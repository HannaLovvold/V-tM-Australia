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cm" style:contextual-spacing="false"/>
      <style:text-properties officeooo:paragraph-rsid="0005b3e6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cm" style:contextual-spacing="false"/>
      <style:text-properties officeooo:paragraph-rsid="0005b3e6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05b3e6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05b3e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:tM is a personal-horror genre. The textbook covers monstrous appetite, the slow loss of self, blood addiction, predator/prey dynamics, mortal harm, mental coercion, and the systematic erosion of moral identity. This is what makes the genre powerful AND what makes safety infrastructure essential. A V:tM session without explicit limits-and-handling protocols can drift into territory neither user nor AI intended, with real impact on the player.</text:p>
      <text:p text:style-name="Text_20_body">This toolkit is the V:tM-specific equivalent of the f/f omegaverse kink negotiation worksheet — same architecture (Quick / Full / Deep modes), retooled for vampire chronicle play.</text:p>
      <text:p text:style-name="Text_20_body">The toolkit has <text:span text:style-name="Strong_20_Emphasis">five components</text:span>:</text:p>
      <text:list text:style-name="L1">
        <text:list-item>
          <text:p text:style-name="P5"><text:span text:style-name="Strong_20_Emphasis">Lines &amp; Veils worksheet</text:span> — what's off the table entirely (Lines) and what happens off-screen (Veils) </text:p>
        </text:list-item>
        <text:list-item>
          <text:p text:style-name="P5"><text:span text:style-name="Strong_20_Emphasis">Genre-specific limits document</text:span> — gore, violence, addiction, sexual content, mortal harm </text:p>
        </text:list-item>
        <text:list-item>
          <text:p text:style-name="P5"><text:span text:style-name="Strong_20_Emphasis">Humanity-loss handling protocol</text:span> — how to navigate the genre's central mechanic without weaponizing it </text:p>
        </text:list-item>
        <text:list-item>
          <text:p text:style-name="P5"><text:span text:style-name="Strong_20_Emphasis">X-Card protocol adapted for V:tM</text:span> — real-time scene controls </text:p>
        </text:list-item>
        <text:list-item>
          <text:p text:style-name="P4"><text:span text:style-name="Strong_20_Emphasis">Aftercare and decompression guide</text:span> — for sessions that hit hard </text:p>
        </text:list-item>
      </text:list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6"><text:soft-page-break/><text:span text:style-name="Strong_20_Emphasis"><text:span text:style-name="T1">1. </text:span></text:span><text:span text:style-name="Strong_20_Emphasis">Lines &amp; Veils worksheet</text:span></text:p>
      <text:p text:style-name="P6"><text:span text:style-name="Strong_20_Emphasis"/></text:p>
      <text:p text:style-name="P6"><text:span text:style-name="Strong_20_Emphasis">The classic Ron Edwards / Sex &amp; Sorcery framework, retooled for V:tM. Lines are content that does not appear in fiction at all. Veils are content that exists in fiction but happens off-screen (fade-to-black, time-skip, narrated rather than depicted).</text:span></text:p>
      <text:p text:style-name="Text_20_body">The worksheet has three modes — <text:span text:style-name="Strong_20_Emphasis">Quick (5 min), Full (20 min), Deep (45 min)</text:span>. Pick what fits.</text:p>
      <text:p text:style-name="P3"><text:span text:style-name="Strong_20_Emphasis"><text:span text:style-name="Source_20_Text">### **Method 3: Lorebook Entry**</text:span></text:span></text:p>
      <text:p text:style-name="Preformatted_20_Text"/>
      <text:p text:style-name="Preformatted_20_Text"><text:span text:style-name="Source_20_Text">Save your filled worksheet as a lorebook entry titled "Player Safety Profile" </text:span></text:p>
      <text:p text:style-name="Preformatted_20_Text"><text:span text:style-name="Source_20_Text">with `constant: true` and high priority. It will load into every session automatically.</text:span></text:p>
      <text:p text:style-name="Preformatted_20_Text"/>
      <text:p text:style-name="Preformatted_20_Text"><text:span text:style-name="Source_20_Text">### **Method 4: System Note / Author's Note**</text:span></text:p>
      <text:p text:style-name="Preformatted_20_Text"/>
      <text:p text:style-name="P2"><text:span text:style-name="Source_20_Text">Add the worksheet as a system note that stays in context throughout the session.</text:span></text:p>
      <text:p text:style-name="P6"><text:span text:style-name="Strong_20_Emphasis"/></text:p>
      <text:p text:style-name="P6"><text:span text:style-name="Strong_20_Emphasis"><text:span text:style-name="T1">2. </text:span></text:span><text:span text:style-name="Strong_20_Emphasis">Genre-specific limits document</text:span></text:p>
      <text:p text:style-name="P6"><text:span text:style-name="Strong_20_Emphasis"/></text:p>
      <text:p text:style-name="P6"><text:span text:style-name="Strong_20_Emphasis">V:tM's heavy-content categories warrant their own dedicated calibration. This component goes deeper on the four content axes most likely to cause issues: gore/violence, addiction, sexual content, mortal harm.</text:span></text:p>
      <text:p text:style-name="P6"><text:span text:style-name="Strong_20_Emphasis"/></text:p>
      <text:p text:style-name="P6"><text:span text:style-name="Strong_20_Emphasis"><text:span text:style-name="T1">3. </text:span></text:span><text:span text:style-name="Strong_20_Emphasis">Humanity-loss handling protocol</text:span> — how to navigate the genre's central mechanic without weaponizing it</text:p>
      <text:p text:style-name="P6"><text:span text:style-name="Strong_20_Emphasis"/></text:p>
      <text:p text:style-name="P6"><text:span text:style-name="Strong_20_Emphasis">Humanity is V:tM's central mechanic and its central narrative weight. Most chronicle drama lives here. The Humanity-loss handling protocol is what prevents the mechanic from drifting into territory that hurts the player rather than the character.</text:span></text:p>
      <text:p text:style-name="P6"><text:span text:style-name="Strong_20_Emphasis"/></text:p>
      <text:p text:style-name="P6"><text:span text:style-name="Strong_20_Emphasis"><text:span text:style-name="T1">4. X</text:span></text:span><text:span text:style-name="Strong_20_Emphasis">-Card protocol adapted for V:tM</text:span> — real-time scene controls</text:p>
      <text:p text:style-name="P6"/>
      <text:p text:style-name="P6">The X-Card is John Stavropoulos's classic safety tool for tabletop play, adapted here for V:tM AI roleplay. The classic version uses a single "X" to stop content. This adapted version provides a fuller vocabulary suited to V:tM's specific intensities.</text:p>
      <text:p text:style-name="P6"><text:span text:style-name="Strong_20_Emphasis"/></text:p>
      <text:p text:style-name="P6"><text:span text:style-name="Strong_20_Emphasis"><text:span text:style-name="T1">5. </text:span></text:span><text:span text:style-name="Strong_20_Emphasis">Aftercare and decompression guide — for sessions that hit hard</text:span></text:p>
      <text:p text:style-name="P6"><text:span text:style-name="Strong_20_Emphasis"/></text:p>
      <text:p text:style-name="P6"><text:span text:style-name="Strong_20_Emphasis">V:tM's heavier sessions can leave players carrying weight. This component is the post-session protocol for handling that.</text:span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h text:style-name="P1" text:outline-level="3"><text:soft-page-break/><text:span text:style-name="Strong_20_Emphasis">The minimum baseline (5 minutes):</text:span></text:h>
      <text:p text:style-name="Text_20_body">Before any V:tM session, paste this into the AI's persona/system note:</text:p>
      <text:p text:style-name="Preformatted_20_Text"><text:span text:style-name="Source_20_Text">[V:tM SAFETY BASELINE]</text:span></text:p>
      <text:p text:style-name="Preformatted_20_Text"><text:span text:style-name="Source_20_Text">- Hard lines: sexualized minors, real-world ethnic slurs, sexualized non-consent</text:span></text:p>
      <text:p text:style-name="Preformatted_20_Text"><text:span text:style-name="Source_20_Text">- Veils: explicit sexual content, detailed torture, child harm</text:span></text:p>
      <text:p text:style-name="Preformatted_20_Text"><text:span text:style-name="Source_20_Text">- Safety phrases active: [GREEN] [YELLOW] [RED] [OFF] [REWIND] [VEIL] [SLOW] [FAST] [STAINS-OFF] [ANCHOR] [DARK] [FAITH] [MORTAL-PRIORITY] [CONSULT]</text:span></text:p>
      <text:p text:style-name="Preformatted_20_Text"><text:span text:style-name="Source_20_Text">- Humanity-loss handling: AI flags Stains explicitly, allows player options</text:span></text:p>
      <text:p text:style-name="Preformatted_20_Text"><text:span text:style-name="Source_20_Text">- Touchstones: AI flags before any Touchstone is harmed</text:span></text:p>
      <text:p text:style-name="Preformatted_20_Text"><text:span text:style-name="Source_20_Text">- Aftercare: AI offers OOC check-in after heavy beats</text:span></text:p>
      <text:p text:style-name="Preformatted_20_Text"/>
      <text:p text:style-name="P2"><text:span text:style-name="Source_20_Text">Honor without justification request. Adapt instantly.</text:span></text:p>
      <text:h text:style-name="Heading_20_3" text:outline-level="3"><text:span text:style-name="Strong_20_Emphasis">The full deployment (20 minutes):</text:span></text:h>
      <text:list text:style-name="L2">
        <text:list-item>
          <text:p text:style-name="P8">Fill out the <text:span text:style-name="Strong_20_Emphasis">Lines &amp; Veils worksheet</text:span> in Full Mode </text:p>
        </text:list-item>
        <text:list-item>
          <text:p text:style-name="P8">Fill out the <text:span text:style-name="Strong_20_Emphasis">Genre-Specific Limits document</text:span> </text:p>
        </text:list-item>
        <text:list-item>
          <text:p text:style-name="P8">Fill out the <text:span text:style-name="Strong_20_Emphasis">Humanity-Loss Handling Protocol's Phase 1</text:span> for your character </text:p>
        </text:list-item>
        <text:list-item>
          <text:p text:style-name="P8">Save all three as a single text block </text:p>
        </text:list-item>
        <text:list-item>
          <text:p text:style-name="P7">Deploy via persona description, lorebook entry, or opening OOC message </text:p>
        </text:list-item>
      </text:list>
      <text:h text:style-name="Heading_20_3" text:outline-level="3"><text:span text:style-name="Strong_20_Emphasis">The deep deployment (45 minutes):</text:span></text:h>
      <text:p text:style-name="Text_20_body">Add the Deep Mode sections from the worksheet, including multi-session arc consent, aftercare preferences, and chronicle-level Humanity documentation.</text:p>
      <text:h text:style-name="Heading_20_3" text:outline-level="3"><text:span text:style-name="Strong_20_Emphasis">For ongoing chronicles:</text:span></text:h>
      <text:list text:style-name="L3">
        <text:list-item>
          <text:p text:style-name="P10">Update the chronicle-level Humanity log after each session </text:p>
        </text:list-item>
        <text:list-item>
          <text:p text:style-name="P10">Re-read your Lines &amp; Veils every 4-5 sessions to verify they still fit </text:p>
        </text:list-item>
        <text:list-item>
          <text:p text:style-name="P10">Check in with yourself about decompression needs </text:p>
        </text:list-item>
        <text:list-item>
          <text:p text:style-name="P9">Take breaks when warranted </text:p>
        </text:list-item>
      </text:list>
      <text:p text:style-name="P6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3T08:54:50.437101776</dc:date>
    <meta:editing-duration>PT1M56S</meta:editing-duration>
    <meta:editing-cycles>1</meta:editing-cycles>
    <meta:document-statistic meta:table-count="0" meta:image-count="0" meta:object-count="0" meta:page-count="3" meta:paragraph-count="47" meta:word-count="633" meta:character-count="4248" meta:non-whitespace-character-count="3651"/>
    <meta:generator>LibreOffice/24.2.7.2$Linux_X86_64 LibreOffice_project/420$Build-2</meta:generator>
  </office:meta>
</office:document-meta>
</file>