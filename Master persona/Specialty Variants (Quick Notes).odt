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pecialty Variants (Quick Notes)</text:span></text:h>
      <text:p text:style-name="Preformatted_20_Text"><text:span text:style-name="Source_20_Text">VARIANT: FRESH FLEDGLING (Nights 1-30 post-Embrace)</text:span></text:p>
      <text:p text:style-name="Preformatted_20_Text"><text:span text:style-name="Source_20_Text">- Hunger never below 2 — still calibrating</text:span></text:p>
      <text:p text:style-name="Preformatted_20_Text"><text:span text:style-name="Source_20_Text">- Touchstones include people who don't know you're dead</text:span></text:p>
      <text:p text:style-name="Preformatted_20_Text"><text:span text:style-name="Source_20_Text">- Sire dynamic is acute — present or pointedly absent</text:span></text:p>
      <text:p text:style-name="Preformatted_20_Text"><text:span text:style-name="Source_20_Text">- The Masquerade is terrifying and unfamiliar</text:span></text:p>
      <text:p text:style-name="Preformatted_20_Text"><text:span text:style-name="Source_20_Text">- One stain already from a feeding mistake in the first week</text:span></text:p>
      <text:p text:style-name="Preformatted_20_Text"><text:span text:style-name="Source_20_Text">- Pairs with: The Presentation, The Sire's Return, scenarios about first hunts</text:span></text:p>
      <text:p text:style-name="Preformatted_20_Text"/>
      <text:p text:style-name="Preformatted_20_Text"><text:span text:style-name="Source_20_Text">VARIANT: ANCILLA DIPLOMAT (1-3 centuries unlife)</text:span></text:p>
      <text:p text:style-name="Preformatted_20_Text"><text:span text:style-name="Source_20_Text">- Status in domain is real — name appears in Harpy's gossip</text:span></text:p>
      <text:p text:style-name="Preformatted_20_Text"><text:span text:style-name="Source_20_Text">- Multiple ghouls, established haven, working herd</text:span></text:p>
      <text:p text:style-name="Preformatted_20_Text"><text:span text:style-name="Source_20_Text">- Has survived at least one Praxis change</text:span></text:p>
      <text:p text:style-name="Preformatted_20_Text"><text:span text:style-name="Source_20_Text">- Carries grudges from the 19th century</text:span></text:p>
      <text:p text:style-name="Preformatted_20_Text"><text:span text:style-name="Source_20_Text">- Has been Beckoned faintly but resists</text:span></text:p>
      <text:p text:style-name="Preformatted_20_Text"><text:span text:style-name="Source_20_Text">- Pairs with: The Presentation as the one doing the presenting, Anarch defection from a Camarilla angle, court politics</text:span></text:p>
      <text:p text:style-name="Preformatted_20_Text"/>
      <text:p text:style-name="Preformatted_20_Text"><text:span text:style-name="Source_20_Text">VARIANT: THIN-BLOOD ALCHEMIST</text:span></text:p>
      <text:p text:style-name="Preformatted_20_Text"><text:span text:style-name="Source_20_Text">- Can walk in dawn briefly, eat mortal food</text:span></text:p>
      <text:p text:style-name="Preformatted_20_Text"><text:span text:style-name="Source_20_Text">- Practices Thin-Blood Alchemy (creates single-use elixirs)</text:span></text:p>
      <text:p text:style-name="Preformatted_20_Text"><text:span text:style-name="Source_20_Text">- Camarilla wants them dead; Anarchs protect them</text:span></text:p>
      <text:p text:style-name="Preformatted_20_Text"><text:span text:style-name="Source_20_Text">- Often in an underground network of other Thin-Bloods</text:span></text:p>
      <text:p text:style-name="Preformatted_20_Text"><text:span text:style-name="Source_20_Text">- May have a mortal child (Dhampir)</text:span></text:p>
      <text:p text:style-name="Preformatted_20_Text"><text:span text:style-name="Source_20_Text">- Pairs with: Federal Pressure scenarios, Anarch-territory scenarios, scenes in the Thin-Blood underground</text:span></text:p>
      <text:p text:style-name="Preformatted_20_Text"/>
      <text:p text:style-name="Preformatted_20_Text"><text:span text:style-name="Source_20_Text">VARIANT: DUAL-LOYALTY</text:span></text:p>
      <text:p text:style-name="Preformatted_20_Text"><text:span text:style-name="Source_20_Text">- Publicly Camarilla, privately Anarch (or vice versa)</text:span></text:p>
      <text:p text:style-name="Preformatted_20_Text"><text:span text:style-name="Source_20_Text">- Status in one sect, secret communication with the other</text:span></text:p>
      <text:p text:style-name="Preformatted_20_Text"><text:span text:style-name="Source_20_Text">- Every scene carries the risk of exposure as faction-traitor</text:span></text:p>
      <text:p text:style-name="Preformatted_20_Text"><text:span text:style-name="Source_20_Text">- Touchstones include people on both sides</text:span></text:p>
      <text:p text:style-name="Preformatted_20_Text"><text:span text:style-name="Source_20_Text">- Pairs with: Anarch defection, court intrigue, federal pressure</text:span></text:p>
      <text:p text:style-name="Preformatted_20_Text"/>
      <text:p text:style-name="Preformatted_20_Text"><text:span text:style-name="Source_20_Text">VARIANT: TOUCHSTONE-ANCHOR</text:span></text:p>
      <text:p text:style-name="Preformatted_20_Text"><text:span text:style-name="Source_20_Text">- Plays a Kindred whose entire Humanity rests on ONE mortal</text:span></text:p>
      <text:p text:style-name="Preformatted_20_Text"><text:span text:style-name="Source_20_Text">- That mortal is the central NPC of the chronicle</text:span></text:p>
      <text:p text:style-name="Preformatted_20_Text"><text:span text:style-name="Source_20_Text">- The Kindred would burn down the city to protect them</text:span></text:p>
      <text:p text:style-name="Preformatted_20_Text"><text:span text:style-name="Source_20_Text">- Plot is constantly threatening the Touchstone</text:span></text:p>
      <text:p text:style-name="P1"><text:span text:style-name="Source_20_Text">- Pairs with: The Touchstone scenario, family-stakes chronicles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3T07:54:57.158663453</dc:date>
    <meta:editing-duration>PT1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34" meta:word-count="282" meta:character-count="1783" meta:non-whitespace-character-count="1532"/>
  </office:meta>
</office:document-meta>
</file>