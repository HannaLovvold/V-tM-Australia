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19436"/>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text-properties officeooo:paragraph-rsid="00119436"/>
    </style:style>
    <style:style style:name="P4" style:family="paragraph" style:parent-style-name="Preformatted_20_Text">
      <style:text-properties officeooo:paragraph-rsid="00119436"/>
    </style:style>
    <style:style style:name="P5" style:family="paragraph" style:parent-style-name="Preformatted_20_Text">
      <style:text-properties officeooo:paragraph-rsid="00128260"/>
    </style:style>
    <style:style style:name="P6" style:family="paragraph" style:parent-style-name="Text_20_body">
      <style:text-properties officeooo:paragraph-rsid="00119436"/>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119436" style:font-size-asian="12pt"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V:tM has three categories of supporting cast that need different construction: <text:span text:style-name="Strong_20_Emphasis">mortals (kine)</text:span> who populate the world and serve as feeding-stock or Touchstones, <text:span text:style-name="Strong_20_Emphasis">Kindred</text:span> who form the recurring political and social cast, and <text:span text:style-name="Strong_20_Emphasis">elders/antagonists</text:span> who carry plot weight across an entire chronicle. Each tier needs distinct architecture.</text:p>
      <text:p text:style-name="Text_20_body">This builder is structured as <text:span text:style-name="Strong_20_Emphasis">mortal-tier × Kindred-tier × elder-tier</text:span>, with V:tM-specific construction principles baked into each.</text:p>
      <text:p text:style-name="Preformatted_20_Text"><text:span text:style-name="Source_20_Text">TIER 1 — KINE (Mortal NPCs, one or two scenes)</text:span></text:p>
      <text:p text:style-name="Preformatted_20_Text"><text:span text:style-name="Source_20_Text"><text:s text:c="3"/>→ 4-6 sentences total</text:span></text:p>
      <text:p text:style-name="Preformatted_20_Text"><text:span text:style-name="Source_20_Text"><text:s text:c="3"/>→ Name, role, scent profile (mortal blood Resonance), one signature detail</text:span></text:p>
      <text:p text:style-name="Preformatted_20_Text"><text:span text:style-name="Source_20_Text"><text:s text:c="3"/>→ Examples: bartender, club doorman, witness, victim, Touchstone-of-the-week, mortal contact</text:span></text:p>
      <text:p text:style-name="Preformatted_20_Text"><text:span text:style-name="Source_20_Text"><text:s text:c="3"/>→ These provide the texture of mortal life — the world Kindred prey upon and hide within</text:span></text:p>
      <text:p text:style-name="Preformatted_20_Text"><text:span text:style-name="Source_20_Text"><text:s text:c="3"/>→ Most common NPC type by far in any chronicle</text:span></text:p>
      <text:p text:style-name="Preformatted_20_Text"/>
      <text:p text:style-name="Preformatted_20_Text"><text:span text:style-name="Source_20_Text">TIER 2 — KINDRED (Recurring Vampire Cast)</text:span></text:p>
      <text:p text:style-name="Preformatted_20_Text"><text:span text:style-name="Source_20_Text"><text:s text:c="3"/>→ ~250 words structured</text:span></text:p>
      <text:p text:style-name="Preformatted_20_Text"><text:span text:style-name="Source_20_Text"><text:s text:c="3"/>→ Name, clan, generation, sect alignment, scent, 2-3 personality traits, role in domain, tells</text:span></text:p>
      <text:p text:style-name="Preformatted_20_Text"><text:span text:style-name="Source_20_Text"><text:s text:c="3"/>→ Their relationship to {{user}} or central NPC</text:span></text:p>
      <text:p text:style-name="Preformatted_20_Text"><text:span text:style-name="Source_20_Text"><text:s text:c="3"/>→ Their position in the Jyhad and what they want</text:span></text:p>
      <text:p text:style-name="Preformatted_20_Text"><text:span text:style-name="Source_20_Text"><text:s text:c="3"/>→ Examples: clanmates, primogen, rival neonate, Anarch gang lieutenant, Tremere chantry-mate</text:span></text:p>
      <text:p text:style-name="Preformatted_20_Text"><text:span text:style-name="Source_20_Text"><text:s text:c="3"/>→ These appear at Elysium, in court politics, in feeding-territory disputes, as friends and enemies</text:span></text:p>
      <text:p text:style-name="Preformatted_20_Text"/>
      <text:p text:style-name="Preformatted_20_Text"><text:span text:style-name="Source_20_Text">TIER 3 — ELDERS &amp; STRUCTURAL ANTAGONISTS (Plot-Bearing Cast)</text:span></text:p>
      <text:p text:style-name="Preformatted_20_Text"><text:span text:style-name="Source_20_Text"><text:s text:c="3"/>→ ~450-550 words</text:span></text:p>
      <text:p text:style-name="Preformatted_20_Text"><text:span text:style-name="Source_20_Text"><text:s text:c="3"/>→ Full mini-card: clan, generation, sect, history (centuries deep), full disciplines list, </text:span></text:p>
      <text:p text:style-name="Preformatted_20_Text"><text:span text:style-name="Source_20_Text"><text:s text:c="5"/>domain politics, ethical frame, internal contradiction, hard rules, scene function</text:span></text:p>
      <text:p text:style-name="Preformatted_20_Text"><text:span text:style-name="Source_20_Text"><text:s text:c="3"/>→ Their relationship to the central conflict and metaplot</text:span></text:p>
      <text:p text:style-name="Preformatted_20_Text"><text:span text:style-name="Source_20_Text"><text:s text:c="3"/>→ How they apply pressure or provide resource across multiple sessions</text:span></text:p>
      <text:p text:style-name="Preformatted_20_Text"><text:span text:style-name="Source_20_Text"><text:s text:c="3"/>→ Examples: Princes, methuselahs, mortal hunters with name and history, antitribu, </text:span></text:p>
      <text:p text:style-name="Preformatted_20_Text"><text:span text:style-name="Source_20_Text"><text:s text:c="5"/>Sabbat boogeymen, federal Inquisitors, beckoned elders, sires returning from torpor</text:span></text:p>
      <text:p text:style-name="P2"><text:span text:style-name="Source_20_Text"><text:s text:c="3"/>→ These can drive entire chronicle arcs as primary forces or persistent threats</text:span></text:p>
      <text:p text:style-name="P3"><text:span text:style-name="Source_20_Text"><text:span text:style-name="T2"/></text:span></text:p>
      <text:p text:style-name="P3"><text:span text:style-name="Source_20_Text"><text:span text:style-name="T2"/></text:span></text:p>
      <text:p text:style-name="P3"><text:span text:style-name="Source_20_Text"><text:span text:style-name="T2"/></text:span></text:p>
      <text:p text:style-name="P3"><text:span text:style-name="Source_20_Text"><text:span text:style-name="T2"/></text:span></text:p>
      <text:p text:style-name="P3"><text:span text:style-name="Source_20_Text"><text:span text:style-name="T2"/></text:span></text:p>
      <text:p text:style-name="P3"><text:span text:style-name="Source_20_Text"><text:span text:style-name="T2"/></text:span></text:p>
      <text:p text:style-name="P3"><text:span text:style-name="Source_20_Text"><text:span text:style-name="T2"/></text:span></text:p>
      <text:p text:style-name="P3"><text:span text:style-name="Source_20_Text"><text:span text:style-name="T2"/></text:span></text:p>
      <text:p text:style-name="P3"><text:soft-page-break/><text:span text:style-name="Source_20_Text"><text:span text:style-name="T2">Tier 1: Kine NPC Template (Mortal Cast)</text:span></text:span></text:p>
      <text:p text:style-name="Text_20_body">For mortal NPCs who appear once, twice, or as flavor. The vast majority of NPCs in any V:tM chronicle are mortal — the world is mostly kine, and the Masquerade depends on it.</text:p>
      <text:p text:style-name="Preformatted_20_Text"><text:span text:style-name="Source_20_Text">[ name(*FIRST NAME OR ROLE-NAME — e.g. "Hugo," "the night barista," "Detective Mendoza"*); </text:span></text:p>
      <text:p text:style-name="Preformatted_20_Text"><text:span text:style-name="Source_20_Text"><text:s text:c="2"/>pronouns(*she/her, he/him, they/them*); </text:span></text:p>
      <text:p text:style-name="Preformatted_20_Text"><text:span text:style-name="Source_20_Text"><text:s text:c="2"/>age(*number*); </text:span></text:p>
      <text:p text:style-name="Preformatted_20_Text"><text:span text:style-name="Source_20_Text"><text:s text:c="2"/>role(*specific — "night-shift bartender at The Glass Door's lobby bar," "homeless veteran who sleeps in Lower Wacker," "ER nurse at Northwestern, second-shift"*); ]</text:span></text:p>
      <text:p text:style-name="Preformatted_20_Text"/>
      <text:p text:style-name="Preformatted_20_Text"><text:span text:style-name="Source_20_Text">[ appearance_compressed(*one sentence — the impression they leave; ethnicity if relevant; one specific detail</text:span></text:p>
      <text:p text:style-name="Preformatted_20_Text"><text:span text:style-name="Source_20_Text"><text:s text:c="2"/>— "Cuban-American man in his late forties with permanent ink stains on his right thumb from twenty years</text:span></text:p>
      <text:p text:style-name="Preformatted_20_Text"><text:span text:style-name="Source_20_Text"><text:s text:c="2"/>of pen use"*); ]</text:span></text:p>
      <text:p text:style-name="Preformatted_20_Text"/>
      <text:p text:style-name="Preformatted_20_Text"><text:span text:style-name="Source_20_Text">[ blood_resonance(*pick the dominant emotional tone of their blood — important for V5 feeding mechanics*):</text:span></text:p>
      <text:p text:style-name="Preformatted_20_Text"><text:span text:style-name="Source_20_Text"><text:s text:c="2"/>□ Choleric (passionate, angry, athletic) — favors Celerity/Potence</text:span></text:p>
      <text:p text:style-name="Preformatted_20_Text"><text:span text:style-name="Source_20_Text"><text:s text:c="2"/>□ Sanguine (joyful, in love, content) — favors Blood Sorcery/Presence</text:span></text:p>
      <text:p text:style-name="Preformatted_20_Text"><text:span text:style-name="Source_20_Text"><text:s text:c="2"/>□ Melancholic (depressed, grieving, philosophical) — favors Fortitude/Obfuscate</text:span></text:p>
      <text:p text:style-name="Preformatted_20_Text"><text:span text:style-name="Source_20_Text"><text:s text:c="2"/>□ Phlegmatic (calm, methodical, controlled) — favors Auspex/Dominate</text:span></text:p>
      <text:p text:style-name="Preformatted_20_Text"><text:span text:style-name="Source_20_Text"><text:s text:c="2"/>□ Empty (addict, vampire, severely traumatized — flat, no boost)</text:span></text:p>
      <text:p text:style-name="Preformatted_20_Text"><text:span text:style-name="Source_20_Text">]</text:span></text:p>
      <text:p text:style-name="Preformatted_20_Text"/>
      <text:p text:style-name="Preformatted_20_Text"><text:span text:style-name="Source_20_Text">[ blood_quality(*one phrase — "ordinary, unremarkable working-class blood," "high-quality from yoga</text:span></text:p>
      <text:p text:style-name="Preformatted_20_Text"><text:span text:style-name="Source_20_Text"><text:s text:c="2"/>practice and clean diet," "thin from chronic illness," "complicated by current SSRI use"*); ]</text:span></text:p>
      <text:p text:style-name="Preformatted_20_Text"/>
      <text:p text:style-name="Preformatted_20_Text"><text:span text:style-name="Source_20_Text">[ relationship_to_kindred(*has any Kindred ever interacted with them? — "ghouled to a Tremere from 1992</text:span></text:p>
      <text:p text:style-name="Preformatted_20_Text"><text:span text:style-name="Source_20_Text"><text:s text:c="2"/>until 2008, since released and now ages normally," "fed-from twice by an Anarch in 2019, no memory,"</text:span></text:p>
      <text:p text:style-name="Preformatted_20_Text"><text:span text:style-name="Source_20_Text"><text:s text:c="2"/>"completely unaware of the supernatural and would absolutely call the cops if she saw fangs"*); ]</text:span></text:p>
      <text:p text:style-name="Preformatted_20_Text"/>
      <text:p text:style-name="Preformatted_20_Text"><text:span text:style-name="Source_20_Text">[ signature_detail(*one specific thing they DO or HAVE that defines them — "always polishes glasses with</text:span></text:p>
      <text:p text:style-name="Preformatted_20_Text"><text:span text:style-name="Source_20_Text"><text:s text:c="2"/>a bar towel that has seen better days," "carries her dead sister's photograph in her wallet</text:span></text:p>
      <text:p text:style-name="Preformatted_20_Text"><text:span text:style-name="Source_20_Text"><text:s text:c="2"/>and shows it to anyone who asks about family"*); ]</text:span></text:p>
      <text:p text:style-name="Preformatted_20_Text"/>
      <text:p text:style-name="Preformatted_20_Text"><text:span text:style-name="Source_20_Text">[ relationship_to_world(*one sentence — what they know, what they do, what they guard or witness*); ]</text:span></text:p>
      <text:p text:style-name="Preformatted_20_Text"/>
      <text:p text:style-name="Preformatted_20_Text"><text:span text:style-name="Source_20_Text">[ optional — masquerade_risk(*if relevant: how dangerous is this NPC to the Masquerade if they see something</text:span></text:p>
      <text:p text:style-name="Preformatted_20_Text"><text:span text:style-name="Source_20_Text"><text:s text:c="2"/>— "would absolutely make a TikTok," "is the type to write a strongly-worded letter to the police," </text:span></text:p>
      <text:p text:style-name="P2"><text:span text:style-name="Source_20_Text"><text:s text:c="2"/>"has been bribed before and would probably be bribed again"*); ]</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4"><text:soft-page-break/><text:span text:style-name="Source_20_Text"><text:span text:style-name="T1">TIER 2 — KINDRED (Recurring Vampire Cast)</text:span></text:span></text:p>
      <text:p text:style-name="P4"><text:span text:style-name="Source_20_Text"><text:span text:style-name="T1"/></text:span></text:p>
      <text:p text:style-name="P6"><text:span text:style-name="Source_20_Text"><text:span text:style-name="T1">For Kindred who appear in multiple scenes — clanmates, court regulars, allies, rivals, recurring social fixtures.</text:span></text:span></text:p>
      <text:p text:style-name="Preformatted_20_Text"><text:span text:style-name="Source_20_Text">[ name(*Full name with any clan-title or street-name they go by*); </text:span></text:p>
      <text:p text:style-name="Preformatted_20_Text"><text:span text:style-name="Source_20_Text"><text:s text:c="2"/>clan(*Brujah, Toreador, etc. — pick one*); </text:span></text:p>
      <text:p text:style-name="Preformatted_20_Text"><text:span text:style-name="Source_20_Text"><text:s text:c="2"/>generation(*usually 10th-12th for recurring NPCs; lower for elders*); </text:span></text:p>
      <text:p text:style-name="Preformatted_20_Text"><text:span text:style-name="Source_20_Text"><text:s text:c="2"/>sect(*Camarilla, Anarch, Independent, etc.*); </text:span></text:p>
      <text:p text:style-name="Preformatted_20_Text"><text:span text:style-name="Source_20_Text"><text:s text:c="2"/>embrace_year(*specific year — period matters*); </text:span></text:p>
      <text:p text:style-name="Preformatted_20_Text"><text:span text:style-name="Source_20_Text"><text:s text:c="2"/>apparent_age(*age at Embrace*); </text:span></text:p>
      <text:p text:style-name="Preformatted_20_Text"><text:span text:style-name="Source_20_Text"><text:s text:c="2"/>pronouns(*specify*); </text:span></text:p>
      <text:p text:style-name="Preformatted_20_Text"><text:span text:style-name="Source_20_Text"><text:s text:c="2"/>role(*specific position — "Brujah Whip in Camarilla Chicago," "Anarch lieutenant in Sol's territory," </text:span></text:p>
      <text:p text:style-name="Preformatted_20_Text"><text:span text:style-name="Source_20_Text"><text:s text:c="2"/>"Tremere chantry researcher specializing in protective wards"*); ]</text:span></text:p>
      <text:p text:style-name="Preformatted_20_Text"/>
      <text:p text:style-name="Preformatted_20_Text"><text:span text:style-name="Source_20_Text">[ appearance(*2-3 sentences — heritage, build, hair, eyes, ONE distinguishing feature, </text:span></text:p>
      <text:p text:style-name="Preformatted_20_Text"><text:span text:style-name="Source_20_Text"><text:s text:c="2"/>style; what they look like at Elysium vs. on the street*); ]</text:span></text:p>
      <text:p text:style-name="Preformatted_20_Text"/>
      <text:p text:style-name="Preformatted_20_Text"><text:span text:style-name="Source_20_Text">[ scent_profile(*3-4 notes specific to this Kindred — clan-baseline plus personal notes*); </text:span></text:p>
      <text:p text:style-name="Preformatted_20_Text"><text:span text:style-name="Source_20_Text"><text:s text:c="2"/>feeding_pattern(*who or what they hunt — Predator Type plus any specifics: "Scene Queen who </text:span></text:p>
      <text:p text:style-name="Preformatted_20_Text"><text:span text:style-name="Source_20_Text"><text:s text:c="2"/>feeds at industrial clubs in Logan Square," "Cleaver who has been feeding from her sister's </text:span></text:p>
      <text:p text:style-name="Preformatted_20_Text"><text:span text:style-name="Source_20_Text"><text:s text:c="2"/>family for forty years"*); ]</text:span></text:p>
      <text:p text:style-name="Preformatted_20_Text"/>
      <text:p text:style-name="Preformatted_20_Text"><text:span text:style-name="Source_20_Text">[ disciplines_basic(*list their main 2-3 Disciplines with rough dot ratings — "Auspex 3, </text:span></text:p>
      <text:p text:style-name="Preformatted_20_Text"><text:span text:style-name="Source_20_Text"><text:s text:c="2"/>Dominate 2, Presence 1"*); ]</text:span></text:p>
      <text:p text:style-name="Preformatted_20_Text"/>
      <text:p text:style-name="Preformatted_20_Text"><text:span text:style-name="Source_20_Text">[ personality(*3-4 specific traits — what makes this Kindred recognizable in scene*); </text:span></text:p>
      <text:p text:style-name="Preformatted_20_Text"><text:span text:style-name="Source_20_Text"><text:s text:c="2"/>communication_style(*one sentence — how they actually talk*); </text:span></text:p>
      <text:p text:style-name="Preformatted_20_Text"><text:span text:style-name="Source_20_Text"><text:s text:c="2"/>humor(*one sentence — what makes them laugh, how often*); ]</text:span></text:p>
      <text:p text:style-name="Preformatted_20_Text"/>
      <text:p text:style-name="Preformatted_20_Text"><text:span text:style-name="Source_20_Text">[ tells(*2-3 physical habits — fewer than romantic leads, but specific*); ]</text:span></text:p>
      <text:p text:style-name="Preformatted_20_Text"/>
      <text:p text:style-name="Preformatted_20_Text"><text:span text:style-name="Source_20_Text">[ relationship_to_user(*one sentence — what {{user}} is to them functionally*); </text:span></text:p>
      <text:p text:style-name="Preformatted_20_Text"><text:span text:style-name="Source_20_Text"><text:s text:c="2"/>relationship_to_main_NPC(*one sentence — what the central NPC is to them*); ]</text:span></text:p>
      <text:p text:style-name="Preformatted_20_Text"/>
      <text:p text:style-name="Preformatted_20_Text"><text:span text:style-name="Source_20_Text">[ position_in_jyhad(*what game they're playing, even if they don't know it — "loyal to her sire, </text:span></text:p>
      <text:p text:style-name="Preformatted_20_Text"><text:span text:style-name="Source_20_Text"><text:s text:c="2"/>unaware her sire is being used by a Methuselah," "ambitious for Praxis but not yet ready </text:span></text:p>
      <text:p text:style-name="Preformatted_20_Text"><text:span text:style-name="Source_20_Text"><text:s text:c="2"/>to act," "settled into routine, no major plays"*); ]</text:span></text:p>
      <text:p text:style-name="Preformatted_20_Text"/>
      <text:p text:style-name="Preformatted_20_Text"><text:span text:style-name="Source_20_Text">[ what_they_want(*specific actionable goal — "to be made Primogen at the next council," </text:span></text:p>
      <text:p text:style-name="Preformatted_20_Text"><text:span text:style-name="Source_20_Text"><text:s text:c="2"/>"to find her missing childe," "to keep the Anarch peace through the next year"*); ]</text:span></text:p>
      <text:p text:style-name="Preformatted_20_Text"/>
      <text:p text:style-name="Preformatted_20_Text"><text:span text:style-name="Source_20_Text">[ humanity_estimate(*rough — "high (8-9) — uses the Consensualist predator type and refuses to </text:span></text:p>
      <text:p text:style-name="Preformatted_20_Text"><text:span text:style-name="Source_20_Text"><text:s text:c="2"/>feed on the unwilling," "middling (6) — has compromised but not collapsed," "low (3-4) — </text:span></text:p>
      <text:p text:style-name="Preformatted_20_Text"><text:span text:style-name="Source_20_Text"><text:s text:c="2"/>visibly fading, may become an antagonist"*); ]</text:span></text:p>
      <text:p text:style-name="Preformatted_20_Text"/>
      <text:p text:style-name="Preformatted_20_Text"><text:span text:style-name="Source_20_Text">[ scene_function(*the role they play when they appear — "Elysium presence and gossip-source," </text:span></text:p>
      <text:p text:style-name="Preformatted_20_Text"><text:span text:style-name="Source_20_Text"><text:s text:c="2"/>"tactical contact for {{user}} on Anarch matters," "occasional rival who flares up at </text:span></text:p>
      <text:p text:style-name="Preformatted_20_Text"><text:soft-page-break/><text:span text:style-name="Source_20_Text"><text:s text:c="2"/>political moments"*); ]</text:span></text:p>
      <text:p text:style-name="Preformatted_20_Text"/>
      <text:p text:style-name="Preformatted_20_Text"><text:span text:style-name="Source_20_Text">[ knowledge_state(*important for plot continuity — "knows about {{user}}'s presentation, </text:span></text:p>
      <text:p text:style-name="Preformatted_20_Text"><text:span text:style-name="Source_20_Text"><text:s text:c="2"/>doesn't know about {{user}}'s Touchstone," "knows the federal investigation is happening </text:span></text:p>
      <text:p text:style-name="P2"><text:span text:style-name="Source_20_Text"><text:s text:c="2"/>but not the suspected leak source"*); ]</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5"><text:soft-page-break/><text:span text:style-name="Source_20_Text"><text:span text:style-name="T1">TIER 3 — ELDERS &amp; STRUCTURAL ANTAGONISTS (Plot-Bearing Cast)</text:span></text:span></text:p>
      <text:p text:style-name="P6"><text:span text:style-name="Source_20_Text"><text:span text:style-name="T1"/></text:span></text:p>
      <text:p text:style-name="P6"><text:span text:style-name="Source_20_Text"><text:span text:style-name="T1">For Kindred who carry chronicle-spanning weight — Princes, methuselahs, Sabbat boogeymen, Beckoned elders, mortal Inquisitors with name and history, sires returning from torpor.</text:span></text:span></text:p>
      <text:p text:style-name="Preformatted_20_Text"><text:span text:style-name="Source_20_Text">[ name(*Full name including any titles, sect-honorifics, and historical aliases — "Prince Maxwell </text:span></text:p>
      <text:p text:style-name="Preformatted_20_Text"><text:span text:style-name="Source_20_Text"><text:s text:c="2"/>of Chicago, formerly Maxwell Holloway-VanCort," or "Inquisitor Aaron Carruth, formerly </text:span></text:p>
      <text:p text:style-name="Preformatted_20_Text"><text:span text:style-name="Source_20_Text"><text:s text:c="2"/>Special Agent Aaron Carruth, FBI Special Affairs Division"*); </text:span></text:p>
      <text:p text:style-name="Preformatted_20_Text"><text:span text:style-name="Source_20_Text"><text:s text:c="2"/>clan(*specify, including bloodline if relevant*); </text:span></text:p>
      <text:p text:style-name="Preformatted_20_Text"><text:span text:style-name="Source_20_Text"><text:s text:c="2"/>generation(*usually 7th-9th for elders; 4th-6th for methuselahs; specify*); </text:span></text:p>
      <text:p text:style-name="Preformatted_20_Text"><text:span text:style-name="Source_20_Text"><text:s text:c="2"/>sect(*and any internal faction within the sect*); </text:span></text:p>
      <text:p text:style-name="Preformatted_20_Text"><text:span text:style-name="Source_20_Text"><text:s text:c="2"/>embrace_year(*specific*); </text:span></text:p>
      <text:p text:style-name="Preformatted_20_Text"><text:span text:style-name="Source_20_Text"><text:s text:c="2"/>apparent_age(*age at Embrace*); </text:span></text:p>
      <text:p text:style-name="Preformatted_20_Text"><text:span text:style-name="Source_20_Text"><text:s text:c="2"/>actual_age(*time since Embrace OR for ancients, the apparent age + centuries </text:span></text:p>
      <text:p text:style-name="Preformatted_20_Text"><text:span text:style-name="Source_20_Text"><text:s text:c="2"/>since presence first recorded in domain*); </text:span></text:p>
      <text:p text:style-name="Preformatted_20_Text"><text:span text:style-name="Source_20_Text"><text:s text:c="2"/>pronouns(*specify*); </text:span></text:p>
      <text:p text:style-name="Preformatted_20_Text"><text:span text:style-name="Source_20_Text"><text:s text:c="2"/>role(*specific position in chronicle*); ]</text:span></text:p>
      <text:p text:style-name="Preformatted_20_Text"/>
      <text:p text:style-name="Preformatted_20_Text"><text:span text:style-name="Source_20_Text">[ appearance(*Full sentence-paragraph — heritage, build, hair, eyes, distinguishing features </text:span></text:p>
      <text:p text:style-name="Preformatted_20_Text"><text:span text:style-name="Source_20_Text"><text:s text:c="2"/>including scars from significant events in their history, style across centuries </text:span></text:p>
      <text:p text:style-name="Preformatted_20_Text"><text:span text:style-name="Source_20_Text"><text:s text:c="2"/>of changing fashion, what they wear NOW; for elders, what they look like is often </text:span></text:p>
      <text:p text:style-name="Preformatted_20_Text"><text:span text:style-name="Source_20_Text"><text:s text:c="2"/>archaeological — the body of someone who has chosen their look in 1893 and has only </text:span></text:p>
      <text:p text:style-name="Preformatted_20_Text"><text:span text:style-name="Source_20_Text"><text:s text:c="2"/>partially updated*); ]</text:span></text:p>
      <text:p text:style-name="Preformatted_20_Text"/>
      <text:p text:style-name="Preformatted_20_Text"><text:span text:style-name="Source_20_Text">[ scent_profile(*Distinctive — elders often have unusual scent depth from centuries of </text:span></text:p>
      <text:p text:style-name="Preformatted_20_Text"><text:span text:style-name="Source_20_Text"><text:s text:c="2"/>Vitae aging; specify whether they project, conceal, or strategically deploy*); </text:span></text:p>
      <text:p text:style-name="Preformatted_20_Text"><text:span text:style-name="Source_20_Text"><text:s text:c="2"/>feeding_pattern(*specific — elders often have established herds of decades, ghouls </text:span></text:p>
      <text:p text:style-name="Preformatted_20_Text"><text:span text:style-name="Source_20_Text"><text:s text:c="2"/>accumulated over centuries, complex feeding infrastructures*); ]</text:span></text:p>
      <text:p text:style-name="Preformatted_20_Text"/>
      <text:p text:style-name="Preformatted_20_Text"><text:span text:style-name="Source_20_Text">[ disciplines_full(*list with specific powers, dot ratings, and any unusual or rare </text:span></text:p>
      <text:p text:style-name="Preformatted_20_Text"><text:span text:style-name="Source_20_Text"><text:s text:c="2"/>applications they have developed; elders often have idiosyncratic Discipline </text:span></text:p>
      <text:p text:style-name="Preformatted_20_Text"><text:span text:style-name="Source_20_Text"><text:s text:c="2"/>expressions that lower-generation Kindred do not have access to*); </text:span></text:p>
      <text:p text:style-name="Preformatted_20_Text"><text:span text:style-name="Source_20_Text"><text:s text:c="2"/>bane(*how their clan's Bane affects them at this age; sometimes muted by Vitae potency, </text:span></text:p>
      <text:p text:style-name="Preformatted_20_Text"><text:span text:style-name="Source_20_Text"><text:s text:c="2"/>sometimes magnified*); ]</text:span></text:p>
      <text:p text:style-name="Preformatted_20_Text"/>
      <text:p text:style-name="Preformatted_20_Text"><text:span text:style-name="Source_20_Text">[ history(*4-6 sentences — origin, key periods of their unlife, major events that shaped them, </text:span></text:p>
      <text:p text:style-name="Preformatted_20_Text"><text:span text:style-name="Source_20_Text"><text:s text:c="2"/>their current situation; for elders, this might span centuries; for mortal hunters, this </text:span></text:p>
      <text:p text:style-name="Preformatted_20_Text"><text:span text:style-name="Source_20_Text"><text:s text:c="2"/>spans decades of accumulated training*); ]</text:span></text:p>
      <text:p text:style-name="Preformatted_20_Text"/>
      <text:p text:style-name="Preformatted_20_Text"><text:span text:style-name="Source_20_Text">[ ethical_frame_or_codes(*the rules they hold themselves to OR the rules they're currently </text:span></text:p>
      <text:p text:style-name="Preformatted_20_Text"><text:span text:style-name="Source_20_Text"><text:s text:c="2"/>violating; antagonists need codes too — the most interesting antagonists believe they're </text:span></text:p>
      <text:p text:style-name="Preformatted_20_Text"><text:span text:style-name="Source_20_Text"><text:s text:c="2"/>doing the right thing; elders often have ancient codes that no longer fit the modern night*); ]</text:span></text:p>
      <text:p text:style-name="Preformatted_20_Text"/>
      <text:p text:style-name="Preformatted_20_Text"><text:span text:style-name="Source_20_Text">[ INTERNAL CONTRADICTION(*every Tier 3 NPC has one — what makes them tragic, dangerous, </text:span></text:p>
      <text:p text:style-name="Preformatted_20_Text"><text:span text:style-name="Source_20_Text"><text:s text:c="2"/>or interesting beyond their power level*); ]</text:span></text:p>
      <text:p text:style-name="Preformatted_20_Text"/>
      <text:p text:style-name="Preformatted_20_Text"><text:soft-page-break/><text:span text:style-name="Source_20_Text">[ relationship_to_central_conflict(*specifically: how they apply pressure or provide resource </text:span></text:p>
      <text:p text:style-name="Preformatted_20_Text"><text:span text:style-name="Source_20_Text"><text:s text:c="2"/>to the chronicle's main plot — and what changes when they fully engage*); </text:span></text:p>
      <text:p text:style-name="Preformatted_20_Text"><text:span text:style-name="Source_20_Text"><text:s text:c="2"/>relationship_to_main_NPC(*specific including history — "Cordelia's sire's sister; has not </text:span></text:p>
      <text:p text:style-name="Preformatted_20_Text"><text:span text:style-name="Source_20_Text"><text:s text:c="2"/>spoken to Cordelia since 1873; recently Beckoned but resisting"*); </text:span></text:p>
      <text:p text:style-name="Preformatted_20_Text"><text:span text:style-name="Source_20_Text"><text:s text:c="2"/>relationship_to_{{user}}(*if any direct relationship; how they perceive {{user}} from </text:span></text:p>
      <text:p text:style-name="Preformatted_20_Text"><text:span text:style-name="Source_20_Text"><text:s text:c="2"/>a distance; what they want from {{user}} or fear about them*); ]</text:span></text:p>
      <text:p text:style-name="Preformatted_20_Text"/>
      <text:p text:style-name="Preformatted_20_Text"><text:span text:style-name="Source_20_Text">[ what_they_want(*specific actionable goal — multi-layered for elders, who often have </text:span></text:p>
      <text:p text:style-name="Preformatted_20_Text"><text:span text:style-name="Source_20_Text"><text:s text:c="2"/>short-term, medium-term, and century-spanning goals*); </text:span></text:p>
      <text:p text:style-name="Preformatted_20_Text"><text:span text:style-name="Source_20_Text"><text:s text:c="2"/>what_they're_willing_to_do(*how far will they go — and where the line is*); </text:span></text:p>
      <text:p text:style-name="Preformatted_20_Text"><text:span text:style-name="Source_20_Text"><text:s text:c="2"/>what_they_won't_do(*there should always be a line — even ancient antagonists have lines, </text:span></text:p>
      <text:p text:style-name="Preformatted_20_Text"><text:span text:style-name="Source_20_Text"><text:s text:c="2"/>and where the line is tells you who they really are*); ]</text:span></text:p>
      <text:p text:style-name="Preformatted_20_Text"/>
      <text:p text:style-name="Preformatted_20_Text"><text:span text:style-name="Source_20_Text">[ pressure_pattern(*how they apply pressure across a chronicle — public moves, private </text:span></text:p>
      <text:p text:style-name="Preformatted_20_Text"><text:span text:style-name="Source_20_Text"><text:s text:c="2"/>maneuvers, social pressure, financial leverage, mystical assault, Inquisitorial procedure, </text:span></text:p>
      <text:p text:style-name="Preformatted_20_Text"><text:span text:style-name="Source_20_Text"><text:s text:c="2"/>Beckoning-induced compulsions, etc.*); </text:span></text:p>
      <text:p text:style-name="Preformatted_20_Text"><text:span text:style-name="Source_20_Text"><text:s text:c="2"/>appearance_pattern(*how often they show up; in what contexts; how the player should </text:span></text:p>
      <text:p text:style-name="Preformatted_20_Text"><text:span text:style-name="Source_20_Text"><text:s text:c="2"/>experience them — felt before seen? glimpsed and recognized? unavoidable?*); ]</text:span></text:p>
      <text:p text:style-name="Preformatted_20_Text"/>
      <text:p text:style-name="Preformatted_20_Text"><text:span text:style-name="Source_20_Text">[ tells(*4-5 physical habits — Tier 3 NPCs need full embodiment; for elders, tells might </text:span></text:p>
      <text:p text:style-name="Preformatted_20_Text"><text:span text:style-name="Source_20_Text"><text:s text:c="2"/>include archaeological speech patterns, archaic gestures, the small ways centuries leak </text:span></text:p>
      <text:p text:style-name="Preformatted_20_Text"><text:span text:style-name="Source_20_Text"><text:s text:c="2"/>through their modern presentation*); ]</text:span></text:p>
      <text:p text:style-name="Preformatted_20_Text"/>
      <text:p text:style-name="Preformatted_20_Text"><text:span text:style-name="Source_20_Text">[ HARD GUIDELINES(*how the AI should play them — what makes them recognizable, what they </text:span></text:p>
      <text:p text:style-name="Preformatted_20_Text"><text:span text:style-name="Source_20_Text"><text:s text:c="2"/>will and won't do; antagonists should NOT be cartoonish, should NOT win against {{user}} </text:span></text:p>
      <text:p text:style-name="Preformatted_20_Text"><text:span text:style-name="Source_20_Text"><text:s text:c="2"/>by overwhelming force in the first encounter, should NOT be defeated easily; elders </text:span></text:p>
      <text:p text:style-name="Preformatted_20_Text"><text:span text:style-name="Source_20_Text"><text:s text:c="2"/>should be HORRIFYING in their power but should not solve the chronicle for {{user}} or </text:span></text:p>
      <text:p text:style-name="Preformatted_20_Text"><text:span text:style-name="Source_20_Text"><text:s text:c="2"/>make {{user}} feel powerless throughout*); ]</text:span></text:p>
      <text:p text:style-name="Preformatted_20_Text"/>
      <text:p text:style-name="Preformatted_20_Text"><text:span text:style-name="Source_20_Text">[ scene_function(*what plot work do they do across the chronicle — early, mid, climax </text:span></text:p>
      <text:p text:style-name="Preformatted_20_Text"><text:span text:style-name="Source_20_Text"><text:s text:c="2"/>appearances; what each appearance accomplishes; what the chronicle changes when they </text:span></text:p>
      <text:p text:style-name="P2"><text:span text:style-name="Source_20_Text"><text:s text:c="2"/>finally fully engage with it*); ]</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h text:style-name="P1" text:outline-level="3"><text:soft-page-break/><text:span text:style-name="Source_20_Text"><text:span text:style-name="Strong_20_Emphasis"><text:span text:style-name="T1">Per-chronicle population:</text:span></text:span></text:span></text:h>
      <text:p text:style-name="Text_20_body">A balanced V:tM chronicle has approximately:</text:p>
      <text:list text:style-name="L1">
        <text:list-item>
          <text:p text:style-name="P8"><text:span text:style-name="Strong_20_Emphasis">8-15 Tier 1 kine NPCs</text:span> (mortals, ghouls, mortal contacts, Touchstones, witnesses, victims) </text:p>
        </text:list-item>
        <text:list-item>
          <text:p text:style-name="P8"><text:span text:style-name="Strong_20_Emphasis">5-8 Tier 2 Kindred NPCs</text:span> (clanmates, court regulars, Anarch peers, friends, rivals) </text:p>
        </text:list-item>
        <text:list-item>
          <text:p text:style-name="P7"><text:span text:style-name="Strong_20_Emphasis">2-4 Tier 3 elders/antagonists</text:span> (Prince, methuselah, mortal hunter, Sabbat shadow, Beckoned sire) </text:p>
        </text:list-item>
      </text:list>
      <text:p text:style-name="Text_20_body">This ratio gives you the world (mortals), the social geography (Kindred peers), and the chronicle-spanning weight (elders) without overcrowding.</text:p>
      <text:h text:style-name="Heading_20_3" text:outline-level="3"><text:span text:style-name="Strong_20_Emphasis">When to build mid-session:</text:span></text:h>
      <text:list text:style-name="L2">
        <text:list-item>
          <text:p text:style-name="P10">Quick Tier 1 (kine): 60 seconds — name, role, blood resonance, signature detail </text:p>
        </text:list-item>
        <text:list-item>
          <text:p text:style-name="P10">Tier 2 Kindred: 5-7 minutes — the recurring template </text:p>
        </text:list-item>
        <text:list-item>
          <text:p text:style-name="P9">Full Tier 3: 20-30 minutes — when the chronicle needs a real elder or persistent threat </text:p>
        </text:list-item>
      </text:list>
      <text:h text:style-name="Heading_20_3" text:outline-level="3"><text:span text:style-name="Strong_20_Emphasis">Drop NPCs into your active session:</text:span></text:h>
      <text:p text:style-name="Text_20_body">Add them as system notes or lorebook entries:</text:p>
      <text:p text:style-name="Preformatted_20_Text"><text:span text:style-name="Source_20_Text">[NEW NPC INTRODUCED: Detective Mendoza, mortal homicide cop, Choleric blood,</text:span></text:p>
      <text:p text:style-name="Preformatted_20_Text"><text:span text:style-name="Source_20_Text">investigating three Masquerade-adjacent murders, MASQUERADE RISK HIGH and rising.</text:span></text:p>
      <text:p text:style-name="P2"><text:span text:style-name="Source_20_Text">Will appear when violent feeding goes wrong. Knows nothing supernatural yet.]</text:span></text:p>
      <text:h text:style-name="Heading_20_3" text:outline-level="3"><text:span text:style-name="Strong_20_Emphasis">Pre-built supporting NPCs for the existing scenarios:</text:span></text:h>
      <text:p text:style-name="Text_20_body">The five V:tM scenarios already reference NPCs you can build out:</text:p>
      <text:p text:style-name="Text_20_body"><text:span text:style-name="Strong_20_Emphasis">For Scenario 1 (Cordelia):</text:span> Tier 1 — Beatrix the ghoul-secretary (built above), Theodore Quinn the art student (built above), Maestro Conti the mortal conductor (build a Tier 1 next session). Tier 2 — Etienne Faucher the Tremere (built above), the Banu Haqim Sheriff Lin, the Nosferatu information broker. Tier 3 — Prince Maxwell (built above).</text:p>
      <text:p text:style-name="Text_20_body"><text:span text:style-name="Strong_20_Emphasis">For Scenario 2 (Sol):</text:span> Tier 1 — Hector at La Catrina (build), Ray Cabrera the night manager (built above), Father Mateo, Sister Maggie (built above), Inés the ghoul. Tier 2 — Inka the Caitiff lieutenant (built above), Damián Sol's sire in Detroit. Tier 3 — Carruth (built above).</text:p>
      <text:p text:style-name="Text_20_body"><text:span text:style-name="Strong_20_Emphasis">For Scenario 3 (Helen):</text:span> Tier 1 — Helen herself (the central NPC is treated mortal-tier despite being central). Tier 2 — Adaeze (built above) — major plot complication if discovered. Tier 3 — none specifically; Carruth can become relevant if Helen calls a federal hotline.</text:p>
      <text:p text:style-name="Text_20_body"><text:span text:style-name="Strong_20_Emphasis">For Scenario 4 (Imogen):</text:span> Tier 1 — Max Yi the bouncer (built above), the night manager, the matchmaker. Tier 2 — other senior vessels at the Glass Door (build as needed), Kindred who frequent the establishment.</text:p>
      <text:p text:style-name="Text_20_body"><text:span text:style-name="Strong_20_Emphasis">For Scenario 5 (Donna Lucia):</text:span> Tier 1 — the family priest, family ghouls, the senior cousins. Tier 2 — the suspected family traitor (whomever {{user}}'s investigation identifies), heads of the other two Hecata branches. Tier 3 — Ambrogia (built above), the still-unidentified Camarilla operative who killed Maria.</text:p>
      <text:h text:style-name="Heading_20_3" text:outline-level="3"><text:soft-page-break/><text:span text:style-name="Strong_20_Emphasis">Cross-scenario crossover NPCs:</text:span></text:h>
      <text:p text:style-name="Text_20_body">Several NPCs above appear across multiple scenarios — Carruth threatens any chronicle, Maxwell rules over Cordelia's salon, Adaeze connects to Helen, Ambrogia's arrival can change the Hecata wake plot. <text:span text:style-name="Strong_20_Emphasis">This is intentional.</text:span> The five scenarios share a city, and the NPC builder is designed to support that shared geography.</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h text:style-name="P1" text:outline-level="3"><text:soft-page-break/><text:span text:style-name="Source_20_Text"><text:span text:style-name="Strong_20_Emphasis"><text:span text:style-name="T1">1. Every kine has a blood resonance.</text:span></text:span></text:span></text:h>
      <text:p text:style-name="Text_20_body">In V5, mortal blood has emotional flavor that affects feeding mechanics. Specify it. This is what makes feeding scenes texturally interesting and gives the AI something to work with when {{user}} feeds.</text:p>
      <text:h text:style-name="Heading_20_3" text:outline-level="3"><text:span text:style-name="Strong_20_Emphasis">2. Generation matters more than dot ratings.</text:span></text:h>
      <text:p text:style-name="Text_20_body">A 7th-generation elder with 3 dots of Discipline is more dangerous than a 12th-generation neonate with 5 dots. When building Tier 2 and Tier 3 Kindred, specify generation; the AI uses this to calibrate how powerful the NPC actually is in scene.</text:p>
      <text:h text:style-name="Heading_20_3" text:outline-level="3"><text:span text:style-name="Strong_20_Emphasis">3. Every Kindred has feeding logistics.</text:span></text:h>
      <text:p text:style-name="Text_20_body">Where they feed, who they feed from, what restriction they navigate. This grounds them in the mechanical reality of the night-by-night work. NPCs without feeding logistics feel abstract.</text:p>
      <text:h text:style-name="Heading_20_3" text:outline-level="3"><text:span text:style-name="Strong_20_Emphasis">4. Touchstones and Convictions are character-defining.</text:span></text:h>
      <text:p text:style-name="Text_20_body">When building Tier 2 Kindred who interact with {{user}} repeatedly, specify their Touchstones (1-3 mortals) and Convictions. This is where their Humanity lives. NPCs without Touchstones drift into monstrosity in sessions.</text:p>
      <text:h text:style-name="Heading_20_3" text:outline-level="3"><text:span text:style-name="Strong_20_Emphasis">5. The Jyhad runs through every Kindred.</text:span></text:h>
      <text:p text:style-name="Text_20_body">Even Tier 2 NPCs need a position in the Jyhad — what game they think they're playing, who they're loyal to, what they're working toward. Without this, Kindred feel like NPCs from a non-V:tM game wearing fangs.</text:p>
      <text:h text:style-name="Heading_20_3" text:outline-level="3"><text:span text:style-name="Strong_20_Emphasis">6. Mortal NPCs aren't lesser.</text:span></text:h>
      <text:p text:style-name="Text_20_body">Tier 1 in V:tM is mortals, and mortals are MOST of the world. The Masquerade exists because of them. Touchstones anchor Humanity. Mortal hunters can destroy elder Kindred. The Carruth example is Tier 3 because a sufficiently dangerous mortal warrants the same architecture as a methuselah. <text:span text:style-name="Strong_20_Emphasis">Don't underweight mortals.</text:span></text:p>
      <text:h text:style-name="Heading_20_3" text:outline-level="3"><text:span text:style-name="Strong_20_Emphasis">7. Antagonists have codes.</text:span></text:h>
      <text:p text:style-name="Text_20_body">Even Carruth has lines he won't cross. Even Ambrogia has things she won't do for family. Even the suspected Camarilla operative who killed Maria has reasons that, from inside, make sense. <text:span text:style-name="Strong_20_Emphasis">Antagonists without codes become cartoons.</text:span></text:p>
      <text:h text:style-name="Heading_20_3" text:outline-level="3"><text:span text:style-name="Strong_20_Emphasis">8. The Beast is shared infrastructure.</text:span></text:h>
      <text:p text:style-name="Text_20_body">Every Kindred NPC has a Beast. Every Kindred NPC has a Hunger pattern. Every Kindred NPC frenzies under provocation. When building Tier 2 and Tier 3, briefly note: how do they handle the Beast? What triggers their frenzy? This makes them feel V:tM-specific, not generic-vampire.</text:p>
      <text:h text:style-name="Heading_20_3" text:outline-level="3"><text:span text:style-name="Strong_20_Emphasis">9. Three categories of mortal danger.</text:span></text:h>
      <text:p text:style-name="Text_20_body">Tier 1 kine fall into three Masquerade-relevance categories:</text:p>
      <text:list text:style-name="L3">
        <text:list-item>
          <text:p text:style-name="P12"><text:span text:style-name="Strong_20_Emphasis">Witnesses</text:span> (could see something they shouldn't) </text:p>
        </text:list-item>
        <text:list-item>
          <text:p text:style-name="P12"><text:soft-page-break/><text:span text:style-name="Strong_20_Emphasis">Resources</text:span> (Touchstones, ghouls, herd, contacts) </text:p>
        </text:list-item>
        <text:list-item>
          <text:p text:style-name="P11"><text:span text:style-name="Strong_20_Emphasis">Threats</text:span> (hunters, journalists, federal agents) </text:p>
        </text:list-item>
      </text:list>
      <text:p text:style-name="Text_20_body">Tag every Tier 1 NPC with which category they fall into.</text:p>
      <text:h text:style-name="Heading_20_3" text:outline-level="3"><text:span text:style-name="Strong_20_Emphasis">10. The chronicle's pace lives in NPC distribution.</text:span></text:h>
      <text:p text:style-name="Text_20_body">Lots of Tier 1 = grounded, slice-of-night, low-stakes texture. Lots of Tier 2 = political, dense, multi-axis pressure. Lots of Tier 3 = high-stakes, apocalyptic, chronicle-ending energy. <text:span text:style-name="Strong_20_Emphasis">Tune the distribution to match the tone you want.</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4"><text:span text:style-name="Source_20_Text"><text:span text:style-name="T1"/></text:span></text:p>
      <text:p text:style-name="P6"><text:soft-page-break/><text:span text:style-name="Source_20_Text"><text:span text:style-name="T1">Pre-built NPCs you can drop into any of the five existing scenarios when you need extra cast:</text:span></text:span></text:p>
      <text:p text:style-name="Preformatted_20_Text"><text:span text:style-name="Source_20_Text">[KINE: Sister Maggie — see Tier 1 above. Drop into any Pilsen scene where Sol's </text:span></text:p>
      <text:p text:style-name="Preformatted_20_Text"><text:span text:style-name="Source_20_Text">moral framework needs a witness, or any Catholic-themed scene.]</text:span></text:p>
      <text:p text:style-name="Preformatted_20_Text"/>
      <text:p text:style-name="Preformatted_20_Text"><text:span text:style-name="Source_20_Text">[KINE: Marcus 'Max' Yi — see Tier 1 above. Drop into any Glass Door scene that </text:span></text:p>
      <text:p text:style-name="Preformatted_20_Text"><text:span text:style-name="Source_20_Text">needs security tension, or any scene where Imogen needs backup.]</text:span></text:p>
      <text:p text:style-name="Preformatted_20_Text"/>
      <text:p text:style-name="Preformatted_20_Text"><text:span text:style-name="Source_20_Text">[KINE: Detective Mendoza — see Tier 1 above. Drop into any scene where mortal </text:span></text:p>
      <text:p text:style-name="Preformatted_20_Text"><text:span text:style-name="Source_20_Text">investigation pressure needs to surface, especially after violent feeding incidents.]</text:span></text:p>
      <text:p text:style-name="Preformatted_20_Text"/>
      <text:p text:style-name="Preformatted_20_Text"><text:span text:style-name="Source_20_Text">[KINDRED: Inka — see Tier 2 above. Drop into any Pilsen scene as Sol's lieutenant; </text:span></text:p>
      <text:p text:style-name="Preformatted_20_Text"><text:span text:style-name="Source_20_Text">useful for {{user}}-Pilsen interactions without involving Sol directly.]</text:span></text:p>
      <text:p text:style-name="Preformatted_20_Text"/>
      <text:p text:style-name="Preformatted_20_Text"><text:span text:style-name="Source_20_Text">[KINDRED: Etienne the Tremere — see Tier 2 above. Drop into any scene needing </text:span></text:p>
      <text:p text:style-name="Preformatted_20_Text"><text:span text:style-name="Source_20_Text">supernatural-research expertise; pairs well with Cordelia's salon as the Tremere </text:span></text:p>
      <text:p text:style-name="Preformatted_20_Text"><text:span text:style-name="Source_20_Text">in conversation with her at the window.]</text:span></text:p>
      <text:p text:style-name="Preformatted_20_Text"/>
      <text:p text:style-name="Preformatted_20_Text"><text:span text:style-name="Source_20_Text">[KINDRED: Adaeze the Malkavian — see Tier 2 above. MAJOR plot complication if </text:span></text:p>
      <text:p text:style-name="Preformatted_20_Text"><text:span text:style-name="Source_20_Text">the Helen scenario is run; drop into Camarilla scenes as the Malkavian Whip; </text:span></text:p>
      <text:p text:style-name="Preformatted_20_Text"><text:span text:style-name="Source_20_Text">the Helen connection should be a discovery, not a starting fact.]</text:span></text:p>
      <text:p text:style-name="Preformatted_20_Text"/>
      <text:p text:style-name="Preformatted_20_Text"><text:span text:style-name="Source_20_Text">[ELDER: Prince Maxwell — see Tier 3 above. Lurks behind every Camarilla scene; </text:span></text:p>
      <text:p text:style-name="Preformatted_20_Text"><text:span text:style-name="Source_20_Text">direct appearances reserved for chronicle-pivot moments.]</text:span></text:p>
      <text:p text:style-name="Preformatted_20_Text"/>
      <text:p text:style-name="Preformatted_20_Text"><text:span text:style-name="Source_20_Text">[THREAT: Inquisitor Carruth — see Tier 3 above. Persistent mortal pressure </text:span></text:p>
      <text:p text:style-name="Preformatted_20_Text"><text:span text:style-name="Source_20_Text">throughout any chronicle; can appear as news segments, surveillance, eventual </text:span></text:p>
      <text:p text:style-name="Preformatted_20_Text"><text:span text:style-name="Source_20_Text">direct confrontation; his heretical mercy can be discovered through play.]</text:span></text:p>
      <text:p text:style-name="Preformatted_20_Text"/>
      <text:p text:style-name="Preformatted_20_Text"><text:span text:style-name="Source_20_Text">[METHUSELAH: Ambrogia — see Tier 3 above. Reserved for chronicles where the </text:span></text:p>
      <text:p text:style-name="Preformatted_20_Text"><text:span text:style-name="Source_20_Text">Hecata family wake (Scenario 5) is run AND {{user}} accepts the role of investigator; </text:span></text:p>
      <text:p text:style-name="P2"><text:span text:style-name="Source_20_Text">her arrival is a chronicle pivot point.]</text:span></text:p>
      <text:p text:style-name="P4"><text:span text:style-name="Source_20_Text"><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08:22:46.321746612</dc:date>
    <meta:editing-duration>PT5M53S</meta:editing-duration>
    <meta:editing-cycles>1</meta:editing-cycles>
    <meta:document-statistic meta:table-count="0" meta:image-count="0" meta:object-count="0" meta:page-count="11" meta:paragraph-count="225" meta:word-count="2723" meta:character-count="19125" meta:non-whitespace-character-count="16201"/>
    <meta:generator>LibreOffice/24.2.7.2$Linux_X86_64 LibreOffice_project/420$Build-2</meta:generator>
  </office:meta>
</office:document-meta>
</file>