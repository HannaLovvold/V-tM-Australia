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left"/>
    </style:style>
    <style:style style:name="Table1.A" style:family="table-column">
      <style:table-column-properties style:column-width="1.531cm"/>
    </style:style>
    <style:style style:name="Table1.B" style:family="table-column">
      <style:table-column-properties style:column-width="2.868cm"/>
    </style:style>
    <style:style style:name="Table1.C" style:family="table-column">
      <style:table-column-properties style:column-width="2.117cm"/>
    </style:style>
    <style:style style:name="Table1.D" style:family="table-column">
      <style:table-column-properties style:column-width="2.78cm"/>
    </style:style>
    <style:style style:name="Table1.E" style:family="table-column">
      <style:table-column-properties style:column-width="7.705cm"/>
    </style:style>
    <style:style style:name="Table1.A1" style:family="table-cell">
      <style:table-cell-properties style:vertical-align="middle" fo:padding="0.049cm" fo:border="none"/>
    </style:style>
    <style:style style:name="Table2" style:family="table">
      <style:table-properties style:width="17cm" table:align="left"/>
    </style:style>
    <style:style style:name="Table2.A" style:family="table-column">
      <style:table-column-properties style:column-width="1.531cm"/>
    </style:style>
    <style:style style:name="Table2.B" style:family="table-column">
      <style:table-column-properties style:column-width="2.947cm"/>
    </style:style>
    <style:style style:name="Table2.C" style:family="table-column">
      <style:table-column-properties style:column-width="2.189cm"/>
    </style:style>
    <style:style style:name="Table2.D" style:family="table-column">
      <style:table-column-properties style:column-width="2.917cm"/>
    </style:style>
    <style:style style:name="Table2.E" style:family="table-column">
      <style:table-column-properties style:column-width="7.415cm"/>
    </style:style>
    <style:style style:name="Table2.A1" style:family="table-cell">
      <style:table-cell-properties style:vertical-align="middle" fo:padding="0.049cm" fo:border="none"/>
    </style:style>
    <style:style style:name="Table3" style:family="table">
      <style:table-properties style:width="17cm" table:align="left"/>
    </style:style>
    <style:style style:name="Table3.A" style:family="table-column">
      <style:table-column-properties style:column-width="1.531cm"/>
    </style:style>
    <style:style style:name="Table3.B" style:family="table-column">
      <style:table-column-properties style:column-width="2.976cm"/>
    </style:style>
    <style:style style:name="Table3.C" style:family="table-column">
      <style:table-column-properties style:column-width="2.028cm"/>
    </style:style>
    <style:style style:name="Table3.D" style:family="table-column">
      <style:table-column-properties style:column-width="2.401cm"/>
    </style:style>
    <style:style style:name="Table3.E" style:family="table-column">
      <style:table-column-properties style:column-width="8.065cm"/>
    </style:style>
    <style:style style:name="Table3.A1" style:family="table-cell">
      <style:table-cell-properties style:vertical-align="middle" fo:padding="0.049cm" fo:border="none"/>
    </style:style>
    <style:style style:name="P1" style:family="paragraph" style:parent-style-name="Preformatted_20_Text">
      <style:paragraph-properties fo:margin-top="0cm" fo:margin-bottom="0.499cm" style:contextual-spacing="false"/>
    </style:style>
    <style:style style:name="P2" style:family="paragraph" style:parent-style-name="Text_20_body" style:list-style-name="L1"/>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2"/>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style style:name="P7" style:family="paragraph" style:parent-style-name="Text_20_body" style:list-style-name="L3">
      <style:paragraph-properties fo:margin-top="0cm" fo:margin-bottom="0cm" style:contextual-spacing="false"/>
    </style:style>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5">
      <style:paragraph-properties fo:margin-top="0cm" fo:margin-bottom="0cm" style:contextual-spacing="false"/>
    </style:style>
    <style:style style:name="P11" style:family="paragraph" style:parent-style-name="Text_20_body" style:list-style-name="L6"/>
    <style:style style:name="P12" style:family="paragraph" style:parent-style-name="Text_20_body" style:list-style-name="L6">
      <style:paragraph-properties fo:margin-top="0cm" fo:margin-bottom="0cm" style:contextual-spacing="false"/>
    </style:style>
    <style:style style:name="P13" style:family="paragraph" style:parent-style-name="Text_20_body" style:list-style-name="L7"/>
    <style:style style:name="P14" style:family="paragraph" style:parent-style-name="Text_20_body" style:list-style-name="L7">
      <style:paragraph-properties fo:margin-top="0cm" fo:margin-bottom="0cm" style:contextual-spacing="false"/>
    </style:style>
    <style:style style:name="P15" style:family="paragraph" style:parent-style-name="Text_20_body" style:list-style-name="L8"/>
    <style:style style:name="P16" style:family="paragraph" style:parent-style-name="Text_20_body" style:list-style-name="L8">
      <style:paragraph-properties fo:margin-top="0cm" fo:margin-bottom="0cm" style:contextual-spacing="false"/>
    </style:style>
    <style:style style:name="P17" style:family="paragraph" style:parent-style-name="Text_20_body" style:list-style-name="L9"/>
    <style:style style:name="P18" style:family="paragraph" style:parent-style-name="Text_20_body" style:list-style-name="L9">
      <style:paragraph-properties fo:margin-top="0cm" fo:margin-bottom="0cm" style:contextual-spacing="false"/>
    </style:style>
    <style:style style:name="P19" style:family="paragraph" style:parent-style-name="Text_20_body" style:list-style-name="L10"/>
    <style:style style:name="P20" style:family="paragraph" style:parent-style-name="Text_20_body" style:list-style-name="L10">
      <style:paragraph-properties fo:margin-top="0cm" fo:margin-bottom="0cm" style:contextual-spacing="false"/>
    </style:style>
    <style:style style:name="P21" style:family="paragraph" style:parent-style-name="Text_20_body" style:list-style-name="L11"/>
    <style:style style:name="P22" style:family="paragraph" style:parent-style-name="Text_20_body" style:list-style-name="L11">
      <style:paragraph-properties fo:margin-top="0cm" fo:margin-bottom="0cm" style:contextual-spacing="false"/>
    </style:style>
    <style:style style:name="P23" style:family="paragraph" style:parent-style-name="Text_20_body" style:list-style-name="L12"/>
    <style:style style:name="P24" style:family="paragraph" style:parent-style-name="Text_20_body" style:list-style-name="L12">
      <style:paragraph-properties fo:margin-top="0cm" fo:margin-bottom="0cm" style:contextual-spacing="false"/>
    </style:style>
    <style:style style:name="P25" style:family="paragraph" style:parent-style-name="Text_20_body" style:list-style-name="L13"/>
    <style:style style:name="P26" style:family="paragraph" style:parent-style-name="Text_20_body" style:list-style-name="L13">
      <style:paragraph-properties fo:margin-top="0cm" fo:margin-bottom="0cm" style:contextual-spacing="false"/>
    </style:style>
    <style:style style:name="P27" style:family="paragraph" style:parent-style-name="Text_20_body" style:list-style-name="L14"/>
    <style:style style:name="P28" style:family="paragraph" style:parent-style-name="Text_20_body" style:list-style-name="L14">
      <style:paragraph-properties fo:margin-top="0cm" fo:margin-bottom="0cm" style:contextual-spacing="false"/>
    </style:style>
    <style:style style:name="P29" style:family="paragraph" style:parent-style-name="Text_20_body" style:list-style-name="L15"/>
    <style:style style:name="P30" style:family="paragraph" style:parent-style-name="Text_20_body" style:list-style-name="L15">
      <style:paragraph-properties fo:margin-top="0cm" fo:margin-bottom="0cm" style:contextual-spacing="false"/>
    </style:style>
    <style:style style:name="P31" style:family="paragraph" style:parent-style-name="Text_20_body" style:list-style-name="L16"/>
    <style:style style:name="P32" style:family="paragraph" style:parent-style-name="Text_20_body" style:list-style-name="L16">
      <style:paragraph-properties fo:margin-top="0cm" fo:margin-bottom="0cm" style:contextual-spacing="false"/>
    </style:style>
    <style:style style:name="P33" style:family="paragraph" style:parent-style-name="Text_20_body" style:list-style-name="L17"/>
    <style:style style:name="P34" style:family="paragraph" style:parent-style-name="Text_20_body" style:list-style-name="L17">
      <style:paragraph-properties fo:margin-top="0cm" fo:margin-bottom="0cm" style:contextual-spacing="false"/>
    </style:style>
    <style:style style:name="P35" style:family="paragraph" style:parent-style-name="Text_20_body" style:list-style-name="L18"/>
    <style:style style:name="P36" style:family="paragraph" style:parent-style-name="Text_20_body" style:list-style-name="L18">
      <style:paragraph-properties fo:margin-top="0cm" fo:margin-bottom="0cm" style:contextual-spacing="false"/>
    </style:style>
    <style:style style:name="P37" style:family="paragraph" style:parent-style-name="Text_20_body" style:list-style-name="L19"/>
    <style:style style:name="P38" style:family="paragraph" style:parent-style-name="Text_20_body" style:list-style-name="L19">
      <style:paragraph-properties fo:margin-top="0cm" fo:margin-bottom="0cm" style:contextual-spacing="false"/>
    </style:style>
    <style:style style:name="P39" style:family="paragraph" style:parent-style-name="Text_20_body" style:list-style-name="L20"/>
    <style:style style:name="P40" style:family="paragraph" style:parent-style-name="Text_20_body" style:list-style-name="L20">
      <style:paragraph-properties fo:margin-top="0cm" fo:margin-bottom="0cm" style:contextual-spacing="false"/>
    </style:style>
    <style:style style:name="P41" style:family="paragraph" style:parent-style-name="Text_20_body" style:list-style-name="L21"/>
    <style:style style:name="P42" style:family="paragraph" style:parent-style-name="Text_20_body" style:list-style-name="L21">
      <style:paragraph-properties fo:margin-top="0cm" fo:margin-bottom="0cm" style:contextual-spacing="false"/>
    </style:style>
    <style:style style:name="P43" style:family="paragraph" style:parent-style-name="Text_20_body" style:list-style-name="L22"/>
    <style:style style:name="P44" style:family="paragraph" style:parent-style-name="Text_20_body" style:list-style-name="L22">
      <style:paragraph-properties fo:margin-top="0cm" fo:margin-bottom="0cm" style:contextual-spacing="false"/>
    </style:style>
    <style:style style:name="P45" style:family="paragraph" style:parent-style-name="Text_20_body" style:list-style-name="L23"/>
    <style:style style:name="P46" style:family="paragraph" style:parent-style-name="Text_20_body" style:list-style-name="L23">
      <style:paragraph-properties fo:margin-top="0cm" fo:margin-bottom="0cm" style:contextual-spacing="false"/>
    </style:style>
    <style:style style:name="P47" style:family="paragraph" style:parent-style-name="Text_20_body" style:list-style-name="L24"/>
    <style:style style:name="P48" style:family="paragraph" style:parent-style-name="Text_20_body" style:list-style-name="L24">
      <style:paragraph-properties fo:margin-top="0cm" fo:margin-bottom="0cm" style:contextual-spacing="false"/>
    </style:style>
    <style:style style:name="P49" style:family="paragraph" style:parent-style-name="Text_20_body" style:list-style-name="L25"/>
    <style:style style:name="P50" style:family="paragraph" style:parent-style-name="Text_20_body" style:list-style-name="L25">
      <style:paragraph-properties fo:margin-top="0cm" fo:margin-bottom="0cm" style:contextual-spacing="false"/>
    </style:style>
    <style:style style:name="P51" style:family="paragraph" style:parent-style-name="Text_20_body" style:list-style-name="L26"/>
    <style:style style:name="P52" style:family="paragraph" style:parent-style-name="Text_20_body" style:list-style-name="L26">
      <style:paragraph-properties fo:margin-top="0cm" fo:margin-bottom="0cm" style:contextual-spacing="false"/>
    </style:style>
    <style:style style:name="P53" style:family="paragraph" style:parent-style-name="Text_20_body" style:list-style-name="L27"/>
    <style:style style:name="P54" style:family="paragraph" style:parent-style-name="Text_20_body" style:list-style-name="L27">
      <style:paragraph-properties fo:margin-top="0cm" fo:margin-bottom="0cm" style:contextual-spacing="false"/>
    </style:style>
    <style:style style:name="P55" style:family="paragraph" style:parent-style-name="Text_20_body" style:list-style-name="L28"/>
    <style:style style:name="P56" style:family="paragraph" style:parent-style-name="Text_20_body" style:list-style-name="L28">
      <style:paragraph-properties fo:margin-top="0cm" fo:margin-bottom="0cm" style:contextual-spacing="false"/>
    </style:style>
    <style:style style:name="P57" style:family="paragraph" style:parent-style-name="Text_20_body" style:list-style-name="L29"/>
    <style:style style:name="P58" style:family="paragraph" style:parent-style-name="Text_20_body" style:list-style-name="L29">
      <style:paragraph-properties fo:margin-top="0cm" fo:margin-bottom="0cm" style:contextual-spacing="false"/>
    </style:style>
    <style:style style:name="P59" style:family="paragraph" style:parent-style-name="Text_20_body" style:list-style-name="L30"/>
    <style:style style:name="P60" style:family="paragraph" style:parent-style-name="Text_20_body" style:list-style-name="L30">
      <style:paragraph-properties fo:margin-top="0cm" fo:margin-bottom="0cm" style:contextual-spacing="false"/>
    </style:style>
    <style:style style:name="P61" style:family="paragraph" style:parent-style-name="Text_20_body" style:list-style-name="L31"/>
    <style:style style:name="P62" style:family="paragraph" style:parent-style-name="Text_20_body" style:list-style-name="L31">
      <style:paragraph-properties fo:margin-top="0cm" fo:margin-bottom="0cm" style:contextual-spacing="false"/>
    </style:style>
    <style:style style:name="P63" style:family="paragraph" style:parent-style-name="Text_20_body" style:list-style-name="L32"/>
    <style:style style:name="P64" style:family="paragraph" style:parent-style-name="Text_20_body" style:list-style-name="L32">
      <style:paragraph-properties fo:margin-top="0cm" fo:margin-bottom="0cm" style:contextual-spacing="false"/>
    </style:style>
    <style:style style:name="P65" style:family="paragraph" style:parent-style-name="Text_20_body" style:list-style-name="L33"/>
    <style:style style:name="P66" style:family="paragraph" style:parent-style-name="Text_20_body" style:list-style-name="L33">
      <style:paragraph-properties fo:margin-top="0cm" fo:margin-bottom="0cm" style:contextual-spacing="false"/>
    </style:style>
    <style:style style:name="P67" style:family="paragraph" style:parent-style-name="Text_20_body" style:list-style-name="L34"/>
    <style:style style:name="P68" style:family="paragraph" style:parent-style-name="Text_20_body" style:list-style-name="L34">
      <style:paragraph-properties fo:margin-top="0cm" fo:margin-bottom="0cm" style:contextual-spacing="false"/>
    </style:style>
    <style:style style:name="P69" style:family="paragraph" style:parent-style-name="Text_20_body" style:list-style-name="L35"/>
    <style:style style:name="P70" style:family="paragraph" style:parent-style-name="Text_20_body" style:list-style-name="L35">
      <style:paragraph-properties fo:margin-top="0cm" fo:margin-bottom="0cm" style:contextual-spacing="false"/>
    </style:style>
    <style:style style:name="P71" style:family="paragraph" style:parent-style-name="Text_20_body" style:list-style-name="L36"/>
    <style:style style:name="P72" style:family="paragraph" style:parent-style-name="Text_20_body" style:list-style-name="L36">
      <style:paragraph-properties fo:margin-top="0cm" fo:margin-bottom="0cm" style:contextual-spacing="fals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A meta-document for designing and running multi-session chronicle arcs at the kit's full scope range. This guide parallels the f/f arc-level consent block (which addresses arc-level consent calibration for relationship arcs) by providing arc-level pacing calibration for chronicle arcs at scales from single-arc chronicles through multi-chronicle continental campaigns.</text:p>
      <text:p text:style-name="Text_20_body"><text:span text:style-name="Strong_20_Emphasis">Editorial note:</text:span> Maintaining practical instructional prose throughout — the format that has produced the cleanest discipline on the verbal-tic issue across recent documents.</text:p>
      <text:p text:style-name="Text_20_body"><text:span text:style-name="Strong_20_Emphasis">Position in the kit:</text:span> This guide sits alongside the Chronicle Design Prep Guide as the two meta-documents for chronicle preparation: the Design guide addresses <text:span text:style-name="Emphasis">what chronicle to build</text:span>, while this guide addresses <text:span text:style-name="Emphasis">how to pace the chronicle across multiple sessions</text:span>. The two documents together cover the full chronicle preparation workflow.</text:p>
      <text:p text:style-name="Text_20_body"><text:span text:style-name="Strong_20_Emphasis">Audience:</text:span> Storytellers preparing multi-session chronicles, AI prompt designers calibrating session-level pacing, players who want to understand arc-level pacing decisions their Storyteller is making.</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Text_20_body"><text:soft-page-break/>Every multi-session chronicle operates at five distinct pacing layers simultaneously. Each layer has its own pacing logic; failure to engage a layer produces specific pacing failure modes; engaging all five layers produces chronicle pacing that sustains across multi-session play.</text:p>
      <text:h text:style-name="Heading_20_3" text:outline-level="3"><text:span text:style-name="Strong_20_Emphasis">Layer 1: Scene-level pacing (within-session)</text:span></text:h>
      <text:p text:style-name="Text_20_body">The smallest pacing unit. Scene-level pacing addresses how individual scenes within a session resolve — how long a scene runs before the next scene begins, how scene transitions handle, how within-scene tension develops and releases.</text:p>
      <text:p text:style-name="Text_20_body"><text:span text:style-name="Strong_20_Emphasis">Scene-level pacing decisions:</text:span></text:p>
      <text:list text:style-name="L1">
        <text:list-item>
          <text:p text:style-name="P3"><text:span text:style-name="Strong_20_Emphasis">Scene length</text:span> — short (3-5 minutes of play, single exchange), medium (10-15 minutes, structured exchange with multiple beats), long (25-40 minutes, extended development including character introspection, tactical resolution, or institutional negotiation) </text:p>
        </text:list-item>
        <text:list-item>
          <text:p text:style-name="P3"><text:span text:style-name="Strong_20_Emphasis">Scene type</text:span> — institutional (court occasions, formal correspondence, institutional meetings), interpersonal (one-on-one conversations, intimate exchanges), tactical (combat, infiltration, investigation), atmospheric (travel, observation, sensory texture) </text:p>
        </text:list-item>
        <text:list-item>
          <text:p text:style-name="P2"><text:span text:style-name="Strong_20_Emphasis">Scene transition</text:span> — hard cut (immediate transition to next scene), soft transition (narrative bridge), montage (multiple short scenes representing extended chronological period) </text:p>
        </text:list-item>
      </text:list>
      <text:p text:style-name="Text_20_body"><text:span text:style-name="Strong_20_Emphasis">Scene-level pacing diagnostic:</text:span> <text:span text:style-name="Emphasis">Are scenes the right length for what they're doing?</text:span></text:p>
      <text:p text:style-name="Text_20_body">Institutional scenes typically run medium-to-long; interpersonal scenes vary widely; tactical scenes typically run medium with occasional long extensions for chronicle-defining tactical moments; atmospheric scenes typically run short-to-medium and benefit from compression.</text:p>
      <text:p text:style-name="Text_20_body"><text:span text:style-name="Strong_20_Emphasis">Common scene-level failure mode:</text:span> Atmospheric scenes running long (becoming tedious), tactical scenes running short (becoming insufficient for chronicle-active stakes), institutional scenes either too short (failing to develop institutional weight) or too long (becoming tedious institutional exposition).</text:p>
      <text:h text:style-name="Heading_20_3" text:outline-level="3"><text:span text:style-name="Strong_20_Emphasis">Layer 2: Session-level pacing</text:span></text:h>
      <text:p text:style-name="Text_20_body">The session is the kit's primary pacing unit. Session-level pacing addresses how scenes assemble within a single session — what scenes belong together, what scene types alternate, how session-level tension develops and releases.</text:p>
      <text:p text:style-name="Text_20_body"><text:span text:style-name="Strong_20_Emphasis">Session-level pacing structure:</text:span></text:p>
      <text:p text:style-name="Text_20_body">A well-paced session typically contains:</text:p>
      <text:list text:style-name="L2">
        <text:list-item>
          <text:p text:style-name="P5"><text:span text:style-name="Strong_20_Emphasis">1 opening scene</text:span> establishing session position relative to chronicle arc (5-10 minutes) </text:p>
        </text:list-item>
        <text:list-item>
          <text:p text:style-name="P5"><text:span text:style-name="Strong_20_Emphasis">2-4 development scenes</text:span> producing chronicle development at appropriate pacing variation (60-120 minutes total) </text:p>
        </text:list-item>
        <text:list-item>
          <text:p text:style-name="P5"><text:span text:style-name="Strong_20_Emphasis">1 climactic scene or major chronicle development</text:span> (15-30 minutes) </text:p>
        </text:list-item>
        <text:list-item>
          <text:p text:style-name="P4"><text:span text:style-name="Strong_20_Emphasis">1 closing scene</text:span> establishing chronicle position for next session (5-10 minutes) </text:p>
        </text:list-item>
      </text:list>
      <text:p text:style-name="Text_20_body">Total session length typically 90-180 minutes of chronicle-active play (in-person sessions often run longer; AI-prompted sessions may run shorter or longer depending on player engagement).</text:p>
      <text:p text:style-name="Text_20_body"><text:span text:style-name="Strong_20_Emphasis">Session-level pacing decisions:</text:span></text:p>
      <text:list text:style-name="L3">
        <text:list-item>
          <text:p text:style-name="P7"><text:soft-page-break/><text:span text:style-name="Strong_20_Emphasis">Session shape</text:span> — rising action (tension builds toward session climax), constant tension (sustained chronicle pressure throughout), rest session (deliberate lower-tension session for character development and chronicle texture), pivot session (session that produces major chronicle direction change) </text:p>
        </text:list-item>
        <text:list-item>
          <text:p text:style-name="P7"><text:span text:style-name="Strong_20_Emphasis">Scene-type alternation</text:span> — sessions benefit from scene-type variation (institutional + interpersonal + tactical + atmospheric in some combination); single-type sessions often produce flatness </text:p>
        </text:list-item>
        <text:list-item>
          <text:p text:style-name="P6"><text:span text:style-name="Strong_20_Emphasis">Session climax</text:span> — most sessions benefit from identified climactic scene where chronicle pressure resolves at session-level scale even if chronicle-arc pressure continues </text:p>
        </text:list-item>
      </text:list>
      <text:p text:style-name="Text_20_body"><text:span text:style-name="Strong_20_Emphasis">Session-level pacing diagnostic:</text:span> <text:span text:style-name="Emphasis">Does each session produce identifiable chronicle development, or do sessions blur together without distinct chronicle progression?</text:span></text:p>
      <text:p text:style-name="Text_20_body"><text:span text:style-name="Strong_20_Emphasis">Common session-level failure mode:</text:span> Sessions running without identified climactic scene (chronicle pressure builds but never resolves at session-level scale), sessions running at single scene-type (flatness), sessions running at constant maximum tension (exhausting players without adequate rest).</text:p>
      <text:h text:style-name="Heading_20_3" text:outline-level="3"><text:span text:style-name="Strong_20_Emphasis">Layer 3: Arc-level pacing</text:span></text:h>
      <text:p text:style-name="Text_20_body">The arc is the kit's chronicle organisational unit — a chronicle arc typically runs 4-7 sessions (short arc), 8-12 sessions (standard arc), or 13-20 sessions (extended arc). Arc-level pacing addresses how sessions assemble within a chronicle arc — what session types follow what, how arc-level tension develops, how the arc resolves toward chronicle-defining moment.</text:p>
      <text:p text:style-name="Text_20_body"><text:span text:style-name="Strong_20_Emphasis">Arc-level structural pattern:</text:span></text:p>
      <text:p text:style-name="Text_20_body">The classic arc structure operates in five phases:</text:p>
      <text:list text:style-name="L4">
        <text:list-item>
          <text:p text:style-name="P8"><text:span text:style-name="Strong_20_Emphasis">Setup phase (sessions 1-2 of arc)</text:span> — Establishing arc situation, introducing arc-specific antagonists, identifying arc-specific chronicle hooks. Typical pacing: rising action sessions with early development scenes.</text:p>
        </text:list-item>
        <text:list-item>
          <text:p text:style-name="P8"><text:span text:style-name="Strong_20_Emphasis">Rising action phase (sessions 3-4 of standard arc, sessions 3-7 of extended arc)</text:span> — Arc complications develop, antagonist pressure increases, player character institutional positioning becomes operationally engaged. Typical pacing: alternating rising-action and constant-tension sessions with periodic rest sessions.</text:p>
        </text:list-item>
        <text:list-item>
          <text:p text:style-name="P8"><text:span text:style-name="Strong_20_Emphasis">Mid-arc complication (session 5-6 of standard arc, sessions 8-10 of extended arc)</text:span> — Major chronicle development that changes arc trajectory, often through unexpected antagonist development or player character institutional positioning shift. Typical pacing: pivot session producing major chronicle direction change.</text:p>
        </text:list-item>
        <text:list-item>
          <text:p text:style-name="P8"><text:span text:style-name="Strong_20_Emphasis">Climax buildup (sessions 7-9 of standard arc, sessions 11-15 of extended arc)</text:span> — Arc tension intensifies toward chronicle-defining moment, player characters position for arc climax engagement. Typical pacing: rising action sessions with increasing chronicle pressure.</text:p>
        </text:list-item>
        <text:list-item>
          <text:p text:style-name="P8"><text:span text:style-name="Strong_20_Emphasis">Climax and resolution (sessions 10-12 of standard arc, sessions 16-20 of extended arc)</text:span> — Arc-defining moment resolves, post-climax chronicle development establishes arc resolution and continuing chronicle position. Typical pacing: climactic session followed by <text:soft-page-break/>1-2 resolution sessions.</text:p>
        </text:list-item>
      </text:list>
      <text:p text:style-name="Text_20_body"><text:span text:style-name="Strong_20_Emphasis">Arc-level pacing decisions:</text:span></text:p>
      <text:list text:style-name="L5">
        <text:list-item>
          <text:p text:style-name="P10"><text:span text:style-name="Strong_20_Emphasis">Arc length</text:span> — short, standard, or extended arc length depending on chronicle scope and chronicle commitment </text:p>
        </text:list-item>
        <text:list-item>
          <text:p text:style-name="P10"><text:span text:style-name="Strong_20_Emphasis">Arc shape</text:span> — single-climax arc (one chronicle-defining moment at arc end), double-climax arc (mid-arc pivot plus arc-end climax), continuing-tension arc (sustained chronicle pressure without single chronicle-defining moment, common in continental scope chronicles) </text:p>
        </text:list-item>
        <text:list-item>
          <text:p text:style-name="P9"><text:span text:style-name="Strong_20_Emphasis">Arc resolution depth</text:span> — full resolution (arc-defining moment produces chronicle direction change), partial resolution (arc resolves locally but continuing chronicle pressure continues to subsequent arc), open resolution (arc ends with continuing chronicle pressure unresolved, requiring subsequent arc engagement) </text:p>
        </text:list-item>
      </text:list>
      <text:p text:style-name="Text_20_body"><text:span text:style-name="Strong_20_Emphasis">Arc-level pacing diagnostic:</text:span> <text:span text:style-name="Emphasis">Does the arc structure support the chronicle-defining moment the arc is building toward?</text:span></text:p>
      <text:p text:style-name="Text_20_body"><text:span text:style-name="Strong_20_Emphasis">Common arc-level failure mode:</text:span> Arc structure misaligned with arc length (extended arc structure compressed into short arc producing rushed climax; short arc structure stretched across extended arc producing sagging middle), arc resolution mismatch with chronicle scope (full resolution in continental scope chronicles producing premature chronicle conclusion; open resolution in single-coterie chronicles producing player frustration).</text:p>
      <text:h text:style-name="Heading_20_3" text:outline-level="3"><text:span text:style-name="Strong_20_Emphasis">Layer 4: Chronicle-level pacing</text:span></text:h>
      <text:p text:style-name="Text_20_body">The chronicle is multiple arcs assembled into a single chronicle scope — a chronicle typically runs 1 arc (single-arc chronicle, 8-12 sessions), 2-3 arcs (standard chronicle, 15-30 sessions), or 4+ arcs (extended chronicle / multi-chronicle campaign, 30+ sessions). Chronicle-level pacing addresses how arcs assemble within a chronicle — what arc types follow what, how chronicle-level tension develops across arcs, how the chronicle resolves toward chronicle-defining moment.</text:p>
      <text:p text:style-name="Text_20_body"><text:span text:style-name="Strong_20_Emphasis">Chronicle-level structural pattern:</text:span></text:p>
      <text:p text:style-name="Text_20_body">For multi-arc chronicles:</text:p>
      <text:list text:style-name="L6">
        <text:list-item>
          <text:p text:style-name="P12"><text:span text:style-name="Strong_20_Emphasis">Arc 1: Opening arc</text:span> — Chronicle scope establishment, primary antagonist introduction, chronicle-active dynamics initial engagement. Often shorter than subsequent arcs (4-6 sessions); produces chronicle launch infrastructure. </text:p>
        </text:list-item>
        <text:list-item>
          <text:p text:style-name="P12"><text:span text:style-name="Strong_20_Emphasis">Arc 2-3: Development arcs</text:span> — Chronicle scope expansion, secondary antagonist material engagement, chronicle institutional positioning development. Typically standard length (8-12 sessions each). </text:p>
        </text:list-item>
        <text:list-item>
          <text:p text:style-name="P11"><text:span text:style-name="Strong_20_Emphasis">Final arc: Climax arc</text:span> — Chronicle-defining moment engagement, chronicle scope resolution. Often extended length (12-15 sessions); produces chronicle conclusion infrastructure. </text:p>
        </text:list-item>
      </text:list>
      <text:p text:style-name="Text_20_body"><text:span text:style-name="Strong_20_Emphasis">Chronicle-level pacing decisions:</text:span></text:p>
      <text:list text:style-name="L7">
        <text:list-item>
          <text:p text:style-name="P14"><text:span text:style-name="Strong_20_Emphasis">Chronicle shape</text:span> — escalating (each arc produces higher chronicle pressure than previous arc), parallel (arcs operate at similar chronicle pressure with different chronicle scope), convergent (early arcs operate at scattered scope; later arcs converge toward chronicle-defining moment) </text:p>
        </text:list-item>
        <text:list-item>
          <text:p text:style-name="P14"><text:soft-page-break/><text:span text:style-name="Strong_20_Emphasis">Inter-arc pacing</text:span> — between-arc rest periods (sessions of lower-pressure chronicle development between arc structural intensity), inter-arc continuity (continuing chronicle hooks bridging arc transitions), inter-arc reset (deliberate chronicle direction shift between arcs) </text:p>
        </text:list-item>
        <text:list-item>
          <text:p text:style-name="P13"><text:span text:style-name="Strong_20_Emphasis">Chronicle conclusion infrastructure</text:span> — full chronicle resolution (chronicle-defining moment produces chronicle conclusion), continuing chronicle resolution (chronicle resolves with continuing chronicle pressure supporting potential subsequent chronicle work), campaign continuation (chronicle ends positioning for explicit subsequent chronicle work) </text:p>
        </text:list-item>
      </text:list>
      <text:p text:style-name="Text_20_body"><text:span text:style-name="Strong_20_Emphasis">Chronicle-level pacing diagnostic:</text:span> <text:span text:style-name="Emphasis">Do the arcs build toward chronicle conclusion at appropriate session count, or does chronicle scope outrun chronicle session capacity?</text:span></text:p>
      <text:p text:style-name="Text_20_body"><text:span text:style-name="Strong_20_Emphasis">Common chronicle-level failure mode:</text:span> Scope creep producing arc count exceeding sustainable chronicle session count (chronicle stalls in middle arcs), inter-arc pacing collapse (arcs blur together without distinct chronicle development), chronicle conclusion mismatch with chronicle scope (continental chronicle producing single-city resolution insufficient to chronicle scope; single-coterie chronicle producing continental resolution exceeding chronicle scope).</text:p>
      <text:h text:style-name="Heading_20_3" text:outline-level="3"><text:span text:style-name="Strong_20_Emphasis">Layer 5: Calendar-level pacing</text:span></text:h>
      <text:p text:style-name="Text_20_body">The kit's chronicle-active 2025-2026 period provides specific chronological reference points. Calendar-level pacing addresses how chronicle sessions align with the kit's calendar infrastructure — when chronicle scenes occur in chronological terms, how chronicle calendar progression relates to chronicle session progression.</text:p>
      <text:p text:style-name="Text_20_body"><text:span text:style-name="Strong_20_Emphasis">Calendar-level pacing options:</text:span></text:p>
      <text:list text:style-name="L8">
        <text:list-item>
          <text:p text:style-name="P16"><text:span text:style-name="Strong_20_Emphasis">Real-time chronological pacing</text:span> — Chronicle scenes occur at chronicle-active calendar position matching real-world chronological position. October 2025 chronicle launch produces October 2025 chronicle scenes; chronicle progression matches real-world chronological progression. Best for chronicles wanting maximum chronological grounding. </text:p>
        </text:list-item>
        <text:list-item>
          <text:p text:style-name="P16"><text:span text:style-name="Strong_20_Emphasis">Compressed chronological pacing</text:span> — Chronicle scenes operate at compressed chronological scale (multiple chronicle sessions covering one chronicle calendar week, or equivalent compression). Best for chronicles wanting acute chronicle pressure across compressed chronicle calendar period. </text:p>
        </text:list-item>
        <text:list-item>
          <text:p text:style-name="P16"><text:span text:style-name="Strong_20_Emphasis">Expanded chronological pacing</text:span> — Chronicle scenes operate at expanded chronological scale (single chronicle session covering one chronicle calendar month or longer). Best for chronicles wanting extended chronicle calendar scope across moderate session count. </text:p>
        </text:list-item>
        <text:list-item>
          <text:p text:style-name="P15"><text:span text:style-name="Strong_20_Emphasis">Variable chronological pacing</text:span> — Chronicle pacing varies across chronicle arc, with compressed pacing at chronicle-active periods (Article 8 operations, pre-operation pre-positioning) and expanded pacing at lower-pressure periods (institutional rhythm sessions, character development arcs). </text:p>
        </text:list-item>
      </text:list>
      <text:p text:style-name="Text_20_body"><text:span text:style-name="Strong_20_Emphasis">Calendar-level anchor points (kit-default):</text:span></text:p>
      <text:list text:style-name="L9">
        <text:list-item>
          <text:p text:style-name="P18"><text:span text:style-name="Strong_20_Emphasis">November 2025</text:span> — Standard chronicle launch period </text:p>
        </text:list-item>
        <text:list-item>
          <text:p text:style-name="P18"><text:span text:style-name="Strong_20_Emphasis">November 3, 2025</text:span> — Brisbane Burning Shepherds pack formalisation ritual </text:p>
        </text:list-item>
        <text:list-item>
          <text:p text:style-name="P18"><text:span text:style-name="Strong_20_Emphasis">January 26, 2026</text:span> — Australia Day Sarrasine Reception </text:p>
        </text:list-item>
        <text:list-item>
          <text:p text:style-name="P18"><text:span text:style-name="Strong_20_Emphasis">March 2026</text:span> — Adelaide Festival programming </text:p>
        </text:list-item>
        <text:list-item>
          <text:p text:style-name="P18"><text:span text:style-name="Strong_20_Emphasis">April 25, 2026</text:span> — Anzac Day continental Camarilla institutional formal occasions </text:p>
        </text:list-item>
        <text:list-item>
          <text:p text:style-name="P18"><text:soft-page-break/><text:span text:style-name="Strong_20_Emphasis">June-August 2026</text:span> — Australian winter operational reduction; Cress Truce framework intensification </text:p>
        </text:list-item>
        <text:list-item>
          <text:p text:style-name="P18"><text:span text:style-name="Strong_20_Emphasis">October 2026</text:span> — Brisbane Glass Walker operation (chronicle-defining moment for chronicles engaging Brisbane scope) </text:p>
        </text:list-item>
        <text:list-item>
          <text:p text:style-name="P17"><text:span text:style-name="Strong_20_Emphasis">November 2026</text:span> — Pentex First Team meeting in Singapore </text:p>
        </text:list-item>
      </text:list>
      <text:p text:style-name="Text_20_body"><text:span text:style-name="Strong_20_Emphasis">Calendar-level pacing diagnostic:</text:span> <text:span text:style-name="Emphasis">Does chronicle calendar progression match chronicle session progression at sustainable rate?</text:span></text:p>
      <text:p text:style-name="Text_20_body"><text:span text:style-name="Strong_20_Emphasis">Common calendar-level failure mode:</text:span> Chronicle calendar drift (chronicle calendar advancing faster than chronicle session count without chronicle development, producing pacing flatness), chronicle calendar stall (chronicle calendar barely advancing across multiple sessions, producing chronicle pressure flatness), calendar-defining moment misalignment (chronicle climactic session occurring before or after calendar-defining moment, producing chronicle pressure mismatch).</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Text_20_body"><text:soft-page-break/>Different chronicle modes produce different pacing patterns. The kit's six chronicle modes each have distinctive pacing characteristics that scene-level, session-level, and arc-level pacing should accommodate.</text:p>
      <text:h text:style-name="Heading_20_3" text:outline-level="3"><text:span text:style-name="Strong_20_Emphasis">Camarilla Orthodox pacing pattern</text:span></text:h>
      <text:p text:style-name="Text_20_body">Camarilla orthodox chronicles operate at quarterly institutional rhythm (formal court occasions every 3 months) with continuing weekly-to-monthly institutional activity between court occasions.</text:p>
      <text:p text:style-name="Text_20_body"><text:span text:style-name="Strong_20_Emphasis">Scene-level:</text:span> Institutional scenes run medium-to-long (formal court formality requires development time); interpersonal scenes vary; tactical scenes infrequent (Camarilla orthodox prefers institutional resolution to tactical resolution).</text:p>
      <text:p text:style-name="Text_20_body"><text:span text:style-name="Strong_20_Emphasis">Session-level:</text:span> Sessions often anchor around institutional event (court occasion, formal meeting, formal correspondence resolution) plus continuing institutional development. Session climax typically institutional rather than tactical.</text:p>
      <text:p text:style-name="Text_20_body"><text:span text:style-name="Strong_20_Emphasis">Arc-level:</text:span> Arcs typically operate at quarterly or semi-annual chronological scale (one arc covering 3-6 chronicle calendar months). Standard arc length 8-12 sessions producing approximately one institutional rhythm cycle.</text:p>
      <text:p text:style-name="Text_20_body"><text:span text:style-name="Strong_20_Emphasis">Calendar-level:</text:span> Quarterly Camarilla institutional rhythm provides natural arc punctuation (Anzac Day continental Camarilla institutional formal occasions, quarterly Toorak Circle meetings, semi-annual Lytton-Octavia in-person meetings).</text:p>
      <text:p text:style-name="Text_20_body"><text:span text:style-name="Strong_20_Emphasis">Pacing recommendations:</text:span></text:p>
      <text:list text:style-name="L10">
        <text:list-item>
          <text:p text:style-name="P20">Plan arcs around institutional rhythm rather than around antagonist pressure escalation </text:p>
        </text:list-item>
        <text:list-item>
          <text:p text:style-name="P20">Use court occasions as arc-anchor scenes (chronicle-defining moments often occur at court rather than in tactical scenes) </text:p>
        </text:list-item>
        <text:list-item>
          <text:p text:style-name="P19">Calendar-level pacing benefits from real-time or expanded chronological pacing rather than compressed pacing </text:p>
        </text:list-item>
      </text:list>
      <text:h text:style-name="Heading_20_3" text:outline-level="3"><text:span text:style-name="Strong_20_Emphasis">Sabbat-Survivor pacing pattern</text:span></text:h>
      <text:p text:style-name="Text_20_body">Sabbat-survivor chronicles operate at acute chronicle-active tempo with continuing operational pressure plus periodic chronicle-defining ritual moments (formalisation rituals, doctrinal religious observances, chronicle-defining operations).</text:p>
      <text:p text:style-name="Text_20_body"><text:span text:style-name="Strong_20_Emphasis">Scene-level:</text:span> Tactical scenes more common than in Camarilla orthodox (Sabbat-survivor mode operates with continuing operational pressure); doctrinal religious scenes produce extended-length scenes with continuing institutional weight; interpersonal scenes often charged with continuing institutional pressure.</text:p>
      <text:p text:style-name="Text_20_body"><text:span text:style-name="Strong_20_Emphasis">Session-level:</text:span> Sessions often anchor around continuing operational pressure plus periodic chronicle-defining ritual moments. Session climax often tactical or institutional confrontation.</text:p>
      <text:p text:style-name="Text_20_body"><text:span text:style-name="Strong_20_Emphasis">Arc-level:</text:span> Arcs typically operate at compressed chronological scale (one arc covering 1-3 chronicle calendar months) with chronicle-defining ritual moment as arc climax. Standard arc length 8-12 sessions producing approximately 60-90 chronicle calendar days.</text:p>
      <text:p text:style-name="Text_20_body"><text:span text:style-name="Strong_20_Emphasis">Calendar-level:</text:span> Sabbat liturgical calendar provides natural arc punctuation (Festivo dello Estinto in February, Fire Dance in late April, Wild Hunt in late December, Palla Grande in late October). <text:soft-page-break/>Chronicle-defining operations (October 2026 Brisbane operation) provide chronicle-defining moments.</text:p>
      <text:p text:style-name="Text_20_body"><text:span text:style-name="Strong_20_Emphasis">Pacing recommendations:</text:span></text:p>
      <text:list text:style-name="L11">
        <text:list-item>
          <text:p text:style-name="P22">Plan arcs around chronicle-defining ritual or operational moments </text:p>
        </text:list-item>
        <text:list-item>
          <text:p text:style-name="P22">Use Sabbat liturgical calendar as arc-anchor infrastructure </text:p>
        </text:list-item>
        <text:list-item>
          <text:p text:style-name="P22">Calendar-level pacing benefits from compressed or variable chronological pacing </text:p>
        </text:list-item>
        <text:list-item>
          <text:p text:style-name="P21">Allow rest sessions between chronicle-active operational periods to prevent player fatigue </text:p>
        </text:list-item>
      </text:list>
      <text:h text:style-name="Heading_20_3" text:outline-level="3"><text:span text:style-name="Strong_20_Emphasis">Methuselah-Tempo pacing pattern</text:span></text:h>
      <text:p text:style-name="Text_20_body">Methuselah-tempo chronicles operate at deliberate sustained pacing with patient chronicle development across extended chronological periods. Continuing institutional pressure operates at sustained scale rather than at acute escalation.</text:p>
      <text:p text:style-name="Text_20_body"><text:span text:style-name="Strong_20_Emphasis">Scene-level:</text:span> Scenes routinely run long with continuing institutional weight. Patient operational tempo produces scenes that develop slowly across multiple beats. Atmospheric scenes more common than in other chronicle modes.</text:p>
      <text:p text:style-name="Text_20_body"><text:span text:style-name="Strong_20_Emphasis">Session-level:</text:span> Sessions often anchor around continuing institutional development rather than around discrete chronicle-defining moments. Session climax often subtle institutional positioning shift rather than dramatic chronicle development.</text:p>
      <text:p text:style-name="Text_20_body"><text:span text:style-name="Strong_20_Emphasis">Arc-level:</text:span> Arcs typically operate at expanded chronological scale (one arc covering 6-12 chronicle calendar months or longer) with continuing institutional development across extended chronological period. Extended arc length 13-20 sessions producing approximately one institutional rhythm cycle at methuselah scale.</text:p>
      <text:p text:style-name="Text_20_body"><text:span text:style-name="Strong_20_Emphasis">Calendar-level:</text:span> Methuselah-tempo institutional rhythm operates at multi-year scale with continuing institutional development. Annual Australia Day Sarrasine Reception provides natural chronicle-active anchor point. Continental Phase Two operation at 2026-2028 chronological scope provides chronicle-defining continental scope.</text:p>
      <text:p text:style-name="Text_20_body"><text:span text:style-name="Strong_20_Emphasis">Pacing recommendations:</text:span></text:p>
      <text:list text:style-name="L12">
        <text:list-item>
          <text:p text:style-name="P24">Plan arcs around extended chronological periods rather than around acute chronicle pressure </text:p>
        </text:list-item>
        <text:list-item>
          <text:p text:style-name="P24">Use sustained institutional development as arc-defining infrastructure rather than chronicle-defining moments </text:p>
        </text:list-item>
        <text:list-item>
          <text:p text:style-name="P24">Calendar-level pacing benefits from expanded chronological pacing </text:p>
        </text:list-item>
        <text:list-item>
          <text:p text:style-name="P23">Resist scene-level pacing pressure to compress methuselah-tempo material into Melbourne-pace scenes; sustained pacing is the chronicle mode's distinctive character </text:p>
        </text:list-item>
      </text:list>
      <text:h text:style-name="Heading_20_3" text:outline-level="3"><text:span text:style-name="Strong_20_Emphasis">Anarch Movement pacing pattern</text:span></text:h>
      <text:p text:style-name="Text_20_body">Anarch Movement chronicles operate at variable chronological scale with continuing community-organising rhythm plus periodic chronicle-active moments (community crises, institutional confrontation, organising successes).</text:p>
      <text:p text:style-name="Text_20_body"><text:span text:style-name="Strong_20_Emphasis">Scene-level:</text:span> Scenes vary widely; community-organising scenes produce extended-length scenes with continuing community-organising rhythm; tactical scenes occur at chronicle-active scale; institutional scenes often charged with continuing institutional refusal.</text:p>
      <text:p text:style-name="Text_20_body"><text:soft-page-break/><text:span text:style-name="Strong_20_Emphasis">Session-level:</text:span> Sessions often anchor around community-organising development plus periodic chronicle-active moments. Session climax varies between community-organising successes and institutional confrontation.</text:p>
      <text:p text:style-name="Text_20_body"><text:span text:style-name="Strong_20_Emphasis">Arc-level:</text:span> Arcs typically operate at variable chronological scale (one arc covering 2-6 chronicle calendar months) with chronicle-active moment as arc climax. Standard arc length 8-12 sessions.</text:p>
      <text:p text:style-name="Text_20_body"><text:span text:style-name="Strong_20_Emphasis">Calendar-level:</text:span> Community-organising calendar provides natural arc punctuation (community events, institutional pressure moments, organising calendar landmarks). Anarch Movement does not align with formal Camarilla or Sabbat institutional calendar.</text:p>
      <text:p text:style-name="Text_20_body"><text:span text:style-name="Strong_20_Emphasis">Pacing recommendations:</text:span></text:p>
      <text:list text:style-name="L13">
        <text:list-item>
          <text:p text:style-name="P26">Plan arcs around community-organising rhythm rather than around formal institutional rhythm </text:p>
        </text:list-item>
        <text:list-item>
          <text:p text:style-name="P26">Use community events as arc-anchor scenes </text:p>
        </text:list-item>
        <text:list-item>
          <text:p text:style-name="P26">Calendar-level pacing benefits from variable chronological pacing </text:p>
        </text:list-item>
        <text:list-item>
          <text:p text:style-name="P25">Avoid imposing Camarilla orthodox pacing on Anarch Movement chronicles; the chronicle mode's distinctive character requires distinctive pacing </text:p>
        </text:list-item>
      </text:list>
      <text:h text:style-name="Heading_20_3" text:outline-level="3"><text:span text:style-name="Strong_20_Emphasis">Hecata Family pacing pattern</text:span></text:h>
      <text:p text:style-name="Text_20_body">Hecata family chronicles operate at family-cousinage rhythm with continuing necromantic operational tempo plus periodic chronicle-active family operations.</text:p>
      <text:p text:style-name="Text_20_body"><text:span text:style-name="Strong_20_Emphasis">Scene-level:</text:span> Scenes often anchor around family-cousinage relationships; necromantic operational scenes produce distinctive scene texture; institutional scenes operate at family-cousinage formality scale rather than at Camarilla formal scale.</text:p>
      <text:p text:style-name="Text_20_body"><text:span text:style-name="Strong_20_Emphasis">Session-level:</text:span> Sessions often anchor around family operational coordination plus periodic chronicle-active family operations. Session climax varies between family-cousinage development and necromantic operational moments.</text:p>
      <text:p text:style-name="Text_20_body"><text:span text:style-name="Strong_20_Emphasis">Arc-level:</text:span> Arcs typically operate at moderate chronological scale (one arc covering 3-6 chronicle calendar months) with family operational moment as arc climax. Standard arc length 8-12 sessions.</text:p>
      <text:p text:style-name="Text_20_body"><text:span text:style-name="Strong_20_Emphasis">Calendar-level:</text:span> Family operational calendar provides natural arc punctuation (family operational coordination events, necromantic operational calendar moments, family-cousinage relationship developments).</text:p>
      <text:p text:style-name="Text_20_body"><text:span text:style-name="Strong_20_Emphasis">Pacing recommendations:</text:span></text:p>
      <text:list text:style-name="L14">
        <text:list-item>
          <text:p text:style-name="P28">Plan arcs around family operational coordination </text:p>
        </text:list-item>
        <text:list-item>
          <text:p text:style-name="P28">Use family-cousinage relationship development as continuing chronicle texture </text:p>
        </text:list-item>
        <text:list-item>
          <text:p text:style-name="P28">Calendar-level pacing benefits from moderate or variable chronological pacing </text:p>
        </text:list-item>
        <text:list-item>
          <text:p text:style-name="P27">Allow extended scene time for family-cousinage development; family relationships are chronicle-central rather than backdrop </text:p>
        </text:list-item>
      </text:list>
      <text:h text:style-name="Heading_20_3" text:outline-level="3"><text:span text:style-name="Strong_20_Emphasis">Cross-Supernatural Diplomatic pacing pattern</text:span></text:h>
      <text:p text:style-name="Text_20_body">Cross-supernatural diplomatic chronicles operate at quarterly Truce Council rhythm with continuing inter-splat institutional cooperation plus periodic chronicle-defining Article 8 operations.</text:p>
      <text:p text:style-name="Text_20_body"><text:soft-page-break/><text:span text:style-name="Strong_20_Emphasis">Scene-level:</text:span> Inter-splat institutional scenes operate at distinctive treaty-counterpart formality scale; Article 8 tactical scenes produce extended-length cross-supernatural cooperation scenes; cross-cultural development scenes provide chronicle texture.</text:p>
      <text:p text:style-name="Text_20_body"><text:span text:style-name="Strong_20_Emphasis">Session-level:</text:span> Sessions often anchor around inter-splat institutional development plus periodic chronicle-defining operations. Session climax often inter-splat institutional moment or Article 8 operational scene.</text:p>
      <text:p text:style-name="Text_20_body"><text:span text:style-name="Strong_20_Emphasis">Arc-level:</text:span> Arcs typically operate at quarterly or semi-annual chronological scale (one arc covering 3-6 chronicle calendar months) with Article 8 operation as chronicle-defining moment. Standard arc length 12-15 sessions producing approximately one Truce Council institutional cycle.</text:p>
      <text:p text:style-name="Text_20_body"><text:span text:style-name="Strong_20_Emphasis">Calendar-level:</text:span> Quarterly Truce Council meetings provide natural arc punctuation. Continuing chronicle-active continental Article 8 activation possibility (Burrup Hive, Barrier Hive operations) provides chronicle-defining moments.</text:p>
      <text:p text:style-name="Text_20_body"><text:span text:style-name="Strong_20_Emphasis">Pacing recommendations:</text:span></text:p>
      <text:list text:style-name="L15">
        <text:list-item>
          <text:p text:style-name="P30">Plan arcs around quarterly Truce Council rhythm with chronicle-defining Article 8 operations as arc climax </text:p>
        </text:list-item>
        <text:list-item>
          <text:p text:style-name="P30">Use Truce Council meetings as arc-anchor scenes </text:p>
        </text:list-item>
        <text:list-item>
          <text:p text:style-name="P30">Calendar-level pacing benefits from variable chronological pacing (compressed during Article 8 operations, expanded between operations) </text:p>
        </text:list-item>
        <text:list-item>
          <text:p text:style-name="P29">Allow extended scene time for inter-splat institutional development; treaty-counterpart relationships require sustained development </text:p>
        </text:list-item>
      </text:lis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Text_20_body"><text:soft-page-break/>Chronicle scope produces distinct pacing requirements. The kit's five primary scope categories each have characteristic pacing patterns.</text:p>
      <text:h text:style-name="Heading_20_3" text:outline-level="3"><text:span text:style-name="Strong_20_Emphasis">Single-coterie chronicle pacing</text:span></text:h>
      <text:p text:style-name="Text_20_body"><text:span text:style-name="Strong_20_Emphasis">Typical structure:</text:span> 8-12 sessions, single arc, single chronicle mode, single geographic anchor.</text:p>
      <text:p text:style-name="Text_20_body"><text:span text:style-name="Strong_20_Emphasis">Scene-level pacing:</text:span> Standard scene-level patterns; coterie cohesion produces scene continuity across sessions through continuing coterie-internal dynamics.</text:p>
      <text:p text:style-name="Text_20_body"><text:span text:style-name="Strong_20_Emphasis">Session-level pacing:</text:span> Standard session structure with rising action across most sessions; rest sessions less common at single-coterie scope (chronicle is short enough that continuous rising action sustains).</text:p>
      <text:p text:style-name="Text_20_body"><text:span text:style-name="Strong_20_Emphasis">Arc-level pacing:</text:span> Single arc with classic five-phase structure (setup → rising action → mid-arc complication → climax buildup → climax and resolution). Mid-arc complication typically occurs at session 4-5; climax at session 9-11; resolution session 11-12.</text:p>
      <text:p text:style-name="Text_20_body"><text:span text:style-name="Strong_20_Emphasis">Calendar-level pacing:</text:span> Compressed chronological pacing common (one chronicle session covering 1-2 chronicle calendar weeks) producing approximately 2-3 chronicle calendar months across full chronicle.</text:p>
      <text:p text:style-name="Text_20_body"><text:span text:style-name="Strong_20_Emphasis">Pacing recommendations:</text:span></text:p>
      <text:list text:style-name="L16">
        <text:list-item>
          <text:p text:style-name="P32">Plan tight arc structure with explicit chronicle-defining moment at arc climax </text:p>
        </text:list-item>
        <text:list-item>
          <text:p text:style-name="P32">Avoid scope creep that would extend chronicle beyond single-coterie capacity </text:p>
        </text:list-item>
        <text:list-item>
          <text:p text:style-name="P32">Use coterie-internal dynamics as continuing chronicle texture </text:p>
        </text:list-item>
        <text:list-item>
          <text:p text:style-name="P31">Calendar-level chronicle launch: typically October-November 2025 producing chronicle climax around January-February 2026 </text:p>
        </text:list-item>
      </text:list>
      <text:h text:style-name="Heading_20_3" text:outline-level="3"><text:span text:style-name="Strong_20_Emphasis">Single-city chronicle pacing</text:span></text:h>
      <text:p text:style-name="Text_20_body"><text:span text:style-name="Strong_20_Emphasis">Typical structure:</text:span> 12-15 sessions, single arc or two-arc structure, often single chronicle mode with optional secondary mode through coterie variation, single geographic anchor.</text:p>
      <text:p text:style-name="Text_20_body"><text:span text:style-name="Strong_20_Emphasis">Scene-level pacing:</text:span> Standard scene-level patterns with city-specific cultural register variation.</text:p>
      <text:p text:style-name="Text_20_body"><text:span text:style-name="Strong_20_Emphasis">Session-level pacing:</text:span> Standard session structure; rest sessions appropriate at session 5-6 to provide chronicle texture between rising action and chronicle climax.</text:p>
      <text:p text:style-name="Text_20_body"><text:span text:style-name="Strong_20_Emphasis">Arc-level pacing:</text:span> Single extended arc (12-15 sessions) or two standard arcs (6-7 sessions each). Single-arc structure produces clearer chronicle-defining moment; two-arc structure produces more chronicle scope variation.</text:p>
      <text:p text:style-name="Text_20_body"><text:span text:style-name="Strong_20_Emphasis">Calendar-level pacing:</text:span> Real-time or compressed chronological pacing. Single-city chronicles typically cover 4-6 chronicle calendar months.</text:p>
      <text:p text:style-name="Text_20_body"><text:span text:style-name="Strong_20_Emphasis">Pacing recommendations:</text:span></text:p>
      <text:list text:style-name="L17">
        <text:list-item>
          <text:p text:style-name="P34">Plan around city-specific institutional rhythm (quarterly Camarilla rhythm for Camarilla orthodox cities, Sabbat liturgical calendar for Brisbane) </text:p>
        </text:list-item>
        <text:list-item>
          <text:p text:style-name="P34">Use city-specific antagonist material as primary chronicle pressure </text:p>
        </text:list-item>
        <text:list-item>
          <text:p text:style-name="P33">Calendar-level chronicle launch: typically October 2025 producing chronicle climax around April-May 2026 for two-arc structure or June-July 2026 for single extended arc </text:p>
        </text:list-item>
      </text:list>
      <text:h text:style-name="Heading_20_3" text:outline-level="3"><text:soft-page-break/><text:span text:style-name="Strong_20_Emphasis">Single-mode continental chronicle pacing</text:span></text:h>
      <text:p text:style-name="Text_20_body"><text:span text:style-name="Strong_20_Emphasis">Typical structure:</text:span> 15-20 sessions, two-to-three arcs, single chronicle mode across multiple continental cities, multi-city geographic anchor.</text:p>
      <text:p text:style-name="Text_20_body"><text:span text:style-name="Strong_20_Emphasis">Scene-level pacing:</text:span> Continental scope produces inter-city travel scenes, inter-city correspondence scenes, multi-city institutional development scenes that single-city chronicles do not engage. Calendar-level pacing must accommodate continental geographic rhythm at four temporal scales (within-city hour-scale, inter-city day-scale, inter-city correspondence week-scale, continental institutional coordination month-scale).</text:p>
      <text:p text:style-name="Text_20_body"><text:span text:style-name="Strong_20_Emphasis">Session-level pacing:</text:span> Sessions vary in geographic positioning; some sessions occur primarily at one city, others span multiple cities through travel and correspondence. Inter-city sessions often run longer than within-city sessions due to additional pacing complexity.</text:p>
      <text:p text:style-name="Text_20_body"><text:span text:style-name="Strong_20_Emphasis">Arc-level pacing:</text:span> Two-to-three arcs typically organise around chronicle scope expansion (Arc 1: opening arc establishing primary city; Arc 2: continental expansion incorporating secondary cities; Arc 3: continental climax engaging full continental scope).</text:p>
      <text:p text:style-name="Text_20_body"><text:span text:style-name="Strong_20_Emphasis">Calendar-level pacing:</text:span> Real-time chronological pacing with continental calendar alignment. Continental scope chronicles typically cover 6-12 chronicle calendar months.</text:p>
      <text:p text:style-name="Text_20_body"><text:span text:style-name="Strong_20_Emphasis">Pacing recommendations:</text:span></text:p>
      <text:list text:style-name="L18">
        <text:list-item>
          <text:p text:style-name="P36">Plan inter-city travel and correspondence as chronicle-active operational infrastructure rather than as backdrop </text:p>
        </text:list-item>
        <text:list-item>
          <text:p text:style-name="P36">Use continental calendar alignment (Anzac Day, quarterly Truce Council, Adelaide Festival, Sabbat liturgical calendar) as arc-anchor infrastructure </text:p>
        </text:list-item>
        <text:list-item>
          <text:p text:style-name="P35">Calendar-level chronicle launch: typically October 2025 producing chronicle climax around October 2026 (12-month chronicle scope) </text:p>
        </text:list-item>
      </text:list>
      <text:h text:style-name="Heading_20_3" text:outline-level="3"><text:span text:style-name="Strong_20_Emphasis">Multi-mode continental chronicle pacing</text:span></text:h>
      <text:p text:style-name="Text_20_body"><text:span text:style-name="Strong_20_Emphasis">Typical structure:</text:span> 20-25 sessions, three-to-four arcs, multiple chronicle modes simultaneously across continental cities, multi-city geographic anchor with chronicle-mode plurality.</text:p>
      <text:p text:style-name="Text_20_body"><text:span text:style-name="Strong_20_Emphasis">Scene-level pacing:</text:span> Continental scope plus chronicle-mode plurality produces scene-level pacing variation across cities. Each city operates at its distinctive chronicle mode pacing pattern; inter-city scenes engage chronicle-mode pivot handling per the Continental Coordination Guide.</text:p>
      <text:p text:style-name="Text_20_body"><text:span text:style-name="Strong_20_Emphasis">Session-level pacing:</text:span> Sessions often pivot between chronicle modes through inter-city travel or correspondence. Storyteller / AI capacity for chronicle-mode plurality maintenance is the central session-level pacing challenge.</text:p>
      <text:p text:style-name="Text_20_body"><text:span text:style-name="Strong_20_Emphasis">Arc-level pacing:</text:span> Three-to-four arcs typically organise around continental scope plus chronicle-mode plurality (Arc 1: opening arc establishing primary city and primary mode; Arc 2: secondary city introduction with chronicle-mode pivot handling; Arc 3-4: continental climax engaging full chronicle-mode plurality).</text:p>
      <text:p text:style-name="Text_20_body"><text:span text:style-name="Strong_20_Emphasis">Calendar-level pacing:</text:span> Real-time chronological pacing with continental calendar alignment plus chronicle-mode-specific calendar variation (Camarilla orthodox quarterly rhythm at Melbourne and Adelaide; Sabbat liturgical calendar at Brisbane; methuselah-tempo expanded chronological scope at Sydney).</text:p>
      <text:p text:style-name="Text_20_body"><text:soft-page-break/><text:span text:style-name="Strong_20_Emphasis">Pacing recommendations:</text:span></text:p>
      <text:list text:style-name="L19">
        <text:list-item>
          <text:p text:style-name="P38">Plan chronicle-mode pivot handling explicitly per Continental Coordination Guide chronicle-mode plurality framework </text:p>
        </text:list-item>
        <text:list-item>
          <text:p text:style-name="P38">Use chronicle-mode-specific calendar alignment as arc-anchor infrastructure varying across cities </text:p>
        </text:list-item>
        <text:list-item>
          <text:p text:style-name="P37">Calendar-level chronicle launch: typically October 2025 producing chronicle climax around October 2026 with continental chronicle scope continuing through October 2027 if multi-chronicle campaign engagement </text:p>
        </text:list-item>
      </text:list>
      <text:h text:style-name="Heading_20_3" text:outline-level="3"><text:span text:style-name="Strong_20_Emphasis">Cross-splat continental chronicle pacing</text:span></text:h>
      <text:p text:style-name="Text_20_body"><text:span text:style-name="Strong_20_Emphasis">Typical structure:</text:span> 25+ sessions, four-or-more arcs, multiple chronicle modes plus cross-splat antagonist infrastructure, continental geographic anchor with full kit engagement.</text:p>
      <text:p text:style-name="Text_20_body"><text:span text:style-name="Strong_20_Emphasis">Scene-level pacing:</text:span> Cross-splat material adds metaphysical-horror register scenes, Article 8 operational scenes, cross-Wyrm-infrastructure cooperation scenes that other chronicle scopes do not engage. Scene-level pacing accommodates cross-splat material at chronicle-active scale.</text:p>
      <text:p text:style-name="Text_20_body"><text:span text:style-name="Strong_20_Emphasis">Session-level pacing:</text:span> Sessions vary widely across chronicle scope; cross-splat sessions often produce extended pacing through metaphysical-horror material plus continental cross-supernatural cooperation infrastructure.</text:p>
      <text:p text:style-name="Text_20_body"><text:span text:style-name="Strong_20_Emphasis">Arc-level pacing:</text:span> Four-or-more arcs typically organise around chronicle scope progression (opening arc + continental development arcs + cross-splat engagement arcs + chronicle-defining climax arc). Multi-chronicle campaign engagement common.</text:p>
      <text:p text:style-name="Text_20_body"><text:span text:style-name="Strong_20_Emphasis">Calendar-level pacing:</text:span> Real-time chronological pacing with continental calendar alignment plus chronicle-defining cross-splat moments (October 2026 Brisbane operation; chronicle-active Article 8 activation periods). Cross-splat continental chronicles typically cover 12-18 chronicle calendar months across full chronicle scope.</text:p>
      <text:p text:style-name="Text_20_body"><text:span text:style-name="Strong_20_Emphasis">Pacing recommendations:</text:span></text:p>
      <text:list text:style-name="L20">
        <text:list-item>
          <text:p text:style-name="P40">Plan cross-splat scope at central chronicle infrastructure scale rather than as background context </text:p>
        </text:list-item>
        <text:list-item>
          <text:p text:style-name="P40">Use chronicle-defining cross-splat moments as primary arc-defining infrastructure </text:p>
        </text:list-item>
        <text:list-item>
          <text:p text:style-name="P39">Calendar-level chronicle launch: typically October-November 2025 producing chronicle climax at October 2026 (Brisbane operation as chronicle-defining moment) with continuing chronicle scope through 2027 for multi-chronicle campaign engagement </text:p>
        </text:list-item>
      </text:lis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Text_20_body"><text:soft-page-break/>Eight common pacing failure modes specific to multi-session chronicle work, with diagnostic indicators and corrective adjustments.</text:p>
      <text:h text:style-name="Heading_20_3" text:outline-level="3"><text:span text:style-name="Strong_20_Emphasis">Failure Mode 1: Sagging Middle</text:span></text:h>
      <text:p text:style-name="Text_20_body"><text:span text:style-name="Strong_20_Emphasis">Diagnostic indicators:</text:span></text:p>
      <text:list text:style-name="L21">
        <text:list-item>
          <text:p text:style-name="P42">Sessions 4-7 of standard arc producing chronicle development at lower pacing than sessions 1-3 or sessions 8-12 </text:p>
        </text:list-item>
        <text:list-item>
          <text:p text:style-name="P42">Player engagement dropping mid-arc </text:p>
        </text:list-item>
        <text:list-item>
          <text:p text:style-name="P42">Chronicle development feeling like wheel-spinning rather than progress </text:p>
        </text:list-item>
        <text:list-item>
          <text:p text:style-name="P41">Storyteller running improvised material because planned arc structure collapsed </text:p>
        </text:list-item>
      </text:list>
      <text:p text:style-name="Text_20_body"><text:span text:style-name="Strong_20_Emphasis">Underlying problem:</text:span> Arc-level pacing did not include identified mid-arc complication; rising action phase extended too long without mid-arc structural pivot.</text:p>
      <text:p text:style-name="Text_20_body"><text:span text:style-name="Strong_20_Emphasis">Corrective adjustment:</text:span></text:p>
      <text:list text:style-name="L22">
        <text:list-item>
          <text:p text:style-name="P44">Introduce mid-arc complication immediately at next session — major chronicle development that changes arc trajectory </text:p>
        </text:list-item>
        <text:list-item>
          <text:p text:style-name="P44">Specifically engage chronicle-active dynamics from city supplements or antagonist pack at scale that produces clear chronicle direction shift </text:p>
        </text:list-item>
        <text:list-item>
          <text:p text:style-name="P43">Plan future arcs with explicit mid-arc complication at session 4-6 of standard arc </text:p>
        </text:list-item>
      </text:list>
      <text:h text:style-name="Heading_20_3" text:outline-level="3"><text:span text:style-name="Strong_20_Emphasis">Failure Mode 2: Premature Climax</text:span></text:h>
      <text:p text:style-name="Text_20_body"><text:span text:style-name="Strong_20_Emphasis">Diagnostic indicators:</text:span></text:p>
      <text:list text:style-name="L23">
        <text:list-item>
          <text:p text:style-name="P46">Chronicle climactic moment occurring before chronicle-arc has built sufficient pressure </text:p>
        </text:list-item>
        <text:list-item>
          <text:p text:style-name="P46">Climax feeling unearned despite operational mechanical consequence </text:p>
        </text:list-item>
        <text:list-item>
          <text:p text:style-name="P46">Continuing arc sessions struggling to sustain chronicle pressure after premature climax </text:p>
        </text:list-item>
        <text:list-item>
          <text:p text:style-name="P45">Players reporting that chronicle ended emotionally even though sessions continue </text:p>
        </text:list-item>
      </text:list>
      <text:p text:style-name="Text_20_body"><text:span text:style-name="Strong_20_Emphasis">Underlying problem:</text:span> Arc-level pacing rushed climax buildup phase; insufficient session count between mid-arc complication and climactic moment.</text:p>
      <text:p text:style-name="Text_20_body"><text:span text:style-name="Strong_20_Emphasis">Corrective adjustment:</text:span></text:p>
      <text:list text:style-name="L24">
        <text:list-item>
          <text:p text:style-name="P48">If climax has not yet occurred: extend climax buildup phase by 1-2 additional sessions </text:p>
        </text:list-item>
        <text:list-item>
          <text:p text:style-name="P48">If premature climax has occurred: shift chronicle to post-climax resolution phase rather than attempting to extend chronicle pressure beyond arc structure </text:p>
        </text:list-item>
        <text:list-item>
          <text:p text:style-name="P47">For subsequent arcs: plan minimum 3-session climax buildup phase between mid-arc complication and arc climax </text:p>
        </text:list-item>
      </text:list>
      <text:h text:style-name="Heading_20_3" text:outline-level="3"><text:span text:style-name="Strong_20_Emphasis">Failure Mode 3: Calendar Drift</text:span></text:h>
      <text:p text:style-name="Text_20_body"><text:span text:style-name="Strong_20_Emphasis">Diagnostic indicators:</text:span></text:p>
      <text:list text:style-name="L25">
        <text:list-item>
          <text:p text:style-name="P50">Chronicle calendar advancing faster than chronicle session progression (multiple chronicle calendar months passing between sessions without chronicle development) </text:p>
        </text:list-item>
        <text:list-item>
          <text:p text:style-name="P50">Calendar-defining moments approaching faster than chronicle-arc development supports </text:p>
        </text:list-item>
        <text:list-item>
          <text:p text:style-name="P50">Storyteller compressing chronicle development to keep pace with calendar progression </text:p>
        </text:list-item>
        <text:list-item>
          <text:p text:style-name="P49">Player confusion about chronicle calendar position </text:p>
        </text:list-item>
      </text:list>
      <text:p text:style-name="Text_20_body"><text:soft-page-break/><text:span text:style-name="Strong_20_Emphasis">Underlying problem:</text:span> Calendar-level pacing not calibrated to session-level pacing; chronicle calendar progression set without checking session-level pacing capacity.</text:p>
      <text:p text:style-name="Text_20_body"><text:span text:style-name="Strong_20_Emphasis">Corrective adjustment:</text:span></text:p>
      <text:list text:style-name="L26">
        <text:list-item>
          <text:p text:style-name="P52">Slow chronicle calendar progression to match session-level pacing capacity </text:p>
        </text:list-item>
        <text:list-item>
          <text:p text:style-name="P52">Compress chronicle calendar position for upcoming sessions to allow chronicle-arc development to catch up to calendar position </text:p>
        </text:list-item>
        <text:list-item>
          <text:p text:style-name="P51">For subsequent chronicles: plan calendar progression alongside session-level pacing rather than separately </text:p>
        </text:list-item>
      </text:list>
      <text:h text:style-name="Heading_20_3" text:outline-level="3"><text:span text:style-name="Strong_20_Emphasis">Failure Mode 4: Scope Collapse</text:span></text:h>
      <text:p text:style-name="Text_20_body"><text:span text:style-name="Strong_20_Emphasis">Diagnostic indicators:</text:span></text:p>
      <text:list text:style-name="L27">
        <text:list-item>
          <text:p text:style-name="P54">Continental scope chronicle drifting toward de-facto single-city chronicle </text:p>
        </text:list-item>
        <text:list-item>
          <text:p text:style-name="P54">Multi-mode chronicle drifting toward single-mode chronicle </text:p>
        </text:list-item>
        <text:list-item>
          <text:p text:style-name="P54">Cross-splat chronicle drifting toward standard chronicle without cross-splat engagement </text:p>
        </text:list-item>
        <text:list-item>
          <text:p text:style-name="P53">Continental coordination scenes disappearing from chronicle pacing </text:p>
        </text:list-item>
      </text:list>
      <text:p text:style-name="Text_20_body"><text:span text:style-name="Strong_20_Emphasis">Underlying problem:</text:span> Storyteller / AI handling capacity exceeded by chronicle scope; chronicle scope quietly contracting through omission rather than through deliberate adjustment.</text:p>
      <text:p text:style-name="Text_20_body"><text:span text:style-name="Strong_20_Emphasis">Corrective adjustment:</text:span></text:p>
      <text:list text:style-name="L28">
        <text:list-item>
          <text:p text:style-name="P56">Acknowledge scope collapse explicitly with players </text:p>
        </text:list-item>
        <text:list-item>
          <text:p text:style-name="P56">Either commit to scope contraction explicitly (announcing chronicle scope reduction and adjusting expectations accordingly) or restore continental / multi-mode / cross-splat engagement through deliberate chronicle scene scheduling </text:p>
        </text:list-item>
        <text:list-item>
          <text:p text:style-name="P56">Apply Continental Coordination Guide chronicle-mode plurality framework if scope collapse involves chronicle-mode contraction </text:p>
        </text:list-item>
        <text:list-item>
          <text:p text:style-name="P55">For subsequent chronicles: scope down at chronicle preparation rather than attempting full scope and contracting during play </text:p>
        </text:list-item>
      </text:list>
      <text:h text:style-name="Heading_20_3" text:outline-level="3"><text:span text:style-name="Strong_20_Emphasis">Failure Mode 5: Antagonist Burnout</text:span></text:h>
      <text:p text:style-name="Text_20_body"><text:span text:style-name="Strong_20_Emphasis">Diagnostic indicators:</text:span></text:p>
      <text:list text:style-name="L29">
        <text:list-item>
          <text:p text:style-name="P58">Same antagonist material appearing across multiple sessions without development </text:p>
        </text:list-item>
        <text:list-item>
          <text:p text:style-name="P58">Players treating antagonist appearances as expected rather than as chronicle-active threats </text:p>
        </text:list-item>
        <text:list-item>
          <text:p text:style-name="P58">Antagonist scenes producing diminishing chronicle pressure </text:p>
        </text:list-item>
        <text:list-item>
          <text:p text:style-name="P57">Storyteller running same antagonist material because original chronicle plans depleted </text:p>
        </text:list-item>
      </text:list>
      <text:p text:style-name="Text_20_body"><text:span text:style-name="Strong_20_Emphasis">Underlying problem:</text:span> Antagonist progression not planned across chronicle arc; antagonists deployed as static threat material rather than as developing chronicle infrastructure.</text:p>
      <text:p text:style-name="Text_20_body"><text:span text:style-name="Strong_20_Emphasis">Corrective adjustment:</text:span></text:p>
      <text:list text:style-name="L30">
        <text:list-item>
          <text:p text:style-name="P60">Plan antagonist progression explicitly for remaining chronicle sessions — antagonist development across arc rather than antagonist repetition </text:p>
        </text:list-item>
        <text:list-item>
          <text:p text:style-name="P60">Introduce secondary antagonist material to complement primary antagonist (different antagonist category — internal institutional, cross-faction, mortal-network, supernatural-corruption, methuselah-tier) </text:p>
        </text:list-item>
        <text:list-item>
          <text:p text:style-name="P59"><text:soft-page-break/>For subsequent chronicles: plan antagonist progression at chronicle preparation alongside chronicle-arc structure </text:p>
        </text:list-item>
      </text:list>
      <text:h text:style-name="Heading_20_3" text:outline-level="3"><text:span text:style-name="Strong_20_Emphasis">Failure Mode 6: Rest-Session Avoidance</text:span></text:h>
      <text:p text:style-name="Text_20_body"><text:span text:style-name="Strong_20_Emphasis">Diagnostic indicators:</text:span></text:p>
      <text:list text:style-name="L31">
        <text:list-item>
          <text:p text:style-name="P62">Every session running at high chronicle pressure without low-pressure development sessions </text:p>
        </text:list-item>
        <text:list-item>
          <text:p text:style-name="P62">Player exhaustion across multi-session chronicle work </text:p>
        </text:list-item>
        <text:list-item>
          <text:p text:style-name="P62">Character development happening only during chronicle-active scenes rather than during dedicated character development sessions </text:p>
        </text:list-item>
        <text:list-item>
          <text:p text:style-name="P61">Chronicle texture flattening through continuous high-pressure operation </text:p>
        </text:list-item>
      </text:list>
      <text:p text:style-name="Text_20_body"><text:span text:style-name="Strong_20_Emphasis">Underlying problem:</text:span> Storyteller avoiding rest sessions through belief that low-pressure sessions are unwelcome; chronicle pacing operating at constant maximum tension.</text:p>
      <text:p text:style-name="Text_20_body"><text:span text:style-name="Strong_20_Emphasis">Corrective adjustment:</text:span></text:p>
      <text:list text:style-name="L32">
        <text:list-item>
          <text:p text:style-name="P64">Schedule explicit rest session within next 2-3 sessions </text:p>
        </text:list-item>
        <text:list-item>
          <text:p text:style-name="P64">Use rest session for character development scenes, atmospheric scenes, institutional rhythm scenes that establish chronicle texture without producing chronicle-active pressure </text:p>
        </text:list-item>
        <text:list-item>
          <text:p text:style-name="P64">Chronicle players generally welcome rest sessions when scheduled deliberately; the failure mode is constant high-pressure operation, not occasional low-pressure sessions </text:p>
        </text:list-item>
        <text:list-item>
          <text:p text:style-name="P63">For subsequent chronicles: plan rest sessions at sessions 4 and 8 of standard arc structure </text:p>
        </text:list-item>
      </text:list>
      <text:h text:style-name="Heading_20_3" text:outline-level="3"><text:span text:style-name="Strong_20_Emphasis">Failure Mode 7: Chronicle-Mode Pivot Failure</text:span></text:h>
      <text:p text:style-name="Text_20_body"><text:span text:style-name="Strong_20_Emphasis">Diagnostic indicators:</text:span></text:p>
      <text:list text:style-name="L33">
        <text:list-item>
          <text:p text:style-name="P66">Multi-mode chronicle operating at single mode despite chronicle scope commitment </text:p>
        </text:list-item>
        <text:list-item>
          <text:p text:style-name="P66">Inter-city scenes flattening chronicle-mode distinctiveness </text:p>
        </text:list-item>
        <text:list-item>
          <text:p text:style-name="P66">Players developing characters that operate at one chronicle mode despite chronicle scope spanning multiple modes </text:p>
        </text:list-item>
        <text:list-item>
          <text:p text:style-name="P65">Chronicle-mode pivot scenes feeling forced rather than chronicle-active </text:p>
        </text:list-item>
      </text:list>
      <text:p text:style-name="Text_20_body"><text:span text:style-name="Strong_20_Emphasis">Underlying problem:</text:span> Chronicle-mode plurality handling not engaged at scale that chronicle scope requires; Continental Coordination Guide chronicle-mode pivot framework not applied.</text:p>
      <text:p text:style-name="Text_20_body"><text:span text:style-name="Strong_20_Emphasis">Corrective adjustment:</text:span></text:p>
      <text:list text:style-name="L34">
        <text:list-item>
          <text:p text:style-name="P68">Apply Continental Coordination Guide handling guidance throughout </text:p>
        </text:list-item>
        <text:list-item>
          <text:p text:style-name="P68">Schedule deliberate chronicle-mode marker scenes at each city establishing distinctive chronicle-mode register </text:p>
        </text:list-item>
        <text:list-item>
          <text:p text:style-name="P68">Render city-specific cultural-political register through specific sensory specificity and operational-character marker patterns </text:p>
        </text:list-item>
        <text:list-item>
          <text:p text:style-name="P67">For subsequent chronicles: plan chronicle-mode plurality handling at chronicle preparation rather than during play </text:p>
        </text:list-item>
      </text:list>
      <text:h text:style-name="Heading_20_3" text:outline-level="3"><text:span text:style-name="Strong_20_Emphasis">Failure Mode 8: Chronicle Conclusion Failure</text:span></text:h>
      <text:p text:style-name="Text_20_body"><text:span text:style-name="Strong_20_Emphasis">Diagnostic indicators:</text:span></text:p>
      <text:list text:style-name="L35">
        <text:list-item>
          <text:p text:style-name="P70">Chronicle approaching planned session count without chronicle-arc resolution </text:p>
        </text:list-item>
        <text:list-item>
          <text:p text:style-name="P70"><text:soft-page-break/>Storyteller planning chronicle extension to accommodate chronicle scope that exceeded original session count </text:p>
        </text:list-item>
        <text:list-item>
          <text:p text:style-name="P70">Players reporting confusion about chronicle conclusion timing </text:p>
        </text:list-item>
        <text:list-item>
          <text:p text:style-name="P69">Chronicle scope creep producing chronicle scope that cannot resolve at sustainable session count </text:p>
        </text:list-item>
      </text:list>
      <text:p text:style-name="Text_20_body"><text:span text:style-name="Strong_20_Emphasis">Underlying problem:</text:span> Chronicle scope expanded beyond original chronicle commitment without scope adjustment; chronicle conclusion infrastructure not protected from scope creep.</text:p>
      <text:p text:style-name="Text_20_body"><text:span text:style-name="Strong_20_Emphasis">Corrective adjustment:</text:span></text:p>
      <text:list text:style-name="L36">
        <text:list-item>
          <text:p text:style-name="P72">Identify chronicle conclusion session explicitly (session N of remaining chronicle session count) </text:p>
        </text:list-item>
        <text:list-item>
          <text:p text:style-name="P72">Plan chronicle conclusion infrastructure in remaining sessions even if chronicle scope cannot fully resolve at sustainable session count </text:p>
        </text:list-item>
        <text:list-item>
          <text:p text:style-name="P72">Either accept partial chronicle resolution at planned chronicle conclusion or commit to chronicle extension with explicit player agreement </text:p>
        </text:list-item>
        <text:list-item>
          <text:p text:style-name="P71">For subsequent chronicles: protect chronicle conclusion session count from scope creep through deliberate chronicle scope discipline </text:p>
        </text:list-item>
      </text:lis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Text_20_body"><text:soft-page-break/>Five worked pacing templates demonstrating arc-level pacing for specific chronicle configurations. Each template provides session-by-session pacing guidance for chronicle preparation.</text:p>
      <text:h text:style-name="Heading_20_3" text:outline-level="3"><text:span text:style-name="Strong_20_Emphasis">Template 1: Single-Coterie Brisbane Chronicle (10 sessions)</text:span></text:h>
      <text:p text:style-name="Text_20_body">Aligned with Brisbane Sabbat-Survivor mode and the Burning Shepherds pack scenario.</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Table_20_Heading">Session</text:p>
            </table:table-cell>
            <table:table-cell table:style-name="Table1.A1" office:value-type="string">
              <text:p text:style-name="Table_20_Heading">Arc phase</text:p>
            </table:table-cell>
            <table:table-cell table:style-name="Table1.A1" office:value-type="string">
              <text:p text:style-name="Table_20_Heading">Session shape</text:p>
            </table:table-cell>
            <table:table-cell table:style-name="Table1.A1" office:value-type="string">
              <text:p text:style-name="Table_20_Heading">Chronicle calendar</text:p>
            </table:table-cell>
            <table:table-cell table:style-name="Table1.A1" office:value-type="string">
              <text:p text:style-name="Table_20_Heading">Notes</text:p>
            </table:table-cell>
          </table:table-row>
        </table:table-header-rows>
        <table:table-row>
          <table:table-cell table:style-name="Table1.A1" office:value-type="string">
            <text:p text:style-name="Table_20_Contents">1</text:p>
          </table:table-cell>
          <table:table-cell table:style-name="Table1.A1" office:value-type="string">
            <text:p text:style-name="Table_20_Contents">Setup</text:p>
          </table:table-cell>
          <table:table-cell table:style-name="Table1.A1" office:value-type="string">
            <text:p text:style-name="Table_20_Contents">Rising action</text:p>
          </table:table-cell>
          <table:table-cell table:style-name="Table1.A1" office:value-type="string">
            <text:p text:style-name="Table_20_Contents">Late October 2025</text:p>
          </table:table-cell>
          <table:table-cell table:style-name="Table1.A1" office:value-type="string">
            <text:p text:style-name="Table_20_Contents">Burning Shepherds pack establishment scenes; Ty's indoctrination context</text:p>
          </table:table-cell>
        </table:table-row>
        <table:table-row>
          <table:table-cell table:style-name="Table1.A1" office:value-type="string">
            <text:p text:style-name="Table_20_Contents">2</text:p>
          </table:table-cell>
          <table:table-cell table:style-name="Table1.A1" office:value-type="string">
            <text:p text:style-name="Table_20_Contents">Setup</text:p>
          </table:table-cell>
          <table:table-cell table:style-name="Table1.A1" office:value-type="string">
            <text:p text:style-name="Table_20_Contents">Rising action</text:p>
          </table:table-cell>
          <table:table-cell table:style-name="Table1.A1" office:value-type="string">
            <text:p text:style-name="Table_20_Contents">Late October 2025</text:p>
          </table:table-cell>
          <table:table-cell table:style-name="Table1.A1" office:value-type="string">
            <text:p text:style-name="Table_20_Contents">Pack-leader Hesh briefing; operational specialty selection question (Scenario 1 opening)</text:p>
          </table:table-cell>
        </table:table-row>
        <table:table-row>
          <table:table-cell table:style-name="Table1.A1" office:value-type="string">
            <text:p text:style-name="Table_20_Contents">3</text:p>
          </table:table-cell>
          <table:table-cell table:style-name="Table1.A1" office:value-type="string">
            <text:p text:style-name="Table_20_Contents">Rising action</text:p>
          </table:table-cell>
          <table:table-cell table:style-name="Table1.A1" office:value-type="string">
            <text:p text:style-name="Table_20_Contents">Rising action</text:p>
          </table:table-cell>
          <table:table-cell table:style-name="Table1.A1" office:value-type="string">
            <text:p text:style-name="Table_20_Contents">Early November 2025</text:p>
          </table:table-cell>
          <table:table-cell table:style-name="Table1.A1" office:value-type="string">
            <text:p text:style-name="Table_20_Contents">Operational specialty cultivation scenes; pack-cousin development with Marcus</text:p>
          </table:table-cell>
        </table:table-row>
        <table:table-row>
          <table:table-cell table:style-name="Table1.A1" office:value-type="string">
            <text:p text:style-name="Table_20_Contents">4</text:p>
          </table:table-cell>
          <table:table-cell table:style-name="Table1.A1" office:value-type="string">
            <text:p text:style-name="Table_20_Contents">Rising action</text:p>
          </table:table-cell>
          <table:table-cell table:style-name="Table1.A1" office:value-type="string">
            <text:p text:style-name="Table_20_Contents">Constant tension</text:p>
          </table:table-cell>
          <table:table-cell table:style-name="Table1.A1" office:value-type="string">
            <text:p text:style-name="Table_20_Contents">Early November 2025</text:p>
          </table:table-cell>
          <table:table-cell table:style-name="Table1.A1" office:value-type="string">
            <text:p text:style-name="Table_20_Contents">Templar Cruz-Molina dissent crisis institutional pressure introduction</text:p>
          </table:table-cell>
        </table:table-row>
        <table:table-row>
          <table:table-cell table:style-name="Table1.A1" office:value-type="string">
            <text:p text:style-name="Table_20_Contents">5</text:p>
          </table:table-cell>
          <table:table-cell table:style-name="Table1.A1" office:value-type="string">
            <text:p text:style-name="Table_20_Contents">Mid-arc complication</text:p>
          </table:table-cell>
          <table:table-cell table:style-name="Table1.A1" office:value-type="string">
            <text:p text:style-name="Table_20_Contents">Pivot session</text:p>
          </table:table-cell>
          <table:table-cell table:style-name="Table1.A1" office:value-type="string">
            <text:p text:style-name="Table_20_Contents">Mid November 2025</text:p>
          </table:table-cell>
          <table:table-cell table:style-name="Table1.A1" office:value-type="string">
            <text:p text:style-name="Table_20_Contents">November 3 formalisation ritual; chronicle-defining ritual moment producing arc trajectory shift</text:p>
          </table:table-cell>
        </table:table-row>
        <table:table-row>
          <table:table-cell table:style-name="Table1.A1" office:value-type="string">
            <text:p text:style-name="Table_20_Contents">6</text:p>
          </table:table-cell>
          <table:table-cell table:style-name="Table1.A1" office:value-type="string">
            <text:p text:style-name="Table_20_Contents">Climax buildup</text:p>
          </table:table-cell>
          <table:table-cell table:style-name="Table1.A1" office:value-type="string">
            <text:p text:style-name="Table_20_Contents">Constant tension</text:p>
          </table:table-cell>
          <table:table-cell table:style-name="Table1.A1" office:value-type="string">
            <text:p text:style-name="Table_20_Contents">Mid-late November 2025</text:p>
          </table:table-cell>
          <table:table-cell table:style-name="Table1.A1" office:value-type="string">
            <text:p text:style-name="Table_20_Contents">Post-formalisation operational engagement; Templar Cruz-Molina dissent crisis intensification</text:p>
          </table:table-cell>
        </table:table-row>
        <table:table-row>
          <table:table-cell table:style-name="Table1.A1" office:value-type="string">
            <text:p text:style-name="Table_20_Contents">7</text:p>
          </table:table-cell>
          <table:table-cell table:style-name="Table1.A1" office:value-type="string">
            <text:p text:style-name="Table_20_Contents">Climax buildup</text:p>
          </table:table-cell>
          <table:table-cell table:style-name="Table1.A1" office:value-type="string">
            <text:p text:style-name="Table_20_Contents">Rising action</text:p>
          </table:table-cell>
          <table:table-cell table:style-name="Table1.A1" office:value-type="string">
            <text:p text:style-name="Table_20_Contents">Late November 2025</text:p>
          </table:table-cell>
          <table:table-cell table:style-name="Table1.A1" office:value-type="string">
            <text:p text:style-name="Table_20_Contents">Chronicle-active operational pressure; Bishop Callista institutional engagement</text:p>
          </table:table-cell>
        </table:table-row>
        <table:table-row>
          <table:table-cell table:style-name="Table1.A1" office:value-type="string">
            <text:p text:style-name="Table_20_Contents">8</text:p>
          </table:table-cell>
          <table:table-cell table:style-name="Table1.A1" office:value-type="string">
            <text:p text:style-name="Table_20_Contents">Climax buildup</text:p>
          </table:table-cell>
          <table:table-cell table:style-name="Table1.A1" office:value-type="string">
            <text:p text:style-name="Table_20_Contents">Rising action</text:p>
          </table:table-cell>
          <table:table-cell table:style-name="Table1.A1" office:value-type="string">
            <text:p text:style-name="Table_20_Contents">Early December 2025</text:p>
          </table:table-cell>
          <table:table-cell table:style-name="Table1.A1" office:value-type="string">
            <text:p text:style-name="Table_20_Contents">Pre-climax operational positioning; cross-Wyrm-infrastructure pressure introduction</text:p>
          </table:table-cell>
        </table:table-row>
        <table:table-row>
          <table:table-cell table:style-name="Table1.A1" office:value-type="string">
            <text:p text:style-name="Table_20_Contents">9</text:p>
          </table:table-cell>
          <table:table-cell table:style-name="Table1.A1" office:value-type="string">
            <text:p text:style-name="Table_20_Contents">Climax</text:p>
          </table:table-cell>
          <table:table-cell table:style-name="Table1.A1" office:value-type="string">
            <text:p text:style-name="Table_20_Contents">Climax session</text:p>
          </table:table-cell>
          <table:table-cell table:style-name="Table1.A1" office:value-type="string">
            <text:p text:style-name="Table_20_Contents">Mid December 2025</text:p>
          </table:table-cell>
          <table:table-cell table:style-name="Table1.A1" office:value-type="string">
            <text:p text:style-name="Table_20_Contents">Chronicle-defining institutional crisis resolution moment</text:p>
          </table:table-cell>
        </table:table-row>
        <table:table-row>
          <table:table-cell table:style-name="Table1.A1" office:value-type="string">
            <text:p text:style-name="Table_20_Contents">10</text:p>
          </table:table-cell>
          <table:table-cell table:style-name="Table1.A1" office:value-type="string">
            <text:p text:style-name="Table_20_Contents">Resolution</text:p>
          </table:table-cell>
          <table:table-cell table:style-name="Table1.A1" office:value-type="string">
            <text:p text:style-name="Table_20_Contents">Constant tension</text:p>
          </table:table-cell>
          <table:table-cell table:style-name="Table1.A1" office:value-type="string">
            <text:p text:style-name="Table_20_Contents">Late December 2025</text:p>
          </table:table-cell>
          <table:table-cell table:style-name="Table1.A1" office:value-type="string">
            <text:p text:style-name="Table_20_Contents">Post-climax resolution; continuing chronicle position establishment</text:p>
          </table:table-cell>
        </table:table-row>
      </table:table>
      <text:p text:style-name="Text_20_body"><text:span text:style-name="Strong_20_Emphasis">Calendar-level pacing:</text:span> Compressed chronological pacing covering approximately 8 chronicle calendar weeks across 10 sessions.</text:p>
      <text:h text:style-name="Heading_20_3" text:outline-level="3"><text:span text:style-name="Strong_20_Emphasis">Template 2: Single-City Melbourne Chronicle (14 sessions, two-arc structure)</text:span></text:h>
      <text:p text:style-name="Text_20_body">Aligned with Melbourne Camarilla orthodox mode and Toorak Circle institutional infrastructure.</text:p>
      <text:p text:style-name="Text_20_body"><text:span text:style-name="Strong_20_Emphasis">Arc 1: Toorak Circle Institutional Engagement (sessions 1-7)</text:span></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Table_20_Heading">Session</text:p>
            </table:table-cell>
            <table:table-cell table:style-name="Table2.A1" office:value-type="string">
              <text:p text:style-name="Table_20_Heading">Arc phase</text:p>
            </table:table-cell>
            <table:table-cell table:style-name="Table2.A1" office:value-type="string">
              <text:p text:style-name="Table_20_Heading">Session shape</text:p>
            </table:table-cell>
            <table:table-cell table:style-name="Table2.A1" office:value-type="string">
              <text:p text:style-name="Table_20_Heading">Chronicle calendar</text:p>
            </table:table-cell>
            <table:table-cell table:style-name="Table2.A1" office:value-type="string">
              <text:p text:style-name="Table_20_Heading">Notes</text:p>
            </table:table-cell>
          </table:table-row>
        </table:table-header-rows>
        <table:table-row>
          <table:table-cell table:style-name="Table2.A1" office:value-type="string">
            <text:p text:style-name="Table_20_Contents">1</text:p>
          </table:table-cell>
          <table:table-cell table:style-name="Table2.A1" office:value-type="string">
            <text:p text:style-name="Table_20_Contents">Setup</text:p>
          </table:table-cell>
          <table:table-cell table:style-name="Table2.A1" office:value-type="string">
            <text:p text:style-name="Table_20_Contents">Rising action</text:p>
          </table:table-cell>
          <table:table-cell table:style-name="Table2.A1" office:value-type="string">
            <text:p text:style-name="Table_20_Contents">October 2025</text:p>
          </table:table-cell>
          <table:table-cell table:style-name="Table2.A1" office:value-type="string">
            <text:p text:style-name="Table_20_Contents">Toorak Circle apprentice positioning; institutional context establishment</text:p>
          </table:table-cell>
        </table:table-row>
        <table:table-row>
          <table:table-cell table:style-name="Table2.A1" office:value-type="string">
            <text:p text:style-name="Table_20_Contents">2</text:p>
          </table:table-cell>
          <table:table-cell table:style-name="Table2.A1" office:value-type="string">
            <text:p text:style-name="Table_20_Contents">Setup</text:p>
          </table:table-cell>
          <table:table-cell table:style-name="Table2.A1" office:value-type="string">
            <text:p text:style-name="Table_20_Contents">Rising action</text:p>
          </table:table-cell>
          <table:table-cell table:style-name="Table2.A1" office:value-type="string">
            <text:p text:style-name="Table_20_Contents">October 2025</text:p>
          </table:table-cell>
          <table:table-cell table:style-name="Table2.A1" office:value-type="string">
            <text:p text:style-name="Table_20_Contents">Lytton operational engagement; primary chronicle hooks introduction</text:p>
          </table:table-cell>
        </table:table-row>
        <text:soft-page-break/>
        <table:table-row>
          <table:table-cell table:style-name="Table2.A1" office:value-type="string">
            <text:p text:style-name="Table_20_Contents">3</text:p>
          </table:table-cell>
          <table:table-cell table:style-name="Table2.A1" office:value-type="string">
            <text:p text:style-name="Table_20_Contents">Rising action</text:p>
          </table:table-cell>
          <table:table-cell table:style-name="Table2.A1" office:value-type="string">
            <text:p text:style-name="Table_20_Contents">Constant tension</text:p>
          </table:table-cell>
          <table:table-cell table:style-name="Table2.A1" office:value-type="string">
            <text:p text:style-name="Table_20_Contents">Early November 2025</text:p>
          </table:table-cell>
          <table:table-cell table:style-name="Table2.A1" office:value-type="string">
            <text:p text:style-name="Table_20_Contents">Quarterly Toorak Circle meeting; institutional politics development</text:p>
          </table:table-cell>
        </table:table-row>
        <table:table-row>
          <table:table-cell table:style-name="Table2.A1" office:value-type="string">
            <text:p text:style-name="Table_20_Contents">4</text:p>
          </table:table-cell>
          <table:table-cell table:style-name="Table2.A1" office:value-type="string">
            <text:p text:style-name="Table_20_Contents">Rising action</text:p>
          </table:table-cell>
          <table:table-cell table:style-name="Table2.A1" office:value-type="string">
            <text:p text:style-name="Table_20_Contents">Rest session</text:p>
          </table:table-cell>
          <table:table-cell table:style-name="Table2.A1" office:value-type="string">
            <text:p text:style-name="Table_20_Contents">Mid November 2025</text:p>
          </table:table-cell>
          <table:table-cell table:style-name="Table2.A1" office:value-type="string">
            <text:p text:style-name="Table_20_Contents">Character development scenes; Touchstone-relationship development</text:p>
          </table:table-cell>
        </table:table-row>
        <table:table-row>
          <table:table-cell table:style-name="Table2.A1" office:value-type="string">
            <text:p text:style-name="Table_20_Contents">5</text:p>
          </table:table-cell>
          <table:table-cell table:style-name="Table2.A1" office:value-type="string">
            <text:p text:style-name="Table_20_Contents">Mid-arc complication</text:p>
          </table:table-cell>
          <table:table-cell table:style-name="Table2.A1" office:value-type="string">
            <text:p text:style-name="Table_20_Contents">Pivot session</text:p>
          </table:table-cell>
          <table:table-cell table:style-name="Table2.A1" office:value-type="string">
            <text:p text:style-name="Table_20_Contents">Mid-late November 2025</text:p>
          </table:table-cell>
          <table:table-cell table:style-name="Table2.A1" office:value-type="string">
            <text:p text:style-name="Table_20_Contents">Lytton Beckoning trajectory operational complication</text:p>
          </table:table-cell>
        </table:table-row>
        <table:table-row>
          <table:table-cell table:style-name="Table2.A1" office:value-type="string">
            <text:p text:style-name="Table_20_Contents">6</text:p>
          </table:table-cell>
          <table:table-cell table:style-name="Table2.A1" office:value-type="string">
            <text:p text:style-name="Table_20_Contents">Climax buildup</text:p>
          </table:table-cell>
          <table:table-cell table:style-name="Table2.A1" office:value-type="string">
            <text:p text:style-name="Table_20_Contents">Rising action</text:p>
          </table:table-cell>
          <table:table-cell table:style-name="Table2.A1" office:value-type="string">
            <text:p text:style-name="Table_20_Contents">Late November 2025</text:p>
          </table:table-cell>
          <table:table-cell table:style-name="Table2.A1" office:value-type="string">
            <text:p text:style-name="Table_20_Contents">Trajectory-management institutional response</text:p>
          </table:table-cell>
        </table:table-row>
        <table:table-row>
          <table:table-cell table:style-name="Table2.A1" office:value-type="string">
            <text:p text:style-name="Table_20_Contents">7</text:p>
          </table:table-cell>
          <table:table-cell table:style-name="Table2.A1" office:value-type="string">
            <text:p text:style-name="Table_20_Contents">Arc 1 climax</text:p>
          </table:table-cell>
          <table:table-cell table:style-name="Table2.A1" office:value-type="string">
            <text:p text:style-name="Table_20_Contents">Climax session</text:p>
          </table:table-cell>
          <table:table-cell table:style-name="Table2.A1" office:value-type="string">
            <text:p text:style-name="Table_20_Contents">Early December 2025</text:p>
          </table:table-cell>
          <table:table-cell table:style-name="Table2.A1" office:value-type="string">
            <text:p text:style-name="Table_20_Contents">Arc 1 chronicle-defining institutional moment</text:p>
          </table:table-cell>
        </table:table-row>
      </table:table>
      <text:p text:style-name="Text_20_body"><text:span text:style-name="Strong_20_Emphasis">Arc 2: Continental Convergent Pressure (sessions 8-14)</text:span></text:p>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Table_20_Heading">Session</text:p>
            </table:table-cell>
            <table:table-cell table:style-name="Table3.A1" office:value-type="string">
              <text:p text:style-name="Table_20_Heading">Arc phase</text:p>
            </table:table-cell>
            <table:table-cell table:style-name="Table3.A1" office:value-type="string">
              <text:p text:style-name="Table_20_Heading">Session shape</text:p>
            </table:table-cell>
            <table:table-cell table:style-name="Table3.A1" office:value-type="string">
              <text:p text:style-name="Table_20_Heading">Chronicle calendar</text:p>
            </table:table-cell>
            <table:table-cell table:style-name="Table3.A1" office:value-type="string">
              <text:p text:style-name="Table_20_Heading">Notes</text:p>
            </table:table-cell>
          </table:table-row>
        </table:table-header-rows>
        <table:table-row>
          <table:table-cell table:style-name="Table3.A1" office:value-type="string">
            <text:p text:style-name="Table_20_Contents">8</text:p>
          </table:table-cell>
          <table:table-cell table:style-name="Table3.A1" office:value-type="string">
            <text:p text:style-name="Table_20_Contents">Setup</text:p>
          </table:table-cell>
          <table:table-cell table:style-name="Table3.A1" office:value-type="string">
            <text:p text:style-name="Table_20_Contents">Constant tension</text:p>
          </table:table-cell>
          <table:table-cell table:style-name="Table3.A1" office:value-type="string">
            <text:p text:style-name="Table_20_Contents">January 2026</text:p>
          </table:table-cell>
          <table:table-cell table:style-name="Table3.A1" office:value-type="string">
            <text:p text:style-name="Table_20_Contents">Australia Day continental institutional positioning; Phase Two pre-positioning intensification</text:p>
          </table:table-cell>
        </table:table-row>
        <table:table-row>
          <table:table-cell table:style-name="Table3.A1" office:value-type="string">
            <text:p text:style-name="Table_20_Contents">9</text:p>
          </table:table-cell>
          <table:table-cell table:style-name="Table3.A1" office:value-type="string">
            <text:p text:style-name="Table_20_Contents">Rising action</text:p>
          </table:table-cell>
          <table:table-cell table:style-name="Table3.A1" office:value-type="string">
            <text:p text:style-name="Table_20_Contents">Rising action</text:p>
          </table:table-cell>
          <table:table-cell table:style-name="Table3.A1" office:value-type="string">
            <text:p text:style-name="Table_20_Contents">February 2026</text:p>
          </table:table-cell>
          <table:table-cell table:style-name="Table3.A1" office:value-type="string">
            <text:p text:style-name="Table_20_Contents">Continental cross-Wyrm-infrastructure pressure introduction</text:p>
          </table:table-cell>
        </table:table-row>
        <table:table-row>
          <table:table-cell table:style-name="Table3.A1" office:value-type="string">
            <text:p text:style-name="Table_20_Contents">10</text:p>
          </table:table-cell>
          <table:table-cell table:style-name="Table3.A1" office:value-type="string">
            <text:p text:style-name="Table_20_Contents">Rising action</text:p>
          </table:table-cell>
          <table:table-cell table:style-name="Table3.A1" office:value-type="string">
            <text:p text:style-name="Table_20_Contents">Constant tension</text:p>
          </table:table-cell>
          <table:table-cell table:style-name="Table3.A1" office:value-type="string">
            <text:p text:style-name="Table_20_Contents">March 2026</text:p>
          </table:table-cell>
          <table:table-cell table:style-name="Table3.A1" office:value-type="string">
            <text:p text:style-name="Table_20_Contents">Adelaide Festival cultural-cultivation operational coordination</text:p>
          </table:table-cell>
        </table:table-row>
        <table:table-row>
          <table:table-cell table:style-name="Table3.A1" office:value-type="string">
            <text:p text:style-name="Table_20_Contents">11</text:p>
          </table:table-cell>
          <table:table-cell table:style-name="Table3.A1" office:value-type="string">
            <text:p text:style-name="Table_20_Contents">Mid-arc complication</text:p>
          </table:table-cell>
          <table:table-cell table:style-name="Table3.A1" office:value-type="string">
            <text:p text:style-name="Table_20_Contents">Pivot session</text:p>
          </table:table-cell>
          <table:table-cell table:style-name="Table3.A1" office:value-type="string">
            <text:p text:style-name="Table_20_Contents">April 2026</text:p>
          </table:table-cell>
          <table:table-cell table:style-name="Table3.A1" office:value-type="string">
            <text:p text:style-name="Table_20_Contents">Anzac Day continental Camarilla institutional formal occasion; chronicle-defining continental moment</text:p>
          </table:table-cell>
        </table:table-row>
        <table:table-row>
          <table:table-cell table:style-name="Table3.A1" office:value-type="string">
            <text:p text:style-name="Table_20_Contents">12</text:p>
          </table:table-cell>
          <table:table-cell table:style-name="Table3.A1" office:value-type="string">
            <text:p text:style-name="Table_20_Contents">Climax buildup</text:p>
          </table:table-cell>
          <table:table-cell table:style-name="Table3.A1" office:value-type="string">
            <text:p text:style-name="Table_20_Contents">Rising action</text:p>
          </table:table-cell>
          <table:table-cell table:style-name="Table3.A1" office:value-type="string">
            <text:p text:style-name="Table_20_Contents">May 2026</text:p>
          </table:table-cell>
          <table:table-cell table:style-name="Table3.A1" office:value-type="string">
            <text:p text:style-name="Table_20_Contents">Pre-climax continental institutional positioning</text:p>
          </table:table-cell>
        </table:table-row>
        <table:table-row>
          <table:table-cell table:style-name="Table3.A1" office:value-type="string">
            <text:p text:style-name="Table_20_Contents">13</text:p>
          </table:table-cell>
          <table:table-cell table:style-name="Table3.A1" office:value-type="string">
            <text:p text:style-name="Table_20_Contents">Climax buildup</text:p>
          </table:table-cell>
          <table:table-cell table:style-name="Table3.A1" office:value-type="string">
            <text:p text:style-name="Table_20_Contents">Constant tension</text:p>
          </table:table-cell>
          <table:table-cell table:style-name="Table3.A1" office:value-type="string">
            <text:p text:style-name="Table_20_Contents">Mid 2026</text:p>
          </table:table-cell>
          <table:table-cell table:style-name="Table3.A1" office:value-type="string">
            <text:p text:style-name="Table_20_Contents">Final pre-climax operational engagement</text:p>
          </table:table-cell>
        </table:table-row>
        <table:table-row>
          <table:table-cell table:style-name="Table3.A1" office:value-type="string">
            <text:p text:style-name="Table_20_Contents">14</text:p>
          </table:table-cell>
          <table:table-cell table:style-name="Table3.A1" office:value-type="string">
            <text:p text:style-name="Table_20_Contents">Arc 2 climax + Resolution</text:p>
          </table:table-cell>
          <table:table-cell table:style-name="Table3.A1" office:value-type="string">
            <text:p text:style-name="Table_20_Contents">Climax session</text:p>
          </table:table-cell>
          <table:table-cell table:style-name="Table3.A1" office:value-type="string">
            <text:p text:style-name="Table_20_Contents">Mid-late 2026</text:p>
          </table:table-cell>
          <table:table-cell table:style-name="Table3.A1" office:value-type="string">
            <text:p text:style-name="Table_20_Contents">Chronicle-defining continental institutional moment + resolution</text:p>
          </table:table-cell>
        </table:table-row>
      </table:table>
      <text:p text:style-name="Text_20_body"><text:span text:style-name="Strong_20_Emphasis">Calendar-level pacing:</text:span> Real-time chronological pacing covering approximately 10 chronicle calendar months across 14 sessions.</text:p>
      <text:h text:style-name="Heading_20_3" text:outline-level="3"><text:span text:style-name="Strong_20_Emphasis">Template 3: Three-City Continental Phase Two Chronicle (22 sessions, three-arc structure)</text:span></text:h>
      <text:p text:style-name="Text_20_body">Aligned with Phase Two continental operation chronicle scope (Sydney + Melbourne + Adelaide).</text:p>
      <text:p text:style-name="Text_20_body"><text:span text:style-name="Strong_20_Emphasis">Arc 1: Phase Two Pre-Positioning (sessions 1-7)</text:span></text:p>
      <text:p text:style-name="Text_20_body">Covers approximately October 2025 through January 2026; establishes Phase Two pre-positioning infrastructure across all three cities; introduces methuselah-tempo register at Sydney with Camarilla orthodox at Melbourne and Adelaide.</text:p>
      <text:p text:style-name="Text_20_body"><text:span text:style-name="Strong_20_Emphasis">Arc 2: Continental Operation Engagement (sessions 8-15)</text:span></text:p>
      <text:p text:style-name="Text_20_body">Covers approximately February through July 2026; Phase Two operational engagement at chronicle-active continental scale; mid-arc complication at session 11-12 (Anzac Day continental <text:soft-page-break/>Camarilla institutional formal occasion or chronicle-active continental Article 8 activation possibility); arc climax at session 14-15.</text:p>
      <text:p text:style-name="Text_20_body"><text:span text:style-name="Strong_20_Emphasis">Arc 3: Continental Climax (sessions 16-22)</text:span></text:p>
      <text:p text:style-name="Text_20_body">Covers approximately August 2026 through end of 2026; Phase Two continental climax; chronicle-defining continental institutional moment at session 20-21; resolution at session 22.</text:p>
      <text:p text:style-name="Text_20_body"><text:span text:style-name="Strong_20_Emphasis">Calendar-level pacing:</text:span> Real-time chronological pacing covering approximately 14 chronicle calendar months across 22 sessions.</text:p>
      <text:h text:style-name="Heading_20_3" text:outline-level="3"><text:span text:style-name="Strong_20_Emphasis">Template 4: Cross-Splat Article 8 Chronicle (28 sessions, four-arc structure)</text:span></text:h>
      <text:p text:style-name="Text_20_body">Aligned with cross-splat continental chronicle scope engaging Pentex and Black Spiral Dancer antagonist material.</text:p>
      <text:p text:style-name="Text_20_body"><text:span text:style-name="Strong_20_Emphasis">Arc 1: Continental Convergent Pressure Establishment (sessions 1-6)</text:span></text:p>
      <text:p text:style-name="Text_20_body">Establishes continental scope across Australian metropolitan domains; introduces cross-splat material as background context; covers approximately October 2025 through January 2026.</text:p>
      <text:p text:style-name="Text_20_body"><text:span text:style-name="Strong_20_Emphasis">Arc 2: Cross-Splat Antagonist Engagement (sessions 7-14)</text:span></text:p>
      <text:p text:style-name="Text_20_body">Cross-splat material engages at chronicle-central scale; Pentex Australian operations engagement; Black Spiral Dancer Hive operational pressure engagement; mid-arc complication at session 10-11 (chronicle-active continental Article 8 activation possibility); covers approximately February through May 2026.</text:p>
      <text:p text:style-name="Text_20_body"><text:span text:style-name="Strong_20_Emphasis">Arc 3: Article 8 Operational Engagement (sessions 15-22)</text:span></text:p>
      <text:p text:style-name="Text_20_body">Continental Cress Truce Article 8 operations engage at chronicle-defining continental scale; joint Garou-Kindred cooperation operations; chronicle-active continental cross-supernatural diplomatic infrastructure development; arc climax at session 21-22; covers approximately June through September 2026.</text:p>
      <text:p text:style-name="Text_20_body"><text:span text:style-name="Strong_20_Emphasis">Arc 4: October 2026 Brisbane Operation Climax (sessions 23-28)</text:span></text:p>
      <text:p text:style-name="Text_20_body">Chronicle-defining moment at session 25-26 (October 2026 Brisbane Glass Walker operation); cross-Pacific institutional implications; post-operation continental institutional reorganisation; chronicle conclusion at session 28; covers approximately October through December 2026.</text:p>
      <text:p text:style-name="Text_20_body"><text:span text:style-name="Strong_20_Emphasis">Calendar-level pacing:</text:span> Real-time chronological pacing covering approximately 14 chronicle calendar months across 28 sessions with chronicle-defining endpoint at October 2026.</text:p>
      <text:h text:style-name="Heading_20_3" text:outline-level="3"><text:span text:style-name="Strong_20_Emphasis">Template 5: Continental Cross-Pacific Sabbat-Refusenik Chronicle (Multi-chronicle campaign, 35+ sessions across multiple chronicles)</text:span></text:h>
      <text:p text:style-name="Text_20_body">Aligned with continental cross-Pacific Sabbat-refusenik chronicle scope.</text:p>
      <text:p text:style-name="Text_20_body"><text:span text:style-name="Strong_20_Emphasis">Chronicle 1: Continental Cross-Pacific Establishment (12 sessions)</text:span></text:p>
      <text:p text:style-name="Text_20_body">Establishes continental cross-Pacific scope; introduces all three remaining Cardinals; covers approximately 6 chronicle calendar months.</text:p>
      <text:p text:style-name="Text_20_body"><text:span text:style-name="Strong_20_Emphasis">Chronicle 2: Cardinal Trajectory Convergent Pressure (12 sessions)</text:span></text:p>
      <text:p text:style-name="Text_20_body"><text:soft-page-break/>Cardinal Beckoning trajectories at chronicle-active continental scale; cross-Cardinal correspondence channel intensification; covers approximately 8-10 chronicle calendar months.</text:p>
      <text:p text:style-name="Text_20_body"><text:span text:style-name="Strong_20_Emphasis">Chronicle 3: Continental Cross-Pacific Climax (12+ sessions)</text:span></text:p>
      <text:p text:style-name="Text_20_body">Cardinal succession question dynamics at chronicle-defining continental scale; potential continental institutional reorganisation; chronicle-defining continental cross-Pacific institutional infrastructure development; covers approximately 12 chronicle calendar months including chronicle-defining Cardinal succession events.</text:p>
      <text:p text:style-name="Text_20_body"><text:span text:style-name="Strong_20_Emphasis">Calendar-level pacing:</text:span> Multi-year chronicle calendar scope (potentially 24-36 chronicle calendar months) across 36+ chronicle sessions.</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Text_20_body"><text:soft-page-break/>For Storytellers running chronicles via AI prompt configuration, AI prompts can be configured for pacing support across the five pacing layers. AI pacing support operates as Storyteller assistance rather than as Storyteller replacement — the AI helps maintain pacing discipline that Storytellers may struggle to maintain across extended chronicle work.</text:p>
      <text:h text:style-name="Heading_20_3" text:outline-level="3"><text:span text:style-name="Strong_20_Emphasis">Pacing-aware prompt configuration:</text:span></text:h>
      <text:p text:style-name="Preformatted_20_Text"><text:span text:style-name="Source_20_Text">This chronicle operates at [scope] across [planned session count] sessions.</text:span></text:p>
      <text:p text:style-name="Preformatted_20_Text"/>
      <text:p text:style-name="Preformatted_20_Text"><text:span text:style-name="Source_20_Text">Current chronicle pacing position:</text:span></text:p>
      <text:p text:style-name="Preformatted_20_Text"><text:span text:style-name="Source_20_Text">- Session: [N of total]</text:span></text:p>
      <text:p text:style-name="Preformatted_20_Text"><text:span text:style-name="Source_20_Text">- Arc phase: [setup / rising action / mid-arc complication / climax </text:span></text:p>
      <text:p text:style-name="Preformatted_20_Text"><text:span text:style-name="Source_20_Text"><text:s text:c="2"/>buildup / climax / resolution]</text:span></text:p>
      <text:p text:style-name="Preformatted_20_Text"><text:span text:style-name="Source_20_Text">- Chronicle calendar position: [date]</text:span></text:p>
      <text:p text:style-name="Preformatted_20_Text"><text:span text:style-name="Source_20_Text">- Time elapsed since chronicle launch: [chronicle calendar duration]</text:span></text:p>
      <text:p text:style-name="Preformatted_20_Text"/>
      <text:p text:style-name="Preformatted_20_Text"><text:span text:style-name="Source_20_Text">Pacing layer status:</text:span></text:p>
      <text:p text:style-name="Preformatted_20_Text"><text:span text:style-name="Source_20_Text">- Scene-level: [current scene type and intended length]</text:span></text:p>
      <text:p text:style-name="Preformatted_20_Text"><text:span text:style-name="Source_20_Text">- Session-level: [current session shape — rising action / constant </text:span></text:p>
      <text:p text:style-name="Preformatted_20_Text"><text:span text:style-name="Source_20_Text"><text:s text:c="2"/>tension / rest / pivot / climax]</text:span></text:p>
      <text:p text:style-name="Preformatted_20_Text"><text:span text:style-name="Source_20_Text">- Arc-level: [current arc phase and remaining arc sessions]</text:span></text:p>
      <text:p text:style-name="Preformatted_20_Text"><text:span text:style-name="Source_20_Text">- Chronicle-level: [current arc number of total arcs]</text:span></text:p>
      <text:p text:style-name="Preformatted_20_Text"><text:span text:style-name="Source_20_Text">- Calendar-level: [chronicle calendar progression rate appropriate </text:span></text:p>
      <text:p text:style-name="Preformatted_20_Text"><text:span text:style-name="Source_20_Text"><text:s text:c="2"/>for chronicle scope]</text:span></text:p>
      <text:p text:style-name="Preformatted_20_Text"/>
      <text:p text:style-name="Preformatted_20_Text"><text:span text:style-name="Source_20_Text">Apply pacing-specific handling guidance:</text:span></text:p>
      <text:p text:style-name="Preformatted_20_Text"><text:span text:style-name="Source_20_Text">- Maintain scene-level pacing at planned scene length</text:span></text:p>
      <text:p text:style-name="Preformatted_20_Text"><text:span text:style-name="Source_20_Text">- Maintain session-level pacing at planned session shape</text:span></text:p>
      <text:p text:style-name="Preformatted_20_Text"><text:span text:style-name="Source_20_Text">- Maintain arc-level pacing at planned arc phase</text:span></text:p>
      <text:p text:style-name="Preformatted_20_Text"><text:span text:style-name="Source_20_Text">- Resist scope creep that would extend chronicle beyond planned </text:span></text:p>
      <text:p text:style-name="Preformatted_20_Text"><text:span text:style-name="Source_20_Text"><text:s text:c="2"/>session count</text:span></text:p>
      <text:p text:style-name="Preformatted_20_Text"><text:span text:style-name="Source_20_Text">- Resist calendar drift that would advance chronicle calendar faster </text:span></text:p>
      <text:p text:style-name="Preformatted_20_Text"><text:span text:style-name="Source_20_Text"><text:s text:c="2"/>than session-level pacing supports</text:span></text:p>
      <text:p text:style-name="Preformatted_20_Text"/>
      <text:p text:style-name="Preformatted_20_Text"><text:span text:style-name="Source_20_Text">Apply pacing failure mode recognition:</text:span></text:p>
      <text:p text:style-name="Preformatted_20_Text"><text:span text:style-name="Source_20_Text">- Sagging middle (corrective: introduce mid-arc complication)</text:span></text:p>
      <text:p text:style-name="Preformatted_20_Text"><text:span text:style-name="Source_20_Text">- Premature climax (corrective: extend climax buildup phase)</text:span></text:p>
      <text:p text:style-name="Preformatted_20_Text"><text:span text:style-name="Source_20_Text">- Calendar drift (corrective: slow chronicle calendar progression)</text:span></text:p>
      <text:p text:style-name="Preformatted_20_Text"><text:span text:style-name="Source_20_Text">- Scope collapse (corrective: restore continental / multi-mode </text:span></text:p>
      <text:p text:style-name="Preformatted_20_Text"><text:span text:style-name="Source_20_Text"><text:s text:c="2"/>engagement)</text:span></text:p>
      <text:p text:style-name="Preformatted_20_Text"><text:span text:style-name="Source_20_Text">- Antagonist burnout (corrective: introduce antagonist progression)</text:span></text:p>
      <text:p text:style-name="Preformatted_20_Text"><text:span text:style-name="Source_20_Text">- Rest-session avoidance (corrective: schedule rest session)</text:span></text:p>
      <text:p text:style-name="Preformatted_20_Text"><text:span text:style-name="Source_20_Text">- Chronicle-mode pivot failure (corrective: apply Continental </text:span></text:p>
      <text:p text:style-name="Preformatted_20_Text"><text:span text:style-name="Source_20_Text"><text:s text:c="2"/>Coordination Guide handling)</text:span></text:p>
      <text:p text:style-name="Preformatted_20_Text"><text:span text:style-name="Source_20_Text">- Chronicle conclusion failure (corrective: protect chronicle </text:span></text:p>
      <text:p text:style-name="P1"><text:span text:style-name="Source_20_Text"><text:s text:c="2"/>conclusion session count)</text:span></text:p>
      <text:h text:style-name="Heading_20_3" text:outline-level="3"><text:span text:style-name="Strong_20_Emphasis">Session-level prompt updates:</text:span></text:h>
      <text:p text:style-name="Text_20_body">Update prompts session-by-session to reflect current pacing position:</text:p>
      <text:p text:style-name="Preformatted_20_Text"><text:span text:style-name="Source_20_Text">Session [N] update:</text:span></text:p>
      <text:p text:style-name="Preformatted_20_Text"><text:span text:style-name="Source_20_Text">- Previous session ended at [chronicle position]</text:span></text:p>
      <text:p text:style-name="Preformatted_20_Text"><text:span text:style-name="Source_20_Text">- This session intended shape: [rising action / constant tension / </text:span></text:p>
      <text:p text:style-name="Preformatted_20_Text"><text:span text:style-name="Source_20_Text"><text:s text:c="2"/>rest / pivot / climax]</text:span></text:p>
      <text:p text:style-name="Preformatted_20_Text"><text:span text:style-name="Source_20_Text">- This session intended scenes: [list scene-level intentions]</text:span></text:p>
      <text:p text:style-name="Preformatted_20_Text"><text:span text:style-name="Source_20_Text">- This session chronicle calendar: [date or date range]</text:span></text:p>
      <text:p text:style-name="Preformatted_20_Text"><text:span text:style-name="Source_20_Text">- Pacing concern from previous sessions: [identify any pacing </text:span></text:p>
      <text:p text:style-name="Preformatted_20_Text"><text:span text:style-name="Source_20_Text"><text:s text:c="2"/>failure mode indicators that have emerged]</text:span></text:p>
      <text:p text:style-name="Preformatted_20_Text"><text:span text:style-name="Source_20_Text">- Corrective adjustment for this session: [specific corrective </text:span></text:p>
      <text:p text:style-name="P1"><text:span text:style-name="Source_20_Text"><text:s text:c="2"/>adjustment if pacing failure mode emerged]</text:span></text:p>
      <text:h text:style-name="Heading_20_3" text:outline-level="3"><text:soft-page-break/><text:span text:style-name="Strong_20_Emphasis">Arc-transition prompt updates:</text:span></text:h>
      <text:p text:style-name="Text_20_body">Update prompts at arc transitions to reflect arc-level pacing position:</text:p>
      <text:p text:style-name="Preformatted_20_Text"><text:span text:style-name="Source_20_Text">Arc transition update (end of arc [N], beginning of arc [N+1]):</text:span></text:p>
      <text:p text:style-name="Preformatted_20_Text"><text:span text:style-name="Source_20_Text">- Arc [N] resolution: [chronicle-arc resolution outcome]</text:span></text:p>
      <text:p text:style-name="Preformatted_20_Text"><text:span text:style-name="Source_20_Text">- Arc [N] chronicle development: [continuing chronicle hooks]</text:span></text:p>
      <text:p text:style-name="Preformatted_20_Text"><text:span text:style-name="Source_20_Text">- Arc [N+1] setup phase: [planned setup phase scenes]</text:span></text:p>
      <text:p text:style-name="Preformatted_20_Text"><text:span text:style-name="Source_20_Text">- Arc [N+1] expected arc length: [planned session count]</text:span></text:p>
      <text:p text:style-name="Preformatted_20_Text"><text:span text:style-name="Source_20_Text">- Arc [N+1] chronicle calendar progression: [chronicle calendar </text:span></text:p>
      <text:p text:style-name="Preformatted_20_Text"><text:span text:style-name="Source_20_Text"><text:s text:c="2"/>scope across arc]</text:span></text:p>
      <text:p text:style-name="Preformatted_20_Text"><text:span text:style-name="Source_20_Text">- Arc [N+1] chronicle-mode adjustment: [if chronicle-mode plurality </text:span></text:p>
      <text:p text:style-name="P1"><text:span text:style-name="Source_20_Text"><text:s text:c="2"/>involves chronicle-mode pivot at arc transition]</text:span></text:p>
      <text:h text:style-name="Heading_20_3" text:outline-level="3"><text:span text:style-name="Strong_20_Emphasis">Mid-chronicle review prompt:</text:span></text:h>
      <text:p text:style-name="Text_20_body">At approximately mid-chronicle (session N/2 of total), conduct mid-chronicle pacing review through prompt:</text:p>
      <text:p text:style-name="Preformatted_20_Text"><text:span text:style-name="Source_20_Text">Mid-chronicle review (session [N/2] of [total]):</text:span></text:p>
      <text:p text:style-name="Preformatted_20_Text"><text:span text:style-name="Source_20_Text">- Sessions remaining: [total - N/2]</text:span></text:p>
      <text:p text:style-name="Preformatted_20_Text"><text:span text:style-name="Source_20_Text">- Arcs remaining: [arcs to chronicle conclusion]</text:span></text:p>
      <text:p text:style-name="Preformatted_20_Text"><text:span text:style-name="Source_20_Text">- Chronicle scope status: [matches original chronicle scope / scope </text:span></text:p>
      <text:p text:style-name="Preformatted_20_Text"><text:span text:style-name="Source_20_Text"><text:s text:c="2"/>has expanded / scope has contracted]</text:span></text:p>
      <text:p text:style-name="Preformatted_20_Text"><text:span text:style-name="Source_20_Text">- Pacing failure modes encountered: [list any that have emerged]</text:span></text:p>
      <text:p text:style-name="Preformatted_20_Text"><text:span text:style-name="Source_20_Text">- Corrective adjustments applied: [list any corrections]</text:span></text:p>
      <text:p text:style-name="Preformatted_20_Text"><text:span text:style-name="Source_20_Text">- Chronicle conclusion preparation: [chronicle conclusion infrastructure </text:span></text:p>
      <text:p text:style-name="Preformatted_20_Text"><text:span text:style-name="Source_20_Text"><text:s text:c="2"/>preparation status]</text:span></text:p>
      <text:p text:style-name="Preformatted_20_Text"/>
      <text:p text:style-name="Preformatted_20_Text"><text:span text:style-name="Source_20_Text">Adjust subsequent prompts to align mid-chronicle pacing position </text:span></text:p>
      <text:p text:style-name="P1"><text:span text:style-name="Source_20_Text">with planned chronicle scope and chronicle conclusion infrastructure.</text:span></text:p>
      <text:p text:style-name="Preformatted_20_Text"><text:span text:style-name="Strong_20_Emphasis">The Chronicle Pacing Guide is complete.</text:span> A six-part meta-document for pacing multi-session chronicle arcs at the kit's full scope range: the five pacing layers (scene-level, session-level, arc-level, chronicle-level, calendar-level) each with diagnostic questions and common failure modes; pacing patterns by chronicle mode (Camarilla orthodox, Sabbat-survivor, methuselah-tempo, Anarch Movement, Hecata family, cross-supernatural diplomatic) with mode-specific pacing recommendations; pacing patterns by chronicle scope (single-coterie through cross-splat continental) with scope-specific pacing guidance; eight pacing failure modes with diagnostic indicators and corrective adjustments (sagging middle, premature climax, calendar drift, scope collapse, antagonist burnout, rest-session avoidance, chronicle-mode pivot failure, chronicle conclusion failure); five worked pacing templates with session-by-session pacing guidance for specific chronicle configurations (single-coterie Brisbane through continental cross-Pacific multi-chronicle campaign); and AI prompt configuration guidance for pacing support across the five pacing layer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6-05-13T23:17:29.393415138</dc:date>
    <meta:editing-duration>PT2M48S</meta:editing-duration>
    <meta:editing-cycles>1</meta:editing-cycles>
    <meta:document-statistic meta:table-count="3" meta:image-count="0" meta:object-count="0" meta:page-count="23" meta:paragraph-count="533" meta:word-count="6348" meta:character-count="52419" meta:non-whitespace-character-count="46518"/>
    <meta:generator>LibreOffice/24.2.7.2$Linux_X86_64 LibreOffice_project/420$Build-2</meta:generator>
  </office:meta>
</office:document-meta>
</file>