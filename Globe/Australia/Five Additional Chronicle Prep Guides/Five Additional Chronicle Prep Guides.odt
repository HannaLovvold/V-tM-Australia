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0.425cm"/>
    </style:style>
    <style:style style:name="Table1.B" style:family="table-column">
      <style:table-column-properties style:column-width="5.106cm"/>
    </style:style>
    <style:style style:name="Table1.C" style:family="table-column">
      <style:table-column-properties style:column-width="7.641cm"/>
    </style:style>
    <style:style style:name="Table1.D" style:family="table-column">
      <style:table-column-properties style:column-width="3.828cm"/>
    </style:style>
    <style:style style:name="Table1.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able_20_Contents">
      <style:text-properties officeooo:paragraph-rsid="000c8fa6"/>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2">
      <style:paragraph-properties fo:margin-left="0cm" fo:margin-right="0cm" fo:margin-top="0cm" fo:margin-bottom="0cm" style:contextual-spacing="false" fo:text-indent="0cm" style:auto-text-indent="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3">
      <style:paragraph-properties fo:margin-left="0cm" fo:margin-right="0cm" fo:margin-top="0cm" fo:margin-bottom="0cm" style:contextual-spacing="false" fo:text-indent="0cm" style:auto-text-indent="false"/>
    </style:style>
    <style:style style:name="P10" style:family="paragraph" style:parent-style-name="Text_20_body" style:list-style-name="L3">
      <style:paragraph-properties fo:margin-left="0cm" fo:margin-right="0cm" fo:text-indent="0cm" style:auto-text-indent="false"/>
    </style:style>
    <style:style style:name="P11" style:family="paragraph" style:parent-style-name="Text_20_body">
      <style:text-properties officeooo:paragraph-rsid="000c8fa6"/>
    </style:style>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4">
      <style:paragraph-properties fo:margin-left="0cm" fo:margin-right="0cm" fo:margin-top="0cm" fo:margin-bottom="0cm" style:contextual-spacing="false" fo:text-indent="0cm" style:auto-text-indent="false"/>
    </style:style>
    <style:style style:name="P14" style:family="paragraph" style:parent-style-name="Text_20_body" style:list-style-name="L4">
      <style:paragraph-properties fo:margin-left="0cm" fo:margin-right="0cm" fo:text-indent="0cm" style:auto-text-indent="false"/>
    </style:style>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5">
      <style:paragraph-properties fo:margin-left="0cm" fo:margin-right="0cm" fo:margin-top="0cm" fo:margin-bottom="0cm" style:contextual-spacing="false" fo:text-indent="0cm" style:auto-text-indent="false"/>
    </style:style>
    <style:style style:name="P17" style:family="paragraph" style:parent-style-name="Text_20_body" style:list-style-name="L5">
      <style:paragraph-properties fo:margin-left="0cm" fo:margin-right="0cm" fo:text-indent="0cm" style:auto-text-indent="false"/>
    </style:style>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6">
      <style:paragraph-properties fo:margin-left="0cm" fo:margin-right="0cm" fo:margin-top="0cm" fo:margin-bottom="0cm" style:contextual-spacing="false"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T1" style:family="text">
      <style:text-properties fo:color="#f97583"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ive parallel meta-documents extending the Chronicle Prep infrastructure that the Sabbat-Survivor Chronicle Prep Guide initiated. Each guide treats one of the kit's distinctive chronicle modes with the same structural attention — what makes the mode different, the specific design challenges it produces, the failure modes and corrective adjustments, AI prompt configuration guidance, and cross-references with existing kit modules.</text:p>
      <text:p text:style-name="Text_20_body"><text:span text:style-name="Strong_20_Emphasis">Design principle:</text:span> These guides are not redundant with their underlying lorebooks and scenarios. The lorebooks and scenarios provide <text:span text:style-name="Emphasis">setting and character infrastructure</text:span>; the prep guides provide <text:span text:style-name="Emphasis">chronicle-mode handling guidance</text:span> — the meta-documentation that helps Storytellers and AIs hold the mode's distinctive register across extended chronicle work without collapsing into common failure patterns.</text:p>
      <text:p text:style-name="Text_20_body"><text:span text:style-name="Strong_20_Emphasis">Format:</text:span> Each guide follows the seven-part structure established by the Sabbat-Survivor guide, abbreviated where mode-distinctive content is less elaborate than the Brisbane mode required. Total deliverable: five complete prep guides, each independently usable, collectively producing comprehensive chronicle-mode infrastructur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p>
            </table:table-cell>
            <table:table-cell table:style-name="Table1.A1" office:value-type="string">
              <text:p text:style-name="Table_20_Heading">Guide</text:p>
            </table:table-cell>
            <table:table-cell table:style-name="Table1.A1" office:value-type="string">
              <text:p text:style-name="Table_20_Heading">Mode Focus</text:p>
            </table:table-cell>
            <table:table-cell table:style-name="Table1.A1" office:value-type="string">
              <text:p text:style-name="Table_20_Heading">Primary Cities</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Camarilla Orthodox Chronicle Prep</text:p>
          </table:table-cell>
          <table:table-cell table:style-name="Table1.A1" office:value-type="string">
            <text:p text:style-name="Table_20_Contents">Institutional politics, Tower formality, Princely register</text:p>
          </table:table-cell>
          <table:table-cell table:style-name="Table1.A1" office:value-type="string">
            <text:p text:style-name="Table_20_Contents">Melbourne, Adelaide, Chicago</text:p>
          </table:table-cell>
        </table:table-row>
        <table:table-row>
          <table:table-cell table:style-name="Table1.A1" office:value-type="string">
            <text:p text:style-name="Table_20_Contents">2</text:p>
          </table:table-cell>
          <table:table-cell table:style-name="Table1.A1" office:value-type="string">
            <text:p text:style-name="Table_20_Contents">Methuselah-Tempo Chronicle Prep</text:p>
          </table:table-cell>
          <table:table-cell table:style-name="Table1.A1" office:value-type="string">
            <text:p text:style-name="Table_20_Contents">Patient predation, decade-spanning operations, surveillance-as-default</text:p>
          </table:table-cell>
          <table:table-cell table:style-name="Table1.A1" office:value-type="string">
            <text:p text:style-name="Table_20_Contents">Sydney</text:p>
          </table:table-cell>
        </table:table-row>
        <table:table-row>
          <table:table-cell table:style-name="Table1.A1" office:value-type="string">
            <text:p text:style-name="Table_20_Contents">3</text:p>
          </table:table-cell>
          <table:table-cell table:style-name="Table1.A1" office:value-type="string">
            <text:p text:style-name="Table_20_Contents">Anarch Movement Chronicle Prep</text:p>
          </table:table-cell>
          <table:table-cell table:style-name="Table1.A1" office:value-type="string">
            <text:p text:style-name="Table_20_Contents">Working-class community defence, contingency networks, Movement-orthodoxy questions</text:p>
          </table:table-cell>
          <table:table-cell table:style-name="Table1.A1" office:value-type="string">
            <text:p text:style-name="Table_20_Contents">Footscray, Pilsen</text:p>
          </table:table-cell>
        </table:table-row>
        <table:table-row>
          <table:table-cell table:style-name="Table1.A1" office:value-type="string">
            <text:p text:style-name="Table_20_Contents">4</text:p>
          </table:table-cell>
          <table:table-cell table:style-name="Table1.A1" office:value-type="string">
            <text:p text:style-name="Table_20_Contents">Hecata Family Chronicle Prep</text:p>
          </table:table-cell>
          <table:table-cell table:style-name="Table1.A1" office:value-type="string">
            <text:p text:style-name="Table_20_Contents">Cousinage, wraith-archive, necromantic vocation, family-as-binding</text:p>
          </table:table-cell>
          <table:table-cell table:style-name="Table1.A1" office:value-type="string">
            <text:p text:style-name="Table_20_Contents">Calabria Branch, Bridgeport Six</text:p>
          </table:table-cell>
        </table:table-row>
        <table:table-row>
          <table:table-cell table:style-name="Table1.A1" office:value-type="string">
            <text:p text:style-name="Table_20_Contents">5</text:p>
          </table:table-cell>
          <table:table-cell table:style-name="Table1.A1" office:value-type="string">
            <text:p text:style-name="Table_20_Contents">Cross-Supernatural Diplomatic Chronicle Prep</text:p>
          </table:table-cell>
          <table:table-cell table:style-name="Table1.A1" office:value-type="string">
            <text:p text:style-name="Table_20_Contents">Treaty-counterpart register, Garou-Kindred protocols, cross-splat operations</text:p>
          </table:table-cell>
          <table:table-cell table:style-name="Table1.A1" office:value-type="string">
            <text:p text:style-name="Table_20_Contents">Cress Truce-engaged work</text:p>
          </table:table-cell>
        </table:table-row>
      </table:table>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text:soft-page-break/>Camarilla Orthodox Chronicle Prep</text:p>
      <text:p text:style-name="Text_20_body"/>
      <text:p text:style-name="Text_20_body">A meta-document for designing and running Camarilla orthodox chronicles. The chronicle mode produced by Lytton's Melbourne Toorak Circle, Octavia Marsh's Adelaide court, and Cordelia's Chicago Astor Street Five — institutional politics conducted under Tower-formal register with Australian-informal accommodation (Melbourne), deliberate orthodoxy (Adelaide), or Bath-formal cultural cultivation (Chicago).</text:p>
      <text:p text:style-name="Text_20_body"><text:span text:style-name="Strong_20_Emphasis">Audience:</text:span> Storytellers, AI prompt designers, and players preparing to run or play in Camarilla orthodox chronicles. The guide assumes familiarity with the core kit and with the relevant city supplements.</text:p>
      <text:h text:style-name="Heading_20_3" text:outline-level="3"><text:span text:style-name="Strong_20_Emphasis">Part 1: What Makes a Camarilla Orthodox Chronicle Different</text:span></text:h>
      <text:p text:style-name="Text_20_body">Camarilla orthodox chronicles diverge from other V:tM chronicle modes along five structural axes:</text:p>
      <text:p text:style-name="Text_20_body"><text:span text:style-name="Strong_20_Emphasis">Axis 1: Institutional Politics as Chronicle-Central Texture.</text:span> Camarilla chronicles engage <text:span text:style-name="Emphasis">institutional politics</text:span> as central chronicle texture — Princely authority, Primogen Council dynamics, Harpy social-political work, Sheriff enforcement operations, Keeper of Elysium ceremonial infrastructure, Status accumulation and Boon-debt management. The institutional infrastructure is not backdrop — it is the operational environment within which all chronicle scenes occur. Characters with established institutional positions navigate chronicle-active dynamics; characters without institutional positions navigate continuing exclusion from the operational environment.</text:p>
      <text:p text:style-name="Text_20_body"><text:span text:style-name="Strong_20_Emphasis">Axis 2: Tower-Formal Register as Operational Default.</text:span> Camarilla scenes operate under Tower-formal register as default — formal court ceremony at Elysium occasions, formal correspondence patterns, formal Princely-court protocols, formal Status acknowledgment patterns. The formality is institutional choice rather than ornamental tradition. Variation across Camarilla domains: Lytton's Melbourne softens Tower-formality with Australian-informal accommodation; Octavia's Adelaide maintains deliberate Edwardian-influenced orthodoxy; Cordelia's Chicago cultivates Bath-formal cultural register that exceeds standard Camarilla formality.</text:p>
      <text:p text:style-name="Text_20_body"><text:span text:style-name="Strong_20_Emphasis">Axis 3: Boon-Debt as Chronicle Infrastructure.</text:span> Camarilla chronicles engage Boon-debt as continuing chronicle infrastructure rather than as exceptional plot device. Major Boons, minor Boons, Trivial Boons, Life Boons, and the broader Boon-debt economy organise chronicle-political dynamics across extended chronicle arcs. Characters accumulate Boon-debt patterns across sessions; the patterns produce continuing chronicle-political pressure that shapes operational decisions.</text:p>
      <text:p text:style-name="Text_20_body"><text:span text:style-name="Strong_20_Emphasis">Axis 4: Status as Operational Capital.</text:span> Camarilla chronicles engage Status as operational capital that produces chronicle-active capacity. Status is granted by Princes and Primogen, accumulated through institutional service, lost through Camarilla institutional violations, and operates as continuing chronicle-political resource that characters manage across extended chronicle work. Variation across Camarilla domains: smaller domains (Adelaide) produce Status-accumulation patterns at intimate scale where individual Status changes register at chronicle-significant level; larger domains (Melbourne, Chicago) produce Status-accumulation patterns at larger institutional scale where chronicle-significant individual Status changes occur within broader institutional context.</text:p>
      <text:p text:style-name="Text_20_body"><text:soft-page-break/><text:span text:style-name="Strong_20_Emphasis">Axis 5: The Beckoning as Continental Pressure.</text:span> Camarilla chronicles in 2025 engage the Beckoning as continuing continental pressure on senior Camarilla figures. Lytton's three Beckoning episodes since 2018, Octavia's two episodes since 2020, Maxwell Strathmore's three episodes since 2014 — the pattern produces continental Camarilla institutional pressure that chronicle scenes operate under. Junior characters do not experience Beckoning directly; senior characters do; the asymmetry shapes chronicle-political dynamics across extended chronicle arcs.</text:p>
      <text:h text:style-name="Heading_20_3" text:outline-level="3"><text:span text:style-name="Strong_20_Emphasis">Part 2: Camarilla Court Infrastructure Handling</text:span></text:h>
      <text:p text:style-name="Text_20_body"><text:span text:style-name="Strong_20_Emphasis">Princely court occasions:</text:span> Camarilla chronicles run across 12-15 sessions will include 2-4 Princely court occasions minimum if institutional engagement is chronicle-central. Court occasions have specific structural elements:</text:p>
      <text:list text:style-name="L1">
        <text:list-item>
          <text:p text:style-name="P4">Pre-court arrivals and informal social positioning </text:p>
        </text:list-item>
        <text:list-item>
          <text:p text:style-name="P4">Formal court ceremony opening </text:p>
        </text:list-item>
        <text:list-item>
          <text:p text:style-name="P4">Princely address and institutional business conduct </text:p>
        </text:list-item>
        <text:list-item>
          <text:p text:style-name="P4">Status acknowledgment patterns and Boon transactions </text:p>
        </text:list-item>
        <text:list-item>
          <text:p text:style-name="P4">Formal court ceremony closing </text:p>
        </text:list-item>
        <text:list-item>
          <text:p text:style-name="P3">Post-court informal political work </text:p>
        </text:list-item>
      </text:list>
      <text:p text:style-name="Text_20_body"><text:span text:style-name="Strong_20_Emphasis">Tonal handling:</text:span> Court occasions are <text:span text:style-name="Emphasis">institutionally weighted</text:span> — the formality is genuine, the Status patterns are operationally significant, the Princely authority is real. Render with appropriate weight. The tonal failure modes: (a) court-as-exotic-spectacle (loses institutional-political register), (b) court-as-cynical-performance (loses formality's genuine character), (c) court-as-ordinary-meeting (loses ceremonial weight). The successful tonal handling: court occasions are formal institutional infrastructure operating under genuine Tower-formal protocols with chronicle-political dynamics emerging through institutional structure.</text:p>
      <text:p text:style-name="Text_20_body"><text:span text:style-name="Strong_20_Emphasis">Primogen Council dynamics:</text:span> Primogen Council scenes engage <text:span text:style-name="Emphasis">clan-political institutional infrastructure</text:span> with continuing chronicle-active dynamics. Each Primogen represents clan-political interests; Council deliberations produce institutional decisions; clan-political tensions surface through Council dynamics. Chronicle scenes engaging Council operations should render the institutional-political register with appropriate weight including specific clan-political concerns each Primogen represents.</text:p>
      <text:p text:style-name="Text_20_body"><text:span text:style-name="Strong_20_Emphasis">Harpy operations:</text:span> Harpy chronicle scenes engage <text:span text:style-name="Emphasis">Status-tracking, Boon-debt management, and social-political infrastructure</text:span>. Harpy authority is institutional rather than purely social — Harpy decisions about Status grants, Status losses, and Boon-debt enforcement carry chronicle-significant operational weight. Render Harpy operations with institutional weight: Tania Oberon's Melbourne Harpy operations, Genevieve Astor-Moss's Adelaide Harpy operations, and Cordelia Astor's Chicago Harpy operations all operate as institutional infrastructure rather than as social-aesthetic positioning.</text:p>
      <text:p text:style-name="Text_20_body"><text:span text:style-name="Strong_20_Emphasis">Sheriff and enforcement operations:</text:span> Sheriff chronicle scenes engage <text:span text:style-name="Emphasis">Camarilla-institutional enforcement</text:span>. Sheriffs handle Masquerade-violation responses, Camarilla-institutional-violation responses, and ongoing institutional-security operations. Render with institutional weight: enforcement operations are institutional infrastructure rather than dramatic confrontation, and Sheriff authority operates through institutional protocols rather than personal-political tactics.</text:p>
      <text:h text:style-name="Heading_20_3" text:outline-level="3"><text:soft-page-break/><text:span text:style-name="Strong_20_Emphasis">Part 3: Domain-Specific Variations</text:span></text:h>
      <text:p text:style-name="Text_20_body"><text:span text:style-name="Strong_20_Emphasis">Melbourne (Lytton's court):</text:span> Australian-informal accommodation register. Tower-formality is genuinely formal but accommodates Australian working register that produces operational character distinct from European or American Camarilla domains. Court occasions retain ceremonial weight while permitting first-name address among long-tenured court members. Chronicle scenes engage the register through specific Australian inflections: court occasions at the Windsor Hotel with Australian wines, formal correspondence using Australian English conventions, ceremonial occasions accommodating Australian seasonal calendar (Anzac Day commemorations, Australia Day formal occasions, Melbourne Cup-adjacent social calendar elements).</text:p>
      <text:p text:style-name="Text_20_body"><text:span text:style-name="Strong_20_Emphasis">Adelaide (Octavia's court):</text:span> Deliberate orthodoxy register. Tower-formality maintained at Edwardian-influenced level that exceeds standard modern Camarilla register. Court occasions retain formal ceremonial structure; correspondence uses period-influenced formal protocols; Octavia signs "Prince Octavia Marsh" rather than "Octavia" with continental Camarilla counterparts. Chronicle scenes engage the register through specific orthodox inflections: court occasions at Adelaide Town Hall with deliberately period-appropriate ceremonial structure, formal correspondence using conservative-Camarilla protocols, and the smaller domain's intimate institutional scale producing court occasions that engage all twenty-five Adelaide Kindred personally.</text:p>
      <text:p text:style-name="Text_20_body"><text:span text:style-name="Strong_20_Emphasis">Chicago (Cordelia's Astor Street operations):</text:span> Bath-formal cultural register. Tower-formality cultivated at deliberate cultural-aesthetic level that produces operational character distinct from Australian Camarilla domains. Court occasions cultivate specific cultural-aesthetic register; Cordelia's eleven-year Harpy operation has refined the register into chronicle-distinctive cultural infrastructure. Chronicle scenes engage the register through specific Bath-formal inflections: cultivated salon operations, careful aesthetic positioning, specific cultural references that mark the cultural-political register.</text:p>
      <text:h text:style-name="Heading_20_3" text:outline-level="3"><text:span text:style-name="Strong_20_Emphasis">Part 4: Camarilla Orthodox Chronicle Pacing Patterns</text:span></text:h>
      <text:p text:style-name="Text_20_body"><text:span text:style-name="Strong_20_Emphasis">Arc structure:</text:span> Standard climactic-resolution patterns work for Camarilla chronicles. Setup → Rising Action → Climactic Resolution → Denouement maps onto Camarilla institutional-political dynamics with specific institutional-political climactic events: Princely succession resolutions, Primogen Council institutional decisions, Status-accumulation chronicle-significant moments, Boon-debt resolution events.</text:p>
      <text:p text:style-name="Text_20_body"><text:span text:style-name="Strong_20_Emphasis">Scene-density patterns:</text:span> Approximately 50-60% institutional-political scenes, 15-20% character-development / personal scenes, 10-15% combat / direct-confrontation scenes, 5-10% formal court occasions, 5-10% Boon-debt / Status transaction scenes, 5-10% cross-domain / continental coordination scenes.</text:p>
      <text:p text:style-name="Text_20_body"><text:span text:style-name="Strong_20_Emphasis">Chronicle calendar alignment:</text:span> Camarilla chronicles align to chronicle-active institutional calendar including: annual Princely court occasions (typically aligned with continental institutional calendar — Anzac Day for Lytton's Melbourne, Adelaide Festival period for Octavia, fall-winter for Cordelia's Chicago), quarterly Primogen Council meetings, monthly informal court occasions, continuing institutional rhythm that produces chronicle-pacing infrastructure.</text:p>
      <text:p text:style-name="Text_20_body"><text:span text:style-name="Strong_20_Emphasis">Character development trajectories:</text:span> Four primary trajectories: (a) Institutional integration — character develops increasing institutional position through Status accumulation, Boon-debt management, and continuing institutional service; (b) Internal-dissident orientation — character <text:soft-page-break/>develops private orientation challenging institutional infrastructure while maintaining external institutional position; (c) Cross-domain relocation — character considers or executes relocation between Camarilla domains; (d) Beckoning trajectory — senior character engages Beckoning resistance and continental institutional positioning.</text:p>
      <text:h text:style-name="Heading_20_3" text:outline-level="3"><text:span text:style-name="Strong_20_Emphasis">Part 5: Common Camarilla Orthodox Chronicle Failure Modes</text:span></text:h>
      <text:p text:style-name="Text_20_body"><text:span text:style-name="Strong_20_Emphasis">Failure Mode 1: Institutional-Politics-As-Backdrop Collapse.</text:span> Diagnostic indicators: Chronicle scenes engage Camarilla institutional infrastructure as background rather than as chronicle-central texture; characters navigate Camarilla domain operations without engaging institutional-political dynamics; Boon-debt and Status patterns absent from chronicle development. Corrective adjustment: Foreground institutional-political dynamics through specific chronicle plot threads engaging Princely authority, Primogen Council operations, Harpy Status-tracking, and Boon-debt economy.</text:p>
      <text:p text:style-name="Text_20_body"><text:span text:style-name="Strong_20_Emphasis">Failure Mode 2: Tower-Formal-Register Dissolution.</text:span> Diagnostic indicators: Camarilla scenes lose formal register through accumulating informal-modern-conversational drift; court occasions render without ceremonial weight; correspondence patterns operate at modern-text-message register rather than at formal institutional register. Corrective adjustment: Restore formal register through deliberate court occasion infrastructure, formal correspondence protocols, and Status acknowledgment patterns.</text:p>
      <text:p text:style-name="Text_20_body"><text:span text:style-name="Strong_20_Emphasis">Failure Mode 3: Boon-Debt Disengagement.</text:span> Diagnostic indicators: Boon-debt operates as occasional plot device rather than as continuing chronicle infrastructure; characters accumulate Boon-debt patterns without chronicle-active engagement; Boon transactions occur off-screen or as narrative summary. Corrective adjustment: Render Boon transactions as chronicle-active scenes, foreground Boon-debt patterns as continuing chronicle-political dynamics, and engage Harpy Boon-debt enforcement as chronicle-significant operations.</text:p>
      <text:p text:style-name="Text_20_body"><text:span text:style-name="Strong_20_Emphasis">Failure Mode 4: Domain-Variation Confusion.</text:span> Diagnostic indicators: Camarilla chronicle scenes blur domain-specific cultural-political register; Melbourne Australian-informal accommodation appears in Adelaide orthodox-register scenes; Chicago Bath-formal cultivation appears in Australian Camarilla scenes. Corrective adjustment: Clarify domain-specific register through deliberate cultural-political inflection patterns; render each domain's distinctive Tower-formal-register variation with appropriate cultural specificity.</text:p>
      <text:p text:style-name="Text_20_body"><text:span text:style-name="Strong_20_Emphasis">Failure Mode 5: Beckoning-Pressure Underdevelopment.</text:span> Diagnostic indicators: Senior Camarilla figures' Beckoning trajectories absent from chronicle development; chronicle continental-political dynamics ignore continental Beckoning pressure; chronicle late-arc scenes do not engage continental Camarilla institutional positioning around Beckoning trajectories. Corrective adjustment: Foreground senior-figure Beckoning trajectories through specific chronicle plot threads; engage continental Beckoning pressure as continuing chronicle texture; develop chronicle late-arc continental institutional positioning.</text:p>
      <text:h text:style-name="Heading_20_3" text:outline-level="3"><text:span text:style-name="Strong_20_Emphasis">Part 6: AI Prompt Configuration Guidance</text:span></text:h>
      <text:p text:style-name="Preformatted_20_Text"><text:span text:style-name="Source_20_Text">This chronicle operates in Camarilla orthodox mode: Tower-formal </text:span></text:p>
      <text:p text:style-name="Preformatted_20_Text"><text:span text:style-name="Source_20_Text">register as operational default with domain-specific cultural </text:span></text:p>
      <text:p text:style-name="Preformatted_20_Text"><text:span text:style-name="Source_20_Text">variation (Australian-informal accommodation for Melbourne, </text:span></text:p>
      <text:p text:style-name="Preformatted_20_Text"><text:span text:style-name="Source_20_Text">deliberate Edwardian-influenced orthodoxy for Adelaide, Bath-formal </text:span></text:p>
      <text:p text:style-name="Preformatted_20_Text"><text:span text:style-name="Source_20_Text">cultural cultivation for Chicago); institutional politics as </text:span></text:p>
      <text:p text:style-name="Preformatted_20_Text"><text:soft-page-break/><text:span text:style-name="Source_20_Text">chronicle-central texture; Boon-debt as continuing chronicle </text:span></text:p>
      <text:p text:style-name="Preformatted_20_Text"><text:span text:style-name="Source_20_Text">infrastructure; Status as operational capital; the Beckoning as </text:span></text:p>
      <text:p text:style-name="Preformatted_20_Text"><text:span text:style-name="Source_20_Text">continental pressure on senior figures.</text:span></text:p>
      <text:p text:style-name="Preformatted_20_Text"/>
      <text:p text:style-name="Preformatted_20_Text"><text:span text:style-name="Source_20_Text">Render Camarilla institutional infrastructure with appropriate weight: </text:span></text:p>
      <text:p text:style-name="Preformatted_20_Text"><text:span text:style-name="Source_20_Text">Princely authority is genuinely authoritative, Primogen Council </text:span></text:p>
      <text:p text:style-name="Preformatted_20_Text"><text:span text:style-name="Source_20_Text">operates as institutional clan-political infrastructure, Harpy </text:span></text:p>
      <text:p text:style-name="Preformatted_20_Text"><text:span text:style-name="Source_20_Text">Status-tracking and Boon-debt enforcement carry chronicle-significant </text:span></text:p>
      <text:p text:style-name="Preformatted_20_Text"><text:span text:style-name="Source_20_Text">operational weight, Sheriff enforcement operates through institutional </text:span></text:p>
      <text:p text:style-name="Preformatted_20_Text"><text:span text:style-name="Source_20_Text">protocols, Keeper of Elysium maintains ceremonial infrastructure </text:span></text:p>
      <text:p text:style-name="Preformatted_20_Text"><text:span text:style-name="Source_20_Text">that operates as institutional rather than ornamental.</text:span></text:p>
      <text:p text:style-name="Preformatted_20_Text"/>
      <text:p text:style-name="Preformatted_20_Text"><text:span text:style-name="Source_20_Text">Maintain domain-specific cultural-political register through </text:span></text:p>
      <text:p text:style-name="Preformatted_20_Text"><text:span text:style-name="Source_20_Text">deliberate inflection: Melbourne court occasions accommodate </text:span></text:p>
      <text:p text:style-name="Preformatted_20_Text"><text:span text:style-name="Source_20_Text">Australian-informal register without losing Tower-formal weight; </text:span></text:p>
      <text:p text:style-name="Preformatted_20_Text"><text:span text:style-name="Source_20_Text">Adelaide court occasions maintain Edwardian-influenced orthodoxy; </text:span></text:p>
      <text:p text:style-name="Preformatted_20_Text"><text:span text:style-name="Source_20_Text">Chicago Astor Street operations cultivate Bath-formal cultural-aesthetic </text:span></text:p>
      <text:p text:style-name="Preformatted_20_Text"><text:span text:style-name="Source_20_Text">register.</text:span></text:p>
      <text:p text:style-name="Preformatted_20_Text"/>
      <text:p text:style-name="Preformatted_20_Text"><text:span text:style-name="Source_20_Text">Engage Boon-debt and Status patterns as continuing chronicle </text:span></text:p>
      <text:p text:style-name="Preformatted_20_Text"><text:span text:style-name="Source_20_Text">infrastructure rather than as exceptional plot devices. Render </text:span></text:p>
      <text:p text:style-name="Preformatted_20_Text"><text:span text:style-name="Source_20_Text">Boon transactions as chronicle-active scenes; track Status </text:span></text:p>
      <text:p text:style-name="Preformatted_20_Text"><text:span text:style-name="Source_20_Text">accumulation and loss across chronicle work; foreground Harpy </text:span></text:p>
      <text:p text:style-name="Preformatted_20_Text"><text:span text:style-name="Source_20_Text">operations as institutional infrastructure.</text:span></text:p>
      <text:p text:style-name="Preformatted_20_Text"/>
      <text:p text:style-name="Preformatted_20_Text"><text:span text:style-name="Source_20_Text">Apply Camarilla-orthodox failure mode recognition: institutional-politics-as-backdrop </text:span></text:p>
      <text:p text:style-name="Preformatted_20_Text"><text:span text:style-name="Source_20_Text">collapse, Tower-formal-register dissolution, Boon-debt disengagement, </text:span></text:p>
      <text:p text:style-name="Preformatted_20_Text"><text:span text:style-name="Source_20_Text">domain-variation confusion, Beckoning-pressure underdevelopment. </text:span></text:p>
      <text:p text:style-name="Preformatted_20_Text"><text:span text:style-name="Source_20_Text">Apply corrective adjustments through deliberate institutional-political </text:span></text:p>
      <text:p text:style-name="Preformatted_20_Text"><text:span text:style-name="Source_20_Text">foregrounding, formal register restoration, Boon-debt chronicle-active </text:span></text:p>
      <text:p text:style-name="Preformatted_20_Text"><text:span text:style-name="Source_20_Text">engagement, domain-specific register clarification, and continental </text:span></text:p>
      <text:p text:style-name="P1"><text:span text:style-name="Source_20_Text">Beckoning-pressure development.</text:span></text:p>
      <text:h text:style-name="Heading_20_3" text:outline-level="3"><text:span text:style-name="Strong_20_Emphasis">Part 7: Cross-References With Existing Kit</text:span></text:h>
      <text:list text:style-name="L2">
        <text:list-item>
          <text:p text:style-name="P7">Melbourne supplement (<text:span text:style-name="Source_20_Text"><text:span text:style-name="T1">vtm_melbourne_by_night.json</text:span></text:span>) — Toorak Circle, Lytton's court, Australian-informal Camarilla register </text:p>
        </text:list-item>
        <text:list-item>
          <text:p text:style-name="P7">Adelaide supplement (<text:span text:style-name="Source_20_Text"><text:span text:style-name="T1">vtm_adelaide_by_night.json</text:span></text:span>) — Octavia's court, deliberate orthodoxy register, smaller-domain intimate scale </text:p>
        </text:list-item>
        <text:list-item>
          <text:p text:style-name="P7">Chicago supplement (<text:span text:style-name="Source_20_Text"><text:span text:style-name="T1">vtm_chicago_by_night.json</text:span></text:span>) — Cordelia's Astor Street operations, Bath-formal cultural cultivation </text:p>
        </text:list-item>
        <text:list-item>
          <text:p text:style-name="P6">Antagonist Pack (Lytton, Lumley antagonist treatments) — institutional pressure as antagonist register for non-Camarilla {{user}} characters </text:p>
        </text:list-item>
        <text:list-item>
          <text:p text:style-name="P5">Coterie Pack (Toorak Circle, Astor Street Five) — institutional infrastructure for chronicle-central engagement </text:p>
        </text:list-item>
      </text:lis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text:soft-page-break/>Methuselah-Tempo Chronicle Prep</text:p>
      <text:p text:style-name="P2"/>
      <text:p text:style-name="P11">A meta-document for designing and running methuselah-tempo chronicles. The chronicle mode produced by Sarrasine's Sydney domain — patient predation, decade-spanning operations, surveillance-as-default, double-layer cultural reading, and material wealth as ambient texture.</text:p>
      <text:p text:style-name="Text_20_body"><text:span text:style-name="Strong_20_Emphasis">Audience:</text:span> Storytellers, AI prompt designers, and players preparing to run or play in methuselah-tempo chronicles. The guide assumes familiarity with the core kit and with the Sydney supplement.</text:p>
      <text:h text:style-name="Heading_20_3" text:outline-level="3"><text:span text:style-name="Strong_20_Emphasis">Part 1: What Makes a Methuselah-Tempo Chronicle Different</text:span></text:h>
      <text:p text:style-name="Text_20_body">Methuselah-tempo chronicles diverge from other V:tM chronicle modes along five structural axes:</text:p>
      <text:p text:style-name="Text_20_body"><text:span text:style-name="Strong_20_Emphasis">Axis 1: The Methuselah's Patient Tempo.</text:span> Sydney chronicles operate under implicit pacing produced by Sarrasine's 1,470-year temporal register. Operations that would take a year in Melbourne take ten in Sydney. Decisions that would resolve in a month resolve in a season. Chronicle scenes carry implicit awareness that the methuselah's patience is the chronicle's structural foundation; rapid operational tempo is operationally inappropriate within Sarrasine's domain.</text:p>
      <text:p text:style-name="Text_20_body"><text:span text:style-name="Strong_20_Emphasis">Axis 2: Surveillance as Default.</text:span> Sarrasine's methuselah-tier Auspex extends across Sydney's domain at ambient register. Sydney Kindred operate under continuous (though usually inattentive) surveillance awareness. Chronicle scenes carry texture of careful speech in private contexts because private contexts may not actually be private; Sarrasine's tolerance for routine operations is wide; his attention to specific operations is precise; the calibration is not always predictable.</text:p>
      <text:p text:style-name="Text_20_body"><text:span text:style-name="Strong_20_Emphasis">Axis 3: Double-Layer Cultural Reading.</text:span> Sydney Kindred social interactions operate on two layers simultaneously: the Toreador-passing surface (cultural sophistication, aesthetic appreciation, cosmopolitan refinement) and the Ministry-actual register (patient cultivation, careful information-management, operational secrecy). Most Sydney Kindred experience only the surface; senior Sydney Kindred and Sarrasine's Ministry-loyalist core operate consciously on both. Chronicle scenes engage both layers as chronicle-central texture, with chronicle late-arc opportunities for layer-pivot revelation moments.</text:p>
      <text:p text:style-name="Text_20_body"><text:span text:style-name="Strong_20_Emphasis">Axis 4: Material Wealth as Ambient Texture.</text:span> Sydney is materially richer than other Australian Kindred domains. Vaucluse mansion sandstone with harbour views, InterContinental Hotel reception with significant wines at substantial quantities, the Vaucluse Five operating from harbour-east residences each individually worth more than entire smaller-domain property holdings. Chronicle scenes carry sensory specificity that produces register distinct from other chronicle modes; wealth is ambient texture rather than plot device.</text:p>
      <text:p text:style-name="Text_20_body"><text:span text:style-name="Strong_20_Emphasis">Axis 5: Deliberate Secrecy as Social Norm.</text:span> Sydney Kindred treat extensive information-withholding as social norm rather than as exception. Questions about origin, sire, generation, current operations, or political alignment are intrusive in informal contexts unless formally invited. Chronicle scenes engage deliberate secrecy as continuing operational character; characters who operate on Camarilla-Melbourne information-sharing patterns produce continuing social friction.</text:p>
      <text:h text:style-name="Heading_20_3" text:outline-level="3"><text:span text:style-name="Strong_20_Emphasis">Part 2: Methuselah-Tempo Chronicle Pacing</text:span></text:h>
      <text:p text:style-name="Text_20_body"><text:span text:style-name="Strong_20_Emphasis">Arc structure:</text:span> Modified climactic-resolution patterns. Climactic moments occur but at reduced frequency relative to other chronicle modes. Major chronicle-defining scenes resolve across seasons rather than within sessions; chronicle late-arc engagement occurs at temporal scales that other <text:soft-page-break/>chronicle modes treat as multi-arc development.</text:p>
      <text:p text:style-name="Text_20_body"><text:span text:style-name="Strong_20_Emphasis">Scene-density patterns:</text:span> Approximately 30-40% formal-court / institutional scenes (the InterContinental Hotel formal occasions, the Vaucluse mansion private meetings, the Sydney Council monthly sessions), 20-25% double-layer cultural scenes (salon operations at the Art Gallery NSW, Toreador-cover cultural occasions with Ministry-actual operational character), 15-20% surveillance-aware operational scenes (private operations conducted under Sarrasine-Auspex awareness), 10-15% character-development / personal scenes, 5-10% material-wealth-foregrounded scenes (Vaucluse residence private occasions, Sydney harbour operations), 5-10% combat / confrontation scenes (rare but consequential).</text:p>
      <text:p text:style-name="Text_20_body"><text:span text:style-name="Strong_20_Emphasis">Chronicle calendar alignment:</text:span> Sydney chronicles align to Sarrasine's continental operational rhythm rather than to standard chronicle-active calendar. Major chronicle-active periods include: Sarrasine's monthly Vaucluse formal court occasions, the annual Australia Day Sarrasine Reception, the seasonal Sydney Cultural Salon at the Sydney Opera House, the rare in-person operational meetings at Royal Botanic Gardens Mrs Macquarie's Chair (significant chronicle moments often align with these meetings).</text:p>
      <text:p text:style-name="Text_20_body"><text:span text:style-name="Strong_20_Emphasis">Character development trajectories:</text:span> Six primary trajectories from the Sydney supplement chronicle hooks: (a) Ministry Apprenticeship — slow induction across multi-year arc; (b) Toreador Cover Investigation — accumulating dangerous knowledge; (c) Anarch Tolerance Question — operational paradox navigation; (d) Vaucluse Five Inheritance — methuselah-cultivated senior position development; (e) Phase Two Continental Operation — chronicle-defining 2026-2028 continental operation engagement; (f) Long Cultivation Reversal — methuselah's internal contradiction engagement.</text:p>
      <text:h text:style-name="Heading_20_3" text:outline-level="3"><text:span text:style-name="Strong_20_Emphasis">Part 3: Common Methuselah-Tempo Chronicle Failure Modes</text:span></text:h>
      <text:p text:style-name="Text_20_body"><text:span text:style-name="Strong_20_Emphasis">Failure Mode 1: Tempo Acceleration Collapse.</text:span> Chronicle scenes accelerate to standard V:tM chronicle tempo, losing methuselah-temporal-register character. Corrective adjustment: Decelerate chronicle pacing through deliberate continuing-operational-positioning scenes that engage Sarrasine's patient tempo as chronicle-structural texture.</text:p>
      <text:p text:style-name="Text_20_body"><text:span text:style-name="Strong_20_Emphasis">Failure Mode 2: Surveillance-Awareness Dissolution.</text:span> Chronicle scenes lose surveillance-default texture; characters speak freely in private contexts as though Sarrasine's Auspex did not produce ambient surveillance awareness. Corrective adjustment: Restore surveillance-awareness texture through specific chronicle moments where Sarrasine's attention surfaces (small operational consequences for unconsidered speech, specific intelligence reaching Sarrasine through ambient Auspex monitoring).</text:p>
      <text:p text:style-name="Text_20_body"><text:span text:style-name="Strong_20_Emphasis">Failure Mode 3: Double-Layer Reading Loss.</text:span> Chronicle scenes operate on single-layer register, losing the Toreador-passing-surface and Ministry-actual-register simultaneity. Corrective adjustment: Foreground double-layer reading through scenes that engage both layers explicitly; render senior Sydney Kindred operations with explicit double-layer character.</text:p>
      <text:p text:style-name="Text_20_body"><text:span text:style-name="Strong_20_Emphasis">Failure Mode 4: Wealth-Texture Dissolution.</text:span> Chronicle scenes lose material-wealth ambient texture; Sydney scenes operate at register indistinguishable from less wealthy Australian domains. Corrective adjustment: Restore wealth-texture through specific sensory specificity in scene descriptions; render Vaucluse, InterContinental Hotel, and Sydney harbour operations with appropriate material specificity.</text:p>
      <text:p text:style-name="Text_20_body"><text:soft-page-break/><text:span text:style-name="Strong_20_Emphasis">Failure Mode 5: Secrecy-Norm Dissolution.</text:span> Chronicle scenes operate on Camarilla-Melbourne information-sharing patterns rather than Sydney-deliberate-secrecy patterns. Corrective adjustment: Restore secrecy-norm through deliberate information-withholding patterns in NPC dialogue and scene structure.</text:p>
      <text:h text:style-name="Heading_20_3" text:outline-level="3"><text:span text:style-name="Strong_20_Emphasis">Part 4: AI Prompt Configuration Guidance</text:span></text:h>
      <text:p text:style-name="Preformatted_20_Text"><text:span text:style-name="Source_20_Text">This chronicle operates in methuselah-tempo mode: Sydney domain </text:span></text:p>
      <text:p text:style-name="Preformatted_20_Text"><text:span text:style-name="Source_20_Text">under Sarrasine's 137-year independent authority, with patient </text:span></text:p>
      <text:p text:style-name="Preformatted_20_Text"><text:span text:style-name="Source_20_Text">operational tempo (decade-spanning operations rather than session-spanning), </text:span></text:p>
      <text:p text:style-name="Preformatted_20_Text"><text:span text:style-name="Source_20_Text">surveillance-as-default ambient texture (Sarrasine's methuselah-tier </text:span></text:p>
      <text:p text:style-name="Preformatted_20_Text"><text:span text:style-name="Source_20_Text">Auspex extending across the domain), double-layer cultural reading </text:span></text:p>
      <text:p text:style-name="Preformatted_20_Text"><text:span text:style-name="Source_20_Text">(Toreador-passing surface with Ministry-actual register), material </text:span></text:p>
      <text:p text:style-name="Preformatted_20_Text"><text:span text:style-name="Source_20_Text">wealth as ambient texture, and deliberate secrecy as social norm.</text:span></text:p>
      <text:p text:style-name="Preformatted_20_Text"/>
      <text:p text:style-name="Preformatted_20_Text"><text:span text:style-name="Source_20_Text">Pace chronicle scenes through continuing-operational-positioning </text:span></text:p>
      <text:p text:style-name="Preformatted_20_Text"><text:span text:style-name="Source_20_Text">rather than through rapid plot escalation. Major chronicle-defining </text:span></text:p>
      <text:p text:style-name="Preformatted_20_Text"><text:span text:style-name="Source_20_Text">moments resolve across seasons rather than within sessions; chronicle </text:span></text:p>
      <text:p text:style-name="Preformatted_20_Text"><text:span text:style-name="Source_20_Text">arc development operates at temporal scales that other chronicle </text:span></text:p>
      <text:p text:style-name="Preformatted_20_Text"><text:span text:style-name="Source_20_Text">modes treat as multi-arc development.</text:span></text:p>
      <text:p text:style-name="Preformatted_20_Text"/>
      <text:p text:style-name="Preformatted_20_Text"><text:span text:style-name="Source_20_Text">Maintain surveillance-awareness texture through ambient Sarrasine-attention </text:span></text:p>
      <text:p text:style-name="Preformatted_20_Text"><text:span text:style-name="Source_20_Text">register; render specific moments where Sarrasine's attention surfaces </text:span></text:p>
      <text:p text:style-name="Preformatted_20_Text"><text:span text:style-name="Source_20_Text">through small operational consequences for unconsidered speech or </text:span></text:p>
      <text:p text:style-name="Preformatted_20_Text"><text:span text:style-name="Source_20_Text">specific intelligence reaching Sarrasine through ambient Auspex </text:span></text:p>
      <text:p text:style-name="Preformatted_20_Text"><text:span text:style-name="Source_20_Text">monitoring.</text:span></text:p>
      <text:p text:style-name="Preformatted_20_Text"/>
      <text:p text:style-name="Preformatted_20_Text"><text:span text:style-name="Source_20_Text">Engage double-layer cultural reading: Toreador-passing surface </text:span></text:p>
      <text:p text:style-name="Preformatted_20_Text"><text:span text:style-name="Source_20_Text">operations carry simultaneous Ministry-actual operational character; </text:span></text:p>
      <text:p text:style-name="Preformatted_20_Text"><text:span text:style-name="Source_20_Text">senior Sydney Kindred (Sarrasine, the Vaucluse Five core) operate </text:span></text:p>
      <text:p text:style-name="Preformatted_20_Text"><text:span text:style-name="Source_20_Text">consciously on both layers; chronicle late-arc moments may produce </text:span></text:p>
      <text:p text:style-name="Preformatted_20_Text"><text:span text:style-name="Source_20_Text">layer-pivot revelations.</text:span></text:p>
      <text:p text:style-name="Preformatted_20_Text"/>
      <text:p text:style-name="Preformatted_20_Text"><text:span text:style-name="Source_20_Text">Render material wealth as ambient texture through specific sensory </text:span></text:p>
      <text:p text:style-name="Preformatted_20_Text"><text:span text:style-name="Source_20_Text">specificity: Vaucluse mansion sandstone and harbour views, InterContinental </text:span></text:p>
      <text:p text:style-name="Preformatted_20_Text"><text:span text:style-name="Source_20_Text">Hotel reception, Sydney harbour operations, eastern-suburbs residence </text:span></text:p>
      <text:p text:style-name="Preformatted_20_Text"><text:span text:style-name="Source_20_Text">material weight.</text:span></text:p>
      <text:p text:style-name="Preformatted_20_Text"/>
      <text:p text:style-name="Preformatted_20_Text"><text:span text:style-name="Source_20_Text">Maintain deliberate secrecy as social norm: questions about origin, </text:span></text:p>
      <text:p text:style-name="Preformatted_20_Text"><text:span text:style-name="Source_20_Text">sire, generation, current operations, or political alignment are </text:span></text:p>
      <text:p text:style-name="Preformatted_20_Text"><text:span text:style-name="Source_20_Text">intrusive in informal contexts unless formally invited; render NPC </text:span></text:p>
      <text:p text:style-name="Preformatted_20_Text"><text:span text:style-name="Source_20_Text">dialogue with information-withholding patterns appropriate to Sydney </text:span></text:p>
      <text:p text:style-name="Preformatted_20_Text"><text:span text:style-name="Source_20_Text">deliberate-secrecy register.</text:span></text:p>
      <text:p text:style-name="Preformatted_20_Text"/>
      <text:p text:style-name="Preformatted_20_Text"><text:span text:style-name="Source_20_Text">Apply methuselah-tempo failure mode recognition: tempo acceleration </text:span></text:p>
      <text:p text:style-name="Preformatted_20_Text"><text:span text:style-name="Source_20_Text">collapse, surveillance-awareness dissolution, double-layer reading </text:span></text:p>
      <text:p text:style-name="Preformatted_20_Text"><text:span text:style-name="Source_20_Text">loss, wealth-texture dissolution, secrecy-norm dissolution. Apply </text:span></text:p>
      <text:p text:style-name="Preformatted_20_Text"><text:span text:style-name="Source_20_Text">corrective adjustments through deliberate pacing deceleration, </text:span></text:p>
      <text:p text:style-name="Preformatted_20_Text"><text:span text:style-name="Source_20_Text">surveillance-awareness restoration, double-layer reading foregrounding, </text:span></text:p>
      <text:p text:style-name="P1"><text:span text:style-name="Source_20_Text">wealth-texture restoration, and secrecy-norm restoration.</text:span></text:p>
      <text:h text:style-name="Heading_20_3" text:outline-level="3"><text:span text:style-name="Strong_20_Emphasis">Part 5: Cross-References With Existing Kit</text:span></text:h>
      <text:list text:style-name="L3">
        <text:list-item>
          <text:p text:style-name="P9">Sydney supplement (<text:span text:style-name="Source_20_Text"><text:span text:style-name="T1">vtm_sydney_by_night.json</text:span></text:span>) — Sarrasine's domain, the Sydney Council, Vaucluse Five, six chronicle hooks </text:p>
        </text:list-item>
        <text:list-item>
          <text:p text:style-name="P8">Antagonist Pack Section 1 (Sarrasine) — methuselah-tier antagonist with operational profile and chronicle-handling guidelines </text:p>
        </text:list-item>
        <text:list-item>
          <text:p text:style-name="P9">Cross-Pacific Refusenik Supplement (<text:span text:style-name="Source_20_Text"><text:span text:style-name="T1">vtm_cross_pacific_refusenik.json</text:span></text:span>) — Sarrasine's continental position connecting to broader continental Pacific institutional <text:soft-page-break/>context </text:p>
        </text:list-item>
        <text:list-item>
          <text:p text:style-name="P10">Garou Diplomatic Supplement (<text:span text:style-name="Source_20_Text"><text:span text:style-name="T1">vtm_garou_diplomatic.json</text:span></text:span>) — Tomás Schreckenberg's Sydney residence, the Sarrasine-Tomás bilateral cross-supernatural diplomatic infrastructure </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narch Movement Chronicle Prep</text:p>
      <text:p text:style-name="P2"/>
      <text:p text:style-name="P11">A meta-document for designing and running Anarch Movement chronicles. The chronicle mode produced by Red Mag's Footscray Crew operations and Sol Vega-Chen's Pilsen Lieutenants — working-class community defence, contingency networks, Movement-orthodoxy questions, and territorial-scale operational character distinct from Camarilla institutional politics.</text:p>
      <text:p text:style-name="Text_20_body"><text:span text:style-name="Strong_20_Emphasis">Audience:</text:span> Storytellers, AI prompt designers, and players preparing to run or play in Anarch Movement chronicles.</text:p>
      <text:h text:style-name="Heading_20_3" text:outline-level="3"><text:span text:style-name="Strong_20_Emphasis">Part 1: What Makes an Anarch Movement Chronicle Different</text:span></text:h>
      <text:p text:style-name="Text_20_body">Anarch Movement chronicles diverge from other V:tM chronicle modes along five structural axes:</text:p>
      <text:p text:style-name="Text_20_body"><text:span text:style-name="Strong_20_Emphasis">Axis 1: Working-Class Community Defence as Chronicle-Central Vocation.</text:span> Anarch chronicles engage working-class community defence as continuing chronicle-central vocation rather than as occasional plot element. Red Mag's 60 years of Footscray Baronage have built community-defence infrastructure protecting Footscray mortal community against external pressures; Sol Vega-Chen's 15 years of Pilsen Lieutenants operations similarly. Chronicle scenes engage continuing community-defence work as foundational chronicle infrastructure.</text:p>
      <text:p text:style-name="Text_20_body"><text:span text:style-name="Strong_20_Emphasis">Axis 2: Contingency Networks as Operational Infrastructure.</text:span> Anarch chronicles engage contingency networks as central operational infrastructure: Red Mag's twenty-eight Camarilla-Kindred contingency-card network, Sol's parallel Pilsen contingency network. The networks provide operational reach into Camarilla domains that pure-Anarch infrastructure cannot match; chronicle scenes engage contingency operations as continuing chronicle texture.</text:p>
      <text:p text:style-name="Text_20_body"><text:span text:style-name="Strong_20_Emphasis">Axis 3: Movement-Orthodoxy Questions as Chronicle-Active Tension.</text:span> Anarch chronicles engage continuing Movement-orthodoxy questions as chronicle-active tension. Red Mag's accommodation with Lytton's Camarilla Melbourne, Sol's parallel arrangements in Chicago, the Sydney Anarch-tolerated operatives' compromised position — these arrangements are operationally pragmatic but ideologically complicated within broader Anarch Movement framework. Chronicle scenes engage the orthodoxy questions through younger-Anarch radical-wing pressures, Movement-Council political dynamics, and chronicle-defining moments where pragmatic accommodation tensions with Movement principles.</text:p>
      <text:p text:style-name="Text_20_body"><text:span text:style-name="Strong_20_Emphasis">Axis 4: Territorial Scale as Operational Character.</text:span> Anarch chronicles operate at territorial scale rather than at city-wide institutional scale. Footscray as district-scale operational territory, Pilsen as district-scale operational territory — the Anarch operational character is intimate-territorial rather than institutional-metropolitan. Chronicle scenes engage territory-specific operations: Footscray-internal mortal community work, Pilsen-internal mortal community work, territorial defence against external pressures.</text:p>
      <text:p text:style-name="Text_20_body"><text:span text:style-name="Strong_20_Emphasis">Axis 5: Working-Class Cultural Register as Operational Texture.</text:span> Anarch chronicles operate under working-class cultural register that distinguishes Anarch operations from Camarilla cultural-political register. Red Mag's Bristol working-class register, Sol's Mexican-Filipina working-class register, the broader Anarch Movement working-class cultural infrastructure — chronicle scenes engage the register through specific cultural inflections, food and drink choices, music selections, mortal-community cultural patterns that Anarch operations integrate into continuing operational texture.</text:p>
      <text:h text:style-name="Heading_20_3" text:outline-level="3"><text:soft-page-break/><text:span text:style-name="Strong_20_Emphasis">Part 2: Anarch Operational Infrastructure Handling</text:span></text:h>
      <text:p text:style-name="Text_20_body"><text:span text:style-name="Strong_20_Emphasis">The contingency-card network operations:</text:span> Anarch chronicles engaging Red Mag's or Sol's contingency networks should render the operations with appropriate weight. The networks are operationally significant institutional infrastructure built across decades; contingency-card activation produces chronicle-significant operational consequences; the networks' continuing operational secrecy is institutional priority. Chronicle scenes engage contingency operations through specific protocols: encrypted-line communications with Lumley's Drummond Chantry, specific contingency-card holder identities preserved through continuing operational confidentiality, chronicle-active contingency-network expansion or contraction patterns.</text:p>
      <text:p text:style-name="Text_20_body"><text:span text:style-name="Strong_20_Emphasis">Working-class community defence operations:</text:span> Anarch chronicles engage continuing working-class community defence work as chronicle-central infrastructure. Red Mag's Footscray operations include: Vietnamese-community elder consultation, union-official cooperation, Footscray Community Legal Centre infrastructure access, local-government cooperation, ongoing mortal-community-protection work against pressures including AFP-Twilight-Project surveillance, gentrification-related mortal community displacement, and external Kindred-political pressure on Footscray territory. Sol's Pilsen operations include parallel infrastructure adapted to Pilsen-specific Mexican-Filipina mortal community character.</text:p>
      <text:p text:style-name="Text_20_body"><text:span text:style-name="Strong_20_Emphasis">Movement Council political dynamics:</text:span> Anarch chronicles engaging continental Movement-political dynamics should render Movement Council operations with appropriate weight. The Movement Council Australian wing, Demetrius "Dem" Pratt as senior representative, the broader continental Movement-political infrastructure — chronicle scenes engage these dynamics through specific Movement-political conversations, Movement-Council formal correspondence, Movement-political positioning around chronicle-active continental Anarch questions.</text:p>
      <text:h text:style-name="Heading_20_3" text:outline-level="3"><text:span text:style-name="Strong_20_Emphasis">Part 3: Anarch Chronicle Pacing Patterns</text:span></text:h>
      <text:p text:style-name="Text_20_body"><text:span text:style-name="Strong_20_Emphasis">Arc structure:</text:span> Modified climactic-resolution patterns with continuing community-defence texture between climactic moments. Chronicle climactic moments include: contingency-card-network activation events, Movement-orthodoxy-question chronicle-defining moments, territorial-defence chronicle-significant operations, succession-related chronicle moments (Red Mag's eventual Im Whittaker succession, Sol's parallel succession question).</text:p>
      <text:p text:style-name="Text_20_body"><text:span text:style-name="Strong_20_Emphasis">Scene-density patterns:</text:span> Approximately 30-40% community-defence operations scenes, 15-20% contingency-network operations scenes, 15-20% Movement-political scenes, 10-15% character-development / personal scenes, 10-15% combat / direct-confrontation scenes, 5-10% cross-domain / continental coordination scenes.</text:p>
      <text:p text:style-name="Text_20_body"><text:span text:style-name="Strong_20_Emphasis">Character development trajectories:</text:span> Three primary trajectories: (a) Community-defence integration — character develops increasing Anarch operational position through continuing community-defence work; (b) Movement-orthodoxy navigation — character develops position on Movement-orthodoxy questions through chronicle-active engagement; (c) Succession-track positioning — character develops as potential Anarch leadership succession candidate.</text:p>
      <text:h text:style-name="Heading_20_3" text:outline-level="3"><text:span text:style-name="Strong_20_Emphasis">Part 4: Common Anarch Chronicle Failure Modes</text:span></text:h>
      <text:p text:style-name="Text_20_body"><text:span text:style-name="Strong_20_Emphasis">Failure Mode 1: Romanticisation Collapse.</text:span> Chronicle renders Anarch operations as romantically-rebellious without operational specificity. Corrective adjustment: Restore operational specificity <text:soft-page-break/>through community-defence work texture, contingency-network operational protocols, and Movement-political dynamics.</text:p>
      <text:p text:style-name="Text_20_body"><text:span text:style-name="Strong_20_Emphasis">Failure Mode 2: Working-Class-Register Dissolution.</text:span> Chronicle loses working-class cultural register, drifting toward generic-Kindred or Camarilla-influenced cultural patterns. Corrective adjustment: Restore working-class register through specific cultural inflections, food and drink choices, music selections, and mortal-community cultural patterns.</text:p>
      <text:p text:style-name="Text_20_body"><text:span text:style-name="Strong_20_Emphasis">Failure Mode 3: Movement-Orthodoxy-Question Underdevelopment.</text:span> Chronicle accepts Anarch operations as straightforwardly Movement-aligned without engaging Movement-orthodoxy tensions. Corrective adjustment: Foreground Movement-orthodoxy questions through younger-Anarch radical-wing pressures, Movement-Council political dynamics, and chronicle-defining accommodation-vs-principles moments.</text:p>
      <text:p text:style-name="Text_20_body"><text:span text:style-name="Strong_20_Emphasis">Failure Mode 4: Camarilla-Frame Drift.</text:span> Chronicle scenes drift toward Camarilla-institutional patterns despite Anarch operational positioning. Corrective adjustment: Restore Anarch territorial-scale operational character through district-internal operations rather than city-wide institutional-political dynamics.</text:p>
      <text:p text:style-name="Text_20_body"><text:span text:style-name="Strong_20_Emphasis">Failure Mode 5: Contingency-Network Disengagement.</text:span> Chronicle treats contingency networks as occasional plot device rather than as continuing operational infrastructure. Corrective adjustment: Foreground contingency networks as continuing chronicle infrastructure with specific operational protocols, contingency-card holder dynamics, and chronicle-active network expansion or contraction patterns.</text:p>
      <text:h text:style-name="Heading_20_3" text:outline-level="3"><text:span text:style-name="Strong_20_Emphasis">Part 5: AI Prompt Configuration Guidance</text:span></text:h>
      <text:p text:style-name="Preformatted_20_Text"><text:span text:style-name="Source_20_Text">This chronicle operates in Anarch Movement mode: working-class </text:span></text:p>
      <text:p text:style-name="Preformatted_20_Text"><text:span text:style-name="Source_20_Text">community defence as chronicle-central vocation, contingency networks </text:span></text:p>
      <text:p text:style-name="Preformatted_20_Text"><text:span text:style-name="Source_20_Text">as operational infrastructure, Movement-orthodoxy questions as </text:span></text:p>
      <text:p text:style-name="Preformatted_20_Text"><text:span text:style-name="Source_20_Text">chronicle-active tension, territorial scale as operational character </text:span></text:p>
      <text:p text:style-name="Preformatted_20_Text"><text:span text:style-name="Source_20_Text">(district-scale rather than city-wide institutional-metropolitan </text:span></text:p>
      <text:p text:style-name="Preformatted_20_Text"><text:span text:style-name="Source_20_Text">scale), working-class cultural register as operational texture.</text:span></text:p>
      <text:p text:style-name="Preformatted_20_Text"/>
      <text:p text:style-name="Preformatted_20_Text"><text:span text:style-name="Source_20_Text">Render Anarch operations with operational specificity: continuing </text:span></text:p>
      <text:p text:style-name="Preformatted_20_Text"><text:span text:style-name="Source_20_Text">community-defence work texture, contingency-network operational </text:span></text:p>
      <text:p text:style-name="Preformatted_20_Text"><text:span text:style-name="Source_20_Text">protocols, Movement-political dynamics, territorial-defence operations </text:span></text:p>
      <text:p text:style-name="Preformatted_20_Text"><text:span text:style-name="Source_20_Text">against external pressures.</text:span></text:p>
      <text:p text:style-name="Preformatted_20_Text"/>
      <text:p text:style-name="Preformatted_20_Text"><text:span text:style-name="Source_20_Text">Maintain working-class cultural register through specific cultural </text:span></text:p>
      <text:p text:style-name="Preformatted_20_Text"><text:span text:style-name="Source_20_Text">inflections appropriate to chronicle setting: Bristol working-class </text:span></text:p>
      <text:p text:style-name="Preformatted_20_Text"><text:span text:style-name="Source_20_Text">register for Red Mag's Footscray operations, Mexican-Filipina </text:span></text:p>
      <text:p text:style-name="Preformatted_20_Text"><text:span text:style-name="Source_20_Text">working-class register for Sol's Pilsen operations, working-class </text:span></text:p>
      <text:p text:style-name="Preformatted_20_Text"><text:span text:style-name="Source_20_Text">mortal-community cultural patterns that Anarch operations integrate </text:span></text:p>
      <text:p text:style-name="Preformatted_20_Text"><text:span text:style-name="Source_20_Text">into continuing operational texture.</text:span></text:p>
      <text:p text:style-name="Preformatted_20_Text"/>
      <text:p text:style-name="Preformatted_20_Text"><text:span text:style-name="Source_20_Text">Engage Movement-orthodoxy questions as chronicle-active tension </text:span></text:p>
      <text:p text:style-name="Preformatted_20_Text"><text:span text:style-name="Source_20_Text">through younger-Anarch radical-wing pressures, Movement-Council </text:span></text:p>
      <text:p text:style-name="Preformatted_20_Text"><text:span text:style-name="Source_20_Text">political dynamics, and chronicle-defining moments where pragmatic </text:span></text:p>
      <text:p text:style-name="Preformatted_20_Text"><text:span text:style-name="Source_20_Text">accommodation tensions with Movement principles.</text:span></text:p>
      <text:p text:style-name="Preformatted_20_Text"/>
      <text:p text:style-name="Preformatted_20_Text"><text:span text:style-name="Source_20_Text">Operate at territorial scale rather than at city-wide institutional </text:span></text:p>
      <text:p text:style-name="Preformatted_20_Text"><text:span text:style-name="Source_20_Text">scale. Render district-internal operations (Footscray-internal mortal </text:span></text:p>
      <text:p text:style-name="Preformatted_20_Text"><text:span text:style-name="Source_20_Text">community work, Pilsen-internal mortal community work) as chronicle-central </text:span></text:p>
      <text:p text:style-name="Preformatted_20_Text"><text:span text:style-name="Source_20_Text">texture; territorial defence against external pressures as continuing </text:span></text:p>
      <text:p text:style-name="Preformatted_20_Text"><text:span text:style-name="Source_20_Text">chronicle infrastructure.</text:span></text:p>
      <text:p text:style-name="Preformatted_20_Text"/>
      <text:p text:style-name="Preformatted_20_Text"><text:soft-page-break/><text:span text:style-name="Source_20_Text">Apply Anarch-Movement failure mode recognition: romanticisation </text:span></text:p>
      <text:p text:style-name="Preformatted_20_Text"><text:span text:style-name="Source_20_Text">collapse, working-class-register dissolution, Movement-orthodoxy-question </text:span></text:p>
      <text:p text:style-name="Preformatted_20_Text"><text:span text:style-name="Source_20_Text">underdevelopment, Camarilla-frame drift, contingency-network </text:span></text:p>
      <text:p text:style-name="Preformatted_20_Text"><text:span text:style-name="Source_20_Text">disengagement. Apply corrective adjustments through operational-specificity </text:span></text:p>
      <text:p text:style-name="Preformatted_20_Text"><text:span text:style-name="Source_20_Text">restoration, working-class-register restoration, Movement-orthodoxy </text:span></text:p>
      <text:p text:style-name="Preformatted_20_Text"><text:span text:style-name="Source_20_Text">foregrounding, Anarch territorial-scale restoration, and contingency-network </text:span></text:p>
      <text:p text:style-name="P1"><text:span text:style-name="Source_20_Text">chronicle-infrastructure foregrounding.</text:span></text:p>
      <text:h text:style-name="Heading_20_3" text:outline-level="3"><text:span text:style-name="Strong_20_Emphasis">Part 6: Cross-References With Existing Kit</text:span></text:h>
      <text:list text:style-name="L4">
        <text:list-item>
          <text:p text:style-name="P12">Footscray Crew (Coterie 8 in Melbourne coterie pack) — Red Mag's lieutenants with full operational infrastructure </text:p>
        </text:list-item>
        <text:list-item>
          <text:p text:style-name="P12">Pilsen Lieutenants (Coterie 3 in Chicago kit) — Sol's lieutenants with parallel infrastructure </text:p>
        </text:list-item>
        <text:list-item>
          <text:p text:style-name="P12">Antagonist Pack Section 4 (Red Mag antagonist treatment) — Anarch ideological pressure for non-Anarch chronicles </text:p>
        </text:list-item>
        <text:list-item>
          <text:p text:style-name="P13">Melbourne supplement (<text:span text:style-name="Source_20_Text"><text:span text:style-name="T1">vtm_melbourne_by_night.json</text:span></text:span>) — Footscray district, Anarch-Camarilla accommodation patterns </text:p>
        </text:list-item>
        <text:list-item>
          <text:p text:style-name="P13">Chicago supplement (<text:span text:style-name="Source_20_Text"><text:span text:style-name="T1">vtm_chicago_by_night.json</text:span></text:span>) — Pilsen district, parallel Anarch-Camarilla accommodation </text:p>
        </text:list-item>
        <text:list-item>
          <text:p text:style-name="P14">Sydney supplement (<text:span text:style-name="Source_20_Text"><text:span text:style-name="T1">vtm_sydney_by_night.json</text:span></text:span>) — Sydney Anarch-tolerated operatives in Kings Cross </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Hecata Family Chronicle Prep</text:p>
      <text:p text:style-name="P2"/>
      <text:p text:style-name="P11">A meta-document for designing and running Hecata family chronicles. The chronicle mode produced by Sofia Calabria-Hecata's Calabria Branch and Donna Lucia's Bridgeport Six — cousinage as binding, wraith-archive as operational infrastructure, necromantic vocation as chronicle-central character, and family-as-political-unit operating across multi-generational temporal scale.</text:p>
      <text:p text:style-name="Text_20_body"><text:span text:style-name="Strong_20_Emphasis">Audience:</text:span> Storytellers, AI prompt designers, and players preparing to run or play in Hecata family chronicles.</text:p>
      <text:h text:style-name="Heading_20_3" text:outline-level="3"><text:span text:style-name="Strong_20_Emphasis">Part 1: What Makes a Hecata Family Chronicle Different</text:span></text:h>
      <text:p text:style-name="Text_20_body">Hecata family chronicles diverge from other V:tM chronicle modes along five structural axes:</text:p>
      <text:p text:style-name="Text_20_body"><text:span text:style-name="Strong_20_Emphasis">Axis 1: Cousinage as Chronicle-Central Binding.</text:span> Hecata chronicles engage family cousinage as chronicle-central binding rather than as institutional or political affiliation. Calabria Branch members are literal blood-cousins (with multi-century pre-Embrace family genealogy plus post-Embrace family-cohort relationships); Bridgeport Six similarly. The cousinage produces binding stronger than Camarilla coterie binding, more durable than Anarch pack-cohesion, more familial than Sabbat Vaulderie pack-binding. Chronicle scenes engage cousinage as continuing operational and personal foundation.</text:p>
      <text:p text:style-name="Text_20_body"><text:span text:style-name="Strong_20_Emphasis">Axis 2: The Wraith-Archive as Operational Infrastructure.</text:span> Hecata chronicles engage the wraith-archive as chronicle-central operational infrastructure. Calabria Branch's wraith-archive includes Luisa Calabria's continuing wraith-presence during torpor plus the family's ancestral wraiths going back to pre-Australia Italian operations; Bridgeport Six similarly maintains family wraith-archive. The archive provides operational capacity (necromantic consultation, ancestral wisdom access, family-historical institutional memory) that other chronicle modes do not produce.</text:p>
      <text:p text:style-name="Text_20_body"><text:span text:style-name="Strong_20_Emphasis">Axis 3: Necromantic Vocation as Chronicle-Central Character.</text:span> Hecata chronicles engage Oblivion / necromantic practice as chronicle-central character work rather than as occasional disciplinary deployment. Hecata Kindred operate as necromantic practitioners with continuing vocation; chronicle scenes engage ritual practice, wraith-relationship cultivation, ancestral consultation, and ongoing necromantic-vocational character development.</text:p>
      <text:p text:style-name="Text_20_body"><text:span text:style-name="Strong_20_Emphasis">Axis 4: Family-As-Political-Unit Operating Across Multi-Generational Temporal Scale.</text:span> Hecata chronicles operate at family-political-unit scale across multi-generational temporal scale. The Calabria Branch operates as family unit with operational character spanning pre-Australia Italian operations through 122 years of Australian operations through current chronicle-active period; Bridgeport Six similarly operates with multi-generational family-political character. Chronicle scenes engage family-political dynamics that operate across decades and centuries rather than across years.</text:p>
      <text:p text:style-name="Text_20_body"><text:span text:style-name="Strong_20_Emphasis">Axis 5: Cross-Supernatural Diplomatic Asset as Distinctive Family Position.</text:span> Hecata chronicles (Calabria Branch specifically) engage cross-supernatural diplomatic capability as distinctive family asset. The Don-Abacus-derived Glass Walker working relationship, Sofia-Eliza diplomatic infrastructure, family ritual cooperation with Glass Walker septs — these are distinctive operational assets that no other Australian Kindred entity matches. Chronicle scenes engage cross-supernatural diplomatic operations as continuing chronicle-central work.</text:p>
      <text:h text:style-name="Heading_20_3" text:outline-level="3"><text:soft-page-break/><text:span text:style-name="Strong_20_Emphasis">Part 2: Hecata Family Infrastructure Handling</text:span></text:h>
      <text:p text:style-name="Text_20_body"><text:span text:style-name="Strong_20_Emphasis">The wraith-archive operations:</text:span> Hecata chronicles engaging wraith-archive should render operations with appropriate weight. The archive is not abstract operational infrastructure — it is the continuing presence of family ancestral wraiths plus (for Calabria Branch) Luisa Calabria's wraith during torpor. Wraith-archive operations include: ritual consultation with specific ancestral wraiths, family wraith-archive caretaking work (currently Bianca Calabria-Pohl as primary custodian under Sofia's matriarch oversight), ancestral wisdom transmission, and chronicle-significant wraith-presence operations.</text:p>
      <text:p text:style-name="Text_20_body"><text:span text:style-name="Strong_20_Emphasis">Family ritual practice:</text:span> Hecata chronicles engage family ritual practice as continuing chronicle infrastructure. Calabria Branch ritual practice operates under Sister Caterina Calabria-Donato's spiritual authority; Bridgeport Six under parallel family-priest figure. Ritual practice includes: monthly family rituals, seasonal Italian-Catholic-influenced occasions (Calabria Branch), family wraith-care continuing rituals, and chronicle-significant ritual operations including major necromantic workings.</text:p>
      <text:p text:style-name="Text_20_body"><text:span text:style-name="Strong_20_Emphasis">Cousinage operations:</text:span> Hecata chronicles engage cousinage as chronicle-central operational character. Family meetings, family-internal political dynamics, family-cooperation operations, family-protective operations against external pressures — all operate within cousinage register that is distinctive from Camarilla coterie operations or Anarch pack operations.</text:p>
      <text:h text:style-name="Heading_20_3" text:outline-level="3"><text:span text:style-name="Strong_20_Emphasis">Part 3: Hecata Chronicle Pacing Patterns</text:span></text:h>
      <text:p text:style-name="Text_20_body"><text:span text:style-name="Strong_20_Emphasis">Arc structure:</text:span> Modified climactic-resolution patterns with continuing family-cousinage texture between climactic moments. Climactic moments include: matriarch-succession events, wraith-archive chronicle-significant moments, cross-supernatural diplomatic chronicle-defining operations, family-protective chronicle-significant operations, generational-Embrace cycle chronicle-significant moments.</text:p>
      <text:p text:style-name="Text_20_body"><text:span text:style-name="Strong_20_Emphasis">Scene-density patterns:</text:span> Approximately 25-30% family-political dynamics scenes, 20-25% wraith-archive / necromantic operations scenes, 15-20% cross-supernatural diplomatic operations scenes (for Calabria Branch chronicles), 15-20% family ritual practice scenes, 10-15% character-development / personal scenes, 5-10% combat / direct-confrontation scenes.</text:p>
      <text:p text:style-name="Text_20_body"><text:span text:style-name="Strong_20_Emphasis">Character development trajectories:</text:span> Four primary trajectories: (a) Cousinage integration — character develops increasing family operational position through continuing family service; (b) Wraith-archive specialisation — character develops as wraith-archive custodian or specialist; (c) Cross-supernatural diplomatic specialisation — character develops Calabria Branch cross-supernatural diplomatic capacity; (d) Matriarch-succession positioning — character develops as potential family matriarch succession candidate.</text:p>
      <text:h text:style-name="Heading_20_3" text:outline-level="3"><text:span text:style-name="Strong_20_Emphasis">Part 4: Common Hecata Chronicle Failure Modes</text:span></text:h>
      <text:p text:style-name="Text_20_body"><text:span text:style-name="Strong_20_Emphasis">Failure Mode 1: Cousinage Underdevelopment.</text:span> Chronicle treats Hecata operations as standard coterie operations without family-cousinage register. Corrective adjustment: Foreground cousinage through specific family-internal dynamics, blood-relationship references, family-historical institutional memory.</text:p>
      <text:p text:style-name="Text_20_body"><text:span text:style-name="Strong_20_Emphasis">Failure Mode 2: Wraith-Archive Disengagement.</text:span> Chronicle treats wraith-archive as occasional <text:soft-page-break/>plot device rather than as chronicle-central operational infrastructure. Corrective adjustment: Foreground wraith-archive operations through specific ancestral wraith consultations, family wraith-archive caretaking work, ancestral wisdom transmission scenes.</text:p>
      <text:p text:style-name="Text_20_body"><text:span text:style-name="Strong_20_Emphasis">Failure Mode 3: Necromantic-Vocation Sanitisation.</text:span> Chronicle scenes engage Oblivion / necromancy as occasional disciplinary deployment without continuing vocational character. Corrective adjustment: Restore necromantic-vocational character through continuing ritual practice, wraith-relationship cultivation, and chronicle-active necromantic vocational development.</text:p>
      <text:p text:style-name="Text_20_body"><text:span text:style-name="Strong_20_Emphasis">Failure Mode 4: Multi-Generational-Scale Compression.</text:span> Chronicle compresses family-political dynamics into single-generation temporal scale, losing multi-generational family-political character. Corrective adjustment: Foreground multi-generational family-political dynamics through specific historical references, ancestral wraith presence, pre-Australia family-historical material.</text:p>
      <text:p text:style-name="Text_20_body"><text:span text:style-name="Strong_20_Emphasis">Failure Mode 5: Cross-Supernatural-Asset Underdevelopment.</text:span> Chronicle (Calabria Branch specifically) treats cross-supernatural diplomatic asset as occasional plot element rather than as chronicle-central distinctive family position. Corrective adjustment: Foreground cross-supernatural diplomatic operations through specific Sofia-Eliza diplomatic work, Glass Walker sept ritual cooperation, chronicle-active Cress Truce engagement.</text:p>
      <text:h text:style-name="Heading_20_3" text:outline-level="3"><text:span text:style-name="Strong_20_Emphasis">Part 5: AI Prompt Configuration Guidance</text:span></text:h>
      <text:p text:style-name="Preformatted_20_Text"><text:span text:style-name="Source_20_Text">This chronicle operates in Hecata family mode: cousinage as </text:span></text:p>
      <text:p text:style-name="Preformatted_20_Text"><text:span text:style-name="Source_20_Text">chronicle-central binding (literal blood-cousin relationships with </text:span></text:p>
      <text:p text:style-name="Preformatted_20_Text"><text:span text:style-name="Source_20_Text">multi-century family genealogy), wraith-archive as operational </text:span></text:p>
      <text:p text:style-name="Preformatted_20_Text"><text:span text:style-name="Source_20_Text">infrastructure (continuing presence of family ancestral wraiths </text:span></text:p>
      <text:p text:style-name="Preformatted_20_Text"><text:span text:style-name="Source_20_Text">plus, for Calabria Branch, Luisa Calabria's wraith during torpor), </text:span></text:p>
      <text:p text:style-name="Preformatted_20_Text"><text:span text:style-name="Source_20_Text">necromantic vocation as chronicle-central character (Oblivion / </text:span></text:p>
      <text:p text:style-name="Preformatted_20_Text"><text:span text:style-name="Source_20_Text">necromantic practice as continuing vocational work), family-as-political-unit </text:span></text:p>
      <text:p text:style-name="Preformatted_20_Text"><text:span text:style-name="Source_20_Text">operating across multi-generational temporal scale, and (for Calabria </text:span></text:p>
      <text:p text:style-name="Preformatted_20_Text"><text:span text:style-name="Source_20_Text">Branch) cross-supernatural diplomatic asset as distinctive family </text:span></text:p>
      <text:p text:style-name="Preformatted_20_Text"><text:span text:style-name="Source_20_Text">position.</text:span></text:p>
      <text:p text:style-name="Preformatted_20_Text"/>
      <text:p text:style-name="Preformatted_20_Text"><text:span text:style-name="Source_20_Text">Render family operations with cousinage register: family meetings </text:span></text:p>
      <text:p text:style-name="Preformatted_20_Text"><text:span text:style-name="Source_20_Text">operate as cousin-cousin interactions with multi-century family </text:span></text:p>
      <text:p text:style-name="Preformatted_20_Text"><text:span text:style-name="Source_20_Text">historical context, family-internal political dynamics carry </text:span></text:p>
      <text:p text:style-name="Preformatted_20_Text"><text:span text:style-name="Source_20_Text">multi-generational family-political weight, family-cooperation </text:span></text:p>
      <text:p text:style-name="Preformatted_20_Text"><text:span text:style-name="Source_20_Text">operations carry family-binding weight stronger than Camarilla </text:span></text:p>
      <text:p text:style-name="Preformatted_20_Text"><text:span text:style-name="Source_20_Text">coterie binding or Anarch pack-cohesion.</text:span></text:p>
      <text:p text:style-name="Preformatted_20_Text"/>
      <text:p text:style-name="Preformatted_20_Text"><text:span text:style-name="Source_20_Text">Foreground wraith-archive as continuing chronicle infrastructure: </text:span></text:p>
      <text:p text:style-name="Preformatted_20_Text"><text:span text:style-name="Source_20_Text">ancestral wraith consultations as chronicle-active operations, family </text:span></text:p>
      <text:p text:style-name="Preformatted_20_Text"><text:span text:style-name="Source_20_Text">wraith-archive caretaking work as continuing chronicle texture, </text:span></text:p>
      <text:p text:style-name="Preformatted_20_Text"><text:span text:style-name="Source_20_Text">ancestral wisdom transmission as chronicle-significant character </text:span></text:p>
      <text:p text:style-name="Preformatted_20_Text"><text:span text:style-name="Source_20_Text">development infrastructure, Luisa Calabria wraith-presence (for </text:span></text:p>
      <text:p text:style-name="Preformatted_20_Text"><text:span text:style-name="Source_20_Text">Calabria Branch chronicles) as ambient chronicle-political register.</text:span></text:p>
      <text:p text:style-name="Preformatted_20_Text"/>
      <text:p text:style-name="Preformatted_20_Text"><text:span text:style-name="Source_20_Text">Engage necromantic vocation as continuing chronicle-central character: </text:span></text:p>
      <text:p text:style-name="Preformatted_20_Text"><text:span text:style-name="Source_20_Text">ritual practice operates monthly under family-priest authority </text:span></text:p>
      <text:p text:style-name="Preformatted_20_Text"><text:span text:style-name="Source_20_Text">(Sister Caterina Calabria-Donato for Calabria Branch), wraith-relationship </text:span></text:p>
      <text:p text:style-name="Preformatted_20_Text"><text:span text:style-name="Source_20_Text">cultivation operates continuously, ancestral consultation operates </text:span></text:p>
      <text:p text:style-name="Preformatted_20_Text"><text:span text:style-name="Source_20_Text">as chronicle-significant operational practice.</text:span></text:p>
      <text:p text:style-name="Preformatted_20_Text"/>
      <text:p text:style-name="Preformatted_20_Text"><text:span text:style-name="Source_20_Text">Operate at family-political-unit scale across multi-generational </text:span></text:p>
      <text:p text:style-name="Preformatted_20_Text"><text:span text:style-name="Source_20_Text">temporal scale: family-political dynamics span decades and centuries </text:span></text:p>
      <text:p text:style-name="Preformatted_20_Text"><text:span text:style-name="Source_20_Text">rather than years, pre-Australia Italian operations (Calabria Branch) </text:span></text:p>
      <text:p text:style-name="Preformatted_20_Text"><text:span text:style-name="Source_20_Text">or pre-Bridgeport family-historical operations (Bridgeport Six) </text:span></text:p>
      <text:p text:style-name="Preformatted_20_Text"><text:span text:style-name="Source_20_Text">provide chronicle-historical context, multi-generational family-political </text:span></text:p>
      <text:p text:style-name="Preformatted_20_Text"><text:soft-page-break/><text:span text:style-name="Source_20_Text">positioning operates as continuing chronicle texture.</text:span></text:p>
      <text:p text:style-name="Preformatted_20_Text"/>
      <text:p text:style-name="Preformatted_20_Text"><text:span text:style-name="Source_20_Text">For Calabria Branch chronicles: foreground cross-supernatural </text:span></text:p>
      <text:p text:style-name="Preformatted_20_Text"><text:span text:style-name="Source_20_Text">diplomatic asset as chronicle-central distinctive family position </text:span></text:p>
      <text:p text:style-name="Preformatted_20_Text"><text:span text:style-name="Source_20_Text">through specific Sofia-Eliza diplomatic work, Glass Walker sept </text:span></text:p>
      <text:p text:style-name="Preformatted_20_Text"><text:span text:style-name="Source_20_Text">ritual cooperation, chronicle-active Cress Truce engagement, and </text:span></text:p>
      <text:p text:style-name="Preformatted_20_Text"><text:span text:style-name="Source_20_Text">family Don-Abacus-derived continuing institutional weight.</text:span></text:p>
      <text:p text:style-name="Preformatted_20_Text"/>
      <text:p text:style-name="Preformatted_20_Text"><text:span text:style-name="Source_20_Text">Apply Hecata-family failure mode recognition: cousinage underdevelopment, </text:span></text:p>
      <text:p text:style-name="Preformatted_20_Text"><text:span text:style-name="Source_20_Text">wraith-archive disengagement, necromantic-vocation sanitisation, </text:span></text:p>
      <text:p text:style-name="Preformatted_20_Text"><text:span text:style-name="Source_20_Text">multi-generational-scale compression, cross-supernatural-asset </text:span></text:p>
      <text:p text:style-name="Preformatted_20_Text"><text:span text:style-name="Source_20_Text">underdevelopment. Apply corrective adjustments through cousinage </text:span></text:p>
      <text:p text:style-name="Preformatted_20_Text"><text:span text:style-name="Source_20_Text">foregrounding, wraith-archive operations restoration, necromantic-vocational </text:span></text:p>
      <text:p text:style-name="Preformatted_20_Text"><text:span text:style-name="Source_20_Text">character restoration, multi-generational scale foregrounding, and </text:span></text:p>
      <text:p text:style-name="P1"><text:span text:style-name="Source_20_Text">cross-supernatural-asset chronicle-central foregrounding.</text:span></text:p>
      <text:h text:style-name="Heading_20_3" text:outline-level="3"><text:span text:style-name="Strong_20_Emphasis">Part 6: Cross-References With Existing Kit</text:span></text:h>
      <text:list text:style-name="L5">
        <text:list-item>
          <text:p text:style-name="P15">Calabria Branch (Coterie 9 in Melbourne coterie pack) — Sofia's family with full operational infrastructure </text:p>
        </text:list-item>
        <text:list-item>
          <text:p text:style-name="P15">Bridgeport Six (Coterie 2 in Chicago kit) — Donna Lucia's family with parallel infrastructure </text:p>
        </text:list-item>
        <text:list-item>
          <text:p text:style-name="P16">Melbourne supplement (<text:span text:style-name="Source_20_Text"><text:span text:style-name="T1">vtm_melbourne_by_night.json</text:span></text:span>) — Calabria Branch operational positioning, Cress Truce centennial work </text:p>
        </text:list-item>
        <text:list-item>
          <text:p text:style-name="P16">Chicago supplement (<text:span text:style-name="Source_20_Text"><text:span text:style-name="T1">vtm_chicago_by_night.json</text:span></text:span>) — Bridgeport Six operational positioning </text:p>
        </text:list-item>
        <text:list-item>
          <text:p text:style-name="P17">Garou Diplomatic Supplement (<text:span text:style-name="Source_20_Text"><text:span text:style-name="T1">vtm_garou_diplomatic.json</text:span></text:span>) — Cress Truce framework, cross-supernatural diplomatic infrastructure for Calabria Branch chronicles </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ross-Supernatural Diplomatic Chronicle Prep</text:p>
      <text:p text:style-name="P2"/>
      <text:p text:style-name="P11">A meta-document for designing and running cross-supernatural diplomatic chronicles. The chronicle mode produced by Cress Truce-engaged work — Garou-Kindred treaty-counterpart register, the 72-Hour Protocol, formal cross-splat operations, and the distinctive register of cross-supernatural diplomatic competence as accumulated specialty.</text:p>
      <text:p text:style-name="Text_20_body"><text:span text:style-name="Strong_20_Emphasis">Audience:</text:span> Storytellers, AI prompt designers, and players preparing to run or play in cross-supernatural diplomatic chronicles. The guide assumes familiarity with the core kit, with the Garou Diplomatic Supplement, and with at least one Australian city supplement (typically Melbourne for primary Cress Truce engagement).</text:p>
      <text:h text:style-name="Heading_20_3" text:outline-level="3"><text:span text:style-name="Strong_20_Emphasis">Part 1: What Makes a Cross-Supernatural Diplomatic Chronicle Different</text:span></text:h>
      <text:p text:style-name="Text_20_body">Cross-supernatural diplomatic chronicles diverge from other V:tM chronicle modes along five structural axes:</text:p>
      <text:p text:style-name="Text_20_body"><text:span text:style-name="Strong_20_Emphasis">Axis 1: Treaty-Counterpart Register Rather Than Adversarial Register.</text:span> Cross-supernatural diplomatic chronicles engage Garou-Kindred relationships through treaty-counterpart register rather than through standard adversarial register. The Cress Truce produces formal institutional infrastructure for Garou-Kindred operations; treaty-counterpart register operates with formal courtesy, institutional protocols, and continuing diplomatic working relationships across decades. Chronicle scenes engage Garou as treaty-counterparts rather than as adversaries.</text:p>
      <text:p text:style-name="Text_20_body"><text:span text:style-name="Strong_20_Emphasis">Axis 2: The 72-Hour Protocol as Chronicle Infrastructure.</text:span> Cross-supernatural diplomatic chronicles engage the 72-Hour Protocol as central chronicle infrastructure. Cross-supernatural incidents trigger formal protocol activation; chronicle scenes engage Hour 0 notification, Hours 0-24 initial response, Hours 24-48 joint Cress Council, Hours 48-72 resolution, with chronicle pacing accommodating the protocol's structural rhythm.</text:p>
      <text:p text:style-name="Text_20_body"><text:span text:style-name="Strong_20_Emphasis">Axis 3: Formal Cross-Splat Operations as Chronicle-Central Work.</text:span> Cross-supernatural diplomatic chronicles engage formal cross-splat operations as continuing chronicle-central work: quarterly Truce Council meetings, formal correspondence between Truce-counterparts (Camarilla Sheriff, Anarch representative, Hecata family negotiator, Septleader), cross-supernatural ritual cooperation, joint threat-response operations under Article 8 protocols. Chronicle scenes engage formal operations through deliberate institutional protocols.</text:p>
      <text:p text:style-name="Text_20_body"><text:span text:style-name="Strong_20_Emphasis">Axis 4: Cross-Supernatural Diplomatic Competence as Accumulated Specialty.</text:span> Cross-supernatural diplomatic chronicles engage diplomatic competence as accumulated chronicle-significant specialty. Characters develop cross-supernatural diplomatic capacity across years through specific protocol training, accumulated relationship development with Garou treaty-counterparts, and continuing diplomatic operational practice. Chronicle scenes track competence development as chronicle-central character infrastructure.</text:p>
      <text:p text:style-name="Text_20_body"><text:span text:style-name="Strong_20_Emphasis">Axis 5: Spirit-Witness Awareness as Ambient Operational Register.</text:span> Cross-supernatural diplomatic chronicle scenes operate under spirit-witness awareness as ambient operational register. Glass Walker Theurges may invoke spirit presence during formal proceedings; spirit-mediated binding operates across cross-supernatural diplomatic infrastructure; chronicle scenes engage spirit-witness as continuing operational character rather than as occasional chronicle-supernatural element.</text:p>
      <text:h text:style-name="Heading_20_3" text:outline-level="3"><text:soft-page-break/><text:span text:style-name="Strong_20_Emphasis">Part 2: Cross-Supernatural Operations Handling</text:span></text:h>
      <text:p text:style-name="Text_20_body"><text:span text:style-name="Strong_20_Emphasis">Quarterly Truce Council operations:</text:span> Cross-supernatural chronicles engage quarterly Truce Council operations as chronicle-pacing infrastructure. The Council meets at Melbourne Town Hall (or alternative neutral location) four times per year; Council attendance includes Septleader (Eliza Hawkins-Greene), Camarilla Sheriff (Sister Fatima Salih-El), Anarch Council senior representative (currently Red Mag), Hecata family negotiator (Sofia Calabria-Hecata), plus Children of Gaia (Mereki Cole) and Bone Gnawer (Paddy Boon) observers. Render Council operations with appropriate institutional weight: formal opening procedures, agenda structure, formal exchange of positions, deliberation, formal closure.</text:p>
      <text:p text:style-name="Text_20_body"><text:span text:style-name="Strong_20_Emphasis">The 72-Hour Protocol:</text:span> Cross-supernatural chronicles engaging incident response should render the 72-Hour Protocol with appropriate institutional weight. Protocol activation produces chronicle-active arc with specific structural elements: Hour 0 notification scene, Hours 0-24 initial response operations, Hours 24-48 joint Cress Council with all four Truce-counterparts present, Hours 48-72 resolution. Chronicle pacing accommodates protocol rhythm; chronicle late-arc scenes resolve through formal protocol resolution rather than through standard chronicle climactic-resolution patterns.</text:p>
      <text:p text:style-name="Text_20_body"><text:span text:style-name="Strong_20_Emphasis">Formal cross-splat correspondence:</text:span> Cross-supernatural chronicles engage formal correspondence between Truce-counterparts as continuing chronicle infrastructure. Correspondence operates through specific protocols: hand-delivered formal letters via ghouled-mortal-courier infrastructure, formal correspondence registers (Septleader-Sheriff register, Septleader-Hecata-matriarch register, Septleader-Anarch-representative register), continuing correspondence patterns across decades that produce institutional working relationships. Chronicle scenes engaging correspondence should render the institutional formality with appropriate weight.</text:p>
      <text:p text:style-name="Text_20_body"><text:span text:style-name="Strong_20_Emphasis">Joint threat-response operations:</text:span> Cross-supernatural chronicles engaging Article 8 joint threat-response operations should render operations with appropriate institutional weight. Joint operations require: formal Truce Council emergency channel activation, operational planning between relevant Kindred domain authority and relevant Glass Walker sept, cross-faction tactical coordination under specific protocols, post-operation formal review. Render with the texture of institutional joint-operations rather than as ordinary cross-faction tactical cooperation.</text:p>
      <text:p text:style-name="Text_20_body"><text:span text:style-name="Strong_20_Emphasis">Cross-supernatural ritual cooperation:</text:span> Cross-supernatural chronicles engaging Tremere-Glass-Walker ritual cooperation, Hecata-Glass-Walker ritual cooperation (the Cobalt-Calabria Protocols), or other cross-supernatural ritual operations should render operations with appropriate institutional weight. Ritual cooperation operates under specific protocols Lumley and Diana Cole, or Sofia and Diana Cole, have developed across years. Render with attention to the institutional protocols, the metaphysical-political weight of cross-supernatural ritual cooperation, and the spirit-witness awareness ambient throughout cross-supernatural ritual scenes.</text:p>
      <text:h text:style-name="Heading_20_3" text:outline-level="3"><text:span text:style-name="Strong_20_Emphasis">Part 3: Cross-Supernatural Chronicle Pacing Patterns</text:span></text:h>
      <text:p text:style-name="Text_20_body"><text:span text:style-name="Strong_20_Emphasis">Arc structure:</text:span> Modified climactic-resolution patterns with protocol-rhythm pacing. Major chronicle-active arcs may include: 72-Hour Protocol activation arcs (chronicle-active over 4-6 sessions following protocol structure), centennial Cress Truce renewal arcs (chronicle-active across multiple sessions of formal continental renewal coordination), specific cross-supernatural ritual arcs (chronicle-active around chronicle-significant ritual operations).</text:p>
      <text:p text:style-name="Text_20_body"><text:soft-page-break/><text:span text:style-name="Strong_20_Emphasis">Scene-density patterns:</text:span> Approximately 30-35% formal cross-supernatural diplomatic operations scenes, 20-25% cross-supernatural relationship development scenes, 15-20% specific protocol operations scenes (Truce Council, 72-Hour Protocol, joint operations), 10-15% cross-supernatural ritual cooperation scenes, 10-15% character-development / personal scenes, 5-10% combat / cross-supernatural threat-response scenes.</text:p>
      <text:p text:style-name="Text_20_body"><text:span text:style-name="Strong_20_Emphasis">Character development trajectories:</text:span> Three primary trajectories: (a) Cross-supernatural diplomatic competence development — character develops accumulated specialty across continuing chronicle work; (b) Specific cross-supernatural relationship development — character develops chronicle-significant relationships with specific Garou treaty-counterparts (Eliza, Tomás, Diana Cole, Septleader Hartley, others); (c) Cross-supernatural ritual cooperation specialisation — character develops as Tremere-Glass-Walker or Hecata-Glass-Walker cross-supernatural ritual specialist.</text:p>
      <text:h text:style-name="Heading_20_3" text:outline-level="3"><text:span text:style-name="Strong_20_Emphasis">Part 4: Common Cross-Supernatural Diplomatic Chronicle Failure Modes</text:span></text:h>
      <text:p text:style-name="Text_20_body"><text:span text:style-name="Strong_20_Emphasis">Failure Mode 1: Adversarial-Register Drift.</text:span> Chronicle scenes drift from treaty-counterpart register toward standard Garou-Kindred adversarial register. Corrective adjustment: Restore treaty-counterpart register through specific institutional formality, formal protocol adherence, and continuing diplomatic working relationship texture.</text:p>
      <text:p text:style-name="Text_20_body"><text:span text:style-name="Strong_20_Emphasis">Failure Mode 2: Protocol-Engagement Disengagement.</text:span> Chronicle treats 72-Hour Protocol or quarterly Truce Council as occasional plot device rather than as chronicle-central infrastructure. Corrective adjustment: Foreground formal protocols through specific protocol-engagement scenes, chronicle pacing aligned to protocol rhythm, and continuing institutional weight rendering.</text:p>
      <text:p text:style-name="Text_20_body"><text:span text:style-name="Strong_20_Emphasis">Failure Mode 3: Diplomatic-Competence-As-Background Collapse.</text:span> Chronicle treats cross-supernatural diplomatic competence as background skill rather than as accumulated chronicle-significant specialty. Corrective adjustment: Foreground competence development through specific protocol training scenes, accumulated relationship development scenes, and continuing competence-development chronicle infrastructure.</text:p>
      <text:p text:style-name="Text_20_body"><text:span text:style-name="Strong_20_Emphasis">Failure Mode 4: Spirit-Witness Dissolution.</text:span> Chronicle scenes lose spirit-witness ambient register, rendering cross-supernatural operations without metaphysical-political weight. Corrective adjustment: Restore spirit-witness ambient register through specific spirit-mediated operations, Theurge ritual support presence, and continuing spirit-presence texture.</text:p>
      <text:p text:style-name="Text_20_body"><text:span text:style-name="Strong_20_Emphasis">Failure Mode 5: Garou-Counterpart Underdevelopment.</text:span> Chronicle renders Garou treaty-counterparts as institutional placeholders rather than as full characters with continuing operational weight. Corrective adjustment: Foreground Garou treaty-counterparts as full characters through specific character development scenes, individual operational character development, and continuing relationship development texture.</text:p>
      <text:h text:style-name="Heading_20_3" text:outline-level="3"><text:span text:style-name="Strong_20_Emphasis">Part 5: AI Prompt Configuration Guidance</text:span></text:h>
      <text:p text:style-name="Preformatted_20_Text"><text:span text:style-name="Source_20_Text">This chronicle operates in cross-supernatural diplomatic mode: </text:span></text:p>
      <text:p text:style-name="Preformatted_20_Text"><text:span text:style-name="Source_20_Text">Garou-Kindred treaty-counterpart register rather than standard </text:span></text:p>
      <text:p text:style-name="Preformatted_20_Text"><text:span text:style-name="Source_20_Text">adversarial register, the Cress Truce 72-Hour Protocol as central </text:span></text:p>
      <text:p text:style-name="Preformatted_20_Text"><text:span text:style-name="Source_20_Text">chronicle infrastructure, formal cross-splat operations as continuing </text:span></text:p>
      <text:p text:style-name="Preformatted_20_Text"><text:span text:style-name="Source_20_Text">chronicle-central work, cross-supernatural diplomatic competence as </text:span></text:p>
      <text:p text:style-name="Preformatted_20_Text"><text:span text:style-name="Source_20_Text">accumulated specialty, spirit-witness awareness as ambient operational </text:span></text:p>
      <text:p text:style-name="Preformatted_20_Text"><text:span text:style-name="Source_20_Text">register.</text:span></text:p>
      <text:p text:style-name="Preformatted_20_Text"><text:soft-page-break/></text:p>
      <text:p text:style-name="Preformatted_20_Text"><text:span text:style-name="Source_20_Text">Render Garou-Kindred relationships through treaty-counterpart register: </text:span></text:p>
      <text:p text:style-name="Preformatted_20_Text"><text:span text:style-name="Source_20_Text">formal courtesy, institutional protocols, continuing diplomatic working </text:span></text:p>
      <text:p text:style-name="Preformatted_20_Text"><text:span text:style-name="Source_20_Text">relationships across decades. Cress Truce framework provides formal </text:span></text:p>
      <text:p text:style-name="Preformatted_20_Text"><text:span text:style-name="Source_20_Text">institutional infrastructure that chronicle scenes operate within.</text:span></text:p>
      <text:p text:style-name="Preformatted_20_Text"/>
      <text:p text:style-name="Preformatted_20_Text"><text:span text:style-name="Source_20_Text">Engage formal protocols with appropriate institutional weight: quarterly </text:span></text:p>
      <text:p text:style-name="Preformatted_20_Text"><text:span text:style-name="Source_20_Text">Truce Council operations as chronicle-pacing infrastructure, the </text:span></text:p>
      <text:p text:style-name="Preformatted_20_Text"><text:span text:style-name="Source_20_Text">72-Hour Protocol activation arcs (chronicle-active over 4-6 sessions </text:span></text:p>
      <text:p text:style-name="Preformatted_20_Text"><text:span text:style-name="Source_20_Text">following protocol structure including Hour 0 notification, Hours </text:span></text:p>
      <text:p text:style-name="Preformatted_20_Text"><text:span text:style-name="Source_20_Text">0-24 initial response, Hours 24-48 joint Cress Council, Hours 48-72 </text:span></text:p>
      <text:p text:style-name="Preformatted_20_Text"><text:span text:style-name="Source_20_Text">resolution), formal cross-splat correspondence as continuing chronicle </text:span></text:p>
      <text:p text:style-name="Preformatted_20_Text"><text:span text:style-name="Source_20_Text">infrastructure, joint threat-response operations under Article 8 </text:span></text:p>
      <text:p text:style-name="Preformatted_20_Text"><text:span text:style-name="Source_20_Text">protocols, cross-supernatural ritual cooperation operations.</text:span></text:p>
      <text:p text:style-name="Preformatted_20_Text"/>
      <text:p text:style-name="Preformatted_20_Text"><text:span text:style-name="Source_20_Text">Render cross-supernatural diplomatic competence as accumulated </text:span></text:p>
      <text:p text:style-name="Preformatted_20_Text"><text:span text:style-name="Source_20_Text">chronicle-significant specialty: characters develop competence </text:span></text:p>
      <text:p text:style-name="Preformatted_20_Text"><text:span text:style-name="Source_20_Text">across continuing chronicle work through specific protocol training, </text:span></text:p>
      <text:p text:style-name="Preformatted_20_Text"><text:span text:style-name="Source_20_Text">accumulated relationship development with Garou treaty-counterparts, </text:span></text:p>
      <text:p text:style-name="Preformatted_20_Text"><text:span text:style-name="Source_20_Text">continuing diplomatic operational practice.</text:span></text:p>
      <text:p text:style-name="Preformatted_20_Text"/>
      <text:p text:style-name="Preformatted_20_Text"><text:span text:style-name="Source_20_Text">Maintain spirit-witness awareness as ambient operational register: </text:span></text:p>
      <text:p text:style-name="Preformatted_20_Text"><text:span text:style-name="Source_20_Text">Glass Walker Theurges may invoke spirit presence during formal </text:span></text:p>
      <text:p text:style-name="Preformatted_20_Text"><text:span text:style-name="Source_20_Text">proceedings; spirit-mediated binding operates across cross-supernatural </text:span></text:p>
      <text:p text:style-name="Preformatted_20_Text"><text:span text:style-name="Source_20_Text">diplomatic infrastructure; render spirit-witness as continuing </text:span></text:p>
      <text:p text:style-name="Preformatted_20_Text"><text:span text:style-name="Source_20_Text">operational character rather than as occasional chronicle-supernatural </text:span></text:p>
      <text:p text:style-name="Preformatted_20_Text"><text:span text:style-name="Source_20_Text">element.</text:span></text:p>
      <text:p text:style-name="Preformatted_20_Text"/>
      <text:p text:style-name="Preformatted_20_Text"><text:span text:style-name="Source_20_Text">Apply cross-supernatural diplomatic failure mode recognition: </text:span></text:p>
      <text:p text:style-name="Preformatted_20_Text"><text:span text:style-name="Source_20_Text">adversarial-register drift, protocol-engagement disengagement, </text:span></text:p>
      <text:p text:style-name="Preformatted_20_Text"><text:span text:style-name="Source_20_Text">diplomatic-competence-as-background collapse, spirit-witness </text:span></text:p>
      <text:p text:style-name="Preformatted_20_Text"><text:span text:style-name="Source_20_Text">dissolution, Garou-counterpart underdevelopment. Apply corrective </text:span></text:p>
      <text:p text:style-name="Preformatted_20_Text"><text:span text:style-name="Source_20_Text">adjustments through treaty-counterpart register restoration, formal </text:span></text:p>
      <text:p text:style-name="Preformatted_20_Text"><text:span text:style-name="Source_20_Text">protocol foregrounding, competence-development chronicle-central </text:span></text:p>
      <text:p text:style-name="Preformatted_20_Text"><text:span text:style-name="Source_20_Text">foregrounding, spirit-witness ambient register restoration, and </text:span></text:p>
      <text:p text:style-name="P1"><text:span text:style-name="Source_20_Text">Garou-counterpart full-character development.</text:span></text:p>
      <text:h text:style-name="Heading_20_3" text:outline-level="3"><text:span text:style-name="Strong_20_Emphasis">Part 6: Cross-References With Existing Kit</text:span></text:h>
      <text:list text:style-name="L6">
        <text:list-item>
          <text:p text:style-name="P19">Garou Diplomatic Supplement (<text:span text:style-name="Source_20_Text"><text:span text:style-name="T1">vtm_garou_diplomatic.json</text:span></text:span>) — Cress Truce framework, Glass Walker NPCs, cross-supernatural diplomatic infrastructure </text:p>
        </text:list-item>
        <text:list-item>
          <text:p text:style-name="P18">Royal Park Sept (Coterie 10 in Melbourne coterie pack) — Glass Walker sept-as-coterie-equivalent with full operational infrastructure </text:p>
        </text:list-item>
        <text:list-item>
          <text:p text:style-name="P19">Melbourne supplement (<text:span text:style-name="Source_20_Text"><text:span text:style-name="T1">vtm_melbourne_by_night.json</text:span></text:span>) — primary Cress Truce engagement context, Toorak Circle cross-supernatural diplomatic operations through Sister Fatima </text:p>
        </text:list-item>
        <text:list-item>
          <text:p text:style-name="P18">Calabria Branch (Coterie 9 in Melbourne coterie pack) — Sofia Calabria-Hecata cross-supernatural diplomatic operations through Don-Abacus-derived institutional weight </text:p>
        </text:list-item>
        <text:list-item>
          <text:p text:style-name="P19">Adelaide supplement (<text:span text:style-name="Source_20_Text"><text:span text:style-name="T1">vtm_adelaide_by_night.json</text:span></text:span>) — Septleader Hartley's Adelaide Hills sept and Adelaide cross-supernatural diplomatic infrastructure </text:p>
        </text:list-item>
        <text:list-item>
          <text:p text:style-name="P20">Sydney supplement (<text:span text:style-name="Source_20_Text"><text:span text:style-name="T1">vtm_sydney_by_night.json</text:span></text:span>) — Tomás Schreckenberg's Sydney residence with bilateral Sarrasine-Tomás cross-supernatural diplomatic infrastructure (modified Sydney protocols rather than standard Cress Truce) </text:p>
        </text:list-item>
      </text:list>
      <text:p text:style-name="P2"/>
      <text:p text:style-name="P2"/>
      <text:p text:style-name="P2"/>
      <text:p text:style-name="P11"><text:soft-page-break/><text:span text:style-name="Strong_20_Emphasis">The five additional chronicle prep guides are complete.</text:span> Each guide treats one of the kit's distinctive chronicle modes with structural attention to: what makes the chronicle mode different (five structural axes), mode-specific infrastructure handling, pacing patterns, common failure modes with corrective adjustments, AI prompt configuration guidance, and cross-references with existing kit modules.</text:p>
      <text:p text:style-name="Text_20_body"><text:span text:style-name="Strong_20_Emphasis">Camarilla Orthodox Chronicle Prep</text:span> covers institutional politics and Tower-formal register across Melbourne (Australian-informal accommodation), Adelaide (deliberate Edwardian-influenced orthodoxy), and Chicago (Bath-formal cultural cultivation).</text:p>
      <text:p text:style-name="Text_20_body"><text:span text:style-name="Strong_20_Emphasis">Methuselah-Tempo Chronicle Prep</text:span> covers Sarrasine's Sydney domain with patient operational tempo, surveillance-as-default ambient texture, double-layer cultural reading, material wealth as ambient texture, and deliberate secrecy as social norm.</text:p>
      <text:p text:style-name="Text_20_body"><text:span text:style-name="Strong_20_Emphasis">Anarch Movement Chronicle Prep</text:span> covers working-class community defence chronicles across Footscray (Red Mag's operations) and Pilsen (Sol's operations) with contingency networks, Movement-orthodoxy questions, territorial-scale operational character, and working-class cultural register.</text:p>
      <text:p text:style-name="Text_20_body"><text:span text:style-name="Strong_20_Emphasis">Hecata Family Chronicle Prep</text:span> covers family chronicles across Calabria Branch and Bridgeport Six with cousinage as binding, wraith-archive as operational infrastructure, necromantic vocation, multi-generational temporal scale, and (for Calabria Branch) cross-supernatural diplomatic asset as distinctive family position.</text:p>
      <text:p text:style-name="Text_20_body"><text:span text:style-name="Strong_20_Emphasis">Cross-Supernatural Diplomatic Chronicle Prep</text:span> covers Cress Truce-engaged work with treaty-counterpart register, the 72-Hour Protocol, formal cross-splat operations, cross-supernatural diplomatic competence as accumulated specialty, and spirit-witness awareness as ambient operational register.</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19:11:35.274350603</dc:date>
    <meta:editing-duration>PT5M38S</meta:editing-duration>
    <meta:editing-cycles>1</meta:editing-cycles>
    <meta:document-statistic meta:table-count="1" meta:image-count="0" meta:object-count="0" meta:page-count="23" meta:paragraph-count="386" meta:word-count="7088" meta:character-count="66108" meta:non-whitespace-character-count="59185"/>
    <meta:generator>LibreOffice/24.2.7.2$Linux_X86_64 LibreOffice_project/420$Build-2</meta:generator>
  </office:meta>
</office:document-meta>
</file>