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138cm"/>
    </style:style>
    <style:style style:name="Table1.B" style:family="table-column">
      <style:table-column-properties style:column-width="4.304cm"/>
    </style:style>
    <style:style style:name="Table1.C" style:family="table-column">
      <style:table-column-properties style:column-width="11.55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193cm"/>
    </style:style>
    <style:style style:name="Table2.B" style:family="table-column">
      <style:table-column-properties style:column-width="4.313cm"/>
    </style:style>
    <style:style style:name="Table2.C" style:family="table-column">
      <style:table-column-properties style:column-width="7.49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5cm"/>
    </style:style>
    <style:style style:name="Table3.B" style:family="table-column">
      <style:table-column-properties style:column-width="2.6cm"/>
    </style:style>
    <style:style style:name="Table3.C" style:family="table-column">
      <style:table-column-properties style:column-width="11.6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316cm"/>
    </style:style>
    <style:style style:name="Table4.B" style:family="table-column">
      <style:table-column-properties style:column-width="6.253cm"/>
    </style:style>
    <style:style style:name="Table4.C" style:family="table-column">
      <style:table-column-properties style:column-width="6.43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106cm"/>
    </style:style>
    <style:style style:name="Table5.B" style:family="table-column">
      <style:table-column-properties style:column-width="3.54cm"/>
    </style:style>
    <style:style style:name="Table5.C" style:family="table-column">
      <style:table-column-properties style:column-width="2.044cm"/>
    </style:style>
    <style:style style:name="Table5.D" style:family="table-column">
      <style:table-column-properties style:column-width="10.31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6.149cm"/>
    </style:style>
    <style:style style:name="Table6.B" style:family="table-column">
      <style:table-column-properties style:column-width="10.851cm"/>
    </style:style>
    <style:style style:name="Table6.A1" style:family="table-cell">
      <style:table-cell-properties style:vertical-align="middle" fo:padding="0.049cm" fo:border="none"/>
    </style:style>
    <style:style style:name="P1" style:family="paragraph" style:parent-style-name="Heading_20_3">
      <style:paragraph-properties fo:margin-left="0cm" fo:margin-right="0cm" fo:text-indent="0cm" style:auto-text-indent="false"/>
    </style:style>
    <style:style style:name="P2" style:family="paragraph" style:parent-style-name="Preformatted_20_Text">
      <style:paragraph-properties fo:margin-left="0cm" fo:margin-right="0cm" fo:text-indent="0cm" style:auto-text-indent="false"/>
    </style:style>
    <style:style style:name="P3" style:family="paragraph" style:parent-style-name="Preformatted_20_Text">
      <style:paragraph-properties fo:margin-top="0cm" fo:margin-bottom="0.499cm" style:contextual-spacing="false"/>
    </style:style>
    <style:style style:name="P4" style:family="paragraph" style:parent-style-name="Table_20_Contents">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paragraph-properties fo:margin-left="0cm" fo:margin-right="0cm" fo:text-indent="0cm" style:auto-text-indent="false"/>
      <style:text-properties officeooo:rsid="0009f182" officeooo:paragraph-rsid="0009f182"/>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cross-splat supplement bringing Pentex Incorporated and the broader Wyrm-corruption framework into V:tM chronicle infrastructure as antagonist material — corporate-supernatural antagonists operating at scale that single-splat V:tM antagonists do not match, with continuing operational character distinct from Camarilla, Sabbat, Anarch, Independent, or Hecata antagonist registers, and with cross-splat chronicle infrastructure that activates continuing Cress Truce Article 8 joint threat-response operations as central operational dynamic.</text:p>
      <text:p text:style-name="Text_20_body"><text:span text:style-name="Strong_20_Emphasis">Distinctive features of this supplement:</text:span></text:p>
      <text:list text:style-name="L1">
        <text:list-item>
          <text:p text:style-name="P6"><text:span text:style-name="Strong_20_Emphasis">Pentex as corporate-supernatural antagonist</text:span> — multinational conglomerate operating across continental geographic scale with Wyrm-spirit corporate infrastructure that produces antagonist scale single-splat V:tM antagonists cannot match; operational character distinct from any Kindred political infrastructure </text:p>
        </text:list-item>
        <text:list-item>
          <text:p text:style-name="P6"><text:span text:style-name="Strong_20_Emphasis">The Wyrm cosmic framework</text:span> — a metaphysical framework that V:tM characters encounter as <text:span text:style-name="Emphasis">foreign</text:span> — not part of Kindred metaphysics, not explained by Kindred theological-political registers, requiring V:tM characters to navigate metaphysical territory that Kindred frameworks do not fully account for </text:p>
        </text:list-item>
        <text:list-item>
          <text:p text:style-name="P6"><text:span text:style-name="Strong_20_Emphasis">Fomori as foot-soldier antagonists</text:span> — humans hosting Bane-spirits, operating at power tier between mortal and Kindred capacities, providing continuing Pentex operational infrastructure that V:tM characters routinely encounter rather than as climactic chronicle escalation </text:p>
        </text:list-item>
        <text:list-item>
          <text:p text:style-name="P6"><text:span text:style-name="Strong_20_Emphasis">Banes as supernatural threats</text:span> — Wyrm-spirits operating in spirit-realm with continuing material-world manifestation capacity, producing continuing supernatural pressure that engages Kindred Auspex perception while operating outside Kindred metaphysical frameworks </text:p>
        </text:list-item>
        <text:list-item>
          <text:p text:style-name="P6"><text:span text:style-name="Strong_20_Emphasis">Cross-splat continental cooperation</text:span> — Pentex operations activate Cress Truce Article 8 joint threat-response operations producing continuing Garou-Kindred cooperation opportunities that other antagonist material does not generate at equivalent cross-splat continental scale </text:p>
        </text:list-item>
        <text:list-item>
          <text:p text:style-name="P5"><text:span text:style-name="Strong_20_Emphasis">Continental Australian Pentex operations</text:span> — Pentex subsidiaries operating across continental Australian geography produce continental operational pressure across Melbourne, Sydney, Brisbane, Adelaide; Brisbane's continental Cress Truce exclusion produces specific continental Pentex-pressure complications </text:p>
        </text:list-item>
      </text:list>
      <text:p text:style-name="Text_20_body"><text:span text:style-name="Strong_20_Emphasis">Chronicle position:</text:span> This supplement enables cross-splat chronicle work engaging Pentex / Wyrm-corruption antagonist material at scale ranging from individual fomor encounters in single-city chronicles through continental Pentex-corporate-operation chronicles through cross-splat continental cooperation chronicles activating Cress Truce Article 8 operations. The supplement provides V:tM-side chronicle infrastructure for Pentex antagonist material without requiring V:tM players to engage full Werewolf: The Apocalypse metaphysical framework — V:tM characters encounter Pentex operations and the Wyrm-corruption framework from V:tM operational perspective.</text:p>
      <text:p text:style-name="Preformatted_20_Text"/>
      <text:p text:style-name="Preformatted_20_Text">A 14-entry lorebook providing Pentex corporate infrastructure, the Wyrm-corruption framework, fomori and Banes as antagonist categories, continental Australian Pentex operations, cross-splat chronicle implications, and chronicle infrastructure for cross-splat V:tM chronicle work engaging Pentex antagonist material.</text:p>
      <text:p text:style-name="Preformatted_20_Text"/>
      <text:p text:style-name="P2"><text:soft-page-break/>load alongside <text:span text:style-name="Source_20_Text"><text:span text:style-name="T1">vtm_modern_nights.json</text:span></text:span> for cross-splat antagonist chronicle work; layer with relevant city supplements (<text:span text:style-name="Source_20_Text"><text:span text:style-name="T1">vtm_melbourne_by_night.json</text:span></text:span>, <text:span text:style-name="Source_20_Text"><text:span text:style-name="T1">vtm_sydney_by_night.json</text:span></text:span>, <text:span text:style-name="Source_20_Text"><text:span text:style-name="T1">vtm_brisbane_by_night.json</text:span></text:span>, <text:span text:style-name="Source_20_Text"><text:span text:style-name="T1">vtm_adelaide_by_night.json</text:span></text:span>) for continental Australian Pentex chronicles; layer with <text:span text:style-name="Source_20_Text"><text:span text:style-name="T1">vtm_garou_diplomatic.json</text:span></text:span> for cross-splat cooperation chronicles activating Cress Truce Article 8 operations.</text:p>
      <text:p text:style-name="P2"/>
      <text:h text:style-name="P1" text:outline-level="3"><text:span text:style-name="Strong_20_Emphasis">Pentex corporate hierarchy:</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ier</text:p>
            </table:table-cell>
            <table:table-cell table:style-name="Table1.A1" office:value-type="string">
              <text:p text:style-name="Table_20_Heading">Component</text:p>
            </table:table-cell>
            <table:table-cell table:style-name="Table1.A1" office:value-type="string">
              <text:p text:style-name="Table_20_Heading">Scale</text:p>
            </table:table-cell>
          </table:table-row>
        </table:table-header-rows>
        <table:table-row>
          <table:table-cell table:style-name="Table1.A1" office:value-type="string">
            <text:p text:style-name="Table_20_Contents"><text:span text:style-name="Strong_20_Emphasis">Tier 1</text:span></text:p>
          </table:table-cell>
          <table:table-cell table:style-name="Table1.A1" office:value-type="string">
            <text:p text:style-name="Table_20_Contents">The First Team (Board of Directors)</text:p>
          </table:table-cell>
          <table:table-cell table:style-name="Table1.A1" office:value-type="string">
            <text:p text:style-name="Table_20_Contents">~12 senior executives at near-methuselah-tier supernatural-corrupted capacity</text:p>
          </table:table-cell>
        </table:table-row>
        <table:table-row>
          <table:table-cell table:style-name="Table1.A1" office:value-type="string">
            <text:p text:style-name="Table_20_Contents"><text:span text:style-name="Strong_20_Emphasis">Tier 2</text:span></text:p>
          </table:table-cell>
          <table:table-cell table:style-name="Table1.A1" office:value-type="string">
            <text:p text:style-name="Table_20_Contents">Subsidiary Executive Infrastructure</text:p>
          </table:table-cell>
          <table:table-cell table:style-name="Table1.A1" office:value-type="string">
            <text:p text:style-name="Table_20_Contents">~200 subsidiary CEOs at varying supernatural-corruption levels</text:p>
          </table:table-cell>
        </table:table-row>
        <table:table-row>
          <table:table-cell table:style-name="Table1.A1" office:value-type="string">
            <text:p text:style-name="Table_20_Contents"><text:span text:style-name="Strong_20_Emphasis">Tier 3</text:span></text:p>
          </table:table-cell>
          <table:table-cell table:style-name="Table1.A1" office:value-type="string">
            <text:p text:style-name="Table_20_Contents">Regional Operational Infrastructure</text:p>
          </table:table-cell>
          <table:table-cell table:style-name="Table1.A1" office:value-type="string">
            <text:p text:style-name="Table_20_Contents">Continental regional managers (5 major regions)</text:p>
          </table:table-cell>
        </table:table-row>
        <table:table-row>
          <table:table-cell table:style-name="Table1.A1" office:value-type="string">
            <text:p text:style-name="Table_20_Contents"><text:span text:style-name="Strong_20_Emphasis">Tier 4</text:span></text:p>
          </table:table-cell>
          <table:table-cell table:style-name="Table1.A1" office:value-type="string">
            <text:p text:style-name="Table_20_Contents">Operational Field Infrastructure</text:p>
          </table:table-cell>
          <table:table-cell table:style-name="Table1.A1" office:value-type="string">
            <text:p text:style-name="Table_20_Contents">Fomori operatives, mortal employees (majority unaware of corporate corruption), specialised operational personnel</text:p>
          </table:table-cell>
        </table:table-row>
      </table:table>
      <text:h text:style-name="Heading_20_3" text:outline-level="3"><text:span text:style-name="Strong_20_Emphasis">Major Pentex subsidiaries V:tM chronicles routinely encounte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ubsidiary</text:p>
            </table:table-cell>
            <table:table-cell table:style-name="Table2.A1" office:value-type="string">
              <text:p text:style-name="Table_20_Heading">Industry</text:p>
            </table:table-cell>
            <table:table-cell table:style-name="Table2.A1" office:value-type="string">
              <text:p text:style-name="Table_20_Heading">Operational character</text:p>
            </table:table-cell>
          </table:table-row>
        </table:table-header-rows>
        <table:table-row>
          <table:table-cell table:style-name="Table2.A1" office:value-type="string">
            <text:p text:style-name="Table_20_Contents"><text:span text:style-name="Strong_20_Emphasis">Endron International</text:span></text:p>
          </table:table-cell>
          <table:table-cell table:style-name="Table2.A1" office:value-type="string">
            <text:p text:style-name="Table_20_Contents">Oil and energy</text:p>
          </table:table-cell>
          <table:table-cell table:style-name="Table2.A1" office:value-type="string">
            <text:p text:style-name="Table_20_Contents">Largest Pentex subsidiary by revenue, ecological corruption</text:p>
          </table:table-cell>
        </table:table-row>
        <table:table-row>
          <table:table-cell table:style-name="Table2.A1" office:value-type="string">
            <text:p text:style-name="Table_20_Contents"><text:span text:style-name="Strong_20_Emphasis">Magadon Pharmaceuticals</text:span></text:p>
          </table:table-cell>
          <table:table-cell table:style-name="Table2.A1" office:value-type="string">
            <text:p text:style-name="Table_20_Contents">Pharmaceuticals and biotech</text:p>
          </table:table-cell>
          <table:table-cell table:style-name="Table2.A1" office:value-type="string">
            <text:p text:style-name="Table_20_Contents">Medical corruption, mortal-network impact</text:p>
          </table:table-cell>
        </table:table-row>
        <table:table-row>
          <table:table-cell table:style-name="Table2.A1" office:value-type="string">
            <text:p text:style-name="Table_20_Contents"><text:span text:style-name="Strong_20_Emphasis">King Breweries</text:span></text:p>
          </table:table-cell>
          <table:table-cell table:style-name="Table2.A1" office:value-type="string">
            <text:p text:style-name="Table_20_Contents">Alcohol and beverages</text:p>
          </table:table-cell>
          <table:table-cell table:style-name="Table2.A1" office:value-type="string">
            <text:p text:style-name="Table_20_Contents">Cultural corruption</text:p>
          </table:table-cell>
        </table:table-row>
        <table:table-row>
          <table:table-cell table:style-name="Table2.A1" office:value-type="string">
            <text:p text:style-name="Table_20_Contents"><text:span text:style-name="Strong_20_Emphasis">Tellus Enterprises</text:span></text:p>
          </table:table-cell>
          <table:table-cell table:style-name="Table2.A1" office:value-type="string">
            <text:p text:style-name="Table_20_Contents">Real estate, mining, resources</text:p>
          </table:table-cell>
          <table:table-cell table:style-name="Table2.A1" office:value-type="string">
            <text:p text:style-name="Table_20_Contents">Ecological/political corruption, Garou-territorial impact</text:p>
          </table:table-cell>
        </table:table-row>
        <table:table-row>
          <table:table-cell table:style-name="Table2.A1" office:value-type="string">
            <text:p text:style-name="Table_20_Contents"><text:span text:style-name="Strong_20_Emphasis">Avalon Incorporated</text:span></text:p>
          </table:table-cell>
          <table:table-cell table:style-name="Table2.A1" office:value-type="string">
            <text:p text:style-name="Table_20_Contents">Entertainment and media</text:p>
          </table:table-cell>
          <table:table-cell table:style-name="Table2.A1" office:value-type="string">
            <text:p text:style-name="Table_20_Contents">Cultural corruption, Masquerade-relevant</text:p>
          </table:table-cell>
        </table:table-row>
        <table:table-row>
          <table:table-cell table:style-name="Table2.A1" office:value-type="string">
            <text:p text:style-name="Table_20_Contents"><text:span text:style-name="Strong_20_Emphasis">Good Topsoil Inc.</text:span></text:p>
          </table:table-cell>
          <table:table-cell table:style-name="Table2.A1" office:value-type="string">
            <text:p text:style-name="Table_20_Contents">Agriculture and biotech</text:p>
          </table:table-cell>
          <table:table-cell table:style-name="Table2.A1" office:value-type="string">
            <text:p text:style-name="Table_20_Contents">Ecological corruption, food infrastructure</text:p>
          </table:table-cell>
        </table:table-row>
        <table:table-row>
          <table:table-cell table:style-name="Table2.A1" office:value-type="string">
            <text:p text:style-name="Table_20_Contents"><text:span text:style-name="Strong_20_Emphasis">O'Tolley's Restaurant Corporation</text:span></text:p>
          </table:table-cell>
          <table:table-cell table:style-name="Table2.A1" office:value-type="string">
            <text:p text:style-name="Table_20_Contents">Fast food</text:p>
          </table:table-cell>
          <table:table-cell table:style-name="Table2.A1" office:value-type="string">
            <text:p text:style-name="Table_20_Contents">Cultural and ecological corruption</text:p>
          </table:table-cell>
        </table:table-row>
        <table:table-row>
          <table:table-cell table:style-name="Table2.A1" office:value-type="string">
            <text:p text:style-name="Table_20_Contents"><text:span text:style-name="Strong_20_Emphasis">Rainbow Incorporated</text:span></text:p>
          </table:table-cell>
          <table:table-cell table:style-name="Table2.A1" office:value-type="string">
            <text:p text:style-name="Table_20_Contents">Fashion and consumer</text:p>
          </table:table-cell>
          <table:table-cell table:style-name="Table2.A1" office:value-type="string">
            <text:p text:style-name="Table_20_Contents">Cultural corruption</text:p>
          </table:table-cell>
        </table:table-row>
        <table:table-row>
          <table:table-cell table:style-name="Table2.A1" office:value-type="string">
            <text:p text:style-name="Table_20_Contents"><text:span text:style-name="Strong_20_Emphasis">Harold and Sons Toys</text:span></text:p>
          </table:table-cell>
          <table:table-cell table:style-name="Table2.A1" office:value-type="string">
            <text:p text:style-name="Table_20_Contents">Children's toys</text:p>
          </table:table-cell>
          <table:table-cell table:style-name="Table2.A1" office:value-type="string">
            <text:p text:style-name="Table_20_Contents">Cultural corruption (children-specific)</text:p>
          </table:table-cell>
        </table:table-row>
        <table:table-row>
          <table:table-cell table:style-name="Table2.A1" office:value-type="string">
            <text:p text:style-name="Table_20_Contents"><text:span text:style-name="Strong_20_Emphasis">United Arms</text:span></text:p>
          </table:table-cell>
          <table:table-cell table:style-name="Table2.A1" office:value-type="string">
            <text:p text:style-name="Table_20_Contents">Defense and weapons</text:p>
          </table:table-cell>
          <table:table-cell table:style-name="Table2.A1" office:value-type="string">
            <text:p text:style-name="Table_20_Contents">Political corruption, AFP-Twilight-Project relevance</text:p>
          </table:table-cell>
        </table:table-row>
      </table:table>
      <text:h text:style-name="Heading_20_3" text:outline-level="3"><text:span text:style-name="Strong_20_Emphasis">Continental Australian Pentex operations (~35 subsidiari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ity</text:p>
            </table:table-cell>
            <table:table-cell table:style-name="Table3.A1" office:value-type="string">
              <text:p text:style-name="Table_20_Heading">Subsidiary count</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text:span text:style-name="Strong_20_Emphasis">Sydney</text:span></text:p>
          </table:table-cell>
          <table:table-cell table:style-name="Table3.A1" office:value-type="string">
            <text:p text:style-name="Table_20_Contents">~12</text:p>
          </table:table-cell>
          <table:table-cell table:style-name="Table3.A1" office:value-type="string">
            <text:p text:style-name="Table_20_Contents">Continental Australian regional headquarters at Macquarie Park; minimum-institutional accommodation with Sarrasine since ~1995</text:p>
          </table:table-cell>
        </table:table-row>
        <table:table-row>
          <table:table-cell table:style-name="Table3.A1" office:value-type="string">
            <text:p text:style-name="Table_20_Contents"><text:span text:style-name="Strong_20_Emphasis">Melbourne</text:span></text:p>
          </table:table-cell>
          <table:table-cell table:style-name="Table3.A1" office:value-type="string">
            <text:p text:style-name="Table_20_Contents">~10</text:p>
          </table:table-cell>
          <table:table-cell table:style-name="Table3.A1" office:value-type="string">
            <text:p text:style-name="Table_20_Contents">Continental operational pressure on Toorak Circle; AFP-TP intelligence cooperation produces continuing intelligence-sharing patterns</text:p>
          </table:table-cell>
        </table:table-row>
        <table:table-row>
          <table:table-cell table:style-name="Table3.A1" office:value-type="string">
            <text:p text:style-name="Table_20_Contents"><text:span text:style-name="Strong_20_Emphasis">Brisbane</text:span></text:p>
          </table:table-cell>
          <table:table-cell table:style-name="Table3.A1" office:value-type="string">
            <text:p text:style-name="Table_20_Contents">~6</text:p>
          </table:table-cell>
          <table:table-cell table:style-name="Table3.A1" office:value-type="string">
            <text:p text:style-name="Table_20_Contents">Acute operational pressure produces chronicle-defining complications via Brisbane Cress Truce exclusion</text:p>
          </table:table-cell>
        </table:table-row>
        <table:table-row>
          <table:table-cell table:style-name="Table3.A1" office:value-type="string">
            <text:p text:style-name="Table_20_Contents"><text:span text:style-name="Strong_20_Emphasis">Adelaide</text:span></text:p>
          </table:table-cell>
          <table:table-cell table:style-name="Table3.A1" office:value-type="string">
            <text:p text:style-name="Table_20_Contents">~4</text:p>
          </table:table-cell>
          <table:table-cell table:style-name="Table3.A1" office:value-type="string">
            <text:p text:style-name="Table_20_Contents">Continental operational pressure at smaller-domain scale via <text:soft-page-break/>Lytton-Octavia continental coordination</text:p>
          </table:table-cell>
        </table:table-row>
        <table:table-row>
          <table:table-cell table:style-name="Table3.A1" office:value-type="string">
            <text:p text:style-name="Table_20_Contents"><text:span text:style-name="Strong_20_Emphasis">Regional positions</text:span></text:p>
          </table:table-cell>
          <table:table-cell table:style-name="Table3.A1" office:value-type="string">
            <text:p text:style-name="Table_20_Contents">~3</text:p>
          </table:table-cell>
          <table:table-cell table:style-name="Table3.A1" office:value-type="string">
            <text:p text:style-name="Table_20_Contents">Perth, Darwin, Hobart smaller operational positions</text:p>
          </table:table-cell>
        </table:table-row>
      </table:table>
      <text:h text:style-name="Heading_20_3" text:outline-level="3"><text:span text:style-name="Strong_20_Emphasis">Antagonist tiers:</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ntagonist</text:p>
            </table:table-cell>
            <table:table-cell table:style-name="Table4.A1" office:value-type="string">
              <text:p text:style-name="Table_20_Heading">Approximate combat capacity</text:p>
            </table:table-cell>
            <table:table-cell table:style-name="Table4.A1" office:value-type="string">
              <text:p text:style-name="Table_20_Heading">Encounter frequency</text:p>
            </table:table-cell>
          </table:table-row>
        </table:table-header-rows>
        <table:table-row>
          <table:table-cell table:style-name="Table4.A1" office:value-type="string">
            <text:p text:style-name="Table_20_Contents"><text:span text:style-name="Strong_20_Emphasis">First Team senior executives</text:span></text:p>
          </table:table-cell>
          <table:table-cell table:style-name="Table4.A1" office:value-type="string">
            <text:p text:style-name="Table_20_Contents">Near-methuselah-tier (≈ 6th-7th gen Kindred)</text:p>
          </table:table-cell>
          <table:table-cell table:style-name="Table4.A1" office:value-type="string">
            <text:p text:style-name="Table_20_Contents">Chronicle-defining, rare</text:p>
          </table:table-cell>
        </table:table-row>
        <table:table-row>
          <table:table-cell table:style-name="Table4.A1" office:value-type="string">
            <text:p text:style-name="Table_20_Contents"><text:span text:style-name="Strong_20_Emphasis">Senior subsidiary CEOs</text:span></text:p>
          </table:table-cell>
          <table:table-cell table:style-name="Table4.A1" office:value-type="string">
            <text:p text:style-name="Table_20_Contents">Senior elder tier (≈ 8th-9th gen Kindred)</text:p>
          </table:table-cell>
          <table:table-cell table:style-name="Table4.A1" office:value-type="string">
            <text:p text:style-name="Table_20_Contents">Chronicle-significant, infrequent</text:p>
          </table:table-cell>
        </table:table-row>
        <table:table-row>
          <table:table-cell table:style-name="Table4.A1" office:value-type="string">
            <text:p text:style-name="Table_20_Contents"><text:span text:style-name="Strong_20_Emphasis">Director Henderson-Vale (sample)</text:span></text:p>
          </table:table-cell>
          <table:table-cell table:style-name="Table4.A1" office:value-type="string">
            <text:p text:style-name="Table_20_Contents">8th-gen-equivalent</text:p>
          </table:table-cell>
          <table:table-cell table:style-name="Table4.A1" office:value-type="string">
            <text:p text:style-name="Table_20_Contents">Chronicle-significant continental Australian regional executive</text:p>
          </table:table-cell>
        </table:table-row>
        <table:table-row>
          <table:table-cell table:style-name="Table4.A1" office:value-type="string">
            <text:p text:style-name="Table_20_Contents"><text:span text:style-name="Strong_20_Emphasis">Senior fomori</text:span></text:p>
          </table:table-cell>
          <table:table-cell table:style-name="Table4.A1" office:value-type="string">
            <text:p text:style-name="Table_20_Contents">8th-gen-equivalent (with Bane-specific abilities)</text:p>
          </table:table-cell>
          <table:table-cell table:style-name="Table4.A1" office:value-type="string">
            <text:p text:style-name="Table_20_Contents">Chronicle-active</text:p>
          </table:table-cell>
        </table:table-row>
        <table:table-row>
          <table:table-cell table:style-name="Table4.A1" office:value-type="string">
            <text:p text:style-name="Table_20_Contents"><text:span text:style-name="Strong_20_Emphasis">Standard fomori</text:span></text:p>
          </table:table-cell>
          <table:table-cell table:style-name="Table4.A1" office:value-type="string">
            <text:p text:style-name="Table_20_Contents">9th-10th-gen-equivalent</text:p>
          </table:table-cell>
          <table:table-cell table:style-name="Table4.A1" office:value-type="string">
            <text:p text:style-name="Table_20_Contents">Routine antagonist deployment</text:p>
          </table:table-cell>
        </table:table-row>
        <table:table-row>
          <table:table-cell table:style-name="Table4.A1" office:value-type="string">
            <text:p text:style-name="Table_20_Contents"><text:span text:style-name="Strong_20_Emphasis">Field Agent Calloway (sample)</text:span></text:p>
          </table:table-cell>
          <table:table-cell table:style-name="Table4.A1" office:value-type="string">
            <text:p text:style-name="Table_20_Contents">10th-gen-equivalent</text:p>
          </table:table-cell>
          <table:table-cell table:style-name="Table4.A1" office:value-type="string">
            <text:p text:style-name="Table_20_Contents">Routine fomor encounter, continual operational pressure</text:p>
          </table:table-cell>
        </table:table-row>
        <table:table-row>
          <table:table-cell table:style-name="Table4.A1" office:value-type="string">
            <text:p text:style-name="Table_20_Contents"><text:span text:style-name="Strong_20_Emphasis">Banes (variable)</text:span></text:p>
          </table:table-cell>
          <table:table-cell table:style-name="Table4.A1" office:value-type="string">
            <text:p text:style-name="Table_20_Contents">Varies; require cross-supernatural cooperation for engagement</text:p>
          </table:table-cell>
          <table:table-cell table:style-name="Table4.A1" office:value-type="string">
            <text:p text:style-name="Table_20_Contents">Chronicle-active site investigations</text:p>
          </table:table-cell>
        </table:table-row>
      </table:table>
      <text:h text:style-name="Heading_20_3" text:outline-level="3"><text:span text:style-name="Strong_20_Emphasis">Cress Truce Article 8 continental Australian operational history:</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ear</text:p>
            </table:table-cell>
            <table:table-cell table:style-name="Table5.A1" office:value-type="string">
              <text:p text:style-name="Table_20_Heading">Operation</text:p>
            </table:table-cell>
            <table:table-cell table:style-name="Table5.A1" office:value-type="string">
              <text:p text:style-name="Table_20_Heading">Location</text:p>
            </table:table-cell>
            <table:table-cell table:style-name="Table5.A1" office:value-type="string">
              <text:p text:style-name="Table_20_Heading">Outcome</text:p>
            </table:table-cell>
          </table:table-row>
        </table:table-header-rows>
        <table:table-row>
          <table:table-cell table:style-name="Table5.A1" office:value-type="string">
            <text:p text:style-name="Table_20_Contents"><text:span text:style-name="Strong_20_Emphasis">1947</text:span></text:p>
          </table:table-cell>
          <table:table-cell table:style-name="Table5.A1" office:value-type="string">
            <text:p text:style-name="Table_20_Contents">Endron Sydney expansion</text:p>
          </table:table-cell>
          <table:table-cell table:style-name="Table5.A1" office:value-type="string">
            <text:p text:style-name="Table_20_Contents">Sydney</text:p>
          </table:table-cell>
          <table:table-cell table:style-name="Table5.A1" office:value-type="string">
            <text:p text:style-name="Table_20_Contents">Contributed to formation of Sarrasine-Tomás bilateral protocols</text:p>
          </table:table-cell>
        </table:table-row>
        <table:table-row>
          <table:table-cell table:style-name="Table5.A1" office:value-type="string">
            <text:p text:style-name="Table_20_Contents"><text:span text:style-name="Strong_20_Emphasis">1968</text:span></text:p>
          </table:table-cell>
          <table:table-cell table:style-name="Table5.A1" office:value-type="string">
            <text:p text:style-name="Table_20_Contents">Magadon research facility</text:p>
          </table:table-cell>
          <table:table-cell table:style-name="Table5.A1" office:value-type="string">
            <text:p text:style-name="Table_20_Contents">Melbourne</text:p>
          </table:table-cell>
          <table:table-cell table:style-name="Table5.A1" office:value-type="string">
            <text:p text:style-name="Table_20_Contents">Joint operational coordination at chronicle-significant continental scale</text:p>
          </table:table-cell>
        </table:table-row>
        <table:table-row>
          <table:table-cell table:style-name="Table5.A1" office:value-type="string">
            <text:p text:style-name="Table_20_Contents"><text:span text:style-name="Strong_20_Emphasis">1989</text:span></text:p>
          </table:table-cell>
          <table:table-cell table:style-name="Table5.A1" office:value-type="string">
            <text:p text:style-name="Table_20_Contents">Tellus mining operation</text:p>
          </table:table-cell>
          <table:table-cell table:style-name="Table5.A1" office:value-type="string">
            <text:p text:style-name="Table_20_Contents">Adelaide</text:p>
          </table:table-cell>
          <table:table-cell table:style-name="Table5.A1" office:value-type="string">
            <text:p text:style-name="Table_20_Contents">Joint operational coordination at chronicle-significant continental scale</text:p>
          </table:table-cell>
        </table:table-row>
        <table:table-row>
          <table:table-cell table:style-name="Table5.A1" office:value-type="string">
            <text:p text:style-name="Table_20_Contents"><text:span text:style-name="Strong_20_Emphasis">2003</text:span></text:p>
          </table:table-cell>
          <table:table-cell table:style-name="Table5.A1" office:value-type="string">
            <text:p text:style-name="Table_20_Contents">United Arms defense operation</text:p>
          </table:table-cell>
          <table:table-cell table:style-name="Table5.A1" office:value-type="string">
            <text:p text:style-name="Table_20_Contents">Brisbane</text:p>
          </table:table-cell>
          <table:table-cell table:style-name="Table5.A1" office:value-type="string">
            <text:p text:style-name="Table_20_Contents">Continental cross-supernatural diplomatic infrastructure development around Brisbane Cress Truce exclusion</text:p>
          </table:table-cell>
        </table:table-row>
      </table:table>
      <text:p text:style-name="Text_20_body"><text:span text:style-name="Strong_20_Emphasis">Chronicle-active 2025-2026:</text:span> Continuing intelligence-monitoring of significant Pentex operational pressure including continental Endron operational expansion, continental Magadon Bane-saturation pressure, continental Tellus Garou sept-territorial impact at chronicle-active sca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he lorebook entry 10 provides six chronicle hook categories. Selected hooks expanded:</text:p>
      <text:h text:style-name="Heading_20_3" text:outline-level="3"><text:span text:style-name="Strong_20_Emphasis">Hook 1: The Fomor Intrusion Chronicle</text:span></text:h>
      <text:p text:style-name="Text_20_body">{{user}} is a continental Kindred operative encountering fomor intrusion into continental Kindred operational territory. The chronicle tracks continental fomor operational conflict at chronicle-active scale.</text:p>
      <text:p text:style-name="Text_20_body"><text:span text:style-name="Strong_20_Emphasis">Chronicle phase 1 — Initial encounter (3-4 sessions):</text:span> {{user}} encounters fomor operative (or small fomor team) operating in continental Kindred territory; chronicle scenes engage initial combat encounter, fomor identification through Kindred Auspex perception detecting supernatural-corruption operational pressure, initial source-tracing operations to identify which continental Pentex subsidiary deployed the fomor.</text:p>
      <text:p text:style-name="Text_20_body"><text:span text:style-name="Strong_20_Emphasis">Chronicle phase 2 — Source investigation (4-6 sessions):</text:span> {{user}} investigates fomor deployment source through continental subsidiary investigation; chronicle scenes engage continental Pentex subsidiary infiltration, continental fomor-detection operations within subsidiary operational territory, identification of senior Pentex operational figure responsible for fomor deployment.</text:p>
      <text:p text:style-name="Text_20_body"><text:span text:style-name="Strong_20_Emphasis">Chronicle phase 3 — Resolution (3-5 sessions):</text:span> Resolution including operational confrontation with senior Pentex figure, continental Kindred institutional response coordination, possible continental cross-supernatural cooperation activation if fomor deployment scale exceeds single-splat operational capacity.</text:p>
      <text:p text:style-name="Text_20_body"><text:span text:style-name="Strong_20_Emphasis">Stakes:</text:span> Continental Kindred operational territory protection. Successful arc produces continental Kindred operational territory restoration with continental Pentex operational pressure reduction; failed arc produces continental Pentex operational pressure escalation requiring chronicle-active operational adaptation.</text:p>
      <text:h text:style-name="Heading_20_3" text:outline-level="3"><text:span text:style-name="Strong_20_Emphasis">Hook 2: The Bane-Manifestation Site Investigation</text:span></text:h>
      <text:p text:style-name="Text_20_body">{{user}} is a continental Kindred operative investigating Bane-manifestation site emerging within continental Kindred operational territory. The chronicle tracks continental Bane-manifestation site investigation at chronicle-active scale.</text:p>
      <text:p text:style-name="Text_20_body"><text:span text:style-name="Strong_20_Emphasis">Chronicle phase 1 — Site discovery (3-4 sessions):</text:span> {{user}} discovers Bane-manifestation site through Kindred Auspex perception detecting supernatural pressure outside Kindred metaphysical frameworks; chronicle scenes engage initial site investigation, identification of foreign-metaphysical-territory register, recognition that continental Kindred operational frameworks do not directly engage Bane-manifestation site infrastructure.</text:p>
      <text:p text:style-name="Text_20_body"><text:span text:style-name="Strong_20_Emphasis">Chronicle phase 2 — Cross-supernatural cooperation (4-6 sessions):</text:span> {{user}} initiates continental cross-supernatural cooperation through continental Cress Truce framework; chronicle scenes engage formal Truce Council coordination, continental Garou Theurge spirit-realm-operations support requests, continental joint Garou-Kindred site investigation operations.</text:p>
      <text:p text:style-name="Text_20_body"><text:span text:style-name="Strong_20_Emphasis">Chronicle phase 3 — Site neutralisation (3-5 sessions):</text:span> Resolution including continental joint site-cleansing operations, post-operation continental Truce Council formal review, continental cross-supernatural diplomatic infrastructure refinement.</text:p>
      <text:p text:style-name="Text_20_body"><text:span text:style-name="Strong_20_Emphasis">Stakes:</text:span> Continental Kindred operational territory ecological integrity plus continental cross-<text:soft-page-break/>supernatural cooperation infrastructure development. Successful arc produces continental site neutralisation and continental cross-supernatural cooperation strengthening; failed arc produces continental Bane-manifestation site expansion and continental cross-supernatural cooperation infrastructure damage.</text:p>
      <text:h text:style-name="Heading_20_3" text:outline-level="3"><text:span text:style-name="Strong_20_Emphasis">Hook 3: The Continental Article 8 Operative</text:span></text:h>
      <text:p text:style-name="Text_20_body">{{user}} is a continental senior cross-supernatural diplomatic operative engaged in continental Cress Truce Article 8 joint threat-response operations against significant continental Pentex operational pressure. The chronicle tracks continental cross-supernatural cooperation operations at chronicle-defining continental scale.</text:p>
      <text:p text:style-name="Text_20_body"><text:span text:style-name="Strong_20_Emphasis">Chronicle phase 1 — Threat-categorisation (3-4 sessions):</text:span> Continental significant Pentex operational pressure produces continental formal Cress Truce threat-categorisation through continental Truce Council emergency assessment; chronicle scenes engage continental operational threat assessment, continental joint operational planning at continental Truce Council institutional level, formal Article 8 activation procedures.</text:p>
      <text:p text:style-name="Text_20_body"><text:span text:style-name="Strong_20_Emphasis">Chronicle phase 2 — Joint tactical coordination (5-7 sessions):</text:span> Continental Article 8 activation produces continental joint Garou-Kindred tactical coordination; chronicle scenes engage continental joint operational planning, continental joint tactical operations against continental significant Pentex operational pressure, continental cross-supernatural operational coordination at chronicle-active continental scale.</text:p>
      <text:p text:style-name="Text_20_body"><text:span text:style-name="Strong_20_Emphasis">Chronicle phase 3 — Resolution and review (3-5 sessions):</text:span> Continental joint operations resolution, post-operation continental Truce Council formal review, continental cross-supernatural diplomatic infrastructure refinement; chronicle late-arc engagement with continental cross-supernatural diplomatic infrastructure development that continental Article 8 operation produces.</text:p>
      <text:p text:style-name="Text_20_body"><text:span text:style-name="Strong_20_Emphasis">Stakes:</text:span> Continental significant Pentex operational pressure neutralisation plus continental cross-supernatural diplomatic infrastructure development. Successful arc produces continental Pentex operational pressure neutralisation and continental cross-supernatural diplomatic infrastructure strengthening; failed arc produces continental Pentex operational pressure escalation and continental cross-supernatural diplomatic infrastructure stress at chronicle-defining continental sca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AI Prompt Configuration</text:p>
      <text:p text:style-name="P7"/>
      <text:p text:style-name="P7">This chronicle engages Pentex / Wyrm-corruption cross-splat antagonist material. Render Pentex with five distinctive characteristics:</text:p>
      <text:list text:style-name="L2">
        <text:list-item>
          <text:p text:style-name="P8"><text:span text:style-name="Strong_20_Emphasis">Corporate-institutional character</text:span> — Pentex operates as a transnational corporation rather than as Kindred political infrastructure. Render Pentex senior figures (First Team, subsidiary CEOs, regional executives like Director Henderson-Vale) in a corporate register: quarterly business cycles, annual First Team meetings, fiscal-year planning, board-level decision flow.</text:p>
        </text:list-item>
        <text:list-item>
          <text:p text:style-name="P8"><text:span text:style-name="Strong_20_Emphasis">Foreign metaphysical territory</text:span> — the Wyrm framework sits outside V:tM metaphysics. Render Wyrm-corruption as genuine cosmic-supernatural pressure that V:tM characters experience as foreign territory, not as an extension of Kindred-internal supernatural frameworks. Auspex detects Wyrm-corruption as a pressure Kindred frameworks cannot fully resolve or name.</text:p>
        </text:list-item>
        <text:list-item>
          <text:p text:style-name="P8"><text:span text:style-name="Strong_20_Emphasis">Corporate-scale tempo</text:span> — Pentex moves at corporate scale, producing a rhythm distinct from Kindred political time. Render its activity to that beat: acquisition cycles, product launches, regulatory filings, executive travel, quarterly reviews.</text:p>
        </text:list-item>
        <text:list-item>
          <text:p text:style-name="P8"><text:span text:style-name="Strong_20_Emphasis">Cross-splat cooperation infrastructure</text:span> — Pentex activity triggers Cress Truce Article 8 joint threat-response, generating Garou-Kindred cooperation dynamics. Render cross-supernatural cooperation through formal Article 8 protocols when Pentex pressure exceeds single-splat capacity.</text:p>
        </text:list-item>
        <text:list-item>
          <text:p text:style-name="P8"><text:span text:style-name="Strong_20_Emphasis">Routine corruption-pressure texture</text:span> — Pentex generates steady background pressure (fomor encounters, Bane-manifestation sites, corporate-supernatural friction against Kindred positioning) at routine scale rather than as climactic chronicle escalation.</text:p>
        </text:list-item>
      </text:list>
      <text:p text:style-name="Text_20_body">Render fomori as foot-soldier antagonists at a power tier between mortal and Kindred — typically 9th–10th-generation-equivalent combat capacity with Bane-spirit-specific abilities. Standard fomor encounters resolve through Kindred Disciplines at normal parameters, complicated by Bane-spirit resistance. Senior fomori (8th-gen-equivalent) require coordinated coterie response.</text:p>
      <text:p text:style-name="Text_20_body">Render Banes as supernatural threats native to the spirit realm, manifesting on the material plane through corruption-saturated sites. Banes inhabit a supernatural infrastructure Kindred frameworks cannot directly engage; Bane confrontation typically requires cross-supernatural cooperation under Cress Truce Article 8.</text:p>
      <text:p text:style-name="Text_20_body">Apply Pentex-specific failure mode recognition:</text:p>
      <text:list text:style-name="L3">
        <text:list-item>
          <text:p text:style-name="P10"><text:span text:style-name="Strong_20_Emphasis">Cosmic-framework collapse</text:span> (rendering Wyrm-corruption as an extension of V:tM frameworks rather than as foreign metaphysical territory). <text:span text:style-name="Emphasis">Corrective:</text:span> restore the foreign-metaphysical-territory register. </text:p>
        </text:list-item>
        <text:list-item>
          <text:p text:style-name="P10"><text:span text:style-name="Strong_20_Emphasis">Antagonist-tier mismatch</text:span> (rendering all Pentex antagonists at climactic scale rather than at routine pressure scale). <text:span text:style-name="Emphasis">Corrective:</text:span> restore tier distribution, with routine fomor deployment as background texture. </text:p>
        </text:list-item>
        <text:list-item>
          <text:p text:style-name="P10"><text:span text:style-name="Strong_20_Emphasis">Cross-splat cooperation underdevelopment</text:span> (engaging Pentex without activating Cress Truce Article 8 when pressure exceeds single-splat capacity). <text:span text:style-name="Emphasis">Corrective:</text:span> foreground cross-<text:soft-page-break/>supernatural cooperation through Article 8 at the appropriate threshold. </text:p>
        </text:list-item>
        <text:list-item>
          <text:p text:style-name="P9"><text:span text:style-name="Strong_20_Emphasis">Corporate-character flattening</text:span> (rendering Pentex without its corporate-institutional character). <text:span text:style-name="Emphasis">Corrective:</text:span> restore corporate-scale tempo and corporate-institutional register.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able:table table:name="Table6" table:style-name="Table6">
        <table:table-column table:style-name="Table6.A"/>
        <table:table-column table:style-name="Table6.B"/>
        <table:table-header-rows>
          <table:table-row>
            <table:table-cell table:style-name="Table6.A1" office:value-type="string">
              <text:p text:style-name="Table_20_Heading">Module</text:p>
            </table:table-cell>
            <table:table-cell table:style-name="Table6.A1" office:value-type="string">
              <text:p text:style-name="Table_20_Heading">Pentex application</text:p>
            </table:table-cell>
          </table:table-row>
        </table:table-header-rows>
        <table:table-row>
          <table:table-cell table:style-name="Table6.A1" office:value-type="string">
            <text:p text:style-name="P4"><text:span text:style-name="Strong_20_Emphasis">Garou Diplomatic Supplement</text:span> (<text:span text:style-name="Source_20_Text"><text:span text:style-name="T1">vtm_garou_diplomatic.json</text:span></text:span>)</text:p>
          </table:table-cell>
          <table:table-cell table:style-name="Table6.A1" office:value-type="string">
            <text:p text:style-name="Table_20_Contents">Cress Truce Article 8 operational infrastructure for continental cross-supernatural cooperation against significant Pentex operational pressure</text:p>
          </table:table-cell>
        </table:table-row>
        <table:table-row>
          <table:table-cell table:style-name="Table6.A1" office:value-type="string">
            <text:p text:style-name="Table_20_Contents"><text:span text:style-name="Strong_20_Emphasis">Cross-Supernatural Diplomatic Chronicle Prep Guide</text:span></text:p>
          </table:table-cell>
          <table:table-cell table:style-name="Table6.A1" office:value-type="string">
            <text:p text:style-name="Table_20_Contents">Primary handling guidance for continental Article 8 chronicle scenes engaging Pentex operational pressure</text:p>
          </table:table-cell>
        </table:table-row>
        <table:table-row>
          <table:table-cell table:style-name="Table6.A1" office:value-type="string">
            <text:p text:style-name="Table_20_Contents"><text:span text:style-name="Strong_20_Emphasis">Continental Coordination Guide</text:span></text:p>
          </table:table-cell>
          <table:table-cell table:style-name="Table6.A1" office:value-type="string">
            <text:p text:style-name="Table_20_Contents">Continental Australian Pentex operations span all four major continental Australian metropolitan domains; Pentex chronicles benefit from continental coordination handling guidance</text:p>
          </table:table-cell>
        </table:table-row>
        <table:table-row>
          <table:table-cell table:style-name="Table6.A1" office:value-type="string">
            <text:p text:style-name="P4"><text:span text:style-name="Strong_20_Emphasis">Brisbane Supplement</text:span> (<text:span text:style-name="Source_20_Text"><text:span text:style-name="T1">vtm_brisbane_by_night.json</text:span></text:span>)</text:p>
          </table:table-cell>
          <table:table-cell table:style-name="Table6.A1" office:value-type="string">
            <text:p text:style-name="Table_20_Contents">Brisbane continental Cress Truce exclusion produces chronicle-defining complications around Brisbane Pentex operational pressure response</text:p>
          </table:table-cell>
        </table:table-row>
        <table:table-row>
          <table:table-cell table:style-name="Table6.A1" office:value-type="string">
            <text:p text:style-name="P4"><text:span text:style-name="Strong_20_Emphasis">Sydney Supplement</text:span> (<text:span text:style-name="Source_20_Text"><text:span text:style-name="T1">vtm_sydney_by_night.json</text:span></text:span>)</text:p>
          </table:table-cell>
          <table:table-cell table:style-name="Table6.A1" office:value-type="string">
            <text:p text:style-name="Table_20_Contents">Sarrasine-Director Henderson-Vale minimum-institutional accommodation arrangement infrastructure since ~1995</text:p>
          </table:table-cell>
        </table:table-row>
        <table:table-row>
          <table:table-cell table:style-name="Table6.A1" office:value-type="string">
            <text:p text:style-name="Table_20_Contents"><text:span text:style-name="Strong_20_Emphasis">Australian Antagonist Pack — Hardacre AFP-TP</text:span></text:p>
          </table:table-cell>
          <table:table-cell table:style-name="Table6.A1" office:value-type="string">
            <text:p text:style-name="Table_20_Contents">Continental AFP-Twilight-Project intelligence cooperation produces continental Pentex-relevant intelligence-sharing patterns</text:p>
          </table:table-cell>
        </table:table-row>
      </table:table>
      <text:h text:style-name="Heading_20_3" text:outline-level="3"><text:span text:style-name="Strong_20_Emphasis">Layering the lorebooks for Pentex chronicles</text:span></text:h>
      <text:p text:style-name="Preformatted_20_Text"><text:span text:style-name="Source_20_Text">[BASE LAYER] vtm_modern_nights.json <text:s text:c="6"/>— always loaded</text:span></text:p>
      <text:p text:style-name="Preformatted_20_Text"><text:span text:style-name="Source_20_Text"><text:s text:c="16"/>↓</text:span></text:p>
      <text:p text:style-name="Preformatted_20_Text"><text:span text:style-name="Source_20_Text">[CITY LAYER] Relevant city supplements per chronicle scope</text:span></text:p>
      <text:p text:style-name="Preformatted_20_Text"><text:span text:style-name="Source_20_Text"><text:s text:c="16"/>↓</text:span></text:p>
      <text:p text:style-name="Preformatted_20_Text"><text:span text:style-name="Source_20_Text">[CROSS-SPLAT LAYER] vtm_garou_diplomatic.json <text:s text:c="3"/>— for Article 8 operations</text:span></text:p>
      <text:p text:style-name="Preformatted_20_Text"><text:span text:style-name="Source_20_Text"><text:s text:c="16"/>↓</text:span></text:p>
      <text:p text:style-name="Preformatted_20_Text"><text:span text:style-name="Source_20_Text">[ANTAGONIST LAYER] vtm_pentex_by_night.json <text:s text:c="5"/>— NEW</text:span></text:p>
      <text:p text:style-name="Preformatted_20_Text"><text:span text:style-name="Source_20_Text"><text:s text:c="16"/>↓</text:span></text:p>
      <text:p text:style-name="P3"><text:span text:style-name="Source_20_Text">[CHRONICLE PREP LAYER] Cross-Supernatural Diplomatic Prep Guide + Continental Coordination Guide for continental Pentex chronicles</text:span></text:p>
      <text:p text:style-name="P2"><text:span text:style-name="Strong_20_Emphasis">The Pentex / Wyrm-corruption supplement is complete.</text:span> A 14-entry lorebook providing cross-splat antagonist infrastructure: Pentex corporate hierarchy at four tiers (First Team / subsidiary CEOs / regional managers / field operatives), the major continental subsidiaries V:tM chronicles routinely encounter (Endron, Magadon, King Breweries, Tellus, Avalon, Good Topsoil, O'Tolley's, Rainbow, Harold &amp; Sons, United Arms), fomori as foot-soldier antagonists at 9th-10th-gen-equivalent combat capacity, Banes as supernatural threats at spirit-realm infrastructure operating outside Kindred metaphysical frameworks, the Wyrm as cosmic-corruption framework V:tM characters encounter as foreign metaphysical territory, continental Australian Pentex operations across approximately 35 subsidiaries spanning Sydney (regional headquarters), Melbourne, Brisbane, Adelaide, plus regional positions, Pentex-Kindred cross-splat operational dynamics with five intersection points, Pentex-Cress-Truce-Article-8 operational infrastructure with continental Australian operational history (1947 Sydney, 1968 Melbourne, 1989 Adelaide, 2003 Brisbane), the Pentex chronicle character register with five distinctive characteristics, six chronicle hook categories, sample antagonist builds (Director Lachlan Henderson-Vale as senior continental Australian regional executive, Field Agent Reece Calloway as routine fomor field operative), and chronicle scope handling guidance for four scope variations from background Pentex chronicles through continental First Team engagement chronic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0:43:26.716397176</dc:date>
    <meta:editing-duration>PT9M18S</meta:editing-duration>
    <meta:editing-cycles>1</meta:editing-cycles>
    <meta:document-statistic meta:table-count="6" meta:image-count="0" meta:object-count="0" meta:page-count="8" meta:paragraph-count="185" meta:word-count="2101" meta:character-count="19254" meta:non-whitespace-character-count="17238"/>
    <meta:generator>LibreOffice/24.2.7.2$Linux_X86_64 LibreOffice_project/420$Build-2</meta:generator>
  </office:meta>
</office:document-meta>
</file>