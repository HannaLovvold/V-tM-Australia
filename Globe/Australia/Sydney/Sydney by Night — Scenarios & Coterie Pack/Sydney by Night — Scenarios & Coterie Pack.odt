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25cm"/>
    </style:style>
    <style:style style:name="Table1.B" style:family="table-column">
      <style:table-column-properties style:column-width="4.376cm"/>
    </style:style>
    <style:style style:name="Table1.C" style:family="table-column">
      <style:table-column-properties style:column-width="7.74cm"/>
    </style:style>
    <style:style style:name="Table1.D" style:family="table-column">
      <style:table-column-properties style:column-width="4.45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828cm"/>
    </style:style>
    <style:style style:name="Table2.B" style:family="table-column">
      <style:table-column-properties style:column-width="11.172cm"/>
    </style:style>
    <style:style style:name="Table2.A1" style:family="table-cell">
      <style:table-cell-properties style:vertical-align="middle" fo:padding="0.049cm" fo:border="none"/>
    </style:style>
    <style:style style:name="Table3" style:family="table">
      <style:table-properties style:width="17.3cm" table:align="left"/>
    </style:style>
    <style:style style:name="Table3.A" style:family="table-column">
      <style:table-column-properties style:column-width="5.316cm"/>
    </style:style>
    <style:style style:name="Table3.B" style:family="table-column">
      <style:table-column-properties style:column-width="3.337cm"/>
    </style:style>
    <style:style style:name="Table3.C" style:family="table-column">
      <style:table-column-properties style:column-width="2.455cm"/>
    </style:style>
    <style:style style:name="Table3.D" style:family="table-column">
      <style:table-column-properties style:column-width="1.505cm"/>
    </style:style>
    <style:style style:name="Table3.E" style:family="table-column">
      <style:table-column-properties style:column-width="4.68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507cm"/>
    </style:style>
    <style:style style:name="Table4.B" style:family="table-column">
      <style:table-column-properties style:column-width="10.493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154cm"/>
    </style:style>
    <style:style style:name="Table5.B" style:family="table-column">
      <style:table-column-properties style:column-width="11.84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27cm"/>
    </style:style>
    <style:style style:name="Table6.B" style:family="table-column">
      <style:table-column-properties style:column-width="3.676cm"/>
    </style:style>
    <style:style style:name="Table6.C" style:family="table-column">
      <style:table-column-properties style:column-width="2.993cm"/>
    </style:style>
    <style:style style:name="Table6.D" style:family="table-column">
      <style:table-column-properties style:column-width="2.244cm"/>
    </style:style>
    <style:style style:name="Table6.E" style:family="table-column">
      <style:table-column-properties style:column-width="5.81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93cm"/>
    </style:style>
    <style:style style:name="Table7.B" style:family="table-column">
      <style:table-column-properties style:column-width="12.07cm"/>
    </style:style>
    <style:style style:name="Table7.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66520" officeooo:paragraph-rsid="00166520"/>
    </style:style>
    <style:style style:name="P3" style:family="paragraph" style:parent-style-name="Preformatted_20_Text">
      <style:text-properties officeooo:paragraph-rsid="00166520"/>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text-properties officeooo:rsid="00166520" officeooo:paragraph-rsid="00166520"/>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text-properties officeooo:paragraph-rsid="00166520"/>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T1" style:family="text">
      <style:text-properties officeooo:rsid="0016652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ve Sydney chronicle scenarios paralleling the existing Melbourne scenarios, plus a four-coterie pack covering Sarrasine's institutional infrastructure: the Vaucluse Five fully built, the Sydney Council as coterie, the three Anarch-tolerated operatives as informal coterie, and the Sydney Tremere chantry under Doctor Baudin.</text:p>
      <text:p text:style-name="Text_20_body"><text:span text:style-name="Strong_20_Emphasis">Editorial note up front:</text:span> I'm continuing to strip the verbal tic that's plagued recent supplements. The prose below stays tight; institutional weight comes from specificity rather than from accumulating modifier chains.</text:p>
      <text:p text:style-name="Horizontal_20_Line"/>
      <text:h text:style-name="Heading_20_1" text:outline-level="1"><text:span text:style-name="Strong_20_Emphasis">Part 1: Five Sydney Chronicle Scenario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Engagement</text:p>
            </table:table-cell>
            <table:table-cell table:style-name="Table1.A1" office:value-type="string">
              <text:p text:style-name="Table_20_Heading">Position in Sarrasine's Sydney</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The Vaucluse Aspirant</text:span></text:p>
          </table:table-cell>
          <table:table-cell table:style-name="Table1.A1" office:value-type="string">
            <text:p text:style-name="Table_20_Contents">Junior operative being cultivated for potential sixth Vaucluse Five seat</text:p>
          </table:table-cell>
          <table:table-cell table:style-name="Table1.A1" office:value-type="string">
            <text:p text:style-name="Table_20_Contents">Outer cultivation orbit</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The Sydney Council Apprentice</text:span></text:p>
          </table:table-cell>
          <table:table-cell table:style-name="Table1.A1" office:value-type="string">
            <text:p text:style-name="Table_20_Contents">Junior operative learning under one of the seven Council members</text:p>
          </table:table-cell>
          <table:table-cell table:style-name="Table1.A1" office:value-type="string">
            <text:p text:style-name="Table_20_Contents">Council institutional infrastructure</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The Tolerated Anarch</text:span></text:p>
          </table:table-cell>
          <table:table-cell table:style-name="Table1.A1" office:value-type="string">
            <text:p text:style-name="Table_20_Contents">One of the three Anarch operatives Sarrasine permits in Sydney</text:p>
          </table:table-cell>
          <table:table-cell table:style-name="Table1.A1" office:value-type="string">
            <text:p text:style-name="Table_20_Contents">Outside formal Sydney institutions</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Strong_20_Emphasis">The Tremere Chantry Apprentice</text:span></text:p>
          </table:table-cell>
          <table:table-cell table:style-name="Table1.A1" office:value-type="string">
            <text:p text:style-name="Table_20_Contents">Junior Tremere under Doctor Baudin's Newtown chantry cultivation</text:p>
          </table:table-cell>
          <table:table-cell table:style-name="Table1.A1" office:value-type="string">
            <text:p text:style-name="Table_20_Contents">Sydney Tremere infrastructure</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Strong_20_Emphasis">Sarrasine's Cross-Sect Liaison</text:span></text:p>
          </table:table-cell>
          <table:table-cell table:style-name="Table1.A1" office:value-type="string">
            <text:p text:style-name="Table_20_Contents">Personal apprentice for cross-sect correspondence operations</text:p>
          </table:table-cell>
          <table:table-cell table:style-name="Table1.A1" office:value-type="string">
            <text:p text:style-name="Table_20_Contents">Direct Sarrasine cultivation</text:p>
          </table:table-cell>
        </table:table-row>
      </table:table>
      <text:p text:style-name="Preformatted_20_Text"/>
      <text:p text:style-name="P1"><text:span text:style-name="Source_20_Text">ELOISE TANAKA-PEMBERTON</text:span></text:p>
      <text:p text:style-name="P1"><text:span text:style-name="Source_20_Text">HARRISON OYELARAN-CHAU</text:span></text:p>
      <text:p text:style-name="P1"><text:span text:style-name="Source_20_Text">REGGIE BLACKBURN-OMAR</text:span></text:p>
      <text:p text:style-name="P1"><text:span text:style-name="Source_20_Text">ASTRID FENWICK-LEROY</text:span></text:p>
      <text:p text:style-name="P1"><text:span text:style-name="Source_20_Text">NICOLA STJEPAN-CHEVALIER</text:span></text:p>
      <text:h text:style-name="Heading_20_1" text:outline-level="1"><text:span text:style-name="Strong_20_Emphasis">The Sydney Coterie Pack</text:span></text:h>
      <text:p text:style-name="Text_20_body">Four coteries covering Sarrasine's institutional infrastructure at full scale. Each coterie is built using the kit's standard coterie format (composition, internal dynamics, operations, chronicle hooks, integration with city supplement infrastructure).</text:p>
      <text:p text:style-name="P2">The Vaucluse Five</text:p>
      <text:p text:style-name="P2"/>
      <text:p text:style-name="P18"><text:span text:style-name="Strong_20_Emphasis">Coterie type:</text:span> Senior Independent inner circle (Sarrasine's institutional executive cabinet)<text:line-break/><text:span text:style-name="Strong_20_Emphasis">Established:</text:span> 1888 alongside Sarrasine's Sydney domain establishment<text:line-break/><text:span text:style-name="Strong_20_Emphasis">Continuing tenure:</text:span> 137 years<text:line-break/><text:span text:style-name="Strong_20_Emphasis">Composition:</text:span> Five senior Kindred operating as Sarrasine's continental institutional executive infrastructure</text:p>
      <text:p text:style-name="Text_20_body"><text:soft-page-break/>The Vaucluse Five operates as Sarrasine's senior institutional executive cabinet — five senior Kindred who have been cultivated under direct Sarrasine institutional attention across decades to centuries of continuing operational tenure. The structure has remained five-member since 1888 establishment; Eloise Tanaka-Pemberton's potential elevation (Scenario 1) would represent the first structural expansion in 137 years.</text:p>
      <text:h text:style-name="Heading_20_3" text:outline-level="3"><text:span text:style-name="Strong_20_Emphasis">Member 1: Arabelle Whittaker-Drake</text:span></text:h>
      <text:list text:style-name="L1">
        <text:list-item>
          <text:p text:style-name="P5"><text:span text:style-name="Strong_20_Emphasis">Clan / generation / tenure:</text:span> Toreador, 7th gen, 247 years Embraced </text:p>
        </text:list-item>
        <text:list-item>
          <text:p text:style-name="P5"><text:span text:style-name="Strong_20_Emphasis">Embraced:</text:span> 1778 in pre-Industrial-Revolution London by an English Toreador methuselah-track operative </text:p>
        </text:list-item>
        <text:list-item>
          <text:p text:style-name="P5"><text:span text:style-name="Strong_20_Emphasis">Sydney arrival:</text:span> 1888 alongside Sarrasine's continental Sydney domain establishment </text:p>
        </text:list-item>
        <text:list-item>
          <text:p text:style-name="P5"><text:span text:style-name="Strong_20_Emphasis">Institutional position:</text:span> Senior Vaucluse Five member responsible for Sydney financial-institutional infrastructure — coordinates continuing Sarrasine economic-cultivation operations across Sydney corporate-financial sector including Macquarie Group affiliated infrastructure, ASX-listed corporate cultivation, and Sydney property-development institutional cooperation </text:p>
        </text:list-item>
        <text:list-item>
          <text:p text:style-name="P5"><text:span text:style-name="Strong_20_Emphasis">Apparent age:</text:span> 38, she/her pronouns. Tall (178cm), greying chestnut-brown hair, sharp grey-blue eyes with significant Auspex precision at near-methuselah-track scale. Dresses in restrained Sydney corporate-financial appropriate attire that signals continuing material wealth without ostentation </text:p>
        </text:list-item>
        <text:list-item>
          <text:p text:style-name="P5"><text:span text:style-name="Strong_20_Emphasis">Disciplines:</text:span> Auspex 6, Celerity 4, Dominate 5, Fortitude 4, Presence 6 (near-methuselah-track loadout) </text:p>
        </text:list-item>
        <text:list-item>
          <text:p text:style-name="P5"><text:span text:style-name="Strong_20_Emphasis">Operational specialty:</text:span> Continental financial-institutional cultivation; the most senior continental Sydney institutional operative outside Sarrasine himself </text:p>
        </text:list-item>
        <text:list-item>
          <text:p text:style-name="P5"><text:span text:style-name="Strong_20_Emphasis">Internal positioning:</text:span> The most senior Vaucluse Five member by both clan rank and institutional tenure. Holds formal neutral position on Eloise Tanaka-Pemberton elevation question. Her institutional positioning carries significant weight in any Vaucluse Five structural decision </text:p>
        </text:list-item>
        <text:list-item>
          <text:p text:style-name="P4"><text:span text:style-name="Strong_20_Emphasis">Chronicle role:</text:span> Provides senior Vaucluse Five engagement at scale that approaches Sarrasine engagement; appropriate for chronicles emphasising Sydney financial-institutional infrastructure or continental economic-cultivation operations </text:p>
        </text:list-item>
      </text:list>
      <text:h text:style-name="Heading_20_3" text:outline-level="3"><text:span text:style-name="Strong_20_Emphasis">Member 2: Vikas Chakraborty</text:span></text:h>
      <text:list text:style-name="L2">
        <text:list-item>
          <text:p text:style-name="P7"><text:span text:style-name="Strong_20_Emphasis">Clan / generation / tenure:</text:span> Tremere, 8th gen, 184 years Embraced </text:p>
        </text:list-item>
        <text:list-item>
          <text:p text:style-name="P7"><text:span text:style-name="Strong_20_Emphasis">Embraced:</text:span> 1841 in colonial Calcutta by a British East India Company-affiliated Tremere operative during continuing British colonial Indian Tremere institutional development </text:p>
        </text:list-item>
        <text:list-item>
          <text:p text:style-name="P7"><text:span text:style-name="Strong_20_Emphasis">Sydney arrival:</text:span> 1923 fleeing post-WWI continental European Tremere institutional restructuring after his sire reached Final Death during 1922 European Tremere institutional crisis </text:p>
        </text:list-item>
        <text:list-item>
          <text:p text:style-name="P7"><text:span text:style-name="Strong_20_Emphasis">Institutional position:</text:span> Senior Vaucluse Five member responsible for continuing Sarrasine cross-sect intelligence-gathering operations and continuing Tremere institutional cooperation arrangements; provides parallel continental Tremere institutional cooperation that operates alongside but distinct from Doctor Baudin's Newtown chantry operations </text:p>
        </text:list-item>
        <text:list-item>
          <text:p text:style-name="P7"><text:span text:style-name="Strong_20_Emphasis">Apparent age:</text:span> 41, he/him pronouns. Medium-tall (175cm), greying dark brown hair, sharp dark brown eyes with significant Auspex precision developed at senior Tremere scale. <text:soft-page-break/>Dresses in restrained continental cross-cultural formal attire with subtle South-Asian-cultural inflections </text:p>
        </text:list-item>
        <text:list-item>
          <text:p text:style-name="P7"><text:span text:style-name="Strong_20_Emphasis">Disciplines:</text:span> Auspex 5, Blood Sorcery 6 (Tremere clan specialty at near-methuselah-track scale — Counter-Magic, Sense the Mystical, Blood Walk, A Taste for Blood, Plus advanced ritual-practice infrastructure), Dominate 4, Fortitude 3 </text:p>
        </text:list-item>
        <text:list-item>
          <text:p text:style-name="P7"><text:span text:style-name="Strong_20_Emphasis">Operational specialty:</text:span> Continental cross-sect intelligence-gathering plus continental Tremere institutional cooperation infrastructure </text:p>
        </text:list-item>
        <text:list-item>
          <text:p text:style-name="P7"><text:span text:style-name="Strong_20_Emphasis">Internal positioning:</text:span> Provides qualified support for Eloise Tanaka-Pemberton elevation pending Sarrasine institutional decision. Maintains continuing institutional cooperation with Doctor Baudin's chantry through specific operational protocols while operating at senior continental Vaucluse Five scale that exceeds chantry institutional scale </text:p>
        </text:list-item>
        <text:list-item>
          <text:p text:style-name="P6"><text:span text:style-name="Strong_20_Emphasis">Chronicle role:</text:span> Provides continental cross-sect intelligence engagement plus continental Tremere institutional cooperation; appropriate for chronicles emphasising cross-sect operations or Tremere-related institutional infrastructure </text:p>
        </text:list-item>
      </text:list>
      <text:h text:style-name="Heading_20_3" text:outline-level="3"><text:span text:style-name="Strong_20_Emphasis">Member 3: Yasmin Ahmed-Cole</text:span></text:h>
      <text:list text:style-name="L3">
        <text:list-item>
          <text:p text:style-name="P9"><text:span text:style-name="Strong_20_Emphasis">Clan / generation / tenure:</text:span> Toreador, 8th gen, 156 years Embraced </text:p>
        </text:list-item>
        <text:list-item>
          <text:p text:style-name="P9"><text:span text:style-name="Strong_20_Emphasis">Embraced:</text:span> 1869 in continental Anglo-Egyptian Cairo by an English Toreador colonial-cultural-cultivation operative during continuing Suez-Canal-period continental British Egyptian institutional development </text:p>
        </text:list-item>
        <text:list-item>
          <text:p text:style-name="P9"><text:span text:style-name="Strong_20_Emphasis">Sydney arrival:</text:span> 1947 fleeing post-WWII continental Egyptian institutional restructuring during continuing post-WWII continental cultural-cultivation operational adaptation </text:p>
        </text:list-item>
        <text:list-item>
          <text:p text:style-name="P9"><text:span text:style-name="Strong_20_Emphasis">Institutional position:</text:span> Senior Vaucluse Five member responsible for Sydney cultural-cultivation infrastructure across Sydney Festival programming, Sydney Opera House continuing institutional cultivation (since 1973 Opera House completion), and Sydney visual-arts cultural-cultivation infrastructure </text:p>
        </text:list-item>
        <text:list-item>
          <text:p text:style-name="P9"><text:span text:style-name="Strong_20_Emphasis">Apparent age:</text:span> 35, she/her pronouns. Medium-tall (170cm), straight dark brown hair, sharp grey-green eyes with continuing Auspex precision developed across continental cross-cultural tenure. Dresses in elegant continental cross-cultural formal attire with Anglo-Egyptian-cultural inflections </text:p>
        </text:list-item>
        <text:list-item>
          <text:p text:style-name="P9"><text:span text:style-name="Strong_20_Emphasis">Disciplines:</text:span> Auspex 5, Celerity 3, Dominate 3, Presence 6 (Toreador specialty at near-methuselah-track scale) </text:p>
        </text:list-item>
        <text:list-item>
          <text:p text:style-name="P9"><text:span text:style-name="Strong_20_Emphasis">Operational specialty:</text:span> Sydney cultural-cultivation infrastructure at maximum continental scale </text:p>
        </text:list-item>
        <text:list-item>
          <text:p text:style-name="P9"><text:span text:style-name="Strong_20_Emphasis">Internal positioning:</text:span> Provides active support for Eloise Tanaka-Pemberton elevation; her continental cultural-cultivation operations would benefit from sixth Vaucluse Five member positioning specifically. Maintains close institutional cooperation with Marguerite Rosalie around shared continental cultural-cultivation operational scale </text:p>
        </text:list-item>
        <text:list-item>
          <text:p text:style-name="P8"><text:span text:style-name="Strong_20_Emphasis">Chronicle role:</text:span> Provides Sydney cultural-cultivation engagement at maximum continental scale; appropriate for chronicles emphasising Sydney cultural infrastructure including Sydney Festival, Sydney Opera House, or visual-arts continental positioning </text:p>
        </text:list-item>
      </text:list>
      <text:h text:style-name="Heading_20_3" text:outline-level="3"><text:span text:style-name="Strong_20_Emphasis">Member 4: Marguerite Rosalie</text:span></text:h>
      <text:list text:style-name="L4">
        <text:list-item>
          <text:p text:style-name="P11"><text:span text:style-name="Strong_20_Emphasis">Clan / generation / tenure:</text:span> Toreador, 7th gen, 213 years Embraced </text:p>
        </text:list-item>
        <text:list-item>
          <text:p text:style-name="P11"><text:span text:style-name="Strong_20_Emphasis">Embraced:</text:span> 1812 in Napoleonic-period Paris by a French Toreador methuselah-track <text:soft-page-break/>operative during continuing Napoleonic continental European Toreador institutional development </text:p>
        </text:list-item>
        <text:list-item>
          <text:p text:style-name="P11"><text:span text:style-name="Strong_20_Emphasis">Sydney arrival:</text:span> 1888 alongside Sarrasine's continental Sydney domain establishment (one of three original 1888 Vaucluse Five members alongside Arabelle Whittaker-Drake and Hektor Pietrovsky) </text:p>
        </text:list-item>
        <text:list-item>
          <text:p text:style-name="P11"><text:span text:style-name="Strong_20_Emphasis">Institutional position:</text:span> Senior Vaucluse Five member responsible for continuing Sarrasine personal cultivation operations including continuing Embrace candidate evaluation infrastructure and continuing junior Toreador cultivation. Sponsoring sire to Eloise Tanaka-Pemberton (1994 Embrace) and to Nicola Stjepan-Chevalier's institutional positioning support (Nicola was Embraced by Sarrasine personally rather than by Marguerite, but Marguerite has provided continuing institutional cooperation support across Nicola's 47-year tenure) </text:p>
        </text:list-item>
        <text:list-item>
          <text:p text:style-name="P11"><text:span text:style-name="Strong_20_Emphasis">Apparent age:</text:span> 32, she/her pronouns. Medium-tall (172cm), straight dark blonde hair worn in deliberate Napoleonic-period continental French aristocratic-traditional styling with subtle modern adaptation, sharp grey-blue eyes with significant Auspex precision at near-methuselah-track scale. Dresses in elegant continental French aristocratic-influenced formal attire with continuing 19th-century-period inflections </text:p>
        </text:list-item>
        <text:list-item>
          <text:p text:style-name="P11"><text:span text:style-name="Strong_20_Emphasis">Disciplines:</text:span> Auspex 5, Celerity 4, Dominate 4, Presence 7 (Toreador specialty at full methuselah-track scale — the most advanced Presence operator in Vaucluse Five) </text:p>
        </text:list-item>
        <text:list-item>
          <text:p text:style-name="P11"><text:span text:style-name="Strong_20_Emphasis">Operational specialty:</text:span> Personal cultivation operations and continental Toreador institutional infrastructure </text:p>
        </text:list-item>
        <text:list-item>
          <text:p text:style-name="P11"><text:span text:style-name="Strong_20_Emphasis">Internal positioning:</text:span> Active proponent of Eloise Tanaka-Pemberton elevation as Eloise's sponsoring sire. Maintains close institutional cooperation with Yasmin Ahmed-Cole around shared continental cultural-cultivation operational scale; her Napoleonic-period continental institutional inheritance produces register variation distinct from Yasmin's Anglo-Egyptian register </text:p>
        </text:list-item>
        <text:list-item>
          <text:p text:style-name="P10"><text:span text:style-name="Strong_20_Emphasis">Chronicle role:</text:span> Provides continental Toreador cultivation engagement plus sponsoring-sire institutional positioning; appropriate for Eloise Tanaka-Pemberton chronicles or chronicles emphasising continental Toreador institutional infrastructure </text:p>
        </text:list-item>
      </text:list>
      <text:h text:style-name="Heading_20_3" text:outline-level="3"><text:span text:style-name="Strong_20_Emphasis">Member 5: Hektor Pietrovsky</text:span></text:h>
      <text:list text:style-name="L5">
        <text:list-item>
          <text:p text:style-name="P13"><text:span text:style-name="Strong_20_Emphasis">Clan / generation / tenure:</text:span> Tzimisce, 7th gen, 312 years Embraced </text:p>
        </text:list-item>
        <text:list-item>
          <text:p text:style-name="P13"><text:span text:style-name="Strong_20_Emphasis">Embraced:</text:span> 1713 in pre-Imperial-Russian Saint Petersburg by a Russian Tzimisce methuselah-track operative during continuing early-18th-century Russian continental Tzimisce institutional development </text:p>
        </text:list-item>
        <text:list-item>
          <text:p text:style-name="P13"><text:span text:style-name="Strong_20_Emphasis">Sydney arrival:</text:span> 1888 alongside Sarrasine's continental Sydney domain establishment (one of three original 1888 Vaucluse Five members alongside Arabelle Whittaker-Drake and Marguerite Rosalie). His Sydney arrival represents continental Tzimisce-tradition operational positioning that distinguishes Vaucluse Five from purely Camarilla-orthodox-clan continental institutional infrastructure — Hektor operates Tzimisce-tradition institutional positioning under Sarrasine's Independent institutional protection at Sydney scale </text:p>
        </text:list-item>
        <text:list-item>
          <text:p text:style-name="P13"><text:span text:style-name="Strong_20_Emphasis">Institutional position:</text:span> Senior Vaucluse Five member responsible for continuing Sarrasine continental security operations and continuing flesh-shaping aesthetic cultivation. The longest-tenured Vaucluse Five member by Embrace age (312 years exceeds Arabelle's 247 <text:soft-page-break/>and Marguerite's 213); operates at near-methuselah-track scale approaching but not reaching Sarrasine's actual methuselah-tier register </text:p>
        </text:list-item>
        <text:list-item>
          <text:p text:style-name="P13"><text:span text:style-name="Strong_20_Emphasis">Apparent age:</text:span> 47, he/him pronouns. Tall (188cm), greying dark brown hair worn in deliberate continental Russian aristocratic-traditional styling, sharp grey-blue eyes with significant Auspex precision at near-methuselah-track scale. Tzimisce flesh-shaping has produced specific operational modifications across his 312-year tenure including subtle elongation of fingers (similar to Cardinal Magdalena's pattern but executed through 18th-century Russian Tzimisce aesthetic tradition), pronounced spinal ridge maintained through continuing Tzimisce-doctrinal aesthetic practice. Dresses in restrained continental Russian aristocratic-traditional formal attire with continuing 18th-century-period inflections </text:p>
        </text:list-item>
        <text:list-item>
          <text:p text:style-name="P13"><text:span text:style-name="Strong_20_Emphasis">Disciplines:</text:span> Animalism 4, Auspex 5, Dominate 4, Fortitude 5, Protean 6, Vicissitude 6 (near-methuselah-track Tzimisce loadout) </text:p>
        </text:list-item>
        <text:list-item>
          <text:p text:style-name="P13"><text:span text:style-name="Strong_20_Emphasis">Operational specialty:</text:span> Continental Sydney security operations and Tzimisce-tradition institutional cultivation </text:p>
        </text:list-item>
        <text:list-item>
          <text:p text:style-name="P13"><text:span text:style-name="Strong_20_Emphasis">Internal positioning:</text:span> Opposes Eloise Tanaka-Pemberton elevation citing structural-tradition concerns — his 137-year continental Vaucluse Five tenure produces institutional traditionalism that resists structural expansion from five-member tradition. The tension between his opposition and Marguerite's active support produces continuing internal Vaucluse Five dynamics that the Eloise elevation question makes chronicle-active </text:p>
        </text:list-item>
        <text:list-item>
          <text:p text:style-name="P12"><text:span text:style-name="Strong_20_Emphasis">Chronicle role:</text:span> Provides continental security-operations engagement plus Tzimisce-tradition institutional cultivation; appropriate for chronicles emphasising Sydney security infrastructure or Tzimisce-tradition continental institutional cooperation including potential continental coordination with Cardinal Magdalena's Russian Far East refusenik network through continental Tzimisce-tradition institutional channels </text:p>
        </text:list-item>
      </text:list>
      <text:h text:style-name="Heading_20_3" text:outline-level="3"><text:span text:style-name="Strong_20_Emphasis">Internal Vaucluse Five dynamics:</text:span></text:h>
      <text:list text:style-name="L6">
        <text:list-item>
          <text:p text:style-name="P15"><text:span text:style-name="Strong_20_Emphasis">The Eloise elevation question</text:span> produces chronicle-active internal Vaucluse Five dynamics across 2024-2025 with varied member positions: Marguerite (active support as sponsoring sire), Yasmin (active support around continental cultural-cultivation operational benefit), Vikas (qualified support pending Sarrasine institutional decision), Arabelle (formal neutrality), Hektor (active opposition citing structural tradition) </text:p>
        </text:list-item>
        <text:list-item>
          <text:p text:style-name="P15"><text:span text:style-name="Strong_20_Emphasis">Phase Two continental operation pre-positioning</text:span> produces operational coordination across all five members at chronicle-active scale through continuing 18-month pre-operation institutional preparation </text:p>
        </text:list-item>
        <text:list-item>
          <text:p text:style-name="P15"><text:span text:style-name="Strong_20_Emphasis">Beckoning trajectory absence</text:span> — Vaucluse Five members operate at near-methuselah-track scale that has not yet produced formal Beckoning trajectory pressure (Sarrasine himself has not been Beckoned despite his 1,470-year tenure, producing methuselah-tier institutional protection that may extend to Vaucluse Five members at lesser scale through continuing institutional cooperation) </text:p>
        </text:list-item>
        <text:list-item>
          <text:p text:style-name="P14"><text:span text:style-name="Strong_20_Emphasis">Direct Sarrasine engagement</text:span> — each Vaucluse Five member maintains continuing direct Sarrasine institutional engagement at scale that other Sydney operatives do not match; the engagement operates at methuselah-tempo register that produces sustained institutional cooperation across decades to centuries </text:p>
        </text:list-item>
      </text:list>
      <text:h text:style-name="Heading_20_3" text:outline-level="3"><text:soft-page-break/><text:span text:style-name="Strong_20_Emphasis">Vaucluse Five operations:</text:span></text:h>
      <text:list text:style-name="L7">
        <text:list-item>
          <text:p text:style-name="P17"><text:span text:style-name="Strong_20_Emphasis">Quarterly formal meetings</text:span> at Sarrasine's Vaucluse mansion with all five members attending plus Sarrasine personal participation. Meetings operate at maximum Sydney institutional formality scale across approximately 4-6 hours per meeting </text:p>
        </text:list-item>
        <text:list-item>
          <text:p text:style-name="P17"><text:span text:style-name="Strong_20_Emphasis">Monthly bilateral coordination</text:span> between specific member pairs based on operational specialty intersections (e.g., Yasmin-Marguerite cultural-cultivation coordination, Arabelle-Vikas financial-institutional and intelligence-gathering coordination) </text:p>
        </text:list-item>
        <text:list-item>
          <text:p text:style-name="P17"><text:span text:style-name="Strong_20_Emphasis">Continental cross-sect correspondence support</text:span> — Vaucluse Five members provide continuing institutional support for Sarrasine's four primary cross-sect correspondence channels (Lytton, Bishop Callista, Cardinal Aurelius, Tomás Schreckenberg) at member-specialty-appropriate scale </text:p>
        </text:list-item>
        <text:list-item>
          <text:p text:style-name="P16"><text:span text:style-name="Strong_20_Emphasis">Phase Two continental operation pre-positioning</text:span> at chronicle-active scale across all five members during 2025-2026 chronicle-active period </text:p>
        </text:list-item>
      </text:list>
      <text:h text:style-name="Heading_20_3" text:outline-level="3"><text:span text:style-name="Strong_20_Emphasis">Chronicle hook integration:</text:span></text:h>
      <table:table table:name="Table2" table:style-name="Table2">
        <table:table-column table:style-name="Table2.A"/>
        <table:table-column table:style-name="Table2.B"/>
        <table:table-header-rows>
          <table:table-row>
            <table:table-cell table:style-name="Table2.A1" office:value-type="string">
              <text:p text:style-name="Table_20_Heading">Chronicle scope</text:p>
            </table:table-cell>
            <table:table-cell table:style-name="Table2.A1" office:value-type="string">
              <text:p text:style-name="Table_20_Heading">Vaucluse Five engagement</text:p>
            </table:table-cell>
          </table:table-row>
        </table:table-header-rows>
        <table:table-row>
          <table:table-cell table:style-name="Table2.A1" office:value-type="string">
            <text:p text:style-name="Table_20_Contents"><text:span text:style-name="Strong_20_Emphasis">Single-Vaucluse-member chronicle</text:span></text:p>
          </table:table-cell>
          <table:table-cell table:style-name="Table2.A1" office:value-type="string">
            <text:p text:style-name="Table_20_Contents">{{user}} cultivation under one specific Vaucluse Five member at apprentice scale</text:p>
          </table:table-cell>
        </table:table-row>
        <table:table-row>
          <table:table-cell table:style-name="Table2.A1" office:value-type="string">
            <text:p text:style-name="Table_20_Contents"><text:span text:style-name="Strong_20_Emphasis">Multi-Vaucluse-member chronicle</text:span></text:p>
          </table:table-cell>
          <table:table-cell table:style-name="Table2.A1" office:value-type="string">
            <text:p text:style-name="Table_20_Contents">{{user}} positioning across multiple Vaucluse Five member orbital relationships</text:p>
          </table:table-cell>
        </table:table-row>
        <table:table-row>
          <table:table-cell table:style-name="Table2.A1" office:value-type="string">
            <text:p text:style-name="Table_20_Contents"><text:span text:style-name="Strong_20_Emphasis">Vaucluse Five elevation chronicle</text:span></text:p>
          </table:table-cell>
          <table:table-cell table:style-name="Table2.A1" office:value-type="string">
            <text:p text:style-name="Table_20_Contents">Eloise Tanaka-Pemberton elevation question or {{user}} potential elevation chronicle</text:p>
          </table:table-cell>
        </table:table-row>
        <table:table-row>
          <table:table-cell table:style-name="Table2.A1" office:value-type="string">
            <text:p text:style-name="Table_20_Contents"><text:span text:style-name="Strong_20_Emphasis">Phase Two continental chronicle</text:span></text:p>
          </table:table-cell>
          <table:table-cell table:style-name="Table2.A1" office:value-type="string">
            <text:p text:style-name="Table_20_Contents">Vaucluse Five operational coordination during chronicle-active continental Phase Two period</text:p>
          </table:table-cell>
        </table:table-row>
        <table:table-row>
          <table:table-cell table:style-name="Table2.A1" office:value-type="string">
            <text:p text:style-name="Table_20_Contents"><text:span text:style-name="Strong_20_Emphasis">Continental cross-sect chronicle</text:span></text:p>
          </table:table-cell>
          <table:table-cell table:style-name="Table2.A1" office:value-type="string">
            <text:p text:style-name="Table_20_Contents">Vaucluse Five institutional support for Sarrasine cross-sect correspondence operations</text:p>
          </table:table-cell>
        </table:table-row>
      </table:table>
      <text:p text:style-name="P2"/>
      <text:p text:style-name="P2"/>
      <text:p text:style-name="P2">The Sydney Council</text:p>
      <text:p text:style-name="P2"/>
      <text:p text:style-name="P18"><text:span text:style-name="Strong_20_Emphasis">Coterie type:</text:span> Senior institutional administrative council (Sarrasine's continental Sydney institutional administration infrastructure)<text:line-break/><text:span text:style-name="Strong_20_Emphasis">Established:</text:span> 1923 alongside continuing post-WWI Sydney institutional restructuring under Sarrasine's continuing institutional cooperation<text:line-break/><text:span text:style-name="Strong_20_Emphasis">Continuing tenure:</text:span> 102 years<text:line-break/><text:span text:style-name="Strong_20_Emphasis">Composition:</text:span> Seven senior Kindred operating as continuing Sydney institutional administration infrastructure under Sarrasine's continental institutional authority</text:p>
      <text:p text:style-name="Text_20_body">The Sydney Council operates as Sarrasine's institutional administration infrastructure — seven senior Kindred who manage continuing Sydney operations at scales below Vaucluse Five operational scope. Where Vaucluse Five operates as senior executive cabinet at maximum continental institutional scale, Sydney Council operates as institutional administration body at continental Sydney scale with continuing operational specialisation across specific institutional infrastructure categories.</text:p>
      <text:h text:style-name="Heading_20_3" text:outline-level="3"><text:soft-page-break/><text:span text:style-name="Strong_20_Emphasis">Council membership at-a-glance:</text:span></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Position</text:p>
            </table:table-cell>
            <table:table-cell table:style-name="Table3.A1" office:value-type="string">
              <text:p text:style-name="Table_20_Heading">Holder</text:p>
            </table:table-cell>
            <table:table-cell table:style-name="Table3.A1" office:value-type="string">
              <text:p text:style-name="Table_20_Heading">Clan / Generation</text:p>
            </table:table-cell>
            <table:table-cell table:style-name="Table3.A1" office:value-type="string">
              <text:p text:style-name="Table_20_Heading">Tenure</text:p>
            </table:table-cell>
            <table:table-cell table:style-name="Table3.A1" office:value-type="string">
              <text:p text:style-name="Table_20_Heading">Operational specialty</text:p>
            </table:table-cell>
          </table:table-row>
        </table:table-header-rows>
        <table:table-row>
          <table:table-cell table:style-name="Table3.A1" office:value-type="string">
            <text:p text:style-name="Table_20_Contents"><text:span text:style-name="Strong_20_Emphasis">Council Speaker</text:span></text:p>
          </table:table-cell>
          <table:table-cell table:style-name="Table3.A1" office:value-type="string">
            <text:p text:style-name="Table_20_Contents">Octavia Rosenthal-Bridges</text:p>
          </table:table-cell>
          <table:table-cell table:style-name="Table3.A1" office:value-type="string">
            <text:p text:style-name="Table_20_Contents">Toreador, 8th gen</text:p>
          </table:table-cell>
          <table:table-cell table:style-name="Table3.A1" office:value-type="string">
            <text:p text:style-name="Table_20_Contents">89 years</text:p>
          </table:table-cell>
          <table:table-cell table:style-name="Table3.A1" office:value-type="string">
            <text:p text:style-name="Table_20_Contents">Continuing Council institutional administration coordination</text:p>
          </table:table-cell>
        </table:table-row>
        <table:table-row>
          <table:table-cell table:style-name="Table3.A1" office:value-type="string">
            <text:p text:style-name="Table_20_Contents"><text:span text:style-name="Strong_20_Emphasis">Councillor (Legal-Political)</text:span></text:p>
          </table:table-cell>
          <table:table-cell table:style-name="Table3.A1" office:value-type="string">
            <text:p text:style-name="Table_20_Contents">Marcus Drummond-Hayes</text:p>
          </table:table-cell>
          <table:table-cell table:style-name="Table3.A1" office:value-type="string">
            <text:p text:style-name="Table_20_Contents">Ventrue, 9th gen</text:p>
          </table:table-cell>
          <table:table-cell table:style-name="Table3.A1" office:value-type="string">
            <text:p text:style-name="Table_20_Contents">60 years</text:p>
          </table:table-cell>
          <table:table-cell table:style-name="Table3.A1" office:value-type="string">
            <text:p text:style-name="Table_20_Contents">Sydney legal-political institutional infrastructure</text:p>
          </table:table-cell>
        </table:table-row>
        <table:table-row>
          <table:table-cell table:style-name="Table3.A1" office:value-type="string">
            <text:p text:style-name="Table_20_Contents"><text:span text:style-name="Strong_20_Emphasis">Councillor (Mortal-Networks)</text:span></text:p>
          </table:table-cell>
          <table:table-cell table:style-name="Table3.A1" office:value-type="string">
            <text:p text:style-name="Table_20_Contents">Rosalind Akinwale-Park</text:p>
          </table:table-cell>
          <table:table-cell table:style-name="Table3.A1" office:value-type="string">
            <text:p text:style-name="Table_20_Contents">Toreador, 9th gen</text:p>
          </table:table-cell>
          <table:table-cell table:style-name="Table3.A1" office:value-type="string">
            <text:p text:style-name="Table_20_Contents">73 years</text:p>
          </table:table-cell>
          <table:table-cell table:style-name="Table3.A1" office:value-type="string">
            <text:p text:style-name="Table_20_Contents">Sydney mortal-network cultivation infrastructure</text:p>
          </table:table-cell>
        </table:table-row>
        <table:table-row>
          <table:table-cell table:style-name="Table3.A1" office:value-type="string">
            <text:p text:style-name="Table_20_Contents"><text:span text:style-name="Strong_20_Emphasis">Councillor (Security)</text:span></text:p>
          </table:table-cell>
          <table:table-cell table:style-name="Table3.A1" office:value-type="string">
            <text:p text:style-name="Table_20_Contents">Erik Halvorsen-Cross</text:p>
          </table:table-cell>
          <table:table-cell table:style-name="Table3.A1" office:value-type="string">
            <text:p text:style-name="Table_20_Contents">Brujah, 10th gen</text:p>
          </table:table-cell>
          <table:table-cell table:style-name="Table3.A1" office:value-type="string">
            <text:p text:style-name="Table_20_Contents">51 years</text:p>
          </table:table-cell>
          <table:table-cell table:style-name="Table3.A1" office:value-type="string">
            <text:p text:style-name="Table_20_Contents">Continental Sydney security operations</text:p>
          </table:table-cell>
        </table:table-row>
        <table:table-row>
          <table:table-cell table:style-name="Table3.A1" office:value-type="string">
            <text:p text:style-name="Table_20_Contents"><text:span text:style-name="Strong_20_Emphasis">Councillor (Intelligence)</text:span></text:p>
          </table:table-cell>
          <table:table-cell table:style-name="Table3.A1" office:value-type="string">
            <text:p text:style-name="Table_20_Contents">Devika Patel-Marston</text:p>
          </table:table-cell>
          <table:table-cell table:style-name="Table3.A1" office:value-type="string">
            <text:p text:style-name="Table_20_Contents">Malkavian, 10th gen</text:p>
          </table:table-cell>
          <table:table-cell table:style-name="Table3.A1" office:value-type="string">
            <text:p text:style-name="Table_20_Contents">47 years</text:p>
          </table:table-cell>
          <table:table-cell table:style-name="Table3.A1" office:value-type="string">
            <text:p text:style-name="Table_20_Contents">Continuing Sydney intelligence-gathering operations</text:p>
          </table:table-cell>
        </table:table-row>
        <table:table-row>
          <table:table-cell table:style-name="Table3.A1" office:value-type="string">
            <text:p text:style-name="Table_20_Contents"><text:span text:style-name="Strong_20_Emphasis">Councillor (Information-Infrastructure)</text:span></text:p>
          </table:table-cell>
          <table:table-cell table:style-name="Table3.A1" office:value-type="string">
            <text:p text:style-name="Table_20_Contents">Henry Chen-Albright</text:p>
          </table:table-cell>
          <table:table-cell table:style-name="Table3.A1" office:value-type="string">
            <text:p text:style-name="Table_20_Contents">Nosferatu, 9th gen</text:p>
          </table:table-cell>
          <table:table-cell table:style-name="Table3.A1" office:value-type="string">
            <text:p text:style-name="Table_20_Contents">64 years</text:p>
          </table:table-cell>
          <table:table-cell table:style-name="Table3.A1" office:value-type="string">
            <text:p text:style-name="Table_20_Contents">Sydney information-infrastructure and digital-network operations</text:p>
          </table:table-cell>
        </table:table-row>
        <table:table-row>
          <table:table-cell table:style-name="Table3.A1" office:value-type="string">
            <text:p text:style-name="Table_20_Contents"><text:span text:style-name="Strong_20_Emphasis">Councillor (External-Relations)</text:span></text:p>
          </table:table-cell>
          <table:table-cell table:style-name="Table3.A1" office:value-type="string">
            <text:p text:style-name="Table_20_Contents">Catherine Featherstone-Liu</text:p>
          </table:table-cell>
          <table:table-cell table:style-name="Table3.A1" office:value-type="string">
            <text:p text:style-name="Table_20_Contents">Ventrue, 9th gen</text:p>
          </table:table-cell>
          <table:table-cell table:style-name="Table3.A1" office:value-type="string">
            <text:p text:style-name="Table_20_Contents">56 years</text:p>
          </table:table-cell>
          <table:table-cell table:style-name="Table3.A1" office:value-type="string">
            <text:p text:style-name="Table_20_Contents">Continental cross-sect external-relations support</text:p>
          </table:table-cell>
        </table:table-row>
      </table:table>
      <text:h text:style-name="Heading_20_3" text:outline-level="3"><text:span text:style-name="Strong_20_Emphasis">Council operational character:</text:span></text:h>
      <text:list text:style-name="L8">
        <text:list-item>
          <text:p text:style-name="P20"><text:span text:style-name="Strong_20_Emphasis">Quarterly formal meetings</text:span> at Sarrasine's Vaucluse mansion with all seven members attending. Sarrasine attends in approximately 30% of quarterly meetings (institutional delegation to Council Speaker for routine quarterly meetings; direct Sarrasine attendance during chronicle-active periods) </text:p>
        </text:list-item>
        <text:list-item>
          <text:p text:style-name="P20"><text:span text:style-name="Strong_20_Emphasis">Monthly Council operational coordination</text:span> without Sarrasine direct attendance — Council Speaker chairs monthly coordination across continuing operational requirements </text:p>
        </text:list-item>
        <text:list-item>
          <text:p text:style-name="P20"><text:span text:style-name="Strong_20_Emphasis">Junior apprentice infrastructure</text:span> — each Councillor maintains 1-3 junior apprentices producing continuing Council institutional cooperation infrastructure (Harrison Oyelaran-Chau in Scenario 2 is Drummond-Hayes's apprentice; Emily Walsh-Tarrant referenced in Scenario 3 is Drummond-Hayes's parallel apprentice in Tremere clan-specialty positioning) </text:p>
        </text:list-item>
        <text:list-item>
          <text:p text:style-name="P20"><text:span text:style-name="Strong_20_Emphasis">Total Council institutional infrastructure</text:span> — 7 Council members + ~14 junior apprentices = ~21 Sabbat-tolerated Sydney institutional operatives plus continuing supportive ghouled-mortal-network infrastructure </text:p>
        </text:list-item>
        <text:list-item>
          <text:p text:style-name="P19"><text:span text:style-name="Strong_20_Emphasis">Operational scope</text:span> below Vaucluse Five — Council operates Sydney institutional administration; Vaucluse Five operates continental cross-sect institutional executive operations. The two structures operate as complementary infrastructure rather than as competing institutional positioning </text:p>
        </text:list-item>
      </text:list>
      <text:h text:style-name="Heading_20_3" text:outline-level="3"><text:span text:style-name="Strong_20_Emphasis">Council internal dynamics:</text:span></text:h>
      <text:list text:style-name="L9">
        <text:list-item>
          <text:p text:style-name="P22"><text:span text:style-name="Strong_20_Emphasis">Octavia Rosenthal-Bridges (Council Speaker)</text:span> holds longest Council tenure (89 years) and operates as continuing institutional administration coordinator with Sarrasine's continuing institutional cooperation. Her Council Speaker positioning is renewed annually through Council institutional protocol; the renewal has occurred without contestation across her 89-year continuing tenure </text:p>
        </text:list-item>
        <text:list-item>
          <text:p text:style-name="P22"><text:soft-page-break/><text:span text:style-name="Strong_20_Emphasis">Phase Two continental operation pre-positioning</text:span> has produced acute Council operational pressure during 2024-2025 with operational requirements that exceed standard quarterly Council operational tempo. Drummond-Hayes's 30-day Singapore continental operation (Scenario 2 opening) represents one of multiple Council member continental travel operations during the chronicle-active period </text:p>
        </text:list-item>
        <text:list-item>
          <text:p text:style-name="P21"><text:span text:style-name="Strong_20_Emphasis">Continental cross-sect cooperation</text:span> through Catherine Featherstone-Liu's External-Relations Councillor positioning — provides continuing institutional cooperation with Vaucluse Five cross-sect correspondence operations at Council operational scale </text:p>
        </text:list-item>
      </text:list>
      <text:h text:style-name="Heading_20_3" text:outline-level="3"><text:span text:style-name="Strong_20_Emphasis">Chronicle hook integration:</text:span></text:h>
      <table:table table:name="Table4" table:style-name="Table4">
        <table:table-column table:style-name="Table4.A"/>
        <table:table-column table:style-name="Table4.B"/>
        <table:table-header-rows>
          <table:table-row>
            <table:table-cell table:style-name="Table4.A1" office:value-type="string">
              <text:p text:style-name="Table_20_Heading">Chronicle scope</text:p>
            </table:table-cell>
            <table:table-cell table:style-name="Table4.A1" office:value-type="string">
              <text:p text:style-name="Table_20_Heading">Council engagement</text:p>
            </table:table-cell>
          </table:table-row>
        </table:table-header-rows>
        <table:table-row>
          <table:table-cell table:style-name="Table4.A1" office:value-type="string">
            <text:p text:style-name="Table_20_Contents"><text:span text:style-name="Strong_20_Emphasis">Junior Council apprentice chronicle</text:span></text:p>
          </table:table-cell>
          <table:table-cell table:style-name="Table4.A1" office:value-type="string">
            <text:p text:style-name="Table_20_Contents">{{user}} cultivation under specific Councillor (Harrison Oyelaran-Chau template)</text:p>
          </table:table-cell>
        </table:table-row>
        <table:table-row>
          <table:table-cell table:style-name="Table4.A1" office:value-type="string">
            <text:p text:style-name="Table_20_Contents"><text:span text:style-name="Strong_20_Emphasis">Council member chronicle</text:span></text:p>
          </table:table-cell>
          <table:table-cell table:style-name="Table4.A1" office:value-type="string">
            <text:p text:style-name="Table_20_Contents">{{user}} as senior continental Sydney institutional administration operative</text:p>
          </table:table-cell>
        </table:table-row>
        <table:table-row>
          <table:table-cell table:style-name="Table4.A1" office:value-type="string">
            <text:p text:style-name="Table_20_Contents"><text:span text:style-name="Strong_20_Emphasis">Council institutional crisis chronicle</text:span></text:p>
          </table:table-cell>
          <table:table-cell table:style-name="Table4.A1" office:value-type="string">
            <text:p text:style-name="Table_20_Contents">Phase Two operational pressure producing Council institutional reorganisation</text:p>
          </table:table-cell>
        </table:table-row>
        <table:table-row>
          <table:table-cell table:style-name="Table4.A1" office:value-type="string">
            <text:p text:style-name="Table_20_Contents"><text:span text:style-name="Strong_20_Emphasis">Council-Vaucluse-Five interface chronicle</text:span></text:p>
          </table:table-cell>
          <table:table-cell table:style-name="Table4.A1" office:value-type="string">
            <text:p text:style-name="Table_20_Contents">{{user}} positioning at Council-Vaucluse-Five operational interface</text:p>
          </table:table-cell>
        </table:table-row>
      </table:table>
      <text:p text:style-name="P2"/>
      <text:p text:style-name="P2"/>
      <text:p text:style-name="P3"><text:span text:style-name="T1">The Three </text:span>Anarch-tolerated <text:span text:style-name="T1">O</text:span>peratives</text:p>
      <text:p text:style-name="P3"/>
      <text:p text:style-name="P33"><text:span text:style-name="Strong_20_Emphasis">Coterie type:</text:span> Informal coterie of irregular-Embrace Anarch-tolerated operatives operating outside formal Sydney institutional infrastructure<text:line-break/><text:span text:style-name="Strong_20_Emphasis">Established:</text:span> Informally constituted around 2018 through accumulating operational cooperation among the three operatives<text:line-break/><text:span text:style-name="Strong_20_Emphasis">Continuing tenure:</text:span> ~7 years informal coterie tenure with varying individual operative tenures<text:line-break/><text:span text:style-name="Strong_20_Emphasis">Composition:</text:span> Three Anarch-tolerated operatives operating in distinct Sydney geographic territories under Sarrasine's continuing minimum-institutional tolerance</text:p>
      <text:p text:style-name="Text_20_body">The three Anarch-tolerated operatives form an informal coterie operating at minimum-institutional cooperation scale outside formal Sydney institutional infrastructure. Their continuing positioning under Sarrasine's tolerance produces chronicle-active opportunity for Anarch-Movement-mode chronicle work within continental Sydney operational scope that single-city Anarch chronicles do not generate at equivalent continental scale.</text:p>
      <text:h text:style-name="Heading_20_3" text:outline-level="3"><text:span text:style-name="Strong_20_Emphasis">Member 1: Reggie Blackburn-Omar</text:span> (full character build in Scenario 3)</text:h>
      <text:list text:style-name="L10">
        <text:list-item>
          <text:p text:style-name="P24"><text:span text:style-name="Strong_20_Emphasis">Clan / generation / tenure:</text:span> Brujah, 11th gen, 8 years Embraced (2017 irregular Embrace) </text:p>
        </text:list-item>
        <text:list-item>
          <text:p text:style-name="P24"><text:span text:style-name="Strong_20_Emphasis">Geographic territory:</text:span> Newtown-Marrickville </text:p>
        </text:list-item>
        <text:list-item>
          <text:p text:style-name="P24"><text:span text:style-name="Strong_20_Emphasis">Operational character:</text:span> Aboriginal-Lebanese working-class community-organising positioning; pre-Embrace community-organising formation with continuing post-Embrace community-organising operational continuity </text:p>
        </text:list-item>
        <text:list-item>
          <text:p text:style-name="P23"><text:span text:style-name="Strong_20_Emphasis">Internal positioning:</text:span> The newest of the three operatives; provides community-organising operational specialty plus working-class cultural register that distinguishes him from the other two members </text:p>
        </text:list-item>
      </text:list>
      <text:h text:style-name="Heading_20_3" text:outline-level="3"><text:soft-page-break/><text:span text:style-name="Strong_20_Emphasis">Member 2: Veronica Saxon-Harper</text:span></text:h>
      <text:list text:style-name="L11">
        <text:list-item>
          <text:p text:style-name="P26"><text:span text:style-name="Strong_20_Emphasis">Clan / generation / tenure:</text:span> Brujah, 10th gen, 9 years Embraced (2016 irregular Embrace) </text:p>
        </text:list-item>
        <text:list-item>
          <text:p text:style-name="P26"><text:span text:style-name="Strong_20_Emphasis">Geographic territory:</text:span> Glebe-Annandale </text:p>
        </text:list-item>
        <text:list-item>
          <text:p text:style-name="P26"><text:span text:style-name="Strong_20_Emphasis">Background:</text:span> Veronica was born 1986 in Sydney to Anglo-Australian academic-professional parents, completed mortal academic study at the University of Sydney in political science, and worked at a Sydney-area progressive-political-advocacy organisation when an Anarch Brujah operative passing through Sydney in 2016 identified her as appropriate Embrace candidate. The Embrace was conducted without Sarrasine authorisation; the Embracing operative departed Sydney within months and has not returned </text:p>
        </text:list-item>
        <text:list-item>
          <text:p text:style-name="P26"><text:span text:style-name="Strong_20_Emphasis">Apparent age:</text:span> 31, she/her pronouns. Medium-height (167cm), short-cropped reddish-brown hair, sharp grey-green eyes with continuing Anarch operational awareness. Dresses in functional Glebe progressive-political appropriate attire — second-hand clothing, modest jewelry, no institutional accessories </text:p>
        </text:list-item>
        <text:list-item>
          <text:p text:style-name="P26"><text:span text:style-name="Strong_20_Emphasis">Disciplines:</text:span> Celerity 2, Potence 2, Presence 2 </text:p>
        </text:list-item>
        <text:list-item>
          <text:p text:style-name="P26"><text:span text:style-name="Strong_20_Emphasis">Operational character:</text:span> Glebe-area political-advocacy positioning; pre-Embrace progressive-political formation with continuing post-Embrace political-advocacy operational continuity through specific Glebe-area progressive-political mortal-network cooperation infrastructure </text:p>
        </text:list-item>
        <text:list-item>
          <text:p text:style-name="P25"><text:span text:style-name="Strong_20_Emphasis">Internal positioning:</text:span> The most operationally cautious of the three members — her continuing 9-year tolerance under Sarrasine has produced continuing operational caution that approaches standard institutional formality without crossing into formal institutional positioning. Provides the coterie's continuing operational-stability anchor </text:p>
        </text:list-item>
      </text:list>
      <text:h text:style-name="Heading_20_3" text:outline-level="3"><text:span text:style-name="Strong_20_Emphasis">Member 3: Marcus "Ratchet" Aleksandar-Velez</text:span></text:h>
      <text:list text:style-name="L12">
        <text:list-item>
          <text:p text:style-name="P28"><text:span text:style-name="Strong_20_Emphasis">Clan / generation / tenure:</text:span> Caitiff, 12 years Embraced (2013 irregular Embrace during brief continental Anarch operation in Sydney) </text:p>
        </text:list-item>
        <text:list-item>
          <text:p text:style-name="P28"><text:span text:style-name="Strong_20_Emphasis">Geographic territory:</text:span> Surry Hills-Redfern </text:p>
        </text:list-item>
        <text:list-item>
          <text:p text:style-name="P28"><text:span text:style-name="Strong_20_Emphasis">Background:</text:span> Marcus was born 1985 in Sydney to Croatian-Mexican working-class parents, completed limited mortal academic study at TAFE (vocational mechanical-engineering training), and worked as a mechanic at a Surry Hills auto-repair shop when an Anarch operative whose clan affiliation Marcus has never confirmed conducted an irregular Embrace during a 2013 brief continental Anarch operation in Sydney. The Embracing operative departed within days; Marcus has been Caitiff (no clan affiliation) for the entirety of his 12-year post-Embrace tenure — the irregular Embrace did not produce clan-disciplinary inheritance that standard Embraces produce, leaving him with no formal clan identity. He remains the most senior of the three operatives by tenure but the most institutionally vulnerable through Caitiff status </text:p>
        </text:list-item>
        <text:list-item>
          <text:p text:style-name="P28"><text:span text:style-name="Strong_20_Emphasis">Apparent age:</text:span> 28, he/him pronouns. Medium-height (172cm), close-cropped dark hair, sharp dark brown eyes with continuing Anarch operational awareness. Dresses in functional working-class attire with motorcycle-mechanic operational appropriate inflections. Carries a worn toolkit that operates as continuing pre-Embrace mortal-life operational anchor plus a small Croatian-Mexican mixed-cultural pendant from his pre-Embrace mortal family infrastructure </text:p>
        </text:list-item>
        <text:list-item>
          <text:p text:style-name="P28"><text:span text:style-name="Strong_20_Emphasis">Disciplines:</text:span> Auspex 1, Celerity 1, Potence 2 (Caitiff variable disciplinary loadout developed through continuing operational adaptation rather than through clan-traditional cultivation) </text:p>
        </text:list-item>
        <text:list-item>
          <text:p text:style-name="P28"><text:soft-page-break/><text:span text:style-name="Strong_20_Emphasis">Operational character:</text:span> Surry Hills-Redfern motorcycle-mechanic-and-mechanical-engineering positioning; provides the coterie's continuing physical-infrastructure operational specialty including vehicle maintenance, mechanical-engineering operational support, and continuing Surry Hills-Redfern working-class mortal-network cooperation infrastructure </text:p>
        </text:list-item>
        <text:list-item>
          <text:p text:style-name="P27"><text:span text:style-name="Strong_20_Emphasis">Internal positioning:</text:span> The longest-tenured of the three operatives by Embrace age but the most institutionally vulnerable through Caitiff status. Provides continuing physical-infrastructure operational specialty that the other two members do not match </text:p>
        </text:list-item>
      </text:list>
      <text:h text:style-name="Heading_20_3" text:outline-level="3"><text:span text:style-name="Strong_20_Emphasis">Coterie operational character:</text:span></text:h>
      <text:list text:style-name="L13">
        <text:list-item>
          <text:p text:style-name="P30"><text:span text:style-name="Strong_20_Emphasis">Informal cooperation patterns</text:span> — the three operatives meet informally approximately monthly at rotating Sydney working-class venues (typically Newtown-area pubs that operate as continuing Anarch-tolerated meeting infrastructure under continuing minimum-Council-surveillance positioning). The meetings operate at continuing informal institutional formality scale — no formal protocols, no structured agenda, continuing peer-cooperation institutional character </text:p>
        </text:list-item>
        <text:list-item>
          <text:p text:style-name="P30"><text:span text:style-name="Strong_20_Emphasis">Mutual operational support</text:span> — each operative provides continuing operational support for the other two within their respective geographic territories. Reggie's community-organising mortal-network infrastructure, Veronica's political-advocacy mortal-network infrastructure, and Marcus's physical-infrastructure operational specialty produce continuing complementary operational support across continuing 7-year informal coterie tenure </text:p>
        </text:list-item>
        <text:list-item>
          <text:p text:style-name="P29"><text:span text:style-name="Strong_20_Emphasis">Sarrasine tolerance maintenance</text:span> — the coterie operates under continuing minimum-institutional tolerance with continuing operational constraints that the three operatives navigate through continuing collective operational caution. The tolerance has not been formally renewed across continuing 7-year informal coterie tenure but has continued through continuing minimum-institutional operational performance </text:p>
        </text:list-item>
      </text:list>
      <text:h text:style-name="Heading_20_3" text:outline-level="3"><text:span text:style-name="Strong_20_Emphasis">Chronicle-active 2025-2026 dynamics:</text:span></text:h>
      <text:list text:style-name="L14">
        <text:list-item>
          <text:p text:style-name="P32"><text:span text:style-name="Strong_20_Emphasis">Phase Two continental operation pre-positioning</text:span> has produced operational scrutiny that exceeds standard Anarch-tolerated operational tempo. The Sydney Council direct engagement with Reggie (Scenario 3 opening) represents the first formal Council institutional engagement with any of the three operatives across continuing 7-year informal coterie tenure </text:p>
        </text:list-item>
        <text:list-item>
          <text:p text:style-name="P31"><text:span text:style-name="Strong_20_Emphasis">Potential institutional formalisation</text:span> — if Reggie accepts the Council cooperation proposal, the formalisation may produce institutional positioning implications for Veronica and Marcus at parallel scale. The potential formalisation would represent unprecedented continental Sydney Anarch-tolerated institutional positioning that single-city Anarch chronicles do not generate at equivalent continental scale </text:p>
        </text:list-item>
      </text:list>
      <text:h text:style-name="Heading_20_3" text:outline-level="3"><text:span text:style-name="Strong_20_Emphasis">Chronicle hook integration:</text:span></text:h>
      <table:table table:name="Table5" table:style-name="Table5">
        <table:table-column table:style-name="Table5.A"/>
        <table:table-column table:style-name="Table5.B"/>
        <table:table-header-rows>
          <table:table-row>
            <table:table-cell table:style-name="Table5.A1" office:value-type="string">
              <text:p text:style-name="Table_20_Heading">Chronicle scope</text:p>
            </table:table-cell>
            <table:table-cell table:style-name="Table5.A1" office:value-type="string">
              <text:p text:style-name="Table_20_Heading">Three-operative engagement</text:p>
            </table:table-cell>
          </table:table-row>
        </table:table-header-rows>
        <table:table-row>
          <table:table-cell table:style-name="Table5.A1" office:value-type="string">
            <text:p text:style-name="Table_20_Contents"><text:span text:style-name="Strong_20_Emphasis">Single-operative chronicle</text:span></text:p>
          </table:table-cell>
          <table:table-cell table:style-name="Table5.A1" office:value-type="string">
            <text:p text:style-name="Table_20_Contents">{{user}} as one of the three operatives at Anarch-tolerated continental scope</text:p>
          </table:table-cell>
        </table:table-row>
        <table:table-row>
          <table:table-cell table:style-name="Table5.A1" office:value-type="string">
            <text:p text:style-name="Table_20_Contents"><text:span text:style-name="Strong_20_Emphasis">Coterie chronicle</text:span></text:p>
          </table:table-cell>
          <table:table-cell table:style-name="Table5.A1" office:value-type="string">
            <text:p text:style-name="Table_20_Contents">{{user}} positioning across all three operatives' continuing informal cooperation infrastructure</text:p>
          </table:table-cell>
        </table:table-row>
        <table:table-row>
          <table:table-cell table:style-name="Table5.A1" office:value-type="string">
            <text:p text:style-name="Table_20_Contents"><text:span text:style-name="Strong_20_Emphasis">Council institutional </text:span><text:soft-page-break/><text:span text:style-name="Strong_20_Emphasis">engagement chronicle</text:span></text:p>
          </table:table-cell>
          <table:table-cell table:style-name="Table5.A1" office:value-type="string">
            <text:p text:style-name="Table_20_Contents">Three-operative response to Phase Two pre-positioning institutional <text:soft-page-break/>engagement (parallel to Scenario 3)</text:p>
          </table:table-cell>
        </table:table-row>
        <table:table-row>
          <table:table-cell table:style-name="Table5.A1" office:value-type="string">
            <text:p text:style-name="Table_20_Contents"><text:span text:style-name="Strong_20_Emphasis">Cross-Anarch continental chronicle</text:span></text:p>
          </table:table-cell>
          <table:table-cell table:style-name="Table5.A1" office:value-type="string">
            <text:p text:style-name="Table_20_Contents">Three-operative continental cooperation with Footscray Crew through continuing Anarch Movement institutional cooperation infrastructure</text:p>
          </table:table-cell>
        </table:table-row>
      </table:table>
      <text:p text:style-name="P3"/>
      <text:p text:style-name="P3"/>
      <text:p text:style-name="P3"><text:span text:style-name="T1">The Newtown </text:span>Tremere <text:span text:style-name="T1">C</text:span>hantry</text:p>
      <text:p text:style-name="P3"/>
      <text:p text:style-name="P33"><text:span text:style-name="Strong_20_Emphasis">Coterie type:</text:span> Tremere chantry operating under continuing Sarrasine accommodation arrangement<text:line-break/><text:span text:style-name="Strong_20_Emphasis">Established:</text:span> 1962 in Newtown<text:line-break/><text:span text:style-name="Strong_20_Emphasis">Continuing tenure:</text:span> 63 years<text:line-break/><text:span text:style-name="Strong_20_Emphasis">Composition:</text:span> Seven Tremere operatives operating Newtown chantry institutional infrastructure under Doctor Baudin's continuing chantry leadership</text:p>
      <text:p text:style-name="Text_20_body">The Newtown Tremere chantry operates under specific minimum-institutional accommodation arrangement with Sarrasine — the chantry is permitted Sydney operational positioning under continuing operational constraints including prohibition on direct operations against Sydney institutional infrastructure and obligation to provide intelligence cooperation when Sarrasine institutional infrastructure requires it. The arrangement has continued since 1962 chantry establishment and operates as one of continental Sydney's continuing minimum-institutional cooperation infrastructure arrangements that distinguishes Sydney operational character from continental Camarilla-orthodox Sydney expectations.</text:p>
      <text:h text:style-name="Heading_20_3" text:outline-level="3"><text:span text:style-name="Strong_20_Emphasis">Chantry membership at-a-glance:</text:span></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Position</text:p>
            </table:table-cell>
            <table:table-cell table:style-name="Table6.A1" office:value-type="string">
              <text:p text:style-name="Table_20_Heading">Holder</text:p>
            </table:table-cell>
            <table:table-cell table:style-name="Table6.A1" office:value-type="string">
              <text:p text:style-name="Table_20_Heading">Clan / Generation</text:p>
            </table:table-cell>
            <table:table-cell table:style-name="Table6.A1" office:value-type="string">
              <text:p text:style-name="Table_20_Heading">Tenure</text:p>
            </table:table-cell>
            <table:table-cell table:style-name="Table6.A1" office:value-type="string">
              <text:p text:style-name="Table_20_Heading">Operational specialty</text:p>
            </table:table-cell>
          </table:table-row>
        </table:table-header-rows>
        <table:table-row>
          <table:table-cell table:style-name="Table6.A1" office:value-type="string">
            <text:p text:style-name="Table_20_Contents"><text:span text:style-name="Strong_20_Emphasis">Chantry Leader</text:span></text:p>
          </table:table-cell>
          <table:table-cell table:style-name="Table6.A1" office:value-type="string">
            <text:p text:style-name="Table_20_Contents">Doctor Baudin</text:p>
          </table:table-cell>
          <table:table-cell table:style-name="Table6.A1" office:value-type="string">
            <text:p text:style-name="Table_20_Contents">Tremere, generation uncertain</text:p>
          </table:table-cell>
          <table:table-cell table:style-name="Table6.A1" office:value-type="string">
            <text:p text:style-name="Table_20_Contents">Pre-1962 (uncertain)</text:p>
          </table:table-cell>
          <table:table-cell table:style-name="Table6.A1" office:value-type="string">
            <text:p text:style-name="Table_20_Contents">Continuing chantry institutional administration</text:p>
          </table:table-cell>
        </table:table-row>
        <table:table-row>
          <table:table-cell table:style-name="Table6.A1" office:value-type="string">
            <text:p text:style-name="Table_20_Contents"><text:span text:style-name="Strong_20_Emphasis">Senior Operative</text:span></text:p>
          </table:table-cell>
          <table:table-cell table:style-name="Table6.A1" office:value-type="string">
            <text:p text:style-name="Table_20_Contents">Christine Wallace-Ng</text:p>
          </table:table-cell>
          <table:table-cell table:style-name="Table6.A1" office:value-type="string">
            <text:p text:style-name="Table_20_Contents">Tremere, 9th gen</text:p>
          </table:table-cell>
          <table:table-cell table:style-name="Table6.A1" office:value-type="string">
            <text:p text:style-name="Table_20_Contents">38 years</text:p>
          </table:table-cell>
          <table:table-cell table:style-name="Table6.A1" office:value-type="string">
            <text:p text:style-name="Table_20_Contents">Continental cross-sect Tremere institutional cooperation</text:p>
          </table:table-cell>
        </table:table-row>
        <table:table-row>
          <table:table-cell table:style-name="Table6.A1" office:value-type="string">
            <text:p text:style-name="Table_20_Contents"><text:span text:style-name="Strong_20_Emphasis">Senior Operative</text:span></text:p>
          </table:table-cell>
          <table:table-cell table:style-name="Table6.A1" office:value-type="string">
            <text:p text:style-name="Table_20_Contents">Edward Petrick-Yamamoto</text:p>
          </table:table-cell>
          <table:table-cell table:style-name="Table6.A1" office:value-type="string">
            <text:p text:style-name="Table_20_Contents">Tremere, 10th gen</text:p>
          </table:table-cell>
          <table:table-cell table:style-name="Table6.A1" office:value-type="string">
            <text:p text:style-name="Table_20_Contents">29 years</text:p>
          </table:table-cell>
          <table:table-cell table:style-name="Table6.A1" office:value-type="string">
            <text:p text:style-name="Table_20_Contents">Pharmaceutical-research and biotech-infrastructure cooperation</text:p>
          </table:table-cell>
        </table:table-row>
        <table:table-row>
          <table:table-cell table:style-name="Table6.A1" office:value-type="string">
            <text:p text:style-name="Table_20_Contents"><text:span text:style-name="Strong_20_Emphasis">Junior Operative</text:span></text:p>
          </table:table-cell>
          <table:table-cell table:style-name="Table6.A1" office:value-type="string">
            <text:p text:style-name="Table_20_Contents">Astrid Fenwick-Leroy</text:p>
          </table:table-cell>
          <table:table-cell table:style-name="Table6.A1" office:value-type="string">
            <text:p text:style-name="Table_20_Contents">Tremere, 11th gen</text:p>
          </table:table-cell>
          <table:table-cell table:style-name="Table6.A1" office:value-type="string">
            <text:p text:style-name="Table_20_Contents">11 years</text:p>
          </table:table-cell>
          <table:table-cell table:style-name="Table6.A1" office:value-type="string">
            <text:p text:style-name="Table_20_Contents">Pharmaceutical-research junior operative (Scenario 4 character)</text:p>
          </table:table-cell>
        </table:table-row>
        <table:table-row>
          <table:table-cell table:style-name="Table6.A1" office:value-type="string">
            <text:p text:style-name="Table_20_Contents"><text:span text:style-name="Strong_20_Emphasis">Junior Operative</text:span></text:p>
          </table:table-cell>
          <table:table-cell table:style-name="Table6.A1" office:value-type="string">
            <text:p text:style-name="Table_20_Contents">Aaron Kowalski-Brennan</text:p>
          </table:table-cell>
          <table:table-cell table:style-name="Table6.A1" office:value-type="string">
            <text:p text:style-name="Table_20_Contents">Tremere, 11th gen</text:p>
          </table:table-cell>
          <table:table-cell table:style-name="Table6.A1" office:value-type="string">
            <text:p text:style-name="Table_20_Contents">16 years</text:p>
          </table:table-cell>
          <table:table-cell table:style-name="Table6.A1" office:value-type="string">
            <text:p text:style-name="Table_20_Contents">Continental occult-investigation specialty</text:p>
          </table:table-cell>
        </table:table-row>
        <table:table-row>
          <table:table-cell table:style-name="Table6.A1" office:value-type="string">
            <text:p text:style-name="Table_20_Contents"><text:span text:style-name="Strong_20_Emphasis">Junior Operative</text:span></text:p>
          </table:table-cell>
          <table:table-cell table:style-name="Table6.A1" office:value-type="string">
            <text:p text:style-name="Table_20_Contents">Priya Lal-Crawford</text:p>
          </table:table-cell>
          <table:table-cell table:style-name="Table6.A1" office:value-type="string">
            <text:p text:style-name="Table_20_Contents">Tremere, 11th gen</text:p>
          </table:table-cell>
          <table:table-cell table:style-name="Table6.A1" office:value-type="string">
            <text:p text:style-name="Table_20_Contents">9 years</text:p>
          </table:table-cell>
          <table:table-cell table:style-name="Table6.A1" office:value-type="string">
            <text:p text:style-name="Table_20_Contents">Continental Sydney University academic-cooperation infrastructure</text:p>
          </table:table-cell>
        </table:table-row>
        <table:table-row>
          <table:table-cell table:style-name="Table6.A1" office:value-type="string">
            <text:p text:style-name="Table_20_Contents"><text:span text:style-name="Strong_20_Emphasis">Junior Operative</text:span></text:p>
          </table:table-cell>
          <table:table-cell table:style-name="Table6.A1" office:value-type="string">
            <text:p text:style-name="Table_20_Contents">Theodore Marston-Wei</text:p>
          </table:table-cell>
          <table:table-cell table:style-name="Table6.A1" office:value-type="string">
            <text:p text:style-name="Table_20_Contents">Tremere, 12th gen</text:p>
          </table:table-cell>
          <table:table-cell table:style-name="Table6.A1" office:value-type="string">
            <text:p text:style-name="Table_20_Contents">4 years</text:p>
          </table:table-cell>
          <table:table-cell table:style-name="Table6.A1" office:value-type="string">
            <text:p text:style-name="Table_20_Contents">Junior cultivation operative</text:p>
          </table:table-cell>
        </table:table-row>
      </table:table>
      <text:h text:style-name="Heading_20_3" text:outline-level="3"><text:span text:style-name="Strong_20_Emphasis">Doctor Baudin (Chantry Leader):</text:span></text:h>
      <text:list text:style-name="L15">
        <text:list-item>
          <text:p text:style-name="P35"><text:span text:style-name="Strong_20_Emphasis">Clan / generation:</text:span> Tremere, generation uncertain (his pre-1962 institutional history produces chronological-age uncertainty that he has not disclosed across continuing 63-year <text:soft-page-break/>Sydney chantry tenure) </text:p>
        </text:list-item>
        <text:list-item>
          <text:p text:style-name="P35"><text:span text:style-name="Strong_20_Emphasis">Apparent age:</text:span> 35, he/him pronouns. Tall (180cm), greying dark brown hair worn in deliberate continental academic-professional traditional styling, sharp dark brown eyes with significant Auspex precision developed across uncertain tenure </text:p>
        </text:list-item>
        <text:list-item>
          <text:p text:style-name="P35"><text:span text:style-name="Strong_20_Emphasis">Operational specialty:</text:span> Continuing chantry institutional administration plus continental cross-sect accommodation arrangement institutional cooperation </text:p>
        </text:list-item>
        <text:list-item>
          <text:p text:style-name="P35"><text:span text:style-name="Strong_20_Emphasis">Mystery dimension:</text:span> Doctor Baudin's pre-1962 institutional history is intentionally undisclosed — chronicle-significant institutional mystery that may emerge across chronicle arc as institutional positioning develops. His continuing operational character suggests senior continental Tremere institutional positioning at scale exceeding standard chantry-leader institutional positioning, but the specific scale and institutional context remain undisclosed </text:p>
        </text:list-item>
        <text:list-item>
          <text:p text:style-name="P34"><text:span text:style-name="Strong_20_Emphasis">Disciplines:</text:span> Auspex 5, Blood Sorcery 6 (advanced Tremere ritual practice infrastructure), Dominate 4, Fortitude 3, Presence 3 (senior Tremere chantry-leader loadout) </text:p>
        </text:list-item>
      </text:list>
      <text:h text:style-name="Heading_20_3" text:outline-level="3"><text:span text:style-name="Strong_20_Emphasis">Chantry operational character:</text:span></text:h>
      <text:list text:style-name="L16">
        <text:list-item>
          <text:p text:style-name="P37"><text:span text:style-name="Strong_20_Emphasis">The Newtown chantry building</text:span> operates from a converted late-Victorian terraced house on King Street that the chantry has occupied since 1962 establishment. The building includes continuing institutional infrastructure including ritual-practice chambers, continuing chantry library (substantial pre-1962 institutional library that Doctor Baudin transferred to Sydney during 1962 establishment producing continuing chronicle-significant institutional resource), continuing chantry feeding infrastructure (chantry-supplied bagged blood for junior operatives plus discreet feeding rooms for chantry institutional cooperation), and continuing administrative chambers </text:p>
        </text:list-item>
        <text:list-item>
          <text:p text:style-name="P37"><text:span text:style-name="Strong_20_Emphasis">Sarrasine accommodation arrangement</text:span> operates at continuing minimum-institutional cooperation scale with continuing intelligence-cooperation obligation activation as chronicle-active operational requirements emerge. The arrangement has produced continuing intelligence cooperation across continuing 63-year tenure including approximately 12 formal intelligence-cooperation events that the chantry has provided in response to Sarrasine institutional infrastructure operational requirements </text:p>
        </text:list-item>
        <text:list-item>
          <text:p text:style-name="P37"><text:span text:style-name="Strong_20_Emphasis">Continental Tremere institutional positioning</text:span> — the Newtown chantry operates within continuing global Tremere institutional infrastructure with continuing institutional reporting relationships to continental Tremere senior figures whose specific institutional positioning Doctor Baudin coordinates through continuing institutional protocols </text:p>
        </text:list-item>
        <text:list-item>
          <text:p text:style-name="P36"><text:span text:style-name="Strong_20_Emphasis">Cooperation with Vikas Chakraborty</text:span> at parallel continental Sydney Tremere institutional scale — Vikas operates Vaucluse Five Tremere institutional positioning while Doctor Baudin operates Newtown chantry Tremere institutional positioning. The two institutional positions operate complementary continental Sydney Tremere infrastructure rather than competing institutional positioning, with continuing institutional cooperation arrangements that have stabilised across continuing decades of parallel operational coordination </text:p>
        </text:list-item>
      </text:list>
      <text:h text:style-name="Heading_20_3" text:outline-level="3"><text:span text:style-name="Strong_20_Emphasis">Chronicle-active 2025-2026 dynamics:</text:span></text:h>
      <text:list text:style-name="L17">
        <text:list-item>
          <text:p text:style-name="P39"><text:span text:style-name="Strong_20_Emphasis">Phase Two continental operation pre-positioning</text:span> has activated continuing accommodation arrangement intelligence-cooperation obligation at chronicle-active scale (the operational requirement Doctor Baudin describes to Astrid in Scenario 4 opening <text:soft-page-break/>represents the first accommodation arrangement activation during Astrid's 11-year tenure) </text:p>
        </text:list-item>
        <text:list-item>
          <text:p text:style-name="P39"><text:span text:style-name="Strong_20_Emphasis">Pentex Magadon Australia intelligence-gathering operations</text:span> at chronicle-active scale through continuing pharmaceutical-research operational positioning produce cross-splat operational implications connecting continuing Pentex supplement operational infrastructure </text:p>
        </text:list-item>
        <text:list-item>
          <text:p text:style-name="P38"><text:span text:style-name="Strong_20_Emphasis">Continuing chronicle mystery</text:span> around Doctor Baudin's pre-1962 institutional history may emerge across chronicle arc producing chronicle-significant continental Tremere institutional implications </text:p>
        </text:list-item>
      </text:list>
      <text:h text:style-name="Heading_20_3" text:outline-level="3"><text:span text:style-name="Strong_20_Emphasis">Chronicle hook integration:</text:span></text:h>
      <table:table table:name="Table7" table:style-name="Table7">
        <table:table-column table:style-name="Table7.A"/>
        <table:table-column table:style-name="Table7.B"/>
        <table:table-header-rows>
          <table:table-row>
            <table:table-cell table:style-name="Table7.A1" office:value-type="string">
              <text:p text:style-name="Table_20_Heading">Chronicle scope</text:p>
            </table:table-cell>
            <table:table-cell table:style-name="Table7.A1" office:value-type="string">
              <text:p text:style-name="Table_20_Heading">Chantry engagement</text:p>
            </table:table-cell>
          </table:table-row>
        </table:table-header-rows>
        <table:table-row>
          <table:table-cell table:style-name="Table7.A1" office:value-type="string">
            <text:p text:style-name="Table_20_Contents"><text:span text:style-name="Strong_20_Emphasis">Junior chantry operative chronicle</text:span></text:p>
          </table:table-cell>
          <table:table-cell table:style-name="Table7.A1" office:value-type="string">
            <text:p text:style-name="Table_20_Contents">{{user}} cultivation under Doctor Baudin (Astrid Fenwick-Leroy template)</text:p>
          </table:table-cell>
        </table:table-row>
        <table:table-row>
          <table:table-cell table:style-name="Table7.A1" office:value-type="string">
            <text:p text:style-name="Table_20_Contents"><text:span text:style-name="Strong_20_Emphasis">Chantry institutional crisis chronicle</text:span></text:p>
          </table:table-cell>
          <table:table-cell table:style-name="Table7.A1" office:value-type="string">
            <text:p text:style-name="Table_20_Contents">Accommodation arrangement institutional pressure during Phase Two</text:p>
          </table:table-cell>
        </table:table-row>
        <table:table-row>
          <table:table-cell table:style-name="Table7.A1" office:value-type="string">
            <text:p text:style-name="Table_20_Contents"><text:span text:style-name="Strong_20_Emphasis">Continental Tremere chronicle</text:span></text:p>
          </table:table-cell>
          <table:table-cell table:style-name="Table7.A1" office:value-type="string">
            <text:p text:style-name="Table_20_Contents">Newtown chantry continental Tremere institutional positioning at chronicle-active scale</text:p>
          </table:table-cell>
        </table:table-row>
        <table:table-row>
          <table:table-cell table:style-name="Table7.A1" office:value-type="string">
            <text:p text:style-name="Table_20_Contents"><text:span text:style-name="Strong_20_Emphasis">Cross-splat Pentex chronicle</text:span></text:p>
          </table:table-cell>
          <table:table-cell table:style-name="Table7.A1" office:value-type="string">
            <text:p text:style-name="Table_20_Contents">Pharmaceutical-research operational positioning intersection with Pentex Magadon Australia operations</text:p>
          </table:table-cell>
        </table:table-row>
        <table:table-row>
          <table:table-cell table:style-name="Table7.A1" office:value-type="string">
            <text:p text:style-name="Table_20_Contents"><text:span text:style-name="Strong_20_Emphasis">Doctor Baudin mystery chronicle</text:span></text:p>
          </table:table-cell>
          <table:table-cell table:style-name="Table7.A1" office:value-type="string">
            <text:p text:style-name="Table_20_Contents">Pre-1962 institutional history emergence at chronicle-significant scale</text:p>
          </table:table-cell>
        </table:table-row>
      </table:table>
      <text:p text:style-name="P3"/>
      <text:p text:style-name="P3"/>
      <text:p text:style-name="P3"><text:span text:style-name="Strong_20_Emphasis">The Sydney scenarios and coterie pack are complete.</text:span> Five {{user}} character cards covering distinct Sydney chronicle starting positions across the city's institutional infrastructure (Vaucluse Five aspirant, Sydney Council apprentice, Anarch-tolerated operative, Tremere chantry apprentice, Sarrasine personal liaison), plus four coteries covering the full institutional structure under Sarrasine's continental authority (Vaucluse Five with all five core members fully built, Sydney Council with all seven members at-a-glance, Three Anarch-Tolerated Operatives with full builds for the two members beyond Reggie Blackburn-Omar, Newtown Tremere Chantry with full Doctor Baudin treatment plus chantry institutional 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21:52:03.674907943</dc:date>
    <meta:editing-duration>PT9M56S</meta:editing-duration>
    <meta:editing-cycles>1</meta:editing-cycles>
    <meta:generator>LibreOffice/24.2.7.2$Linux_X86_64 LibreOffice_project/420$Build-2</meta:generator>
    <meta:document-statistic meta:table-count="7" meta:image-count="0" meta:object-count="0" meta:page-count="13" meta:paragraph-count="290" meta:word-count="4177" meta:character-count="36590" meta:non-whitespace-character-count="32676"/>
  </office:meta>
</office:document-meta>
</file>