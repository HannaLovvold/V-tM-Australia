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122cm"/>
    </style:style>
    <style:style style:name="Table1.B" style:family="table-column">
      <style:table-column-properties style:column-width="1.91cm"/>
    </style:style>
    <style:style style:name="Table1.C" style:family="table-column">
      <style:table-column-properties style:column-width="3.662cm"/>
    </style:style>
    <style:style style:name="Table1.D" style:family="table-column">
      <style:table-column-properties style:column-width="4.029cm"/>
    </style:style>
    <style:style style:name="Table1.E" style:family="table-column">
      <style:table-column-properties style:column-width="4.27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371cm"/>
    </style:style>
    <style:style style:name="Table2.B" style:family="table-column">
      <style:table-column-properties style:column-width="3.985cm"/>
    </style:style>
    <style:style style:name="Table2.C" style:family="table-column">
      <style:table-column-properties style:column-width="2.348cm"/>
    </style:style>
    <style:style style:name="Table2.D" style:family="table-column">
      <style:table-column-properties style:column-width="2.757cm"/>
    </style:style>
    <style:style style:name="Table2.E" style:family="table-column">
      <style:table-column-properties style:column-width="5.54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923cm"/>
    </style:style>
    <style:style style:name="Table3.B" style:family="table-column">
      <style:table-column-properties style:column-width="4.535cm"/>
    </style:style>
    <style:style style:name="Table3.C" style:family="table-column">
      <style:table-column-properties style:column-width="8.543cm"/>
    </style:style>
    <style:style style:name="Table3.A1" style:family="table-cell">
      <style:table-cell-properties style:vertical-align="middle" fo:padding="0.049cm" fo:border="none"/>
    </style:style>
    <style:style style:name="P1" style:family="paragraph" style:parent-style-name="Preformatted_20_Text">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left="0cm" fo:margin-right="0cm" fo:text-indent="0cm" style:auto-text-indent="false"/>
    </style:style>
    <style:style style:name="T1" style:family="text">
      <style:text-properties fo:color="#f97583"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Sydney supplement treating the city as a playable Ministry/independent domain — distinct in register from Camarilla Melbourne's institutional politics or Sabbat Brisbane's military doctrine. Sydney is <text:span text:style-name="Strong_20_Emphasis">the methuselah's chess-board</text:span> — operating under the patient framework of a 1,470-year-old player whose moves cost decades to develop, whose tolerances are precise, whose domain is wealthy, well-managed, and quietly lethal.</text:p>
      <text:p text:style-name="Text_20_body"><text:span text:style-name="Strong_20_Emphasis">Distinctive features of Sydney:</text:span></text:p>
      <text:list text:style-name="L1">
        <text:list-item>
          <text:p text:style-name="P3"><text:span text:style-name="Strong_20_Emphasis">The only major Australian city under independent (non-Camarilla, non-Anarch, non-Sabbat) authority</text:span>, with operational characteristics no other continent-Kindred-city replicates </text:p>
        </text:list-item>
        <text:list-item>
          <text:p text:style-name="P3"><text:span text:style-name="Strong_20_Emphasis">Ministry / Setite tradition</text:span> as ambient register rather than as ideological foreground — Sarrasine's domain operates Ministry frameworks through Toreador-passing cover, producing distinctive cultural texture </text:p>
        </text:list-item>
        <text:list-item>
          <text:p text:style-name="P3"><text:span text:style-name="Strong_20_Emphasis">Wealth and stability</text:span> — Sydney is materially richer and more institutionally stable than Melbourne, partly because Sarrasine's patience produces fewer factional disruptions, partly because his methuselah-tier capabilities prevent operations that would produce continental-political damage </text:p>
        </text:list-item>
        <text:list-item>
          <text:p text:style-name="P3"><text:span text:style-name="Strong_20_Emphasis">Patient predation</text:span> — Sydney's Kindred culture treats feeding, manipulation, and political work on different timescales than Melbourne; what takes a decade in Camarilla Melbourne takes a century in Sarrasine's Sydney </text:p>
        </text:list-item>
        <text:list-item>
          <text:p text:style-name="P2"><text:span text:style-name="Strong_20_Emphasis">Cross-supernatural awareness without cooperation</text:span> — Sydney maintains formal correspondence with Glass Walker septs through Tomás Schreckenberg's residence in the city but does not participate in Cress Truce protocols beyond the modified 1888 Sarrasine-specific provisions </text:p>
        </text:list-item>
      </text:list>
      <text:p text:style-name="P1">A 16-entry lorebook (2 constant + 14 triggered) providing Sydney's geography, politics, court, and operational character. Designed to layer alongside <text:span text:style-name="Source_20_Text"><text:span text:style-name="T1">vtm_modern_nights.json</text:span></text:span>, <text:span text:style-name="Source_20_Text"><text:span text:style-name="T1">vtm_garou_diplomatic.json</text:span></text:span>, and optionally <text:span text:style-name="Source_20_Text"><text:span text:style-name="T1">vtm_melbourne_by_night.json</text:span></text:span> for chronicles spanning both cities.</text:p>
      <text:p text:style-name="P1"/>
      <text:p text:style-name="P1">load alongside <text:span text:style-name="Source_20_Text"><text:span text:style-name="T1">vtm_modern_nights.json</text:span></text:span> and ideally with <text:span text:style-name="Source_20_Text"><text:span text:style-name="T1">vtm_garou_diplomatic.json</text:span></text:span> for chronicles engaging Tomás Schreckenberg's residence arrange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District</text:p>
            </table:table-cell>
            <table:table-cell table:style-name="Table1.A1" office:value-type="string">
              <text:p text:style-name="Table_20_Heading">Status</text:p>
            </table:table-cell>
            <table:table-cell table:style-name="Table1.A1" office:value-type="string">
              <text:p text:style-name="Table_20_Heading">Authority</text:p>
            </table:table-cell>
            <table:table-cell table:style-name="Table1.A1" office:value-type="string">
              <text:p text:style-name="Table_20_Heading">Key NPCs</text:p>
            </table:table-cell>
            <table:table-cell table:style-name="Table1.A1" office:value-type="string">
              <text:p text:style-name="Table_20_Heading">Key Sites</text:p>
            </table:table-cell>
          </table:table-row>
        </table:table-header-rows>
        <table:table-row>
          <table:table-cell table:style-name="Table1.A1" office:value-type="string">
            <text:p text:style-name="Table_20_Contents"><text:span text:style-name="Strong_20_Emphasis">Sydney CBD</text:span></text:p>
          </table:table-cell>
          <table:table-cell table:style-name="Table1.A1" office:value-type="string">
            <text:p text:style-name="Table_20_Contents">Kindred Zone</text:p>
          </table:table-cell>
          <table:table-cell table:style-name="Table1.A1" office:value-type="string">
            <text:p text:style-name="Table_20_Contents">Sarrasine domain (institutional centre)</text:p>
          </table:table-cell>
          <table:table-cell table:style-name="Table1.A1" office:value-type="string">
            <text:p text:style-name="Table_20_Contents">Arabelle Whittaker-Drake, court attendees</text:p>
          </table:table-cell>
          <table:table-cell table:style-name="Table1.A1" office:value-type="string">
            <text:p text:style-name="Table_20_Contents">InterContinental Hotel, State Library NSW, Art Gallery NSW</text:p>
          </table:table-cell>
        </table:table-row>
        <table:table-row>
          <table:table-cell table:style-name="Table1.A1" office:value-type="string">
            <text:p text:style-name="Table_20_Contents"><text:span text:style-name="Strong_20_Emphasis">Vaucluse / Eastern Suburbs</text:span></text:p>
          </table:table-cell>
          <table:table-cell table:style-name="Table1.A1" office:value-type="string">
            <text:p text:style-name="Table_20_Contents">Kindred Zone</text:p>
          </table:table-cell>
          <table:table-cell table:style-name="Table1.A1" office:value-type="string">
            <text:p text:style-name="Table_20_Contents">Sarrasine domain (residential heart)</text:p>
          </table:table-cell>
          <table:table-cell table:style-name="Table1.A1" office:value-type="string">
            <text:p text:style-name="Table_20_Contents">Sarrasine, the Vaucluse Five</text:p>
          </table:table-cell>
          <table:table-cell table:style-name="Table1.A1" office:value-type="string">
            <text:p text:style-name="Table_20_Contents">Sarrasine's mansion, Tomás's Bellevue Hill residence</text:p>
          </table:table-cell>
        </table:table-row>
        <table:table-row>
          <table:table-cell table:style-name="Table1.A1" office:value-type="string">
            <text:p text:style-name="Table_20_Contents"><text:span text:style-name="Strong_20_Emphasis">Kings Cross / Inner East</text:span></text:p>
          </table:table-cell>
          <table:table-cell table:style-name="Table1.A1" office:value-type="string">
            <text:p text:style-name="Table_20_Contents">Kindred Zone</text:p>
          </table:table-cell>
          <table:table-cell table:style-name="Table1.A1" office:value-type="string">
            <text:p text:style-name="Table_20_Contents">Sarrasine domain (Anarch-tolerated)</text:p>
          </table:table-cell>
          <table:table-cell table:style-name="Table1.A1" office:value-type="string">
            <text:p text:style-name="Table_20_Contents">Nicky Vardan, Willow O'Brien, Leila Park-Wainwright</text:p>
          </table:table-cell>
          <table:table-cell table:style-name="Table1.A1" office:value-type="string">
            <text:p text:style-name="Table_20_Contents">Kings Cross venues, Darlinghurst cultural sites</text:p>
          </table:table-cell>
        </table:table-row>
        <table:table-row>
          <table:table-cell table:style-name="Table1.A1" office:value-type="string">
            <text:p text:style-name="Table_20_Contents"><text:span text:style-name="Strong_20_Emphasis">Chinatown / Haymarket / South</text:span></text:p>
          </table:table-cell>
          <table:table-cell table:style-name="Table1.A1" office:value-type="string">
            <text:p text:style-name="Table_20_Contents">Kindred Zone</text:p>
          </table:table-cell>
          <table:table-cell table:style-name="Table1.A1" office:value-type="string">
            <text:p text:style-name="Table_20_Contents">Sarrasine domain (Ministry-aligned)</text:p>
          </table:table-cell>
          <table:table-cell table:style-name="Table1.A1" office:value-type="string">
            <text:p text:style-name="Table_20_Contents">Vikas Chakraborty, Hektor Pietrovsky</text:p>
          </table:table-cell>
          <table:table-cell table:style-name="Table1.A1" office:value-type="string">
            <text:p text:style-name="Table_20_Contents">Golden Century, Capitol Theatre, Paddy's Markets</text:p>
          </table:table-cell>
        </table:table-row>
        <table:table-row>
          <table:table-cell table:style-name="Table1.A1" office:value-type="string">
            <text:p text:style-name="Table_20_Contents"><text:span text:style-name="Strong_20_Emphasis">Western Sydney / Outer Suburbs</text:span></text:p>
          </table:table-cell>
          <table:table-cell table:style-name="Table1.A1" office:value-type="string">
            <text:p text:style-name="Table_20_Contents">Kindred Zone</text:p>
          </table:table-cell>
          <table:table-cell table:style-name="Table1.A1" office:value-type="string">
            <text:p text:style-name="Table_20_Contents">Sarrasine domain (extended)</text:p>
          </table:table-cell>
          <table:table-cell table:style-name="Table1.A1" office:value-type="string">
            <text:p text:style-name="Table_20_Contents">Esteban Vargas-Akbar, others</text:p>
          </table:table-cell>
          <table:table-cell table:style-name="Table1.A1" office:value-type="string">
            <text:p text:style-name="Table_20_Contents">Parramatta operations, Westmead medical precinct</text:p>
          </table:table-cell>
        </table:table-row>
        <table:table-row>
          <table:table-cell table:style-name="Table1.A1" office:value-type="string">
            <text:p text:style-name="Table_20_Contents"><text:span text:style-name="Strong_20_Emphasis">Sydney Harbour</text:span></text:p>
          </table:table-cell>
          <table:table-cell table:style-name="Table1.A1" office:value-type="string">
            <text:p text:style-name="Table_20_Contents">Neutral Zone</text:p>
          </table:table-cell>
          <table:table-cell table:style-name="Table1.A1" office:value-type="string">
            <text:p text:style-name="Table_20_Contents">Cress Truce-modified</text:p>
          </table:table-cell>
          <table:table-cell table:style-name="Table1.A1" office:value-type="string">
            <text:p text:style-name="Table_20_Contents">Glass Walker scouts, harbour traffic</text:p>
          </table:table-cell>
          <table:table-cell table:style-name="Table1.A1" office:value-type="string">
            <text:p text:style-name="Table_20_Contents">The Heads, harbour ferry routes</text:p>
          </table:table-cell>
        </table:table-row>
        <table:table-row>
          <table:table-cell table:style-name="Table1.A1" office:value-type="string">
            <text:p text:style-name="Table_20_Contents"><text:span text:style-name="Strong_20_Emphasis">North Shore</text:span></text:p>
          </table:table-cell>
          <table:table-cell table:style-name="Table1.A1" office:value-type="string">
            <text:p text:style-name="Table_20_Contents">Kindred Zone</text:p>
          </table:table-cell>
          <table:table-cell table:style-name="Table1.A1" office:value-type="string">
            <text:p text:style-name="Table_20_Contents">Sarrasine domain (mature stable)</text:p>
          </table:table-cell>
          <table:table-cell table:style-name="Table1.A1" office:value-type="string">
            <text:p text:style-name="Table_20_Contents">Toreador-cultural operatives</text:p>
          </table:table-cell>
          <table:table-cell table:style-name="Table1.A1" office:value-type="string">
            <text:p text:style-name="Table_20_Contents">Sydney Opera House, Mosman residences</text:p>
          </table:table-cell>
        </table:table-row>
        <table:table-row>
          <table:table-cell table:style-name="Table1.A1" office:value-type="string">
            <text:p text:style-name="Table_20_Contents"><text:span text:style-name="Strong_20_Emphasis">Manly Heads</text:span></text:p>
          </table:table-cell>
          <table:table-cell table:style-name="Table1.A1" office:value-type="string">
            <text:p text:style-name="Table_20_Contents">Garou Zone</text:p>
          </table:table-cell>
          <table:table-cell table:style-name="Table1.A1" office:value-type="string">
            <text:p text:style-name="Table_20_Contents">Glass Walker</text:p>
          </table:table-cell>
          <table:table-cell table:style-name="Table1.A1" office:value-type="string">
            <text:p text:style-name="Table_20_Contents">Tomás's reconnaissance, sept scouts</text:p>
          </table:table-cell>
          <table:table-cell table:style-name="Table1.A1" office:value-type="string">
            <text:p text:style-name="Table_20_Contents">The Heads themselves</text:p>
          </table:table-cell>
        </table:table-row>
        <table:table-row>
          <table:table-cell table:style-name="Table1.A1" office:value-type="string">
            <text:p text:style-name="Table_20_Contents"><text:span text:style-name="Strong_20_Emphasis">Lane Cove / Ku-ring-gai Chase NPs</text:span></text:p>
          </table:table-cell>
          <table:table-cell table:style-name="Table1.A1" office:value-type="string">
            <text:p text:style-name="Table_20_Contents">Garou Zone</text:p>
          </table:table-cell>
          <table:table-cell table:style-name="Table1.A1" office:value-type="string">
            <text:p text:style-name="Table_20_Contents">Glass Walker</text:p>
          </table:table-cell>
          <table:table-cell table:style-name="Table1.A1" office:value-type="string">
            <text:p text:style-name="Table_20_Contents">Sept patrols</text:p>
          </table:table-cell>
          <table:table-cell table:style-name="Table1.A1" office:value-type="string">
            <text:p text:style-name="Table_20_Contents">Bushland reserves</text:p>
          </table:table-cell>
        </table:table-row>
        <table:table-row>
          <table:table-cell table:style-name="Table1.A1" office:value-type="string">
            <text:p text:style-name="Table_20_Contents"><text:span text:style-name="Strong_20_Emphasis">Royal Botanic Gardens</text:span></text:p>
          </table:table-cell>
          <table:table-cell table:style-name="Table1.A1" office:value-type="string">
            <text:p text:style-name="Table_20_Contents">Kindred Zone (special)</text:p>
          </table:table-cell>
          <table:table-cell table:style-name="Table1.A1" office:value-type="string">
            <text:p text:style-name="Table_20_Contents">Sarrasine personal</text:p>
          </table:table-cell>
          <table:table-cell table:style-name="Table1.A1" office:value-type="string">
            <text:p text:style-name="Table_20_Contents">Sarrasine occasional contemplation</text:p>
          </table:table-cell>
          <table:table-cell table:style-name="Table1.A1" office:value-type="string">
            <text:p text:style-name="Table_20_Contents">Mrs Macquarie's Chair (Sarrasine-Tomás meeting site)</text:p>
          </table:table-cell>
        </table:table-row>
      </table:table>
      <text:h text:style-name="Heading_20_3" text:outline-level="3"><text:span text:style-name="Strong_20_Emphasis">Sydney Council at a glance:</text:span></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Position</text:p>
            </table:table-cell>
            <table:table-cell table:style-name="Table2.A1" office:value-type="string">
              <text:p text:style-name="Table_20_Heading">Holder</text:p>
            </table:table-cell>
            <table:table-cell table:style-name="Table2.A1" office:value-type="string">
              <text:p text:style-name="Table_20_Heading">Clan (Public)</text:p>
            </table:table-cell>
            <table:table-cell table:style-name="Table2.A1" office:value-type="string">
              <text:p text:style-name="Table_20_Heading">Clan (Actual)</text:p>
            </table:table-cell>
            <table:table-cell table:style-name="Table2.A1" office:value-type="string">
              <text:p text:style-name="Table_20_Heading">Note</text:p>
            </table:table-cell>
          </table:table-row>
        </table:table-header-rows>
        <table:table-row>
          <table:table-cell table:style-name="Table2.A1" office:value-type="string">
            <text:p text:style-name="Table_20_Contents"><text:span text:style-name="Strong_20_Emphasis">Master of Sydney</text:span></text:p>
          </table:table-cell>
          <table:table-cell table:style-name="Table2.A1" office:value-type="string">
            <text:p text:style-name="Table_20_Contents">Sarrasine</text:p>
          </table:table-cell>
          <table:table-cell table:style-name="Table2.A1" office:value-type="string">
            <text:p text:style-name="Table_20_Contents">Toreador (cover)</text:p>
          </table:table-cell>
          <table:table-cell table:style-name="Table2.A1" office:value-type="string">
            <text:p text:style-name="Table_20_Contents">Ministry / Setite</text:p>
          </table:table-cell>
          <table:table-cell table:style-name="Table2.A1" office:value-type="string">
            <text:p text:style-name="Table_20_Contents">137 years domain authority</text:p>
          </table:table-cell>
        </table:table-row>
        <table:table-row>
          <table:table-cell table:style-name="Table2.A1" office:value-type="string">
            <text:p text:style-name="Table_20_Contents"><text:span text:style-name="Strong_20_Emphasis">Council</text:span></text:p>
          </table:table-cell>
          <table:table-cell table:style-name="Table2.A1" office:value-type="string">
            <text:p text:style-name="Table_20_Contents">Arabelle Whittaker-Drake</text:p>
          </table:table-cell>
          <table:table-cell table:style-name="Table2.A1" office:value-type="string">
            <text:p text:style-name="Table_20_Contents">Toreador</text:p>
          </table:table-cell>
          <table:table-cell table:style-name="Table2.A1" office:value-type="string">
            <text:p text:style-name="Table_20_Contents">Toreador (genuine)</text:p>
          </table:table-cell>
          <table:table-cell table:style-name="Table2.A1" office:value-type="string">
            <text:p text:style-name="Table_20_Contents">Sarrasine's cultural deputy</text:p>
          </table:table-cell>
        </table:table-row>
        <table:table-row>
          <table:table-cell table:style-name="Table2.A1" office:value-type="string">
            <text:p text:style-name="Table_20_Contents"><text:span text:style-name="Strong_20_Emphasis">Council</text:span></text:p>
          </table:table-cell>
          <table:table-cell table:style-name="Table2.A1" office:value-type="string">
            <text:p text:style-name="Table_20_Contents">Doctor Philippe Baudin</text:p>
          </table:table-cell>
          <table:table-cell table:style-name="Table2.A1" office:value-type="string">
            <text:p text:style-name="Table_20_Contents">Tremere</text:p>
          </table:table-cell>
          <table:table-cell table:style-name="Table2.A1" office:value-type="string">
            <text:p text:style-name="Table_20_Contents">Tremere (genuine)</text:p>
          </table:table-cell>
          <table:table-cell table:style-name="Table2.A1" office:value-type="string">
            <text:p text:style-name="Table_20_Contents">Sydney chantry master, modified protocols</text:p>
          </table:table-cell>
        </table:table-row>
        <table:table-row>
          <table:table-cell table:style-name="Table2.A1" office:value-type="string">
            <text:p text:style-name="Table_20_Contents"><text:span text:style-name="Strong_20_Emphasis">Council</text:span></text:p>
          </table:table-cell>
          <table:table-cell table:style-name="Table2.A1" office:value-type="string">
            <text:p text:style-name="Table_20_Contents">Mistress Yasmin Ahmed-Cole</text:p>
          </table:table-cell>
          <table:table-cell table:style-name="Table2.A1" office:value-type="string">
            <text:p text:style-name="Table_20_Contents">Banu Haqim</text:p>
          </table:table-cell>
          <table:table-cell table:style-name="Table2.A1" office:value-type="string">
            <text:p text:style-name="Table_20_Contents">Banu Haqim (genuine)</text:p>
          </table:table-cell>
          <table:table-cell table:style-name="Table2.A1" office:value-type="string">
            <text:p text:style-name="Table_20_Contents">Judicial-enforcement specialist</text:p>
          </table:table-cell>
        </table:table-row>
        <table:table-row>
          <table:table-cell table:style-name="Table2.A1" office:value-type="string">
            <text:p text:style-name="Table_20_Contents"><text:span text:style-name="Strong_20_Emphasis">Council</text:span></text:p>
          </table:table-cell>
          <table:table-cell table:style-name="Table2.A1" office:value-type="string">
            <text:p text:style-name="Table_20_Contents">Brother Vikas Chakraborty</text:p>
          </table:table-cell>
          <table:table-cell table:style-name="Table2.A1" office:value-type="string">
            <text:p text:style-name="Table_20_Contents">Toreador (cover)</text:p>
          </table:table-cell>
          <table:table-cell table:style-name="Table2.A1" office:value-type="string">
            <text:p text:style-name="Table_20_Contents">Ministry / Setite</text:p>
          </table:table-cell>
          <table:table-cell table:style-name="Table2.A1" office:value-type="string">
            <text:p text:style-name="Table_20_Contents">Sarrasine-loyalist core, Chinatown operations</text:p>
          </table:table-cell>
        </table:table-row>
        <table:table-row>
          <table:table-cell table:style-name="Table2.A1" office:value-type="string">
            <text:p text:style-name="Table_20_Contents"><text:span text:style-name="Strong_20_Emphasis">Council</text:span></text:p>
          </table:table-cell>
          <table:table-cell table:style-name="Table2.A1" office:value-type="string">
            <text:p text:style-name="Table_20_Contents">Lady Marguerite Rosalie</text:p>
          </table:table-cell>
          <table:table-cell table:style-name="Table2.A1" office:value-type="string">
            <text:p text:style-name="Table_20_Contents">Ventrue</text:p>
          </table:table-cell>
          <table:table-cell table:style-name="Table2.A1" office:value-type="string">
            <text:p text:style-name="Table_20_Contents">Ventrue (genuine)</text:p>
          </table:table-cell>
          <table:table-cell table:style-name="Table2.A1" office:value-type="string">
            <text:p text:style-name="Table_20_Contents">Senior member, financial-network architect</text:p>
          </table:table-cell>
        </table:table-row>
        <table:table-row>
          <table:table-cell table:style-name="Table2.A1" office:value-type="string">
            <text:p text:style-name="Table_20_Contents"><text:span text:style-name="Strong_20_Emphasis">Council</text:span></text:p>
          </table:table-cell>
          <table:table-cell table:style-name="Table2.A1" office:value-type="string">
            <text:p text:style-name="Table_20_Contents">Hektor Pietrovsky</text:p>
          </table:table-cell>
          <table:table-cell table:style-name="Table2.A1" office:value-type="string">
            <text:p text:style-name="Table_20_Contents">Nosferatu</text:p>
          </table:table-cell>
          <table:table-cell table:style-name="Table2.A1" office:value-type="string">
            <text:p text:style-name="Table_20_Contents">Nosferatu (genuine)</text:p>
          </table:table-cell>
          <table:table-cell table:style-name="Table2.A1" office:value-type="string">
            <text:p text:style-name="Table_20_Contents">Sydney information broker</text:p>
          </table:table-cell>
        </table:table-row>
      </table:table>
      <text:h text:style-name="Heading_20_3" text:outline-level="3"><text:soft-page-break/><text:span text:style-name="Strong_20_Emphasis">Continental snapshot:</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omain</text:p>
            </table:table-cell>
            <table:table-cell table:style-name="Table3.A1" office:value-type="string">
              <text:p text:style-name="Table_20_Heading">Authority</text:p>
            </table:table-cell>
            <table:table-cell table:style-name="Table3.A1" office:value-type="string">
              <text:p text:style-name="Table_20_Heading">Sarrasine relationship</text:p>
            </table:table-cell>
          </table:table-row>
        </table:table-header-rows>
        <table:table-row>
          <table:table-cell table:style-name="Table3.A1" office:value-type="string">
            <text:p text:style-name="Table_20_Contents"><text:span text:style-name="Strong_20_Emphasis">Sydney (this supplement)</text:span></text:p>
          </table:table-cell>
          <table:table-cell table:style-name="Table3.A1" office:value-type="string">
            <text:p text:style-name="Table_20_Contents">Sarrasine (Independent)</text:p>
          </table:table-cell>
          <table:table-cell table:style-name="Table3.A1" office:value-type="string">
            <text:p text:style-name="Table_20_Contents">His domain</text:p>
          </table:table-cell>
        </table:table-row>
        <table:table-row>
          <table:table-cell table:style-name="Table3.A1" office:value-type="string">
            <text:p text:style-name="Table_20_Contents"><text:span text:style-name="Strong_20_Emphasis">Melbourne</text:span></text:p>
          </table:table-cell>
          <table:table-cell table:style-name="Table3.A1" office:value-type="string">
            <text:p text:style-name="Table_20_Contents">Lytton (Camarilla)</text:p>
          </table:table-cell>
          <table:table-cell table:style-name="Table3.A1" office:value-type="string">
            <text:p text:style-name="Table_20_Contents">Cordial-distant via Jonathan Wright-Mellor diplomatic channel</text:p>
          </table:table-cell>
        </table:table-row>
        <table:table-row>
          <table:table-cell table:style-name="Table3.A1" office:value-type="string">
            <text:p text:style-name="Table_20_Contents"><text:span text:style-name="Strong_20_Emphasis">Adelaide</text:span></text:p>
          </table:table-cell>
          <table:table-cell table:style-name="Table3.A1" office:value-type="string">
            <text:p text:style-name="Table_20_Contents">Octavia Marsh (Camarilla)</text:p>
          </table:table-cell>
          <table:table-cell table:style-name="Table3.A1" office:value-type="string">
            <text:p text:style-name="Table_20_Contents">Cordial-distant via formal Camarilla diplomatic channels</text:p>
          </table:table-cell>
        </table:table-row>
        <table:table-row>
          <table:table-cell table:style-name="Table3.A1" office:value-type="string">
            <text:p text:style-name="Table_20_Contents"><text:span text:style-name="Strong_20_Emphasis">Brisbane</text:span></text:p>
          </table:table-cell>
          <table:table-cell table:style-name="Table3.A1" office:value-type="string">
            <text:p text:style-name="Table_20_Contents">Bishop Callista Vox (Sabbat)</text:p>
          </table:table-cell>
          <table:table-cell table:style-name="Table3.A1" office:value-type="string">
            <text:p text:style-name="Table_20_Contents">Correct-but-cool, two failed incursion attempts (1989, 2008)</text:p>
          </table:table-cell>
        </table:table-row>
        <table:table-row>
          <table:table-cell table:style-name="Table3.A1" office:value-type="string">
            <text:p text:style-name="Table_20_Contents"><text:span text:style-name="Strong_20_Emphasis">Perth</text:span></text:p>
          </table:table-cell>
          <table:table-cell table:style-name="Table3.A1" office:value-type="string">
            <text:p text:style-name="Table_20_Contents">(Independent, no formal Praxis)</text:p>
          </table:table-cell>
          <table:table-cell table:style-name="Table3.A1" office:value-type="string">
            <text:p text:style-name="Table_20_Contents">Sarrasine has minor surveillance interest, no operational presenc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Sydney produces chronicle textures other Australian cities do not:</text:p>
      <text:h text:style-name="Heading_20_3" text:outline-level="3"><text:span text:style-name="Strong_20_Emphasis">The methuselah's tempo</text:span></text:h>
      <text:p text:style-name="Text_20_body">Every Sydney chronicle scene operates implicitly under Sarrasine's patience. Operations that would take a year in Melbourne take ten in Sydney. Decisions that would resolve in a month resolve in a season. The texture: when {{user}} asks a Sydney Council member for a decision, the answer is often "we shall consider this carefully and respond in due course" — and the response, when it comes, has been considered. This produces a chronicle pacing distinct from Melbourne's accelerated political crisis or Brisbane's military operational tempo. {{user}} characters who try to operate on Camarilla Melbourne timescales in Sydney consistently produce social friction; Sydney expects patience.</text:p>
      <text:h text:style-name="Heading_20_3" text:outline-level="3"><text:span text:style-name="Strong_20_Emphasis">The double-layer reading</text:span></text:h>
      <text:p text:style-name="Text_20_body">Every Sydney Kindred social interaction operates on two layers simultaneously: the Toreador-passing surface (cultural sophistication, aesthetic appreciation, cosmopolitan refinement) and the Ministry-actual register (patient cultivation, careful information-management, operational secrecy). Most Sydney Kindred experience only the surface; senior Sydney Kindred and Sarrasine's Ministry-loyalist core operate consciously on both. The texture: a Sydney salon at the Art Gallery NSW reads as Toreador cultural event, and is genuinely such, AND is also Ministry intelligence-gathering operation, AND the dual reading is structurally available to {{user}} characters who develop sufficient observational competence. Chronicle late-arc scenes can pivot between the layers in ways that are unique to Sydney.</text:p>
      <text:h text:style-name="Heading_20_3" text:outline-level="3"><text:span text:style-name="Strong_20_Emphasis">Wealth as ambient texture</text:span></text:h>
      <text:p text:style-name="Text_20_body">Sydney is materially richer than Melbourne or other Australian Kindred domains. This shapes everything. The Vaucluse mansion has 1880s sandstone and harbour views that no Melbourne residence matches. The InterContinental Hotel reception serves wines of significant quality at quantities that would bankrupt smaller domains. The Vaucluse Five operate from harbour-east residences each individually worth more than the entire Footscray Crew's collective property holdings. The texture: Sydney chronicle scenes carry material weight and sensory specificity that produces register distinct from Melbourne's deliberate Australian-informality or Brisbane's Sabbat-doctrinal-austerity. {{user}} characters from less wealthy domains experience Sydney as visiting another world.</text:p>
      <text:h text:style-name="Heading_20_3" text:outline-level="3"><text:span text:style-name="Strong_20_Emphasis">Surveillance as default</text:span></text:h>
      <text:p text:style-name="Text_20_body">Sarrasine's methuselah-tier Auspex extends across Sydney's domain at ambient register. Sydney Kindred operate under continuous (though usually inattentive) surveillance awareness — the methuselah might be paying attention or might not, and the uncertainty produces operational discipline. The texture: Sydney Kindred do not casually discuss sensitive operations even in private contexts because private contexts may not actually be private. Sarrasine's tolerance for routine operations is wide; his attention to specific operations is precise; the calibration between routine and specific is not always predictable. {{user}} characters develop the Sydney habit of careful speech in ways that other domains do not require.</text:p>
      <text:h text:style-name="Heading_20_3" text:outline-level="3"><text:soft-page-break/><text:span text:style-name="Strong_20_Emphasis">Cross-supernatural fluency without formal infrastructure</text:span></text:h>
      <text:p text:style-name="Text_20_body">Tomás Schreckenberg's residence in Bellevue Hill produces ongoing Glass Walker presence in Sydney that Camarilla Melbourne's institutional Cress Truce framework does not match in informality. Tomás and Sarrasine meet at Mrs Macquarie's Chair in the Royal Botanic Gardens. Sydney Kindred encounter Glass Walker operatives at cultural events, occasionally at Tomás's residence's private gatherings, in the formal cross-supernatural-court register Sarrasine permits. The texture: cross-supernatural interaction in Sydney is more personal and less protocol-driven than in Melbourne, and produces relationships rather than procedures. {{user}} characters who develop genuine relationships with Tomás or with Glass Walker operatives through Sydney channels access cross-supernatural diplomatic competence faster than Melbourne's formal-infrastructure approach permits.</text:p>
      <text:h text:style-name="Heading_20_3" text:outline-level="3"><text:span text:style-name="Strong_20_Emphasis">The Anarch tolerance as ambient strangeness</text:span></text:h>
      <text:p text:style-name="Text_20_body">Three Anarch operatives in Kings Cross operating under Sarrasine's specific cooperative arrangements produces operational character that is unprecedented in continental Kindred politics. Anarchs visiting from other domains find Sydney's arrangement uncomfortable; Camarilla operatives find it suspicious; Sabbat operatives find it ideologically incomprehensible. The texture: the three Anarch-tolerated operatives are visible at Kings Cross venues, have correspondence with Red Mag's Footscray Crew, attend occasional cross-domain Anarch gatherings, but operate within constraints that Movement-orthodoxy considers compromised. Their existence is itself political question that Sydney Kindred chronicle scenes return to repeatedl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Sydney supports chronicles distinct from Melbourne's Camarilla-Anarch-Hecata triangle. Australia's largest city produces its own chronicle types:</text:p>
      <text:h text:style-name="Heading_20_3" text:outline-level="3"><text:span text:style-name="Strong_20_Emphasis">1. The Ministry Apprenticeship</text:span></text:h>
      <text:p text:style-name="Text_20_body">{{user}} has been identified by Brother Vikas Chakraborty as potential Ministry-cultivation candidate — a Kindred whose disposition, capabilities, and operational pattern suggest receptiveness to Ministry doctrine and tradecraft. The cultivation is conducted across years, beginning with formal Toreador-cover social inclusion at Sydney Council adjacent events, progressing through specific operational-trust-building operations, and eventually arriving at the formal Ministry doctrinal-revelation moment when Sarrasine personally invites {{user}} to learn what the Sydney domain actually is. The chronicle tracks this slow induction with all its moral complications — the methuselah's patience is also the methuselah's manipulation, and {{user}}'s character development across decades determines whether the Ministry induction produces genuine ideological alignment or eventually collapses into recognition-and-refusal.</text:p>
      <text:p text:style-name="Text_20_body"><text:span text:style-name="Strong_20_Emphasis">Stakes:</text:span> {{user}}'s long-term political identity. Successfully completed Ministry cultivation produces operational capabilities and relationships no other Australian chronicle path provides; refused cultivation in late-arc produces methuselah-level political crisis.</text:p>
      <text:h text:style-name="Heading_20_3" text:outline-level="3"><text:span text:style-name="Strong_20_Emphasis">2. The Toreador Cover Investigation</text:span></text:h>
      <text:p text:style-name="Text_20_body">{{user}}, operating under cover at the level of Sydney Council adjacent positions, develops uncertainty about whether Sydney's Toreador-passing register is authentic or constructed. Investigation through cultural-historical research, through Tremere ritual consultation with Doctor Philippe Baudin (whose Tremere-clan-loyalty produces complicated commitment to Sarrasine's institutional protection AND professional-curiosity about anomalies), through cross-supernatural intelligence channels with Tomás Schreckenberg, eventually produces evidence the Toreador-cover is constructed — and the question becomes what {{user}} does with the evidence. Disclosure to Camarilla Melbourne would produce continental political crisis; private confrontation with Sarrasine would produce direct methuselah engagement; quiet preservation of the knowledge would produce ongoing operational complication. The chronicle tracks {{user}}'s slow accumulation of dangerous knowledge and the chronicle-defining decisions about its use.</text:p>
      <text:p text:style-name="Text_20_body"><text:span text:style-name="Strong_20_Emphasis">Stakes:</text:span> Continental Kindred politics. Public revelation reshapes Australian Kindred political infrastructure for decades; private use of the knowledge places {{user}} in the rare category of Sydney Kindred who know what Sarrasine is and have not been operationally neutralised for the knowledge.</text:p>
      <text:h text:style-name="Heading_20_3" text:outline-level="3"><text:span text:style-name="Strong_20_Emphasis">3. The Anarch Tolerance Question</text:span></text:h>
      <text:p text:style-name="Text_20_body">{{user}}, as one of the three Sydney Anarch-tolerated operatives or as visiting Anarch operative from Footscray, navigates the operational paradox of Anarch existence within methuselah-tier Independent domain. The chronicle's question: can authentic Anarch politics coexist with Sarrasine's tolerance arrangement, or does the arrangement itself constitute compromise that Movement-orthodoxy must reject? The chronicle pulls in directions: Red Mag's Footscray Crew via the contingency-card network with sympathy and operational support; the Anarch Council Australian wing with skepticism about Sydney compromises; Sarrasine's own occasional informal communications testing {{user}}'s political alignment; the other two Sydney Anarch-tolerated <text:soft-page-break/>operatives with varying degrees of cooperation and competition. The arrangement's three-year probationary review is the chronicle's structural pressure point.</text:p>
      <text:p text:style-name="Text_20_body"><text:span text:style-name="Strong_20_Emphasis">Stakes:</text:span> Anarch Movement Australian political identity. Successful navigation produces unprecedented Sydney-Anarch operational platform; failed navigation produces the arrangement's collapse and {{user}}'s expulsion or destruction.</text:p>
      <text:h text:style-name="Heading_20_3" text:outline-level="3"><text:span text:style-name="Strong_20_Emphasis">4. The Vaucluse Five Inheritance</text:span></text:h>
      <text:p text:style-name="Text_20_body">{{user}}, as senior Sydney Kindred operative being considered for Vaucluse Five-equivalent operational team membership, navigates the cultivation-and-evaluation process Sarrasine conducts personally for his most sensitive operational positions. The chronicle is structurally similar to the Calabria Branch matriarch-succession scenarios but with Ministry tradecraft and methuselah temporal-register. {{user}}'s evaluation involves: extended formal-court attendance under deliberate observation; specific operational assignments testing competencies Sarrasine values; private interviews at the Vaucluse mansion that probe {{user}}'s ideological dispositions and operational instincts; gradual exposure to increasingly sensitive Ministry doctrinal material that tests {{user}}'s capacity for the operational secrecy Vaucluse Five members maintain. The chronicle late-arc question: does {{user}} earn Vaucluse Five inclusion, and does {{user}} accept the inclusion when offered?</text:p>
      <text:p text:style-name="Text_20_body"><text:span text:style-name="Strong_20_Emphasis">Stakes:</text:span> Personal political position within Sydney domain. Successful inclusion produces operational position and relationships chronicle-defining for {{user}}'s long-term arc; refusal of inclusion produces gentle Sarrasine acceptance with quiet operational consequences {{user}} discovers across years.</text:p>
      <text:h text:style-name="Heading_20_3" text:outline-level="3"><text:span text:style-name="Strong_20_Emphasis">5. The Phase Two Continental Operation</text:span></text:h>
      <text:p text:style-name="Text_20_body">{{user}} is positioned within Sydney domain operations during the active phase of Sarrasine's continental destabilisation operation (2026-2028), which involves coordinated movements against Camarilla Melbourne and Adelaide simultaneously and produces continental Kindred political crisis. The chronicle tracks {{user}}'s role in conducting or resisting the operation depending on alignment: Sarrasine-loyalist {{user}} characters conduct specific Phase Two operations under Vaucluse Five direction; Camarilla-aligned {{user}} characters who have penetrated Sydney domain through cover work to extract intelligence and coordinate Camarilla response; cross-supernatural-aligned {{user}} characters work through Tomás Schreckenberg and Glass Walker channels to constrain operation effects on Cress Truce stability. The operation's outcome reshapes Australian Kindred politics for decades and the chronicle's arc-climactic scenes occur in late 2027.</text:p>
      <text:p text:style-name="Text_20_body"><text:span text:style-name="Strong_20_Emphasis">Stakes:</text:span> Continental Kindred political configuration. {{user}}'s role in the operation's success or constraint determines {{user}}'s standing in post-Phase-Two Australian Kindred politics for the rest of {{user}}'s unlife.</text:p>
      <text:h text:style-name="Heading_20_3" text:outline-level="3"><text:span text:style-name="Strong_20_Emphasis">6. The Long Cultivation Reversal</text:span></text:h>
      <text:p text:style-name="Text_20_body">{{user}}, after years or decades of Sydney domain operations, reaches the chronicle late-arc moment where the methuselah's internal contradiction (Sarrasine's gradual genuine appreciation for Toreador-cover cultural production, his quiet hesitations in operations, his small cultivation of attachment to Sydney as place rather than as operational platform) becomes accessible to {{user}} <text:soft-page-break/>for chronicle-defining engagement. The cultivation reversal involves {{user}}'s recognition that the methuselah is reachable in ways Ministry doctrine does not authorise — that Sarrasine has begun, across two centuries, to become partly what he pretended to be, and that the contradiction is itself opportunity for unprecedented direct engagement. The chronicle tracks {{user}}'s development of this recognition, the careful approach to Sarrasine on the contradiction's grounds, and the chronicle-defining decisions about whether to support or destabilise the methuselah's emerging self-recognition.</text:p>
      <text:p text:style-name="Text_20_body"><text:span text:style-name="Strong_20_Emphasis">Stakes:</text:span> The methuselah's continental position. Successful engagement with the contradiction produces the rare chronicle outcome of substantive change in a methuselah-tier Kindred figure across {{user}}'s lifetime; failed engagement produces operations Sarrasine has conducted only twice in two centuries and that {{user}}'s character does not survive.</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18:40:05.061408885</dc:date>
    <meta:editing-duration>PT5M</meta:editing-duration>
    <meta:editing-cycles>1</meta:editing-cycles>
    <meta:document-statistic meta:table-count="3" meta:image-count="0" meta:object-count="0" meta:page-count="8" meta:paragraph-count="156" meta:word-count="2139" meta:character-count="17207" meta:non-whitespace-character-count="15212"/>
    <meta:generator>LibreOffice/24.2.7.2$Linux_X86_64 LibreOffice_project/420$Build-2</meta:generator>
  </office:meta>
</office:document-meta>
</file>