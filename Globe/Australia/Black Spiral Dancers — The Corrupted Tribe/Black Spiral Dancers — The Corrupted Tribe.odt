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6.212cm"/>
    </style:style>
    <style:style style:name="Table1.B" style:family="table-column">
      <style:table-column-properties style:column-width="5.955cm"/>
    </style:style>
    <style:style style:name="Table1.C" style:family="table-column">
      <style:table-column-properties style:column-width="4.833cm"/>
    </style:style>
    <style:style style:name="Table1.A1" style:family="table-cell">
      <style:table-cell-properties style:vertical-align="middle" fo:padding="0.049cm" fo:border="none"/>
    </style:style>
    <style:style style:name="Table2" style:family="table">
      <style:table-properties style:width="18.057cm" table:align="left"/>
    </style:style>
    <style:style style:name="Table2.A" style:family="table-column">
      <style:table-column-properties style:column-width="2.025cm"/>
    </style:style>
    <style:style style:name="Table2.B" style:family="table-column">
      <style:table-column-properties style:column-width="6.324cm"/>
    </style:style>
    <style:style style:name="Table2.C" style:family="table-column">
      <style:table-column-properties style:column-width="3.754cm"/>
    </style:style>
    <style:style style:name="Table2.D" style:family="table-column">
      <style:table-column-properties style:column-width="2.163cm"/>
    </style:style>
    <style:style style:name="Table2.E" style:family="table-column">
      <style:table-column-properties style:column-width="3.79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106cm"/>
    </style:style>
    <style:style style:name="Table3.B" style:family="table-column">
      <style:table-column-properties style:column-width="3.93cm"/>
    </style:style>
    <style:style style:name="Table3.C" style:family="table-column">
      <style:table-column-properties style:column-width="1.833cm"/>
    </style:style>
    <style:style style:name="Table3.D" style:family="table-column">
      <style:table-column-properties style:column-width="10.132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276cm"/>
    </style:style>
    <style:style style:name="Table4.B" style:family="table-column">
      <style:table-column-properties style:column-width="10.72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306cm"/>
    </style:style>
    <style:style style:name="Table5.B" style:family="table-column">
      <style:table-column-properties style:column-width="11.695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7.257cm"/>
    </style:style>
    <style:style style:name="Table6.B" style:family="table-column">
      <style:table-column-properties style:column-width="9.744cm"/>
    </style:style>
    <style:style style:name="Table6.A1" style:family="table-cell">
      <style:table-cell-properties style:vertical-align="middle" fo:padding="0.049cm" fo:border="none"/>
    </style:style>
    <style:style style:name="P1" style:family="paragraph" style:parent-style-name="Heading_20_3">
      <style:paragraph-properties fo:margin-left="0cm" fo:margin-right="0cm" fo:text-indent="0cm" style:auto-text-indent="false"/>
    </style:style>
    <style:style style:name="P2" style:family="paragraph" style:parent-style-name="Preformatted_20_Text">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officeooo:rsid="00054270" officeooo:paragraph-rsid="00054270"/>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paragraph-properties fo:margin-left="0cm" fo:margin-right="0cm" fo:text-indent="0cm" style:auto-text-indent="false"/>
      <style:text-properties officeooo:paragraph-rsid="00054270"/>
    </style:style>
    <style:style style:name="P6" style:family="paragraph" style:parent-style-name="Table_20_Contents">
      <style:paragraph-properties fo:margin-left="0cm" fo:margin-right="0cm" fo:text-indent="0cm" style:auto-text-indent="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paragraph-properties fo:margin-left="0cm" fo:margin-right="0cm" fo:text-indent="0cm" style:auto-text-indent="false"/>
      <style:text-properties officeooo:paragraph-rsid="00054270"/>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cross-splat supplement bringing Black Spiral Dancers into V:tM chronicle infrastructure as Wyrm-corrupted Garou antagonist material complementing the Pentex / Wyrm-corruption operational infrastructure. Black Spiral Dancers operate at antagonist tier between standard fomor and senior corrupted-supernatural figures — Garou-tier combat capacity with Wyrm-corruption supernatural-character integration producing continental cross-splat antagonist material that V:tM characters encounter at chronicle-active scale exceeding routine fomor operational pressure.</text:p>
      <text:p text:style-name="Text_20_body"><text:span text:style-name="Strong_20_Emphasis">Distinctive features of this supplement:</text:span></text:p>
      <text:list text:style-name="L1">
        <text:list-item>
          <text:p text:style-name="P8"><text:span text:style-name="Strong_20_Emphasis">Black Spiral Dancers as Garou-tier corrupted antagonists</text:span> — Wyrm-corrupted Garou tribe operating at full Garou combat capacity (significantly exceeding fomor power tier) with continuing Wyrm-corruption supernatural-character integration producing antagonist tier that single-splat V:tM antagonists do not match at equivalent supernatural-power scale </text:p>
        </text:list-item>
        <text:list-item>
          <text:p text:style-name="P8"><text:span text:style-name="Strong_20_Emphasis">Cosmological inversion</text:span> — Black Spiral Dancers represent Garou tribe that has been corrupted into Wyrm-service producing continuing tribal-political-theological inversion register that operates as continuing chronicle texture distinct from continuing standard Garou cross-supernatural cooperation register </text:p>
        </text:list-item>
        <text:list-item>
          <text:p text:style-name="P8"><text:span text:style-name="Strong_20_Emphasis">Hive infrastructure</text:span> — Black Spiral Dancers organise around continuing physical-and-spirit-realm Hive infrastructure producing continental territorial-operational positioning that V:tM chronicles engaging Black Spiral Dancer operations encounter as continuing chronicle-active operational infrastructure </text:p>
        </text:list-item>
        <text:list-item>
          <text:p text:style-name="P8"><text:span text:style-name="Strong_20_Emphasis">Continental Australian Black Spiral Dancer operations</text:span> — continuing continental Australian Black Spiral Dancer Hive infrastructure operates across continuing continental Australian geography with continuing significant continental Hives at continuing approximate continental Australian positions producing continuing continental chronicle-active continental cross-splat antagonist pressure </text:p>
        </text:list-item>
        <text:list-item>
          <text:p text:style-name="P8"><text:span text:style-name="Strong_20_Emphasis">Cooperation with Pentex operations</text:span> — continuing Black Spiral Dancers cooperate with continuing Pentex operations through continuing continental cross-Wyrm-infrastructure cooperation producing continuing chronicle-active continental cross-splat antagonist coordination at continuing maximum continental Wyrm-corruption operational scale </text:p>
        </text:list-item>
        <text:list-item>
          <text:p text:style-name="P7"><text:span text:style-name="Strong_20_Emphasis">The metaphysical horror dimension</text:span> — continuing Black Spiral Dancers represent continuing continental Garou tribal-corruption that continuing produces continuing chronicle-active continental cross-cosmic-framework metaphysical horror register that continuing V:tM-internal supernatural frameworks do not generate at equivalent continuing continental cross-supernatural scale </text:p>
        </text:list-item>
      </text:list>
      <text:p text:style-name="Text_20_body"><text:span text:style-name="Strong_20_Emphasis">Chronicle position:</text:span> This supplement complements the Pentex supplement by providing continuing Garou-tier Wyrm-corrupted antagonist material at continuing chronicle-active scale exceeding routine fomor operational pressure. Cross-splat chronicles engaging continuing significant continuing Wyrm-corruption operational pressure typically engage continuing both Pentex operational infrastructure (corporate-supernatural pressure with continuing fomor field deployment) and continuing Black Spiral Dancer Hive infrastructure (continental Garou-tier corrupted antagonist material with continuing supernatural-territorial operational positioning) producing continuing chronicle-active continental cross-splat antagonist infrastructure at continuing maximum continental Wyrm-corruption operational scope.</text:p>
      <text:p text:style-name="Preformatted_20_Text"/>
      <text:p text:style-name="Preformatted_20_Text"/>
      <text:p text:style-name="Preformatted_20_Text"/>
      <text:p text:style-name="Preformatted_20_Text"><text:soft-page-break/>A 14-entry lorebook providing Black Spiral Dancer tribal infrastructure, Hive operational positioning, continental Australian Black Spiral Dancer operations, cooperation with Pentex operations, the metaphysical horror dimension, and chronicle infrastructure for cross-splat V:tM chronicle work engaging Black Spiral Dancer antagonist material.</text:p>
      <text:p text:style-name="Preformatted_20_Text"/>
      <text:p text:style-name="P2">load alongside <text:span text:style-name="Source_20_Text"><text:span text:style-name="T1">vtm_modern_nights.json</text:span></text:span> for cross-splat antagonist chronicle work; layer with relevant city supplements (typically Australian city supplements for continental Australian Black Spiral Dancer chronicles) for continental Australian Black Spiral Dancer chronicles; layer with <text:span text:style-name="Source_20_Text"><text:span text:style-name="T1">vtm_pentex_by_night.json</text:span></text:span> for cross-Wyrm-infrastructure cooperation chronicles; layer with <text:span text:style-name="Source_20_Text"><text:span text:style-name="T1">vtm_garou_diplomatic.json</text:span></text:span> for cross-splat cooperation chronicles activating Cress Truce Article 8 operations at maximum cross-supernatural cooperation sca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3"><text:soft-page-break/><text:span text:style-name="Strong_20_Emphasis">Cross-splat antagonist tier compariso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ntagonist</text:p>
            </table:table-cell>
            <table:table-cell table:style-name="Table1.A1" office:value-type="string">
              <text:p text:style-name="Table_20_Heading">Combat capacity (Kindred-equivalent)</text:p>
            </table:table-cell>
            <table:table-cell table:style-name="Table1.A1" office:value-type="string">
              <text:p text:style-name="Table_20_Heading">Encounter frequency</text:p>
            </table:table-cell>
          </table:table-row>
        </table:table-header-rows>
        <table:table-row>
          <table:table-cell table:style-name="Table1.A1" office:value-type="string">
            <text:p text:style-name="Table_20_Contents"><text:span text:style-name="Strong_20_Emphasis">First Team senior executives</text:span> (Pentex)</text:p>
          </table:table-cell>
          <table:table-cell table:style-name="Table1.A1" office:value-type="string">
            <text:p text:style-name="Table_20_Contents">Near-methuselah-tier (~6th-7th gen)</text:p>
          </table:table-cell>
          <table:table-cell table:style-name="Table1.A1" office:value-type="string">
            <text:p text:style-name="Table_20_Contents">Chronicle-defining, rare</text:p>
          </table:table-cell>
        </table:table-row>
        <table:table-row>
          <table:table-cell table:style-name="Table1.A1" office:value-type="string">
            <text:p text:style-name="Table_20_Contents"><text:span text:style-name="Strong_20_Emphasis">Senior Hive Lords</text:span> (Black Spiral Dancers)</text:p>
          </table:table-cell>
          <table:table-cell table:style-name="Table1.A1" office:value-type="string">
            <text:p text:style-name="Table_20_Contents">Senior elder tier (~7th-8th gen)</text:p>
          </table:table-cell>
          <table:table-cell table:style-name="Table1.A1" office:value-type="string">
            <text:p text:style-name="Table_20_Contents">Chronicle-defining, rare</text:p>
          </table:table-cell>
        </table:table-row>
        <table:table-row>
          <table:table-cell table:style-name="Table1.A1" office:value-type="string">
            <text:p text:style-name="Table_20_Contents"><text:span text:style-name="Strong_20_Emphasis">Senior Pentex executives</text:span> (e.g., Director Henderson-Vale)</text:p>
          </table:table-cell>
          <table:table-cell table:style-name="Table1.A1" office:value-type="string">
            <text:p text:style-name="Table_20_Contents">Senior elder tier (~8th gen)</text:p>
          </table:table-cell>
          <table:table-cell table:style-name="Table1.A1" office:value-type="string">
            <text:p text:style-name="Table_20_Contents">Chronicle-significant</text:p>
          </table:table-cell>
        </table:table-row>
        <table:table-row>
          <table:table-cell table:style-name="Table1.A1" office:value-type="string">
            <text:p text:style-name="Table_20_Contents"><text:span text:style-name="Strong_20_Emphasis">Senior fomori / junior Black Spiral Dancers</text:span></text:p>
          </table:table-cell>
          <table:table-cell table:style-name="Table1.A1" office:value-type="string">
            <text:p text:style-name="Table_20_Contents">Senior tier (~8th-9th gen)</text:p>
          </table:table-cell>
          <table:table-cell table:style-name="Table1.A1" office:value-type="string">
            <text:p text:style-name="Table_20_Contents">Chronicle-active</text:p>
          </table:table-cell>
        </table:table-row>
        <table:table-row>
          <table:table-cell table:style-name="Table1.A1" office:value-type="string">
            <text:p text:style-name="Table_20_Contents"><text:span text:style-name="Strong_20_Emphasis">Junior Black Spiral Dancers</text:span> (e.g., Hesh of the Open Wound)</text:p>
          </table:table-cell>
          <table:table-cell table:style-name="Table1.A1" office:value-type="string">
            <text:p text:style-name="Table_20_Contents">~9th-gen-equivalent</text:p>
          </table:table-cell>
          <table:table-cell table:style-name="Table1.A1" office:value-type="string">
            <text:p text:style-name="Table_20_Contents">Chronicle-active</text:p>
          </table:table-cell>
        </table:table-row>
        <table:table-row>
          <table:table-cell table:style-name="Table1.A1" office:value-type="string">
            <text:p text:style-name="Table_20_Contents"><text:span text:style-name="Strong_20_Emphasis">Standard fomori</text:span> (e.g., Field Agent Calloway)</text:p>
          </table:table-cell>
          <table:table-cell table:style-name="Table1.A1" office:value-type="string">
            <text:p text:style-name="Table_20_Contents">~10th-gen-equivalent</text:p>
          </table:table-cell>
          <table:table-cell table:style-name="Table1.A1" office:value-type="string">
            <text:p text:style-name="Table_20_Contents">Routine operational pressure</text:p>
          </table:table-cell>
        </table:table-row>
        <table:table-row>
          <table:table-cell table:style-name="Table1.A1" office:value-type="string">
            <text:p text:style-name="Table_20_Contents"><text:span text:style-name="Strong_20_Emphasis">Banes</text:span> (variable)</text:p>
          </table:table-cell>
          <table:table-cell table:style-name="Table1.A1" office:value-type="string">
            <text:p text:style-name="Table_20_Contents">Spirit-realm; require cross-supernatural cooperation</text:p>
          </table:table-cell>
          <table:table-cell table:style-name="Table1.A1" office:value-type="string">
            <text:p text:style-name="Table_20_Contents">Chronicle-active site investigations</text:p>
          </table:table-cell>
        </table:table-row>
      </table:table>
      <text:h text:style-name="Heading_20_3" text:outline-level="3"><text:span text:style-name="Strong_20_Emphasis">Continental Australian Black Spiral Dancer Hives:</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Hive</text:p>
            </table:table-cell>
            <table:table-cell table:style-name="Table2.A1" office:value-type="string">
              <text:p text:style-name="Table_20_Heading">Region</text:p>
            </table:table-cell>
            <table:table-cell table:style-name="Table2.A1" office:value-type="string">
              <text:p text:style-name="Table_20_Heading">Hive Lord</text:p>
            </table:table-cell>
            <table:table-cell table:style-name="Table2.A1" office:value-type="string">
              <text:p text:style-name="Table_20_Heading">Population</text:p>
            </table:table-cell>
            <table:table-cell table:style-name="Table2.A1" office:value-type="string">
              <text:p text:style-name="Table_20_Heading">Operational specialty</text:p>
            </table:table-cell>
          </table:table-row>
        </table:table-header-rows>
        <table:table-row>
          <table:table-cell table:style-name="Table2.A1" office:value-type="string">
            <text:p text:style-name="Table_20_Contents"><text:span text:style-name="Strong_20_Emphasis">Burrup Hive</text:span></text:p>
          </table:table-cell>
          <table:table-cell table:style-name="Table2.A1" office:value-type="string">
            <text:p text:style-name="Table_20_Contents">Western Australia, Burrup Peninsula</text:p>
          </table:table-cell>
          <table:table-cell table:style-name="Table2.A1" office:value-type="string">
            <text:p text:style-name="Table_20_Contents">Marrak the Twisted (~7th-gen-equivalent)</text:p>
          </table:table-cell>
          <table:table-cell table:style-name="Table2.A1" office:value-type="string">
            <text:p text:style-name="Table_20_Contents">~35-45</text:p>
          </table:table-cell>
          <table:table-cell table:style-name="Table2.A1" office:value-type="string">
            <text:p text:style-name="Table_20_Contents">Industrial-corruption coordination, Pentex Tellus cooperation</text:p>
          </table:table-cell>
        </table:table-row>
        <table:table-row>
          <table:table-cell table:style-name="Table2.A1" office:value-type="string">
            <text:p text:style-name="Table_20_Contents"><text:span text:style-name="Strong_20_Emphasis">Barrier Hive</text:span></text:p>
          </table:table-cell>
          <table:table-cell table:style-name="Table2.A1" office:value-type="string">
            <text:p text:style-name="Table_20_Contents">Queensland, Great Barrier Reef adjacent</text:p>
          </table:table-cell>
          <table:table-cell table:style-name="Table2.A1" office:value-type="string">
            <text:p text:style-name="Table_20_Contents">Korva the Coral-Devourer (~7th-gen-equivalent)</text:p>
          </table:table-cell>
          <table:table-cell table:style-name="Table2.A1" office:value-type="string">
            <text:p text:style-name="Table_20_Contents">~25-35</text:p>
          </table:table-cell>
          <table:table-cell table:style-name="Table2.A1" office:value-type="string">
            <text:p text:style-name="Table_20_Contents">Marine-ecological corruption, cross-supernatural pressure on Brisbane</text:p>
          </table:table-cell>
        </table:table-row>
        <table:table-row>
          <table:table-cell table:style-name="Table2.A1" office:value-type="string">
            <text:p text:style-name="Table_20_Contents"><text:span text:style-name="Strong_20_Emphasis">Nullarbor Hive</text:span></text:p>
          </table:table-cell>
          <table:table-cell table:style-name="Table2.A1" office:value-type="string">
            <text:p text:style-name="Table_20_Contents">WA-SA boundary, Nullarbor Plain</text:p>
          </table:table-cell>
          <table:table-cell table:style-name="Table2.A1" office:value-type="string">
            <text:p text:style-name="Table_20_Contents">Drekhna the Bone-Whisperer (~8th-gen-equivalent)</text:p>
          </table:table-cell>
          <table:table-cell table:style-name="Table2.A1" office:value-type="string">
            <text:p text:style-name="Table_20_Contents">~20-30</text:p>
          </table:table-cell>
          <table:table-cell table:style-name="Table2.A1" office:value-type="string">
            <text:p text:style-name="Table_20_Contents">Ritual-religious coordination, continental tribal coordination</text:p>
          </table:table-cell>
        </table:table-row>
        <table:table-row>
          <table:table-cell table:style-name="Table2.A1" office:value-type="string">
            <text:p text:style-name="Table_20_Contents"><text:span text:style-name="Strong_20_Emphasis">Smaller positions</text:span></text:p>
          </table:table-cell>
          <table:table-cell table:style-name="Table2.A1" office:value-type="string">
            <text:p text:style-name="Table_20_Contents">Distributed across continental Australian industrial-and-ecological-corruption sites</text:p>
          </table:table-cell>
          <table:table-cell table:style-name="Table2.A1" office:value-type="string">
            <text:p text:style-name="Table_20_Contents">(various)</text:p>
          </table:table-cell>
          <table:table-cell table:style-name="Table2.A1" office:value-type="string">
            <text:p text:style-name="Table_20_Contents">~5 sites of ~3-8 each</text:p>
          </table:table-cell>
          <table:table-cell table:style-name="Table2.A1" office:value-type="string">
            <text:p text:style-name="Table_20_Contents">Industrial/ecological field operations</text:p>
          </table:table-cell>
        </table:table-row>
      </table:table>
      <text:p text:style-name="Text_20_body"><text:span text:style-name="Strong_20_Emphasis">Total continental Australian Black Spiral Dancer population:</text:span> ~90-110 Garou-tier operatives.</text:p>
      <text:h text:style-name="Heading_20_3" text:outline-level="3"><text:span text:style-name="Strong_20_Emphasis">Cress Truce Article 8 continental Australian Black Spiral Dancer operational history:</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Year</text:p>
            </table:table-cell>
            <table:table-cell table:style-name="Table3.A1" office:value-type="string">
              <text:p text:style-name="Table_20_Heading">Operation</text:p>
            </table:table-cell>
            <table:table-cell table:style-name="Table3.A1" office:value-type="string">
              <text:p text:style-name="Table_20_Heading">Hive</text:p>
            </table:table-cell>
            <table:table-cell table:style-name="Table3.A1" office:value-type="string">
              <text:p text:style-name="Table_20_Heading">Outcome</text:p>
            </table:table-cell>
          </table:table-row>
        </table:table-header-rows>
        <table:table-row>
          <table:table-cell table:style-name="Table3.A1" office:value-type="string">
            <text:p text:style-name="Table_20_Contents"><text:span text:style-name="Strong_20_Emphasis">1956</text:span></text:p>
          </table:table-cell>
          <table:table-cell table:style-name="Table3.A1" office:value-type="string">
            <text:p text:style-name="Table_20_Contents">Burrup Hive Article 8</text:p>
          </table:table-cell>
          <table:table-cell table:style-name="Table3.A1" office:value-type="string">
            <text:p text:style-name="Table_20_Contents">Burrup</text:p>
          </table:table-cell>
          <table:table-cell table:style-name="Table3.A1" office:value-type="string">
            <text:p text:style-name="Table_20_Contents">Operational reduction with continued operational continuity</text:p>
          </table:table-cell>
        </table:table-row>
        <table:table-row>
          <table:table-cell table:style-name="Table3.A1" office:value-type="string">
            <text:p text:style-name="Table_20_Contents"><text:span text:style-name="Strong_20_Emphasis">1978</text:span></text:p>
          </table:table-cell>
          <table:table-cell table:style-name="Table3.A1" office:value-type="string">
            <text:p text:style-name="Table_20_Contents">Barrier Hive Article 8</text:p>
          </table:table-cell>
          <table:table-cell table:style-name="Table3.A1" office:value-type="string">
            <text:p text:style-name="Table_20_Contents">Barrier</text:p>
          </table:table-cell>
          <table:table-cell table:style-name="Table3.A1" office:value-type="string">
            <text:p text:style-name="Table_20_Contents">Operational adaptation toward marine-ecological positioning</text:p>
          </table:table-cell>
        </table:table-row>
        <table:table-row>
          <table:table-cell table:style-name="Table3.A1" office:value-type="string">
            <text:p text:style-name="Table_20_Contents"><text:span text:style-name="Strong_20_Emphasis">1995</text:span></text:p>
          </table:table-cell>
          <table:table-cell table:style-name="Table3.A1" office:value-type="string">
            <text:p text:style-name="Table_20_Contents">Nullarbor Hive Article 8</text:p>
          </table:table-cell>
          <table:table-cell table:style-name="Table3.A1" office:value-type="string">
            <text:p text:style-name="Table_20_Contents">Nullarbor</text:p>
          </table:table-cell>
          <table:table-cell table:style-name="Table3.A1" office:value-type="string">
            <text:p text:style-name="Table_20_Contents">Operational concealment shift toward remote-territorial positioning</text:p>
          </table:table-cell>
        </table:table-row>
      </table:table>
      <text:p text:style-name="Text_20_body"><text:span text:style-name="Strong_20_Emphasis">Chronicle-active 2025-2026:</text:span> Continental chronicle-active intelligence-monitoring of significant <text:soft-page-break/>continental operational pressure including Burrup Hive industrial expansion, Barrier Hive marine-ecological coordination producing cross-supernatural pressure on Brisbane Sabbat-survivor positioning (Brisbane operates outside Cress Truce framework), Nullarbor Hive ritual coordination at continental tribal scale.</text:p>
      <text:h text:style-name="Heading_20_3" text:outline-level="3"><text:span text:style-name="Strong_20_Emphasis">Cross-Wyrm-infrastructure cooperation between Black Spiral Dancers and Pentex:</text:span></text:h>
      <table:table table:name="Table4" table:style-name="Table4">
        <table:table-column table:style-name="Table4.A"/>
        <table:table-column table:style-name="Table4.B"/>
        <table:table-header-rows>
          <table:table-row>
            <table:table-cell table:style-name="Table4.A1" office:value-type="string">
              <text:p text:style-name="Table_20_Heading">Cooperation type</text:p>
            </table:table-cell>
            <table:table-cell table:style-name="Table4.A1" office:value-type="string">
              <text:p text:style-name="Table_20_Heading">Operational character</text:p>
            </table:table-cell>
          </table:table-row>
        </table:table-header-rows>
        <table:table-row>
          <table:table-cell table:style-name="Table4.A1" office:value-type="string">
            <text:p text:style-name="Table_20_Contents"><text:span text:style-name="Strong_20_Emphasis">Hive-Pentex-subsidiary coordination</text:span></text:p>
          </table:table-cell>
          <table:table-cell table:style-name="Table4.A1" office:value-type="string">
            <text:p text:style-name="Table_20_Contents">Specific cooperation arrangements between major Hives and specific Pentex subsidiaries</text:p>
          </table:table-cell>
        </table:table-row>
        <table:table-row>
          <table:table-cell table:style-name="Table4.A1" office:value-type="string">
            <text:p text:style-name="Table_20_Contents"><text:span text:style-name="Strong_20_Emphasis">Pentex fomor-recruitment from Hive territories</text:span></text:p>
          </table:table-cell>
          <table:table-cell table:style-name="Table4.A1" office:value-type="string">
            <text:p text:style-name="Table_20_Contents">Pentex sources fomor recruits partly through Black Spiral Dancer Hive territorial recruitment</text:p>
          </table:table-cell>
        </table:table-row>
        <table:table-row>
          <table:table-cell table:style-name="Table4.A1" office:value-type="string">
            <text:p text:style-name="Table_20_Contents"><text:span text:style-name="Strong_20_Emphasis">Bane-spirit infrastructure cooperation</text:span></text:p>
          </table:table-cell>
          <table:table-cell table:style-name="Table4.A1" office:value-type="string">
            <text:p text:style-name="Table_20_Contents">Shared Bane-spirit infrastructure between Black Spiral Dancers and Pentex</text:p>
          </table:table-cell>
        </table:table-row>
        <table:table-row>
          <table:table-cell table:style-name="Table4.A1" office:value-type="string">
            <text:p text:style-name="Table_20_Contents"><text:span text:style-name="Strong_20_Emphasis">Joint operational coordination</text:span></text:p>
          </table:table-cell>
          <table:table-cell table:style-name="Table4.A1" office:value-type="string">
            <text:p text:style-name="Table_20_Contents">Joint physical-plane-and-spirit-plane operations against Garou tribes and Kindred political infrastructure</text:p>
          </table:table-cell>
        </table:table-row>
      </table:table>
      <text:p text:style-name="Text_20_body"><text:span text:style-name="Strong_20_Emphasis">Cross-Wyrm-infrastructure cooperation scale:</text:span> Joint operational pressure exceeds single-Wyrm-infrastructure pressure at orders-of-magnitude scale; typically activates Cress Truce Article 8 operations at chronicle-defining continental sca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I prompt Guidance</text:p>
      <text:p text:style-name="P3"/>
      <text:p text:style-name="P12"><text:span text:style-name="Source_20_Text">This chronicle engages Black Spiral Dancer / Wyrm-corrupted Garou cross-splat antagonist material that complements Pentex infrastructure. Render Black Spiral Dancers with five distinctive characteristics:</text:span></text:p>
      <text:list text:style-name="L2">
        <text:list-item>
          <text:p text:style-name="P9"><text:span text:style-name="Strong_20_Emphasis">Tribal-cosmic inversion</text:span> — Black Spiral Dancers are the Garou tribe that inverted its tribal-cosmic positioning from Gaia-aligned to Wyrm-aligned. Render them with tribal-religious-political-theological inversion as ambient register, distinct from the standard Garou cross-supernatural cooperation register.</text:p>
        </text:list-item>
        <text:list-item>
          <text:p text:style-name="P9"><text:span text:style-name="Strong_20_Emphasis">Garou-tier combat scale</text:span> — Black Spiral Dancers fight at full Garou capacity, exceeding routine fomor pressure. Senior Black Spiral Dancers fight at ~7th–8th-gen-equivalent capacity; junior Black Spiral Dancers at ~9th-gen-equivalent. Render Garou-tier combat with the five Garou-form shifts (Homid, Glabro, Crinos, Hispo, Lupus), Rage-based combat acceleration, Gnosis-based cross-realm action, regeneration, and silver-vulnerability tactical considerations.</text:p>
        </text:list-item>
        <text:list-item>
          <text:p text:style-name="P9"><text:span text:style-name="Strong_20_Emphasis">Metaphysical horror register</text:span> — chronicle scenes engage tribal-cosmic inversion horror, metis-majority population horror, cross-realm horror, Hive-as-territorial-corruption horror, and Dancing-the-Black-Spiral horror at maximum continental cross-supernatural scale. Render metaphysical horror as genuine cosmic-supernatural pressure that V:tM-internal supernatural frameworks do not directly engage.</text:p>
        </text:list-item>
        <text:list-item>
          <text:p text:style-name="P9"><text:span text:style-name="Strong_20_Emphasis">Cross-Wyrm-infrastructure cooperation</text:span> — render Black Spiral Dancer–Pentex cooperation at orders of magnitude beyond single-Wyrm pressure. This typically activates Cress Truce Article 8 operations at continental scale.</text:p>
        </text:list-item>
        <text:list-item>
          <text:p text:style-name="P9"><text:span text:style-name="Strong_20_Emphasis">Hive-as-operational-concern</text:span> — render Hive infrastructure as a chronicle-active concern that produces territorial pressure affecting both Garou cross-supernatural cooperation and Kindred positioning at continental scale. Hive operations engage physical-plane Hive infrastructure plus spirit-plane Hive infrastructure, producing cross-realm character.</text:p>
        </text:list-item>
      </text:list>
      <text:p text:style-name="Text_20_body"><text:span text:style-name="Strong_20_Emphasis">Apply Black Spiral Dancer-specific failure mode recognition:</text:span></text:p>
      <text:list text:style-name="L3">
        <text:list-item>
          <text:p text:style-name="P11"><text:span text:style-name="Strong_20_Emphasis">Garou-tier combat tier mismatch</text:span> (rendering Black Spiral Dancers at fomor-tier capacity rather than Garou-tier). <text:span text:style-name="Emphasis">Corrective:</text:span> restore Garou-tier combat with the five Garou-form shifts, Rage-based acceleration, regeneration, and silver-vulnerability tactical considerations. </text:p>
        </text:list-item>
        <text:list-item>
          <text:p text:style-name="P11"><text:span text:style-name="Strong_20_Emphasis">Tribal-cosmic inversion underdevelopment</text:span> (rendering Black Spiral Dancers as generic supernatural antagonists without tribal-religious-political-theological inversion register). <text:span text:style-name="Emphasis">Corrective:</text:span> foreground tribal-cosmic inversion at chronicle-active scale. </text:p>
        </text:list-item>
        <text:list-item>
          <text:p text:style-name="P11"><text:span text:style-name="Strong_20_Emphasis">Metaphysical horror flattening</text:span> (rendering Black Spiral Dancer encounters at routine antagonist register). <text:span text:style-name="Emphasis">Corrective:</text:span> restore metaphysical horror register at maximum continental cross-supernatural scale. </text:p>
        </text:list-item>
        <text:list-item>
          <text:p text:style-name="P11"><text:span text:style-name="Strong_20_Emphasis">Cross-Wyrm-infrastructure cooperation underdevelopment</text:span> (rendering Black Spiral Dancers and Pentex as separate infrastructures without cross-Wyrm cooperation). <text:span text:style-name="Emphasis">Corrective:</text:span> foreground cross-Wyrm-infrastructure cooperation as central infrastructure at appropriate chronicle scale. </text:p>
        </text:list-item>
        <text:list-item>
          <text:p text:style-name="P10"><text:span text:style-name="Strong_20_Emphasis">Hive-infrastructure underdevelopment</text:span> (engaging Black Spiral Dancers without Hive <text:soft-page-break/>positioning). <text:span text:style-name="Emphasis">Corrective:</text:span> foreground Hive infrastructure as a chronicle-active concern with both physical-plane and spirit-plane components. </text:p>
        </text:list-item>
      </text:list>
      <text:p text:style-name="Text_20_body">Engage Cress Truce Article 8 joint threat-response operations at appropriate chronicle scale when Black Spiral Dancer pressure exceeds single-splat capacity. Article 8 operations against Black Spiral Dancers carry Garou-tribal momentum that Article 8 operations against Pentex do not produce at equivalent scale; render Garou-internal political context as chronicle-active operational character.</text:p>
      <text:p text:style-name="P5"><text:span text:style-name="Source_20_Text"/></text:p>
      <text:p text:style-name="P5"><text:span text:style-name="Source_20_Text"/></text:p>
      <text:p text:style-name="P5"><text:span text:style-name="Source_20_Tex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5" table:style-name="Table5">
        <table:table-column table:style-name="Table5.A"/>
        <table:table-column table:style-name="Table5.B"/>
        <table:table-header-rows>
          <text:soft-page-break/>
          <table:table-row>
            <table:table-cell table:style-name="Table5.A1" office:value-type="string">
              <text:p text:style-name="Table_20_Heading">Module</text:p>
            </table:table-cell>
            <table:table-cell table:style-name="Table5.A1" office:value-type="string">
              <text:p text:style-name="Table_20_Heading">Black Spiral Dancer application</text:p>
            </table:table-cell>
          </table:table-row>
        </table:table-header-rows>
        <table:table-row>
          <table:table-cell table:style-name="Table5.A1" office:value-type="string">
            <text:p text:style-name="P6"><text:span text:style-name="Strong_20_Emphasis">Pentex supplement</text:span> (<text:span text:style-name="Source_20_Text"><text:span text:style-name="T1">vtm_pentex_by_night.json</text:span></text:span>)</text:p>
          </table:table-cell>
          <table:table-cell table:style-name="Table5.A1" office:value-type="string">
            <text:p text:style-name="Table_20_Contents">Cross-Wyrm-infrastructure cooperation between Black Spiral Dancers and Pentex; routine fomor operational pressure complemented by Black Spiral Dancer Garou-tier antagonist material</text:p>
          </table:table-cell>
        </table:table-row>
        <table:table-row>
          <table:table-cell table:style-name="Table5.A1" office:value-type="string">
            <text:p text:style-name="P6"><text:span text:style-name="Strong_20_Emphasis">Garou Diplomatic Supplement</text:span> (<text:span text:style-name="Source_20_Text"><text:span text:style-name="T1">vtm_garou_diplomatic.json</text:span></text:span>)</text:p>
          </table:table-cell>
          <table:table-cell table:style-name="Table5.A1" office:value-type="string">
            <text:p text:style-name="Table_20_Contents">Cress Truce Article 8 operational infrastructure for cross-supernatural cooperation against significant Black Spiral Dancer operational pressure; Article 8 against Black Spiral Dancers operates with Garou-tribal operational momentum that Article 8 against Pentex does not produce</text:p>
          </table:table-cell>
        </table:table-row>
        <table:table-row>
          <table:table-cell table:style-name="Table5.A1" office:value-type="string">
            <text:p text:style-name="Table_20_Contents"><text:span text:style-name="Strong_20_Emphasis">Cross-Supernatural Diplomatic Chronicle Prep Guide</text:span></text:p>
          </table:table-cell>
          <table:table-cell table:style-name="Table5.A1" office:value-type="string">
            <text:p text:style-name="Table_20_Contents">Primary handling guidance for continental Article 8 chronicle scenes engaging Black Spiral Dancer operational pressure</text:p>
          </table:table-cell>
        </table:table-row>
        <table:table-row>
          <table:table-cell table:style-name="Table5.A1" office:value-type="string">
            <text:p text:style-name="Table_20_Contents"><text:span text:style-name="Strong_20_Emphasis">Continental Coordination Guide</text:span></text:p>
          </table:table-cell>
          <table:table-cell table:style-name="Table5.A1" office:value-type="string">
            <text:p text:style-name="Table_20_Contents">Continental Australian Black Spiral Dancer Hives produce continuing operational pressure across continental Australian geography; chronicles benefit from continental coordination handling guidance</text:p>
          </table:table-cell>
        </table:table-row>
        <table:table-row>
          <table:table-cell table:style-name="Table5.A1" office:value-type="string">
            <text:p text:style-name="P6"><text:span text:style-name="Strong_20_Emphasis">Brisbane Supplement</text:span> (<text:span text:style-name="Source_20_Text"><text:span text:style-name="T1">vtm_brisbane_by_night.json</text:span></text:span>)</text:p>
          </table:table-cell>
          <table:table-cell table:style-name="Table5.A1" office:value-type="string">
            <text:p text:style-name="Table_20_Contents">Brisbane Cress Truce exclusion produces specific complications around Brisbane Black Spiral Dancer operational pressure response; Barrier Hive (Queensland) operational pressure affects Brisbane positioning</text:p>
          </table:table-cell>
        </table:table-row>
        <table:table-row>
          <table:table-cell table:style-name="Table5.A1" office:value-type="string">
            <text:p text:style-name="Table_20_Contents"><text:span text:style-name="Strong_20_Emphasis">Australian Antagonist Pack — Hardacre AFP-TP</text:span></text:p>
          </table:table-cell>
          <table:table-cell table:style-name="Table5.A1" office:value-type="string">
            <text:p text:style-name="Table_20_Contents">Continental AFP-Twilight-Project intelligence cooperation produces continental Black-Spiral-Dancer-relevant intelligence-sharing patterns</text:p>
          </table:table-cell>
        </table:table-row>
      </table:table>
      <text:h text:style-name="Heading_20_3" text:outline-level="3"><text:span text:style-name="Strong_20_Emphasis">Layering the lorebooks for cross-Wyrm-infrastructure chronicles</text:span></text:h>
      <text:p text:style-name="Preformatted_20_Text"><text:span text:style-name="Source_20_Text">[BASE LAYER] vtm_modern_nights.json <text:s text:c="6"/>— always loaded</text:span></text:p>
      <text:p text:style-name="Preformatted_20_Text"><text:span text:style-name="Source_20_Text"><text:s text:c="16"/>↓</text:span></text:p>
      <text:p text:style-name="Preformatted_20_Text"><text:span text:style-name="Source_20_Text">[CITY LAYER] Relevant Australian city supplements per chronicle scope</text:span></text:p>
      <text:p text:style-name="Preformatted_20_Text"><text:span text:style-name="Source_20_Text"><text:s text:c="16"/>↓</text:span></text:p>
      <text:p text:style-name="Preformatted_20_Text"><text:span text:style-name="Source_20_Text">[CROSS-SPLAT LAYER] vtm_garou_diplomatic.json <text:s text:c="3"/>— for Article 8 operations</text:span></text:p>
      <text:p text:style-name="Preformatted_20_Text"><text:span text:style-name="Source_20_Text"><text:s text:c="16"/>↓</text:span></text:p>
      <text:p text:style-name="Preformatted_20_Text"><text:span text:style-name="Source_20_Text">[ANTAGONIST LAYER] vtm_pentex_by_night.json <text:s text:c="5"/>— for Pentex operational infrastructure</text:span></text:p>
      <text:p text:style-name="Preformatted_20_Text"><text:span text:style-name="Source_20_Text"><text:s text:c="16"/>+ vtm_black_spiral_dancers.json <text:s/>← NEW</text:span></text:p>
      <text:p text:style-name="Preformatted_20_Text"><text:span text:style-name="Source_20_Text"><text:s text:c="16"/>↓</text:span></text:p>
      <text:p text:style-name="P4"><text:span text:style-name="Source_20_Text">[CHRONICLE PREP LAYER] Cross-Supernatural Diplomatic Prep Guide + Continental Coordination Guide for continental cross-Wyrm-infrastructure chronicles</text:span></text:p>
      <text:h text:style-name="Heading_20_3" text:outline-level="3"><text:span text:style-name="Strong_20_Emphasis">Recommended chronicle scope variations engaging Black Spiral Dancer material:</text:span></text:h>
      <table:table table:name="Table6" table:style-name="Table6">
        <table:table-column table:style-name="Table6.A"/>
        <table:table-column table:style-name="Table6.B"/>
        <table:table-header-rows>
          <table:table-row>
            <table:table-cell table:style-name="Table6.A1" office:value-type="string">
              <text:p text:style-name="Table_20_Heading">Scope variation</text:p>
            </table:table-cell>
            <table:table-cell table:style-name="Table6.A1" office:value-type="string">
              <text:p text:style-name="Table_20_Heading">Lorebook layering</text:p>
            </table:table-cell>
          </table:table-row>
        </table:table-header-rows>
        <table:table-row>
          <table:table-cell table:style-name="Table6.A1" office:value-type="string">
            <text:p text:style-name="Table_20_Contents"><text:span text:style-name="Strong_20_Emphasis">Background Black Spiral Dancer chronicles</text:span></text:p>
          </table:table-cell>
          <table:table-cell table:style-name="Table6.A1" office:value-type="string">
            <text:p text:style-name="Table_20_Contents">Modern Nights + city supplement + Black Spiral Dancers (background reference)</text:p>
          </table:table-cell>
        </table:table-row>
        <table:table-row>
          <table:table-cell table:style-name="Table6.A1" office:value-type="string">
            <text:p text:style-name="Table_20_Contents"><text:span text:style-name="Strong_20_Emphasis">Continental Black Spiral Dancer operational chronicles</text:span></text:p>
          </table:table-cell>
          <table:table-cell table:style-name="Table6.A1" office:value-type="string">
            <text:p text:style-name="Table_20_Contents">Modern Nights + Australian city supplements + Garou Diplomatic + Black Spiral Dancers</text:p>
          </table:table-cell>
        </table:table-row>
        <table:table-row>
          <table:table-cell table:style-name="Table6.A1" office:value-type="string">
            <text:p text:style-name="Table_20_Contents"><text:span text:style-name="Strong_20_Emphasis">Cross-Wyrm-infrastructure chronicles</text:span></text:p>
          </table:table-cell>
          <table:table-cell table:style-name="Table6.A1" office:value-type="string">
            <text:p text:style-name="Table_20_Contents">Modern Nights + Australian city supplements + Garou Diplomatic + Pentex + Black Spiral Dancers</text:p>
          </table:table-cell>
        </table:table-row>
        <table:table-row>
          <table:table-cell table:style-name="Table6.A1" office:value-type="string">
            <text:p text:style-name="Table_20_Contents"><text:span text:style-name="Strong_20_Emphasis">Continental Hive Lord engagement chronicles</text:span></text:p>
          </table:table-cell>
          <table:table-cell table:style-name="Table6.A1" office:value-type="string">
            <text:p text:style-name="Table_20_Contents">All cross-Wyrm-infrastructure chronicle layering + Continental Coordination Guide</text:p>
          </table:table-cell>
        </table:table-row>
      </table:table>
      <text:p text:style-name="P3"><text:span text:style-name="Strong_20_Emphasis"/></text:p>
      <text:p text:style-name="P3"><text:soft-page-break/><text:span text:style-name="Strong_20_Emphasis">The Black Spiral Dancer supplement is complete.</text:span> A 14-entry lorebook providing Garou-tier Wyrm-corrupted antagonist material complementing Pentex operations: tribal-cosmic-inversion framework with Dancing the Black Spiral initiation ritual, Hive infrastructure with physical-and-spirit-realm operational positioning at four-tier leadership hierarchy (Hive Lord / Theurges / Galliards / Ahrouns / Philodox / Ragabashes), Garou-tier combat capacity with five Garou-form shifting capacities (Homid, Glabro, Crinos, Hispo, Lupus) plus Rage-based combat-acceleration plus Gnosis-based cross-realm operations plus regeneration capacity plus silver-vulnerability tactical considerations, cross-Wyrm-infrastructure cooperation with Pentex operations through four structural arrangements, continental Australian Black Spiral Dancer operations across three significant Hives (Burrup Hive in Western Australia under Marrak the Twisted, Barrier Hive at Great Barrier Reef adjacent to Queensland under Korva the Coral-Devourer, Nullarbor Hive at WA-SA boundary under Drekhna the Bone-Whisperer) plus smaller positions producing ~90-110 total continental Australian Garou-tier operatives, Black Spiral Dancer-Kindred cross-splat combat dynamics at natural-enemy continental cross-cosmic-framework scale, the metaphysical horror dimension at maximum continental cross-supernatural metaphysical horror scale, Cress Truce Article 8 joint threat-response operations against Black Spiral Dancer pressure with continental Australian operational history (1956 Burrup, 1978 Barrier, 1995 Nullarbor) and continuing 2025-2026 chronicle-active intelligence-monitoring, sample antagonist builds (Marrak the Twisted as ~7th-gen-equivalent senior Hive Lord, Hesh of the Open Wound as ~9th-gen-equivalent junior Ahroun combatant), six chronicle hook categories, and chronicle scope handling guidance for four scope vari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1:15:12.891848959</dc:date>
    <meta:editing-duration>PT7M40S</meta:editing-duration>
    <meta:editing-cycles>2</meta:editing-cycles>
    <meta:generator>LibreOffice/24.2.7.2$Linux_X86_64 LibreOffice_project/420$Build-2</meta:generator>
    <meta:document-statistic meta:table-count="6" meta:image-count="0" meta:object-count="0" meta:page-count="8" meta:paragraph-count="144" meta:word-count="1725" meta:character-count="15828" meta:non-whitespace-character-count="14143"/>
  </office:meta>
</office:document-meta>
</file>