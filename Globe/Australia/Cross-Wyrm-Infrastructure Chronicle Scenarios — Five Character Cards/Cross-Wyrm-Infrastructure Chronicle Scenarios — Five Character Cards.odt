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4.214cm"/>
    </style:style>
    <style:style style:name="Table1.C" style:family="table-column">
      <style:table-column-properties style:column-width="6.962cm"/>
    </style:style>
    <style:style style:name="Table1.D" style:family="table-column">
      <style:table-column-properties style:column-width="5.39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Five chronicle scenarios providing playable {{user}} character starting positions for cross-splat chronicle work engaging Pentex-Black-Spiral-Dancer joint operations, Cress Truce Article 8 operations, and Hive infiltration material. Each scenario engages distinct chronicle hook infrastructure across the continental Australian cross-Wyrm-infrastructure operational scope.</text:p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#</text:p>
            </table:table-cell>
            <table:table-cell table:style-name="Table1.A1" office:value-type="string">
              <text:p text:style-name="Table_20_Heading">Scenario</text:p>
            </table:table-cell>
            <table:table-cell table:style-name="Table1.A1" office:value-type="string">
              <text:p text:style-name="Table_20_Heading">Primary Engagement</text:p>
            </table:table-cell>
            <table:table-cell table:style-name="Table1.A1" office:value-type="string">
              <text:p text:style-name="Table_20_Heading">Chronicle Scop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The Barrier Hive Infiltration Operative</text:span></text:p>
          </table:table-cell>
          <table:table-cell table:style-name="Table1.A1" office:value-type="string">
            <text:p text:style-name="Table_20_Contents">Tremere ritual specialist, Hive infiltration approach work</text:p>
          </table:table-cell>
          <table:table-cell table:style-name="Table1.A1" office:value-type="string">
            <text:p text:style-name="Table_20_Contents">Queensland-Brisbane cross-splat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The Article 8 Tactical Specialist</text:span></text:p>
          </table:table-cell>
          <table:table-cell table:style-name="Table1.A1" office:value-type="string">
            <text:p text:style-name="Table_20_Contents">Senior Brujah, joint Garou-Kindred Article 8 operations</text:p>
          </table:table-cell>
          <table:table-cell table:style-name="Table1.A1" office:value-type="string">
            <text:p text:style-name="Table_20_Contents">Continental Camarilla cross-supernatural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trong_20_Emphasis">The Pentex Investigation Operative</text:span></text:p>
          </table:table-cell>
          <table:table-cell table:style-name="Table1.A1" office:value-type="string">
            <text:p text:style-name="Table_20_Contents">Toreador investigator, Pentex-BSD cooperation patterns</text:p>
          </table:table-cell>
          <table:table-cell table:style-name="Table1.A1" office:value-type="string">
            <text:p text:style-name="Table_20_Contents">Sydney Independent investigation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trong_20_Emphasis">The Brisbane Cross-Splat Operative</text:span></text:p>
          </table:table-cell>
          <table:table-cell table:style-name="Table1.A1" office:value-type="string">
            <text:p text:style-name="Table_20_Contents">Senior Lasombra antitribu, Brisbane Cress Truce exclusion complications</text:p>
          </table:table-cell>
          <table:table-cell table:style-name="Table1.A1" office:value-type="string">
            <text:p text:style-name="Table_20_Contents">Brisbane Sabbat-survivor outside-framework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trong_20_Emphasis">The Continental Coordination Specialist</text:span></text:p>
          </table:table-cell>
          <table:table-cell table:style-name="Table1.A1" office:value-type="string">
            <text:p text:style-name="Table_20_Contents">Senior Ventrue, continental economic-cultivation with cross-Wyrm awareness</text:p>
          </table:table-cell>
          <table:table-cell table:style-name="Table1.A1" office:value-type="string">
            <text:p text:style-name="Table_20_Contents">Continental Camarilla-Independent bridging</text:p>
          </table:table-cell>
        </table:table-row>
      </table:table>
      <text:p text:style-name="Preformatted_20_Text"/>
      <text:p text:style-name="P1"><text:span text:style-name="Source_20_Text">DR. ZARA OKONKWO-HARTWELL</text:span></text:p>
      <text:p text:style-name="P1"><text:span text:style-name="Source_20_Text">SERGEANT ELI MAHONEN-KEOUGH</text:span></text:p>
      <text:p text:style-name="P1"><text:span text:style-name="Source_20_Text">CASSANDRA WEBB-LIN</text:span></text:p>
      <text:p text:style-name="P1"><text:span text:style-name="Source_20_Text">BROTHER TOMÁS CORTEZ-WALSH</text:span></text:p>
      <text:p text:style-name="P1"><text:span text:style-name="Source_20_Text">MADAME YELENA HASANOV-CHEN</text:span></text:p>
      <text:p text:style-name="Preformatted_20_Text"><text:span text:style-name="Strong_20_Emphasis">The five Cross-Wyrm-Infrastructure Chronicle Scenarios are complete.</text:span> Five {{user}} character cards covering chronicle scope variations: Scenario 1 (Dr. Zara Okonkwo-Hartwell — Tremere ritual specialist conducting Barrier Hive infiltration approach work under Lumley's Drummond Institute coordination), Scenario 2 (Sergeant Eli Mahonen-Keough — senior Brujah Toorak Circle tactical specialist with 30-year continental Article 8 operational experience preparing for chronicle-defining 2025-2026 joint operations), Scenario 3 (Cassandra Webb-Lin — Toreador investigator in Vaucluse Five orbit with accumulated independent intelligence on Pentex Australian operations approaching institutional positioning decision under Sarrasine direct engagement), Scenario 4 (Brother Tomás Cortez-Walsh — senior Brisbane Lasombra antitribu navigating Brisbane Cress Truce exclusion through informal Wendigo-and-Uktena tribe cooperation arrangements at chronicle-defining continental cross-tribal cooperation scale), Scenario 5 (Madame Yelena Hasanov-Chen — near-methuselah-track Ventrue with 124-year tenure facing continental coordination role at maximum continental cross-Wyrm-infrastructure operational scope approaching Princely succession candidate consideration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3T21:29:38.298054785</dc:date>
    <meta:editing-duration>PT7M6S</meta:editing-duration>
    <meta:editing-cycles>1</meta:editing-cycles>
    <meta:document-statistic meta:table-count="1" meta:image-count="0" meta:object-count="0" meta:page-count="1" meta:paragraph-count="31" meta:word-count="270" meta:character-count="2471" meta:non-whitespace-character-count="2227"/>
    <meta:generator>LibreOffice/24.2.7.2$Linux_X86_64 LibreOffice_project/420$Build-2</meta:generator>
  </office:meta>
</office:document-meta>
</file>