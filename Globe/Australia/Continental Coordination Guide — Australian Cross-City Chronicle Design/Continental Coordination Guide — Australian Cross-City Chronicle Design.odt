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4.491cm"/>
    </style:style>
    <style:style style:name="Table1.B" style:family="table-column">
      <style:table-column-properties style:column-width="12.51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5.198cm"/>
    </style:style>
    <style:style style:name="Table2.B" style:family="table-column">
      <style:table-column-properties style:column-width="11.802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6.692cm"/>
    </style:style>
    <style:style style:name="Table3.B" style:family="table-column">
      <style:table-column-properties style:column-width="10.308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4.346cm"/>
    </style:style>
    <style:style style:name="Table4.B" style:family="table-column">
      <style:table-column-properties style:column-width="12.654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4.5cm"/>
    </style:style>
    <style:style style:name="Table5.B" style:family="table-column">
      <style:table-column-properties style:column-width="12.501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3.436cm"/>
    </style:style>
    <style:style style:name="Table6.B" style:family="table-column">
      <style:table-column-properties style:column-width="13.564cm"/>
    </style:style>
    <style:style style:name="Table6.A1" style:family="table-cell">
      <style:table-cell-properties style:vertical-align="middle" fo:padding="0.049cm" fo:border="none"/>
    </style:style>
    <style:style style:name="P1" style:family="paragraph" style:parent-style-name="Preformatted_20_Text">
      <style:paragraph-properties fo:margin-top="0cm" fo:margin-bottom="0.499cm" style:contextual-spacing="false"/>
    </style:style>
    <style:style style:name="P2" style:family="paragraph" style:parent-style-name="Table_20_Contents">
      <style:paragraph-properties fo:margin-left="0cm" fo:margin-right="0cm" fo:text-indent="0cm" style:auto-text-indent="false"/>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6"/>
    <style:style style:name="P14" style:family="paragraph" style:parent-style-name="Text_20_body" style:list-style-name="L6">
      <style:paragraph-properties fo:margin-top="0cm" fo:margin-bottom="0cm" style:contextual-spacing="false"/>
    </style:style>
    <style:style style:name="P15" style:family="paragraph" style:parent-style-name="Text_20_body" style:list-style-name="L7"/>
    <style:style style:name="P16" style:family="paragraph" style:parent-style-name="Text_20_body" style:list-style-name="L7">
      <style:paragraph-properties fo:margin-top="0cm" fo:margin-bottom="0cm" style:contextual-spacing="false"/>
    </style:style>
    <style:style style:name="P17" style:family="paragraph" style:parent-style-name="Text_20_body" style:list-style-name="L8"/>
    <style:style style:name="P18" style:family="paragraph" style:parent-style-name="Text_20_body" style:list-style-name="L8">
      <style:paragraph-properties fo:margin-top="0cm" fo:margin-bottom="0cm" style:contextual-spacing="false"/>
    </style:style>
    <style:style style:name="P19" style:family="paragraph" style:parent-style-name="Text_20_body" style:list-style-name="L9"/>
    <style:style style:name="P20" style:family="paragraph" style:parent-style-name="Text_20_body" style:list-style-name="L9">
      <style:paragraph-properties fo:margin-top="0cm" fo:margin-bottom="0cm" style:contextual-spacing="false"/>
    </style:style>
    <style:style style:name="P21" style:family="paragraph" style:parent-style-name="Text_20_body" style:list-style-name="L10"/>
    <style:style style:name="P22" style:family="paragraph" style:parent-style-name="Text_20_body" style:list-style-name="L10">
      <style:paragraph-properties fo:margin-top="0cm" fo:margin-bottom="0cm" style:contextual-spacing="false"/>
    </style:style>
    <style:style style:name="P23" style:family="paragraph" style:parent-style-name="Text_20_body" style:list-style-name="L11"/>
    <style:style style:name="P24" style:family="paragraph" style:parent-style-name="Text_20_body" style:list-style-name="L11">
      <style:paragraph-properties fo:margin-top="0cm" fo:margin-bottom="0cm" style:contextual-spacing="false"/>
    </style:style>
    <style:style style:name="P25" style:family="paragraph" style:parent-style-name="Text_20_body" style:list-style-name="L12"/>
    <style:style style:name="P26" style:family="paragraph" style:parent-style-name="Text_20_body" style:list-style-name="L12">
      <style:paragraph-properties fo:margin-top="0cm" fo:margin-bottom="0cm" style:contextual-spacing="false"/>
    </style:style>
    <style:style style:name="P27" style:family="paragraph" style:parent-style-name="Text_20_body" style:list-style-name="L13"/>
    <style:style style:name="P28" style:family="paragraph" style:parent-style-name="Text_20_body" style:list-style-name="L13">
      <style:paragraph-properties fo:margin-top="0cm" fo:margin-bottom="0cm" style:contextual-spacing="false"/>
    </style:style>
    <style:style style:name="P29" style:family="paragraph" style:parent-style-name="Text_20_body" style:list-style-name="L14"/>
    <style:style style:name="P30" style:family="paragraph" style:parent-style-name="Text_20_body" style:list-style-name="L14">
      <style:paragraph-properties fo:margin-top="0cm" fo:margin-bottom="0cm" style:contextual-spacing="false"/>
    </style:style>
    <style:style style:name="P31" style:family="paragraph" style:parent-style-name="Text_20_body" style:list-style-name="L15"/>
    <style:style style:name="P32" style:family="paragraph" style:parent-style-name="Text_20_body" style:list-style-name="L15">
      <style:paragraph-properties fo:margin-top="0cm" fo:margin-bottom="0cm" style:contextual-spacing="false"/>
    </style:style>
    <style:style style:name="P33" style:family="paragraph" style:parent-style-name="Text_20_body" style:list-style-name="L16"/>
    <style:style style:name="P34" style:family="paragraph" style:parent-style-name="Text_20_body" style:list-style-name="L16">
      <style:paragraph-properties fo:margin-top="0cm" fo:margin-bottom="0cm" style:contextual-spacing="false"/>
    </style:style>
    <style:style style:name="P35" style:family="paragraph" style:parent-style-name="Text_20_body" style:list-style-name="L17"/>
    <style:style style:name="P36" style:family="paragraph" style:parent-style-name="Text_20_body" style:list-style-name="L17">
      <style:paragraph-properties fo:margin-top="0cm" fo:margin-bottom="0cm" style:contextual-spacing="false"/>
    </style:style>
    <style:style style:name="P37" style:family="paragraph" style:parent-style-name="Text_20_body" style:list-style-name="L18"/>
    <style:style style:name="P38" style:family="paragraph" style:parent-style-name="Text_20_body" style:list-style-name="L18">
      <style:paragraph-properties fo:margin-top="0cm" fo:margin-bottom="0cm" style:contextual-spacing="false"/>
    </style:style>
    <style:style style:name="P39" style:family="paragraph" style:parent-style-name="Text_20_body" style:list-style-name="L19"/>
    <style:style style:name="P40" style:family="paragraph" style:parent-style-name="Text_20_body" style:list-style-name="L19">
      <style:paragraph-properties fo:margin-top="0cm" fo:margin-bottom="0cm" style:contextual-spacing="false"/>
    </style:style>
    <style:style style:name="T1" style:family="text">
      <style:text-properties fo:color="#f97583" loext:opacity="10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 meta-document for designing and running chronicles that span multiple Australian Kindred metropolitan domains — Sydney (Sarrasine's Independent methuselah-tempo), Melbourne (Lytton's Camarilla orthodox), Brisbane (Bishop Callista's doctrinal Sabbat-survivor), Adelaide (Octavia Marsh's smaller-town Camarilla orthodox). Continental coordination chronicles operate at scale most chronicle modes do not engage — multiple distinct cultural-political registers held simultaneously, continental geographic rhythm spanning approximately 3,500 km of operational territory, and cross-city operational pacing that requires deliberate Storyteller / AI calibration to avoid common failure modes.</text:p>
      <text:p text:style-name="Text_20_body"><text:span text:style-name="Strong_20_Emphasis">Design principle:</text:span> Continental coordination chronicles are <text:span text:style-name="Emphasis">chronicle-mode plurality</text:span> chronicles. Where single-city chronicles hold one chronicle mode coherently (Camarilla orthodox in Melbourne, Sabbat-survivor in Brisbane, methuselah-tempo in Sydney, Camarilla orthodox in Adelaide), continental chronicles hold <text:span text:style-name="Emphasis">multiple modes simultaneously</text:span> and engage the <text:span text:style-name="Emphasis">interfaces between modes</text:span> as chronicle-central texture. This guide provides the framework for chronicle-mode plurality work that single-city chronicles do not require.</text:p>
      <text:p text:style-name="Text_20_body"><text:span text:style-name="Strong_20_Emphasis">Audience:</text:span> Storytellers and AI prompt designers running continental Australian chronicles, players preparing characters whose chronicle scope spans multiple Australian cities, and chronicle designers developing continental Australian campaign infrastructure.</text:p>
      <text:p text:style-name="Text_20_body"><text:span text:style-name="Strong_20_Emphasis">Position in the kit:</text:span> This guide complements the six existing chronicle-mode prep guides (Sabbat-Survivor, Camarilla Orthodox, Methuselah-Tempo, Anarch Movement, Hecata Family, Cross-Supernatural Diplomatic) by addressing the <text:span text:style-name="Emphasis">meta-question</text:span> of how to combine chronicle modes coherently when chronicle scope requires multiple modes simultaneously. The guide assumes familiarity with the core kit, the four Australian city supplements, and the relevant chronicle-mode prep guides for the specific modes a continental chronicle engages.</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Text_20_body"><text:soft-page-break/>Continental coordination chronicles diverge from single-city chronicles along five structural axes that produce the chronicle mode's distinctive design challenges.</text:p>
      <text:h text:style-name="Heading_20_3" text:outline-level="3"><text:span text:style-name="Strong_20_Emphasis">Axis 1: Chronicle-Mode Plurality</text:span></text:h>
      <text:p text:style-name="Text_20_body"><text:span text:style-name="Strong_20_Emphasis">Single-city chronicles hold one chronicle mode coherently.</text:span> Melbourne chronicles operate Camarilla orthodox; Sydney chronicles operate methuselah-tempo; Brisbane chronicles operate Sabbat-survivor; Adelaide chronicles operate smaller-town Camarilla orthodox. Each mode produces internally coherent chronicle texture across extended chronicle work.</text:p>
      <text:p text:style-name="Text_20_body"><text:span text:style-name="Strong_20_Emphasis">Continental coordination chronicles hold multiple chronicle modes simultaneously.</text:span> A chronicle engaging Melbourne and Brisbane operations holds Camarilla orthodox and Sabbat-survivor modes; a chronicle engaging Sydney and Melbourne operations holds methuselah-tempo and Camarilla orthodox modes; a full continental chronicle engaging all four cities holds all four modes. The chronicle's central design challenge is <text:span text:style-name="Emphasis">holding plurality coherently</text:span> — preventing the modes from blurring into mode-confusion failure while preventing the modes from operating as disconnected single-city chronicles that share only nominal cross-city plot threads.</text:p>
      <text:p text:style-name="Text_20_body">The structural implication: continental chronicle scenes carry mode-marker awareness that single-city chronicles do not require. A Melbourne scene operates under Camarilla orthodox register; a Brisbane scene in the same chronicle operates under Sabbat-survivor register; the transition between scenes requires deliberate mode-pivot handling that single-city chronicles never engage.</text:p>
      <text:p text:style-name="Text_20_body"><text:span text:style-name="Strong_20_Emphasis">Design implication:</text:span> Build chronicle arcs that engage chronicle-mode plurality as central design feature rather than as accidental chronicle-scope expansion. The plurality is the chronicle mode's distinctive character; chronicles that try to hold plurality without engaging the plurality as central feature consistently produce mode-confusion failure modes.</text:p>
      <text:h text:style-name="Heading_20_3" text:outline-level="3"><text:span text:style-name="Strong_20_Emphasis">Axis 2: Continental Geographic Rhythm</text:span></text:h>
      <text:p text:style-name="Text_20_body"><text:span text:style-name="Strong_20_Emphasis">Single-city chronicles operate at metropolitan geographic scale.</text:span> Melbourne chronicle scenes occur within approximately 90 km metropolitan radius; Sydney scenes within approximately 80 km; Brisbane scenes within approximately 60 km; Adelaide scenes within approximately 30 km. Travel between scenes is minutes to hours.</text:p>
      <text:p text:style-name="Text_20_body"><text:span text:style-name="Strong_20_Emphasis">Continental coordination chronicles operate at continental Australian geographic scale.</text:span> Melbourne to Adelaide is 1,400 km (continuing Octavia-Lytton coordination geographic distance); Melbourne to Sydney is 880 km; Melbourne to Brisbane is 1,700 km; Sydney to Brisbane is 920 km; Adelaide to Brisbane is 2,000 km. Travel between cities is hours to days; continuing inter-city coordination operates at temporal rhythm continental geographic distances produce.</text:p>
      <text:p text:style-name="Text_20_body">The structural implication: continental chronicle scenes carry temporal-rhythm awareness that single-city chronicles do not require. Operations that resolve in a session in single-city chronicles take 3-5 sessions in continental chronicles when the operations require cross-city coordination; chronicle pacing accommodates continental geographic rhythm through deliberate scene-spacing patterns that single-city chronicles never engage.</text:p>
      <text:p text:style-name="Text_20_body"><text:span text:style-name="Strong_20_Emphasis">Design implication:</text:span> Build chronicle arcs that accommodate continental geographic rhythm as structural pacing feature rather than as plot-mechanical inconvenience. Continental chronicles that try to operate at single-city temporal rhythm consistently produce pacing-failure modes.</text:p>
      <text:h text:style-name="Heading_20_3" text:outline-level="3"><text:soft-page-break/><text:span text:style-name="Strong_20_Emphasis">Axis 3: Continental Political Geography</text:span></text:h>
      <text:p text:style-name="Text_20_body"><text:span text:style-name="Strong_20_Emphasis">Single-city chronicles engage one Princely/authority structure.</text:span> Melbourne operates under Lytton's Camarilla Princely authority; Sydney under Sarrasine's Independent methuselah authority; Brisbane under Bishop Callista's Sabbat ecclesiastical authority; Adelaide under Octavia's Camarilla Princely authority.</text:p>
      <text:p text:style-name="Text_20_body"><text:span text:style-name="Strong_20_Emphasis">Continental coordination chronicles engage multiple authority structures simultaneously with their interfaces.</text:span> The Lytton-Octavia Camarilla continental coordination produces continuing Australian Camarilla institutional infrastructure; the Lytton-Sarrasine Camarilla-Independent diplomatic correspondence produces continuing continental cross-sect coordination; the Sarrasine-Bishop Callista Independent-Sabbat formal correspondence produces continuing continental cross-sect coordination at minimal institutional level; the broader continental Australian political geography includes continuing Cress Truce framework that Sydney engages through bilateral Sarrasine-Tomás protocols rather than through full continental protocols, that Brisbane operates outside through Cress Truce exclusion, and that Melbourne and Adelaide engage through full Cress Truce institutional infrastructure.</text:p>
      <text:p text:style-name="Text_20_body">The structural implication: continental chronicle scenes operate within multi-authority political geography that requires Storyteller / AI capacity to track multiple authority registers simultaneously. Authority interactions produce chronicle-active dynamics that single-city chronicles do not generate; continuing inter-authority correspondence patterns produce chronicle infrastructure that single-city chronicles never engage.</text:p>
      <text:p text:style-name="Text_20_body"><text:span text:style-name="Strong_20_Emphasis">Design implication:</text:span> Build chronicle arcs that engage multi-authority political geography as central operational infrastructure. Continental chronicles that try to engage one authority at a time without engaging the inter-authority interfaces consistently produce authority-flatness failure modes.</text:p>
      <text:h text:style-name="Heading_20_3" text:outline-level="3"><text:span text:style-name="Strong_20_Emphasis">Axis 4: The Continental Pressure Convergence</text:span></text:h>
      <text:p text:style-name="Text_20_body"><text:span text:style-name="Strong_20_Emphasis">Single-city chronicles engage city-specific pressures.</text:span> Melbourne engages Lytton's Beckoning trajectory and Sarrasine Phase Two operations affecting Melbourne directly; Sydney engages Sarrasine's continuing Phase Two operations as primary domain; Brisbane engages 2026 Glass Walker operation and continuing Sabbat-survivor institutional pressure; Adelaide engages Octavia's Beckoning trajectory and Sarrasine Phase Two affecting Adelaide.</text:p>
      <text:p text:style-name="Text_20_body"><text:span text:style-name="Strong_20_Emphasis">Continental coordination chronicles engage continental pressure convergence.</text:span> The convergent pressures include: Sarrasine Phase Two continental operation affecting Melbourne, Adelaide, and (through formal correspondence with Bishop Callista) Brisbane simultaneously; continuing senior-figure Beckoning trajectories affecting Lytton (Melbourne), Octavia (Adelaide), and Bishop Callista (Brisbane) simultaneously with parallel patterns; AFP-Twilight-Project surveillance operating across all four cities with cross-city intelligence cooperation; continuing 2026 Brisbane operation cross-Pacific coordination producing continental Australian institutional implications; continuing Cress Truce centennial renewal that completed 2024 producing continental continuing infrastructure.</text:p>
      <text:p text:style-name="Text_20_body">The structural implication: continental chronicle scenes operate under continental pressure convergence at scale that single-city chronicles do not engage. The convergent pressures produce chronicle-active dynamics that operate beyond single-city scope; chronicle late-arc continental institutional positioning may produce continental chronicle-defining outcomes that single-city <text:soft-page-break/>chronicles cannot generate.</text:p>
      <text:p text:style-name="Text_20_body"><text:span text:style-name="Strong_20_Emphasis">Design implication:</text:span> Build chronicle arcs that engage continental pressure convergence as chronicle-central operational infrastructure rather than as background context. Continental chronicles that engage continental pressures as background context consistently produce continental-pressure underdevelopment failure modes.</text:p>
      <text:h text:style-name="Heading_20_3" text:outline-level="3"><text:span text:style-name="Strong_20_Emphasis">Axis 5: Cross-City Character Mobility</text:span></text:h>
      <text:p text:style-name="Text_20_body"><text:span text:style-name="Strong_20_Emphasis">Single-city chronicles engage characters at fixed metropolitan position.</text:span> {{user}} characters operate in Melbourne or Sydney or Brisbane or Adelaide; cross-city operations are exceptional plot events.</text:p>
      <text:p text:style-name="Text_20_body"><text:span text:style-name="Strong_20_Emphasis">Continental coordination chronicles engage characters at continental mobility.</text:span> {{user}} characters operating at continental scope travel between cities as continuing operational infrastructure; continuing cross-city correspondence operations produce continuing chronicle-active dynamics; continuing inter-city institutional positioning produces continental operational competence that single-city characters do not develop.</text:p>
      <text:p text:style-name="Text_20_body">The structural implication: continental chronicle scenes engage character competence at continental scale rather than at single-city scale. Characters who operate effectively at continental scope develop competencies (continental geographic rhythm awareness, multi-authority political geography navigation, chronicle-mode plurality operational competence) that single-city characters do not engage.</text:p>
      <text:p text:style-name="Text_20_body"><text:span text:style-name="Strong_20_Emphasis">Design implication:</text:span> Build {{user}} characters with continental scope competence requirements rather than with single-city scope competence. Continental chronicles that engage single-city-competence characters at continental scope consistently produce character-mismatch failure modes.</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Text_20_body"><text:soft-page-break/>Continental coordination chronicles require detailed understanding of continental Australian political geography — the formal correspondence patterns, institutional cooperation infrastructure, and chronicle-active dynamics that organise inter-authority relationships across the four cities.</text:p>
      <text:h text:style-name="Heading_20_3" text:outline-level="3"><text:span text:style-name="Strong_20_Emphasis">The Lytton-Octavia Continental Camarilla Coordination</text:span></text:h>
      <text:p text:style-name="Text_20_body"><text:span text:style-name="Strong_20_Emphasis">The central diplomatic relationship of Australian Camarilla politics.</text:span> Lytton (Prince Melbourne) and Octavia Marsh (Prince Adelaide) have been close personal friends for 136 years (since Octavia's 1889 arrival in Australia under Lytton's invitation). The relationship operates through four structural characteristics:</text:p>
      <text:list text:style-name="L1">
        <text:list-item>
          <text:p text:style-name="P4"><text:span text:style-name="Strong_20_Emphasis">Personal friendship</text:span> — accumulated 136 years of personal trust; Lytton considers Octavia one of perhaps four Kindred globally he genuinely trusts </text:p>
        </text:list-item>
        <text:list-item>
          <text:p text:style-name="P4"><text:span text:style-name="Strong_20_Emphasis">Formal institutional correspondence</text:span> — weekly formal diplomatic correspondence across the entire 136-year period with continuing institutional integration </text:p>
        </text:list-item>
        <text:list-item>
          <text:p text:style-name="P4"><text:span text:style-name="Strong_20_Emphasis">Parallel operational coordination</text:span> — continuing joint operations across continental Camarilla matters including the November 2024 envoy mission on Sarrasine continental operation, the 2024 Cress Truce centennial renewal coordination, and continuing AFP-Twilight-Project joint defensive-protocol-coordination since 2019 </text:p>
        </text:list-item>
        <text:list-item>
          <text:p text:style-name="P3"><text:span text:style-name="Strong_20_Emphasis">Succession-relationship complexity</text:span> — if either Prince falls, the other is the most plausible successor for continental Camarilla leadership; mutual succession-relationship has been formally discussed five times across 2022-2025 </text:p>
        </text:list-item>
      </text:list>
      <text:p text:style-name="Text_20_body"><text:span text:style-name="Strong_20_Emphasis">Chronicle implications:</text:span> Continental chronicles engaging Lytton-Octavia coordination operate with the relationship as continental institutional foundation. The relationship is not abstract diplomatic infrastructure but specific 136-year friendship producing chronicle-active institutional integration patterns that single-city chronicles do not engage.</text:p>
      <text:h text:style-name="Heading_20_3" text:outline-level="3"><text:span text:style-name="Strong_20_Emphasis">The Lytton-Sarrasine Camarilla-Independent Diplomatic Correspondence</text:span></text:h>
      <text:p text:style-name="Text_20_body"><text:span text:style-name="Strong_20_Emphasis">Continental cross-sect diplomatic correspondence channel.</text:span> Lytton and Sarrasine maintain formal Camarilla-Independent diplomatic correspondence with continuing patterns since Sarrasine's 1888 establishment of independent Sydney domain. The correspondence is <text:span text:style-name="Emphasis">cordial-distant</text:span> rather than warm — both Princes treat the relationship as professional institutional necessity rather than personal connection. Correspondence frequency: approximately quarterly with intensification during chronicle-active periods (current 2025-2026 intensification around Phase Two continental operation, 2026 Brisbane operation cross-Pacific coordination implications).</text:p>
      <text:p text:style-name="Text_20_body"><text:span text:style-name="Strong_20_Emphasis">Chronicle implications:</text:span> Continental chronicles engaging Lytton-Sarrasine correspondence operate with the relationship as continental cross-sect institutional infrastructure. The cordial-distant register produces continuing operational character distinct from Lytton-Octavia warm friendship; continuing correspondence patterns produce continuing chronicle-active dynamics.</text:p>
      <text:h text:style-name="Heading_20_3" text:outline-level="3"><text:span text:style-name="Strong_20_Emphasis">The Sarrasine-Bishop Callista Independent-Sabbat Formal Correspondence</text:span></text:h>
      <text:p text:style-name="Text_20_body"><text:span text:style-name="Strong_20_Emphasis">Continental cross-sect correspondence at minimal institutional level.</text:span> Sarrasine and Bishop Callista maintain formal Independent-Sabbat correspondence with continuing patterns since Bishop Callista's 1976 Brisbane Sabbat establishment. The correspondence is <text:span text:style-name="Emphasis">minimal-formal</text:span> — both authorities treat the relationship as institutional necessity at lowest sustainable level rather than as <text:soft-page-break/>substantive coordination. Correspondence frequency: approximately twice yearly with continuing institutional formality at minimum operational tempo.</text:p>
      <text:p text:style-name="Text_20_body">The continuing relationship includes continuing institutional history: Sarrasine rebuffed multiple Brisbane Sabbat continental incursion attempts during 1980s-1990s producing continuing Sabbat-loyalist institutional withdrawal from Sydney operational territory; continuing post-1990s relationship has stabilised at minimum institutional level with continuing cordial-distant register that distinguishes the relationship from continuing Lytton-Sarrasine cordial-distant register through deeper continuing institutional history of operational conflict.</text:p>
      <text:p text:style-name="Text_20_body"><text:span text:style-name="Strong_20_Emphasis">Chronicle implications:</text:span> Continental chronicles engaging Sarrasine-Bishop Callista correspondence operate with the relationship as continental cross-sect minimal infrastructure. The minimal-formal register produces continuing operational character that distinguishes Brisbane-Sydney operational positioning from Brisbane-Melbourne or Brisbane-Adelaide operational positioning at continental institutional scale.</text:p>
      <text:h text:style-name="Heading_20_3" text:outline-level="3"><text:span text:style-name="Strong_20_Emphasis">The Lytton-Bishop Callista Camarilla-Sabbat Hostile-Formal Correspondence</text:span></text:h>
      <text:p text:style-name="Text_20_body"><text:span text:style-name="Strong_20_Emphasis">Continental cross-sect correspondence at hostile-formal register.</text:span> Lytton and Bishop Callista maintain formal Camarilla-Sabbat correspondence at <text:span text:style-name="Emphasis">hostile-formal</text:span> register — the relationship is institutionally formal but operationally hostile, with continuing institutional acknowledgment that produces continuing minimum-institutional-recognition without producing operational cooperation. Correspondence frequency: approximately annually with continuing formal institutional formality at maximum institutional distance.</text:p>
      <text:p text:style-name="Text_20_body">The continuing relationship includes continuing institutional history: continuing 50-year continental Camarilla-Sabbat operational conflict since 1976 Brisbane Sabbat establishment; continuing continental Camarilla institutional positioning around continuing Brisbane Sabbat continuing institutional pressure including continuing AFP-Twilight-Project intelligence cooperation; continuing continental Camarilla-Sabbat institutional acknowledgment at minimum-institutional level.</text:p>
      <text:p text:style-name="Text_20_body"><text:span text:style-name="Strong_20_Emphasis">Chronicle implications:</text:span> Continental chronicles engaging Lytton-Bishop Callista correspondence operate with the relationship as continental cross-sect hostile-formal infrastructure. The hostile-formal register produces continuing operational character at maximum continental sect-political pressure scale that other continental correspondence relationships do not match.</text:p>
      <text:h text:style-name="Heading_20_3" text:outline-level="3"><text:span text:style-name="Strong_20_Emphasis">The Octavia-Bishop Callista Continental Correspondence (Minimal)</text:span></text:h>
      <text:p text:style-name="Text_20_body"><text:span text:style-name="Strong_20_Emphasis">Continental cross-sect correspondence at smaller-domain-formal register.</text:span> Octavia and Bishop Callista maintain formal Camarilla-Sabbat correspondence at <text:span text:style-name="Emphasis">smaller-domain-formal</text:span> register — Octavia's smaller-domain Adelaide operations produce continuing minimum-institutional correspondence with continuing formal institutional formality at smaller-scale operational tempo than Lytton-Bishop Callista correspondence. Correspondence frequency: approximately annually with continuing minimum-institutional-recognition.</text:p>
      <text:p text:style-name="Text_20_body"><text:span text:style-name="Strong_20_Emphasis">Chronicle implications:</text:span> Continental chronicles engaging Octavia-Bishop Callista correspondence operate with the relationship as continental cross-sect minimal-recognition infrastructure. The smaller-domain-formal register produces continuing operational character distinct from Lytton-Bishop Callista hostile-formal register through smaller continental Camarilla institutional capacity.</text:p>
      <text:h text:style-name="Heading_20_3" text:outline-level="3"><text:soft-page-break/><text:span text:style-name="Strong_20_Emphasis">Continuing Cress Truce Continental Infrastructure</text:span></text:h>
      <text:p text:style-name="Text_20_body"><text:span text:style-name="Strong_20_Emphasis">Continental cross-supernatural diplomatic infrastructure across three of four cities.</text:span> The Cress Truce operates across Melbourne (full Cress Truce framework with Lytton's Toorak Circle, Sister Fatima Salih-El's Sheriff position, and Royal Park Sept under Eliza Hawkins-Greene) and Adelaide (full Cress Truce framework with Octavia's smaller-domain operations, Adelaide Hills Glass Walker sept under Septleader Hartley) plus modified bilateral protocols at Sydney (Sarrasine-Tomás Schreckenberg bilateral cross-supernatural diplomatic infrastructure operating outside formal Cress Truce framework). Brisbane operates outside Cress Truce through continental Cress Truce exclusion as continuing structural feature.</text:p>
      <text:p text:style-name="Text_20_body"><text:span text:style-name="Strong_20_Emphasis">Chronicle implications:</text:span> Continental chronicles engaging Cress Truce infrastructure operate with the framework as cross-supernatural continental infrastructure across three cities with Brisbane exclusion as continuing structural feature. Continental cross-supernatural diplomatic chronicle work requires Storyteller / AI capacity to engage Cress Truce-framework operations at Melbourne and Adelaide, modified bilateral protocols at Sydney, and continental Cress Truce exclusion at Brisbane simultaneously.</text:p>
      <text:h text:style-name="Heading_20_3" text:outline-level="3"><text:span text:style-name="Strong_20_Emphasis">Continental AFP-Twilight-Project Intelligence Pressure</text:span></text:h>
      <text:p text:style-name="Text_20_body"><text:span text:style-name="Strong_20_Emphasis">Continental Australian intelligence cooperation across all four cities.</text:span> The AFP Special Operations Twilight Project operates continental Australian Kindred surveillance across all four cities with city-specific operational tempo: Melbourne primary cell (largest operational tempo), Brisbane primary cell (acute operational tempo), Sydney primary cell (intermediate operational tempo with continuing Sarrasine institutional cover producing reduced effective operational tempo), Adelaide secondary cell (low operational tempo).</text:p>
      <text:p text:style-name="Text_20_body"><text:span text:style-name="Strong_20_Emphasis">Chronicle implications:</text:span> Continental chronicles engaging AFP-Twilight-Project pressure operate with the intelligence infrastructure as continental external-pressure infrastructure that produces continuing chronicle-active dynamics across all four cities simultaneously. Continental chronicle scenes engaging AFP pressure require Storyteller / AI capacity to engage city-specific operational tempo while maintaining continental coordination awareness.</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Text_20_body"><text:soft-page-break/>Continental coordination chronicles require explicit handling of cross-city mode pivots — the moments when chronicle scenes transition from one chronicle mode to another as {{user}} characters move between cities or as cross-city operations engage multiple cities simultaneously. Mode-pivot handling is the chronicle mode's most distinctive design challenge.</text:p>
      <text:h text:style-name="Heading_20_3" text:outline-level="3"><text:span text:style-name="Strong_20_Emphasis">The Six Primary Mode-Pivot Patterns</text:span></text:h>
      <text:p text:style-name="Text_20_body">Continental Australian chronicles produce six primary mode-pivot patterns. Each pattern requires specific handling guidance:</text:p>
      <text:p text:style-name="Text_20_body"><text:span text:style-name="Strong_20_Emphasis">Pivot 1: Melbourne Camarilla Orthodox ↔ Sydney Methuselah-Tempo</text:span></text:p>
      <text:p text:style-name="Text_20_body">The Melbourne-Sydney mode pivot is the most operationally common in continental Australian chronicles (the two largest Australian Kindred metropolitan domains, the most chronicle-active cross-city correspondence channel through Lytton-Sarrasine quarterly coordination). The pivot moves between Melbourne's Australian-informal Camarilla orthodox register (institutional politics, formal court occasions, Status accumulation, Tower-formal register softened with Australian-informal accommodation) and Sydney's methuselah-tempo register (patient operational tempo, surveillance-as-default, double-layer cultural reading, material wealth as ambient texture, deliberate secrecy).</text:p>
      <text:p text:style-name="Text_20_body"><text:span text:style-name="Strong_20_Emphasis">Pivot handling:</text:span> The transition requires explicit register shifts. Melbourne scenes operate at session-resolution operational tempo; Sydney scenes operate at season-resolution operational tempo. Melbourne information-sharing patterns assume institutional cooperation; Sydney information-withholding patterns assume deliberate secrecy. {{user}} characters operating at Melbourne pace produce continuing social friction in Sydney; {{user}} characters operating at Sydney secrecy produce continuing institutional friction in Melbourne. The pivot is not seamless — chronicle scenes engaging the pivot foreground the register shift through explicit operational adaptation.</text:p>
      <text:p text:style-name="Text_20_body"><text:span text:style-name="Strong_20_Emphasis">Common failure mode:</text:span> Mode-blur collapse — Sydney scenes drift toward Melbourne tempo, Melbourne scenes drift toward Sydney secrecy. Corrective adjustment: deliberate register-marker scenes that establish each mode's distinctive operational character before chronicle-active operations engage.</text:p>
      <text:p text:style-name="Text_20_body"><text:span text:style-name="Strong_20_Emphasis">Pivot 2: Melbourne Camarilla Orthodox ↔ Brisbane Sabbat-Survivor</text:span></text:p>
      <text:p text:style-name="Text_20_body">The Melbourne-Brisbane mode pivot operates at maximum continental sect-political distance (continuing Camarilla-Sabbat hostile-formal register at maximum continental scale). The pivot moves between Melbourne's Camarilla orthodox register (institutional politics, Tower-formal register, ceremonial occasions, continuing Cress Truce cross-supernatural diplomatic infrastructure) and Brisbane's Sabbat-survivor register (doctrinal Sabbat practice, Cleaver-feeding institutional protocols, continuing institutional fatigue, continental Cress Truce exclusion, continuing AFP-Twilight-Project acute operational pressure).</text:p>
      <text:p text:style-name="Text_20_body"><text:span text:style-name="Strong_20_Emphasis">Pivot handling:</text:span> The transition requires explicit ethical-character pressure adjustment. Melbourne characters with Humanity 7+ operating in Brisbane experience continuing degradation pressure; Brisbane characters with Humanity 4-5 operating in Melbourne experience continuing institutional friction with Camarilla-orthodox-frame ethical assumptions. The pivot is <text:span text:style-name="Emphasis">uncomfortable by design</text:span> — chronicle scenes engaging the pivot foreground the ethical-character pressure as chronicle-<text:soft-page-break/>central texture rather than as transitional inconvenience.</text:p>
      <text:p text:style-name="Text_20_body"><text:span text:style-name="Strong_20_Emphasis">Common failure mode:</text:span> Sect-political flattening — Brisbane scenes operate as adversary backdrop without continuing Sabbat-survivor institutional coherence; Melbourne scenes operate as adversary backdrop without continuing Camarilla-orthodox institutional coherence. Corrective adjustment: deliberate institutional-coherence rendering at both cities producing continuing institutional weight at both cities simultaneously.</text:p>
      <text:p text:style-name="Text_20_body"><text:span text:style-name="Strong_20_Emphasis">Pivot 3: Sydney Methuselah-Tempo ↔ Brisbane Sabbat-Survivor</text:span></text:p>
      <text:p text:style-name="Text_20_body">The Sydney-Brisbane mode pivot operates at continuing minimal-formal correspondence register (continuing Sarrasine-Bishop Callista institutional history including continuing 1980s-1990s operational conflict and continuing post-1990s minimum-institutional stabilisation). The pivot moves between Sydney's methuselah-tempo register and Brisbane's Sabbat-survivor register at continuing maximum cross-sect operational distance produced through different operational character rather than through formal sect-political opposition.</text:p>
      <text:p text:style-name="Text_20_body"><text:span text:style-name="Strong_20_Emphasis">Pivot handling:</text:span> The transition requires explicit operational-character adjustment. Sydney's patient methuselah-tempo operates at continuing slow accumulating institutional development; Brisbane's Sabbat-survivor mode operates at continuing acute survival-accumulation pacing. The two operational characters are <text:span text:style-name="Emphasis">almost incompatible</text:span> — Sydney's patience would produce institutional vulnerability in Brisbane; Brisbane's acute operational tempo would produce continuing operational visibility in Sydney that Sarrasine's surveillance-as-default tolerance would not absorb. The pivot requires deliberate operational-character pivot handling.</text:p>
      <text:p text:style-name="Text_20_body"><text:span text:style-name="Strong_20_Emphasis">Common failure mode:</text:span> Operational-tempo confusion — Sydney scenes operate at Brisbane acute tempo, Brisbane scenes operate at Sydney patient tempo. Corrective adjustment: explicit temporal-rhythm marker scenes establishing each mode's distinctive operational tempo before chronicle-active operations engage.</text:p>
      <text:p text:style-name="Text_20_body"><text:span text:style-name="Strong_20_Emphasis">Pivot 4: Melbourne Camarilla Orthodox ↔ Adelaide Camarilla Orthodox</text:span></text:p>
      <text:p text:style-name="Text_20_body">The Melbourne-Adelaide mode pivot operates within the same chronicle mode (continuing Camarilla orthodox at both cities) but with distinctive register variations between Melbourne's Australian-informal accommodation and Adelaide's deliberate Edwardian-influenced orthodoxy. The pivot is the most subtle of the six primary mode-pivot patterns; the chronicle mode is shared but the register variation produces continuing operational character difference.</text:p>
      <text:p text:style-name="Text_20_body"><text:span text:style-name="Strong_20_Emphasis">Pivot handling:</text:span> The transition requires explicit register-variation handling. Melbourne court occasions operate at continuing Australian-informal accommodation register that softens Tower-formality; Adelaide court occasions operate at continuing deliberate Edwardian-influenced orthodoxy at substantially more conservative continuing register. Melbourne's Camarilla operations include first-name address among long-tenured court members; Adelaide's Camarilla operations retain formal title-address as continuing institutional norm. The pivot is <text:span text:style-name="Emphasis">register-variation rather than mode-pivot</text:span> but produces continuing operational character difference that requires deliberate handling.</text:p>
      <text:p text:style-name="Text_20_body"><text:span text:style-name="Strong_20_Emphasis">Common failure mode:</text:span> Register-variation flattening — Melbourne scenes operate at Adelaide formality, Adelaide scenes operate at Melbourne informality. Corrective adjustment: deliberate cultural-register marker scenes establishing each city's distinctive Camarilla orthodox variation before chronicle-active operations engage.</text:p>
      <text:p text:style-name="Text_20_body"><text:soft-page-break/><text:span text:style-name="Strong_20_Emphasis">Pivot 5: Sydney Methuselah-Tempo ↔ Adelaide Camarilla Orthodox</text:span></text:p>
      <text:p text:style-name="Text_20_body">The Sydney-Adelaide mode pivot operates at continental cross-sect distance with distinctive operational character contrast (continuing Sarrasine methuselah-tempo Independent operations and continuing Octavia smaller-domain Camarilla orthodox operations produce maximally distinctive operational character contrast despite both being non-Sabbat continental Australian Kindred operations). Sarrasine's continuing 1,470-year temporal scale operates at continuing patient accumulating institutional development; Octavia's continuing 102-year continental Princedom operates at continuing smaller-domain intimate institutional management.</text:p>
      <text:p text:style-name="Text_20_body"><text:span text:style-name="Strong_20_Emphasis">Pivot handling:</text:span> The transition requires explicit institutional-scale adjustment. Sydney's continental methuselah-tier institutional capacity operates at continuing maximum continental cross-Pacific scale; Adelaide's smaller-domain institutional capacity operates at continuing intimate continental Australian scale. {{user}} characters operating at Sydney continental scale in Adelaide produce continuing institutional friction with smaller-domain register; {{user}} characters operating at Adelaide intimate scale in Sydney produce continuing operational visibility that Sarrasine's continental institutional positioning would not absorb.</text:p>
      <text:p text:style-name="Text_20_body"><text:span text:style-name="Strong_20_Emphasis">Common failure mode:</text:span> Institutional-scale confusion — Sydney scenes operate at Adelaide intimate scale, Adelaide scenes operate at Sydney continental scale. Corrective adjustment: deliberate institutional-scale marker scenes establishing each city's distinctive operational scale before chronicle-active operations engage.</text:p>
      <text:p text:style-name="Text_20_body"><text:span text:style-name="Strong_20_Emphasis">Pivot 6: Brisbane Sabbat-Survivor ↔ Adelaide Camarilla Orthodox</text:span></text:p>
      <text:p text:style-name="Text_20_body">The Brisbane-Adelaide mode pivot operates at continuing smaller-domain-formal continental cross-sect distance (continuing Octavia-Bishop Callista smaller-domain-formal correspondence at minimum-recognition register). The pivot is structurally similar to Melbourne-Brisbane Camarilla-Sabbat hostile-formal pivot but at smaller continental Camarilla institutional capacity that produces continuing reduced continental cross-sect operational pressure.</text:p>
      <text:p text:style-name="Text_20_body"><text:span text:style-name="Strong_20_Emphasis">Pivot handling:</text:span> The transition requires explicit smaller-domain-Camarilla-versus-Sabbat-survivor handling. Adelaide's smaller-domain Camarilla orthodox produces continuing institutional cooperation patterns at intimate continental scale; Brisbane's Sabbat-survivor produces continuing institutional pressure at acute continental scale; the pivot operates at maximum operational character contrast through smaller-Camarilla-domain and Sabbat-survivor register simultaneous.</text:p>
      <text:p text:style-name="Text_20_body"><text:span text:style-name="Strong_20_Emphasis">Common failure mode:</text:span> Smaller-domain underdevelopment — Adelaide scenes operate at Melbourne continental Camarilla scale rather than at Adelaide smaller-domain scale; the failure mode produces inappropriate continental Camarilla register that does not engage Adelaide's distinctive smaller-domain register. Corrective adjustment: deliberate smaller-domain marker scenes establishing Adelaide's intimate continental scale before continental cross-sect operations engage.</text:p>
      <text:h text:style-name="Heading_20_3" text:outline-level="3"><text:span text:style-name="Strong_20_Emphasis">Continental Mode-Pivot Frequency Patterns</text:span></text:h>
      <text:p text:style-name="Text_20_body">Continental chronicles produce mode-pivot frequency patterns that require deliberate Storyteller / AI calibration:</text:p>
      <text:list text:style-name="L2">
        <text:list-item>
          <text:p text:style-name="P6"><text:span text:style-name="Strong_20_Emphasis">Heavy mode-pivot chronicles</text:span> (multiple pivots per session) — chronicles operating across multiple cities with continuing inter-city correspondence operations. Heavy pivot chronicles <text:soft-page-break/>produce continuing chronicle-mode plurality awareness as central chronicle texture. Storyteller / AI capacity to maintain mode-coherence across heavy pivot frequency is the central handling challenge. </text:p>
        </text:list-item>
        <text:list-item>
          <text:p text:style-name="P6"><text:span text:style-name="Strong_20_Emphasis">Moderate mode-pivot chronicles</text:span> (one pivot per session, typically scene-pivot rather than session-pivot) — chronicles operating across two-three cities with periodic inter-city operations. Moderate pivot chronicles produce continuing chronicle-mode plurality at sustainable Storyteller / AI handling load. </text:p>
        </text:list-item>
        <text:list-item>
          <text:p text:style-name="P5"><text:span text:style-name="Strong_20_Emphasis">Light mode-pivot chronicles</text:span> (one pivot per multi-session arc) — chronicles operating primarily at one city with occasional cross-city operations. Light pivot chronicles produce continuing chronicle-mode plurality at minimum Storyteller / AI handling load while preserving continental scope. </text:p>
        </text:list-item>
      </text:list>
      <text:p text:style-name="Text_20_body"><text:span text:style-name="Strong_20_Emphasis">Design implication:</text:span> Continental chronicle design should explicitly select mode-pivot frequency pattern at chronicle preparation phase and calibrate chronicle pacing accordingly. Heavy pivot chronicles require extended chronicle length (20+ sessions) for adequate mode-coherence development; light pivot chronicles can operate at standard chronicle length (12-15 sessions).</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Text_20_body"><text:soft-page-break/>Continental coordination chronicles require continental pacing patterns distinct from single-city chronicle pacing. The patterns address continental geographic rhythm, multi-city scene-density distribution, and continental institutional rhythm.</text:p>
      <text:h text:style-name="Heading_20_3" text:outline-level="3"><text:span text:style-name="Strong_20_Emphasis">Arc Structure: Continental Convergence Patterns</text:span></text:h>
      <text:p text:style-name="Text_20_body"><text:span text:style-name="Strong_20_Emphasis">Standard single-city arc structure:</text:span> Setup → Rising Action → Climactic Resolution → Denouement at single-city operational scope.</text:p>
      <text:p text:style-name="Text_20_body"><text:span text:style-name="Strong_20_Emphasis">Continental coordination arc structure:</text:span> Multi-City Setup → Continental Pressure Accumulation → Cross-City Coordination Intensification → Continental Convergence Climax → Continental Resolution with City-Specific Outcomes.</text:p>
      <text:p text:style-name="Text_20_body">The structural implication: continental chronicles produce climactic resolution at continental scale rather than at single-city scale. Continental convergence climaxes engage multiple cities simultaneously with continuing continental pressure resolution producing chronicle-defining outcomes that single-city chronicles cannot generate.</text:p>
      <text:p text:style-name="Text_20_body"><text:span text:style-name="Strong_20_Emphasis">Specific continental convergence patterns:</text:span></text:p>
      <text:list text:style-name="L3">
        <text:list-item>
          <text:p text:style-name="P8"><text:span text:style-name="Strong_20_Emphasis">The Phase Two Continental Convergence</text:span> — chronicles engaging Sarrasine's Phase Two continental operation produce continental convergence at Sydney-Melbourne-Adelaide simultaneous engagement (with continuing Brisbane peripheral involvement through formal Sarrasine-Bishop Callista correspondence) across approximately 2026-2028 chronicle-active period </text:p>
        </text:list-item>
        <text:list-item>
          <text:p text:style-name="P8"><text:span text:style-name="Strong_20_Emphasis">The 2026 Brisbane Operation Continental Convergence</text:span> — chronicles engaging Brisbane's October 2026 Glass Walker operation produce continental convergence at Brisbane primary engagement plus continuing continental Camarilla institutional positioning at Melbourne and Adelaide plus continuing continental Independent positioning at Sydney </text:p>
        </text:list-item>
        <text:list-item>
          <text:p text:style-name="P8"><text:span text:style-name="Strong_20_Emphasis">The Senior-Figure Beckoning Convergence</text:span> — chronicles engaging continuing parallel Beckoning trajectories of Lytton (Melbourne), Octavia (Adelaide), and Bishop Callista (Brisbane) produce continental convergence at continuing simultaneous senior-figure trajectory pressure across three of four continental cities </text:p>
        </text:list-item>
        <text:list-item>
          <text:p text:style-name="P7"><text:span text:style-name="Strong_20_Emphasis">The Continental Cress Truce Convergence</text:span> — chronicles engaging continuing post-2024-centennial-renewal continental Cress Truce institutional development produce continental convergence at Melbourne-Adelaide cross-supernatural diplomatic infrastructure plus continuing Sydney bilateral protocols plus continuing Brisbane continental exclusion implications </text:p>
        </text:list-item>
      </text:list>
      <text:h text:style-name="Heading_20_3" text:outline-level="3"><text:span text:style-name="Strong_20_Emphasis">Scene-Density Distribution Across Continental Cities</text:span></text:h>
      <text:p text:style-name="Text_20_body">Continental chronicle pacing requires deliberate scene-density distribution across continental cities. Recommended distributions for the four primary continental scope variations:</text:p>
      <text:p text:style-name="Text_20_body"><text:span text:style-name="Strong_20_Emphasis">Two-city continental chronicles (Melbourne-Sydney, Melbourne-Brisbane, Sydney-Adelaide, etc.):</text:span></text:p>
      <text:list text:style-name="L4">
        <text:list-item>
          <text:p text:style-name="P10">Primary city: 50-60% chronicle scenes </text:p>
        </text:list-item>
        <text:list-item>
          <text:p text:style-name="P10">Secondary city: 30-40% chronicle scenes </text:p>
        </text:list-item>
        <text:list-item>
          <text:p text:style-name="P9">Inter-city correspondence/travel scenes: 5-15% chronicle scenes </text:p>
        </text:list-item>
      </text:list>
      <text:p text:style-name="Text_20_body"><text:soft-page-break/><text:span text:style-name="Strong_20_Emphasis">Three-city continental chronicles:</text:span></text:p>
      <text:list text:style-name="L5">
        <text:list-item>
          <text:p text:style-name="P12">Primary city: 40-50% chronicle scenes </text:p>
        </text:list-item>
        <text:list-item>
          <text:p text:style-name="P12">Secondary cities (each): 20-25% chronicle scenes </text:p>
        </text:list-item>
        <text:list-item>
          <text:p text:style-name="P11">Inter-city correspondence/travel scenes: 10-15% chronicle scenes </text:p>
        </text:list-item>
      </text:list>
      <text:p text:style-name="Text_20_body"><text:span text:style-name="Strong_20_Emphasis">Four-city continental chronicles (full Australian continental scope):</text:span></text:p>
      <text:list text:style-name="L6">
        <text:list-item>
          <text:p text:style-name="P14">Each city: 20-25% chronicle scenes </text:p>
        </text:list-item>
        <text:list-item>
          <text:p text:style-name="P13">Inter-city correspondence/travel scenes: 15-20% chronicle scenes </text:p>
        </text:list-item>
      </text:list>
      <text:p text:style-name="Text_20_body">The structural implication: continental chronicle scene-density distribution requires deliberate Storyteller / AI calibration to prevent scene-density imbalances that produce single-city-dominance failure modes (where continental chronicles drift toward de-facto single-city operations with cross-city plot threads as background context).</text:p>
      <text:h text:style-name="Heading_20_3" text:outline-level="3"><text:span text:style-name="Strong_20_Emphasis">Continental Geographic Rhythm Pacing Calibration</text:span></text:h>
      <text:p text:style-name="Text_20_body">Continental chronicle pacing calibrates to continental geographic rhythm at four temporal scales:</text:p>
      <text:p text:style-name="Text_20_body"><text:span text:style-name="Strong_20_Emphasis">Hour-scale pacing:</text:span> Within-city chronicle scenes operate at hour-scale (single-night operations, single-evening court occasions, single-day correspondence delivery within a city). Hour-scale operations resolve within session.</text:p>
      <text:p text:style-name="Text_20_body"><text:span text:style-name="Strong_20_Emphasis">Day-scale pacing:</text:span> Inter-city travel operations operate at day-scale (continuing Melbourne-Sydney travel approximately 90 minutes by air with continuing operational adaptation requirements; continuing Melbourne-Brisbane travel approximately 2.5 hours by air; continuing continental travel including Adelaide approximately 1.5-3 hours from Melbourne). Day-scale operations resolve across multiple sessions.</text:p>
      <text:p text:style-name="Text_20_body"><text:span text:style-name="Strong_20_Emphasis">Week-scale pacing:</text:span> Inter-city correspondence operations operate at week-scale (continuing Lytton-Octavia weekly correspondence, continuing Lytton-Sarrasine quarterly correspondence with chronicle-active intensification producing continuing weekly correspondence patterns, continuing Bishop Callista-Cardinal Reyna monthly correspondence producing continuing inter-city correspondence pacing). Week-scale operations resolve across approximately one chronicle arc.</text:p>
      <text:p text:style-name="Text_20_body"><text:span text:style-name="Strong_20_Emphasis">Month-scale pacing:</text:span> Continental institutional coordination operations operate at month-scale (continuing quarterly cross-corridor meetings parallel to Cardinal Reyna's continuing Pacific Northwest pattern but at continental Australian scale; continuing quarterly Truce Council meetings; continuing annual continental institutional rhythm producing continental institutional pacing across multi-arc chronicle development). Month-scale operations resolve across multi-arc chronicle scope.</text:p>
      <text:p text:style-name="Text_20_body"><text:span text:style-name="Strong_20_Emphasis">Design implication:</text:span> Continental chronicle pacing requires deliberate Storyteller / AI calibration across four temporal scales simultaneously. Continental chronicles that operate at single temporal scale (hour-scale only or day-scale only or week-scale only) consistently produce temporal-rhythm-flattening failure modes.</text:p>
      <text:h text:style-name="Heading_20_3" text:outline-level="3"><text:span text:style-name="Strong_20_Emphasis">The Continental Calendar as Pacing Infrastructure</text:span></text:h>
      <text:p text:style-name="Text_20_body">Continental Australian chronicles align to continental institutional calendar that produces pacing infrastructure single-city chronicles do not engage:</text:p>
      <text:list text:style-name="L7">
        <text:list-item>
          <text:p text:style-name="P16"><text:span text:style-name="Strong_20_Emphasis">Anzac Day (April 25)</text:span> — continental Australian formal mortal-political occasion that <text:soft-page-break/>continental Camarilla Australian Princes (Lytton and Octavia) align continental institutional formal occasions with; continuing continental Camarilla Anzac Day correspondence patterns produce continental institutional rhythm </text:p>
        </text:list-item>
        <text:list-item>
          <text:p text:style-name="P16"><text:span text:style-name="Strong_20_Emphasis">The Adelaide Festival (March)</text:span> — continuing Octavia continental Camarilla cultural-cover infrastructure that continental Australian Kindred operations engage through continuing cultural-cultivation register </text:p>
        </text:list-item>
        <text:list-item>
          <text:p text:style-name="P16"><text:span text:style-name="Strong_20_Emphasis">The Australian winter (June-August)</text:span> — continuing temperate-climate operational reduction in Adelaide and Melbourne; continuing continental Australian Cress Truce continental cross-supernatural diplomatic intensification during winter months when Mount Lofty Ranges and Royal Park sept-territory operations are reduced </text:p>
        </text:list-item>
        <text:list-item>
          <text:p text:style-name="P16"><text:span text:style-name="Strong_20_Emphasis">The Brisbane Sabbat liturgical calendar</text:span> — continuing Sabbat liturgical calendar (Festivo dello Estinto in February, Fire Dance in late April, Wild Hunt in late December, Palla Grande in late October) producing continuing Brisbane continental institutional rhythm </text:p>
        </text:list-item>
        <text:list-item>
          <text:p text:style-name="P16"><text:span text:style-name="Strong_20_Emphasis">The Australia Day Sarrasine Reception (January 26)</text:span> — continuing annual Sarrasine Sydney continental institutional formal occasion with continuing Toreador-passing cultural cover; continuing continental institutional positioning around continuing Australia Day operational coordination </text:p>
        </text:list-item>
        <text:list-item>
          <text:p text:style-name="P15"><text:span text:style-name="Strong_20_Emphasis">The Cress Truce centennial renewal (continuing 2024 completion)</text:span> — continuing post-2024 continental cross-supernatural diplomatic infrastructure development producing continuing continental institutional rhythm across continuing Melbourne-Adelaide Cress Truce framework cities </text:p>
        </text:list-item>
      </text:list>
      <text:p text:style-name="Text_20_body"><text:span text:style-name="Strong_20_Emphasis">Design implication:</text:span> Continental chronicle pacing benefits from explicit continental calendar alignment that produces continental institutional rhythm at multi-arc scale. Continental chronicles that ignore continental calendar consistently produce continental-rhythm-disengagement failure modes.</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Text_20_body"><text:soft-page-break/>Six common continental chronicle failure modes, with diagnostic indicators and corrective adjustments. The failure modes operate at continental chronicle scope and require continental scope corrective adjustments.</text:p>
      <text:h text:style-name="Heading_20_3" text:outline-level="3"><text:span text:style-name="Strong_20_Emphasis">Failure Mode 1: Single-City Dominance</text:span></text:h>
      <text:p text:style-name="Text_20_body"><text:span text:style-name="Strong_20_Emphasis">Diagnostic indicators:</text:span></text:p>
      <text:list text:style-name="L8">
        <text:list-item>
          <text:p text:style-name="P18">Continental chronicle scenes drift toward de-facto single-city operations with cross-city plot threads operating as background context </text:p>
        </text:list-item>
        <text:list-item>
          <text:p text:style-name="P18">Scene-density distribution heavily skews toward primary city (~70%+ at primary city in two-city continental chronicle, ~50%+ in three-city continental chronicle, ~35%+ in four-city continental chronicle) </text:p>
        </text:list-item>
        <text:list-item>
          <text:p text:style-name="P18">Cross-city travel and correspondence scenes disappear from chronicle pacing </text:p>
        </text:list-item>
        <text:list-item>
          <text:p text:style-name="P17">Continental geographic rhythm flattens toward single-city temporal pacing </text:p>
        </text:list-item>
      </text:list>
      <text:p text:style-name="Text_20_body"><text:span text:style-name="Strong_20_Emphasis">Underlying problem:</text:span> Continental chronicle has collapsed toward single-city chronicle with continental scope as background context rather than as central operational infrastructure.</text:p>
      <text:p text:style-name="Text_20_body"><text:span text:style-name="Strong_20_Emphasis">Corrective adjustment:</text:span></text:p>
      <text:list text:style-name="L9">
        <text:list-item>
          <text:p text:style-name="P20">Restore scene-density distribution per Part 4 recommendations through deliberate cross-city scene scheduling </text:p>
        </text:list-item>
        <text:list-item>
          <text:p text:style-name="P20">Foreground inter-city correspondence operations as continuing chronicle infrastructure </text:p>
        </text:list-item>
        <text:list-item>
          <text:p text:style-name="P20">Engage continental geographic rhythm through deliberate day-scale and week-scale pacing scenes </text:p>
        </text:list-item>
        <text:list-item>
          <text:p text:style-name="P19">Schedule chronicle-significant continental institutional events (continental institutional coordination meetings, continental envoy missions, continental institutional rhythm calendar events) to anchor continental scope </text:p>
        </text:list-item>
      </text:list>
      <text:h text:style-name="Heading_20_3" text:outline-level="3"><text:span text:style-name="Strong_20_Emphasis">Failure Mode 2: Mode-Blur Collapse</text:span></text:h>
      <text:p text:style-name="Text_20_body"><text:span text:style-name="Strong_20_Emphasis">Diagnostic indicators:</text:span></text:p>
      <text:list text:style-name="L10">
        <text:list-item>
          <text:p text:style-name="P22">Continental chronicle scenes lose chronicle-mode distinctiveness across cities </text:p>
        </text:list-item>
        <text:list-item>
          <text:p text:style-name="P22">Sydney scenes operate at Melbourne tempo, Brisbane scenes operate at Adelaide register, Adelaide scenes operate at Sydney scale </text:p>
        </text:list-item>
        <text:list-item>
          <text:p text:style-name="P22">{{user}} characters operate at one-mode competence across all cities without continental mode-pivot adaptation </text:p>
        </text:list-item>
        <text:list-item>
          <text:p text:style-name="P21">Storyteller / AI rendering loses register-marker specificity across cities </text:p>
        </text:list-item>
      </text:list>
      <text:p text:style-name="Text_20_body"><text:span text:style-name="Strong_20_Emphasis">Underlying problem:</text:span> Continental chronicle has lost chronicle-mode plurality as central feature; modes have blurred into generic Australian-Kindred register.</text:p>
      <text:p text:style-name="Text_20_body"><text:span text:style-name="Strong_20_Emphasis">Corrective adjustment:</text:span></text:p>
      <text:list text:style-name="L11">
        <text:list-item>
          <text:p text:style-name="P24">Restore deliberate register-marker scenes at each city establishing distinctive chronicle-mode register before chronicle-active operations engage </text:p>
        </text:list-item>
        <text:list-item>
          <text:p text:style-name="P24">Engage explicit mode-pivot handling per Part 3 cross-city mode-pivot patterns </text:p>
        </text:list-item>
        <text:list-item>
          <text:p text:style-name="P24">Render city-specific cultural-political register through deliberate sensory specificity and operational-character marker patterns </text:p>
        </text:list-item>
        <text:list-item>
          <text:p text:style-name="P23">Apply chronicle-mode prep guides per city's specific chronicle mode (Camarilla Orthodox <text:soft-page-break/>prep guide for Melbourne and Adelaide, Methuselah-Tempo prep guide for Sydney, Sabbat-Survivor prep guide for Brisbane) </text:p>
        </text:list-item>
      </text:list>
      <text:h text:style-name="Heading_20_3" text:outline-level="3"><text:span text:style-name="Strong_20_Emphasis">Failure Mode 3: Continental Pressure Underdevelopment</text:span></text:h>
      <text:p text:style-name="Text_20_body"><text:span text:style-name="Strong_20_Emphasis">Diagnostic indicators:</text:span></text:p>
      <text:list text:style-name="L12">
        <text:list-item>
          <text:p text:style-name="P26">Continental chronicle scenes ignore continuing continental pressure convergence (Phase Two continental operation, continuing Beckoning trajectory convergence, continuing 2026 operation cross-Pacific coordination, continuing AFP-Twilight-Project intelligence pressure, continuing Cress Truce centennial implications) </text:p>
        </text:list-item>
        <text:list-item>
          <text:p text:style-name="P26">Chronicle pacing operates at single-city pressure scale rather than at continental pressure convergence scale </text:p>
        </text:list-item>
        <text:list-item>
          <text:p text:style-name="P26">Continental institutional positioning around continental pressures absent from chronicle development </text:p>
        </text:list-item>
        <text:list-item>
          <text:p text:style-name="P25">Chronicle late-arc continental institutional outcomes do not engage continental pressure convergence </text:p>
        </text:list-item>
      </text:list>
      <text:p text:style-name="Text_20_body"><text:span text:style-name="Strong_20_Emphasis">Underlying problem:</text:span> Continental chronicle has underdeveloped continental pressure convergence as chronicle-central operational infrastructure.</text:p>
      <text:p text:style-name="Text_20_body"><text:span text:style-name="Strong_20_Emphasis">Corrective adjustment:</text:span></text:p>
      <text:list text:style-name="L13">
        <text:list-item>
          <text:p text:style-name="P28">Foreground continental pressure convergence through specific continental pressure plot threads </text:p>
        </text:list-item>
        <text:list-item>
          <text:p text:style-name="P28">Render continental pressure operational implications across multiple cities simultaneously </text:p>
        </text:list-item>
        <text:list-item>
          <text:p text:style-name="P28">Engage continental institutional positioning around continental pressures as continuing chronicle texture </text:p>
        </text:list-item>
        <text:list-item>
          <text:p text:style-name="P27">Schedule continental institutional coordination operations responding to continental pressures (continental envoy missions, continental institutional crisis operations, continental institutional positioning meetings) at chronicle-active operational tempo </text:p>
        </text:list-item>
      </text:list>
      <text:h text:style-name="Heading_20_3" text:outline-level="3"><text:span text:style-name="Strong_20_Emphasis">Failure Mode 4: Authority-Flatness Collapse</text:span></text:h>
      <text:p text:style-name="Text_20_body"><text:span text:style-name="Strong_20_Emphasis">Diagnostic indicators:</text:span></text:p>
      <text:list text:style-name="L14">
        <text:list-item>
          <text:p text:style-name="P30">Continental chronicle scenes engage authority structures (Princely authority, methuselah authority, Sabbat ecclesiastical authority) at flat operational scale without continuing institutional rendering </text:p>
        </text:list-item>
        <text:list-item>
          <text:p text:style-name="P30">Continuing inter-authority correspondence patterns absent from chronicle infrastructure </text:p>
        </text:list-item>
        <text:list-item>
          <text:p text:style-name="P30">Multi-authority political geography operates as background context rather than as central operational infrastructure </text:p>
        </text:list-item>
        <text:list-item>
          <text:p text:style-name="P29">Chronicle-active dynamics across authority interfaces (Lytton-Octavia coordination, Lytton-Sarrasine correspondence, Sarrasine-Bishop Callista correspondence, Lytton-Bishop Callista correspondence, Octavia-Bishop Callista correspondence, continental Cress Truce infrastructure) absent from chronicle development </text:p>
        </text:list-item>
      </text:list>
      <text:p text:style-name="Text_20_body"><text:span text:style-name="Strong_20_Emphasis">Underlying problem:</text:span> Continental chronicle has flattened authority structures into generic continental Australian Kindred register without continuing distinctive authority rendering at each city.</text:p>
      <text:p text:style-name="Text_20_body"><text:soft-page-break/><text:span text:style-name="Strong_20_Emphasis">Corrective adjustment:</text:span></text:p>
      <text:list text:style-name="L15">
        <text:list-item>
          <text:p text:style-name="P32">Restore distinctive authority rendering at each city through deliberate authority-marker scenes </text:p>
        </text:list-item>
        <text:list-item>
          <text:p text:style-name="P32">Foreground continuing inter-authority correspondence patterns as continuing chronicle infrastructure </text:p>
        </text:list-item>
        <text:list-item>
          <text:p text:style-name="P32">Engage multi-authority political geography as central operational infrastructure through specific authority-interface plot threads </text:p>
        </text:list-item>
        <text:list-item>
          <text:p text:style-name="P31">Render continuing inter-authority dynamics through specific chronicle-active correspondence patterns and continental institutional positioning </text:p>
        </text:list-item>
      </text:list>
      <text:h text:style-name="Heading_20_3" text:outline-level="3"><text:span text:style-name="Strong_20_Emphasis">Failure Mode 5: Continental Geographic Rhythm Flattening</text:span></text:h>
      <text:p text:style-name="Text_20_body"><text:span text:style-name="Strong_20_Emphasis">Diagnostic indicators:</text:span></text:p>
      <text:list text:style-name="L16">
        <text:list-item>
          <text:p text:style-name="P34">Continental chronicle scenes operate at single temporal scale across continental scope </text:p>
        </text:list-item>
        <text:list-item>
          <text:p text:style-name="P34">Inter-city operations resolve within sessions rather than across appropriate temporal scales </text:p>
        </text:list-item>
        <text:list-item>
          <text:p text:style-name="P34">Continental geographic distance produces no operational pacing impact </text:p>
        </text:list-item>
        <text:list-item>
          <text:p text:style-name="P33">Continental calendar alignment absent from chronicle pacing </text:p>
        </text:list-item>
      </text:list>
      <text:p text:style-name="Text_20_body"><text:span text:style-name="Strong_20_Emphasis">Underlying problem:</text:span> Continental chronicle has flattened continental geographic rhythm into single-city temporal pacing.</text:p>
      <text:p text:style-name="Text_20_body"><text:span text:style-name="Strong_20_Emphasis">Corrective adjustment:</text:span></text:p>
      <text:list text:style-name="L17">
        <text:list-item>
          <text:p text:style-name="P36">Restore continental geographic rhythm at four temporal scales (hour-scale within-city, day-scale inter-city travel, week-scale inter-city correspondence, month-scale continental institutional coordination) </text:p>
        </text:list-item>
        <text:list-item>
          <text:p text:style-name="P36">Engage continental calendar alignment through specific continental institutional rhythm calendar events </text:p>
        </text:list-item>
        <text:list-item>
          <text:p text:style-name="P36">Render continental geographic distance through deliberate inter-city travel scenes and inter-city correspondence operational delays </text:p>
        </text:list-item>
        <text:list-item>
          <text:p text:style-name="P35">Schedule continental institutional coordination operations at continental temporal scale rather than at single-city temporal scale </text:p>
        </text:list-item>
      </text:list>
      <text:h text:style-name="Heading_20_3" text:outline-level="3"><text:span text:style-name="Strong_20_Emphasis">Failure Mode 6: Character-Continental-Competence Mismatch</text:span></text:h>
      <text:p text:style-name="Text_20_body"><text:span text:style-name="Strong_20_Emphasis">Diagnostic indicators:</text:span></text:p>
      <text:list text:style-name="L18">
        <text:list-item>
          <text:p text:style-name="P38">{{user}} characters operate at single-city competence across continental scope </text:p>
        </text:list-item>
        <text:list-item>
          <text:p text:style-name="P38">Continental chronicle scenes engage characters without continental geographic rhythm awareness, multi-authority political geography navigation, or chronicle-mode plurality operational competence </text:p>
        </text:list-item>
        <text:list-item>
          <text:p text:style-name="P38">Character development trajectories do not engage continental scope competence development </text:p>
        </text:list-item>
        <text:list-item>
          <text:p text:style-name="P37">{{user}} character cultural-political register adapts inadequately across cities </text:p>
        </text:list-item>
      </text:list>
      <text:p text:style-name="Text_20_body"><text:span text:style-name="Strong_20_Emphasis">Underlying problem:</text:span> Continental chronicle engages single-city-competence characters at continental scope without continental scope competence development infrastructure.</text:p>
      <text:p text:style-name="Text_20_body"><text:span text:style-name="Strong_20_Emphasis">Corrective adjustment:</text:span></text:p>
      <text:list text:style-name="L19">
        <text:list-item>
          <text:p text:style-name="P40"><text:soft-page-break/>Build {{user}} characters with continental scope competence requirements at character preparation phase </text:p>
        </text:list-item>
        <text:list-item>
          <text:p text:style-name="P40">Engage continental scope competence development through chronicle scenes that test continental geographic rhythm awareness, multi-authority political geography navigation, and chronicle-mode plurality operational competence </text:p>
        </text:list-item>
        <text:list-item>
          <text:p text:style-name="P40">Render continental scope competence as chronicle-significant character development infrastructure </text:p>
        </text:list-item>
        <text:list-item>
          <text:p text:style-name="P39">Schedule continental scope competence-testing scenes (continental envoy missions, multi-city correspondence operations, multi-authority diplomatic operations) to develop continental competence across chronicle arc </text:p>
        </text:list-item>
      </text:lis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Text_20_body"><text:soft-page-break/>Continental coordination chronicles run via AI prompt configuration require specific configuration extending the chronicle-mode-specific prep guide AI prompt configurations. AI prompts running continental chronicles must hold multiple chronicle modes simultaneously while maintaining continental scope coherence.</text:p>
      <text:h text:style-name="Heading_20_3" text:outline-level="3"><text:span text:style-name="Strong_20_Emphasis">Continental Chronicle System Prompt Layering</text:span></text:h>
      <text:p text:style-name="Preformatted_20_Text"><text:span text:style-name="Source_20_Text">[BASE LAYER] V:tM core system prompt (standard kit infrastructure)</text:span></text:p>
      <text:p text:style-name="Preformatted_20_Text"><text:span text:style-name="Source_20_Text">[CONTINENTAL CHRONICLE LAYER] Continental coordination chronicle prompt (this section)</text:span></text:p>
      <text:p text:style-name="Preformatted_20_Text"><text:span text:style-name="Source_20_Text">[MODE LAYERS] Multiple chronicle-mode prep guide AI prompts simultaneously:</text:span></text:p>
      <text:p text:style-name="Preformatted_20_Text"><text:span text:style-name="Source_20_Text"><text:s text:c="2"/>- Camarilla Orthodox prep prompt (for Melbourne and Adelaide scenes)</text:span></text:p>
      <text:p text:style-name="Preformatted_20_Text"><text:span text:style-name="Source_20_Text"><text:s text:c="2"/>- Methuselah-Tempo prep prompt (for Sydney scenes)</text:span></text:p>
      <text:p text:style-name="Preformatted_20_Text"><text:span text:style-name="Source_20_Text"><text:s text:c="2"/>- Sabbat-Survivor prep prompt (for Brisbane scenes)</text:span></text:p>
      <text:p text:style-name="Preformatted_20_Text"><text:span text:style-name="Source_20_Text"><text:s text:c="2"/>- Cross-Supernatural Diplomatic prep prompt (for continental Cress Truce scenes)</text:span></text:p>
      <text:p text:style-name="Preformatted_20_Text"><text:span text:style-name="Source_20_Text">[CITY LAYERS] Multiple city supplement prompts simultaneously</text:span></text:p>
      <text:p text:style-name="Preformatted_20_Text"><text:span text:style-name="Source_20_Text">[CHARACTER LAYER] {{user}} character configuration with continental scope competence</text:span></text:p>
      <text:p text:style-name="P1"><text:span text:style-name="Source_20_Text">[SESSION LAYER] Specific session parameters with continental scope identification</text:span></text:p>
      <text:h text:style-name="Heading_20_3" text:outline-level="3"><text:span text:style-name="Strong_20_Emphasis">Continental Chronicle Prompt Components</text:span></text:h>
      <text:p text:style-name="Text_20_body">Continental chronicle prompt should include explicit configuration for:</text:p>
      <text:p text:style-name="Text_20_body"><text:span text:style-name="Strong_20_Emphasis">1. Continental scope identification:</text:span></text:p>
      <text:p text:style-name="Preformatted_20_Text"><text:span text:style-name="Source_20_Text">This chronicle operates at continental Australian coordination scope </text:span></text:p>
      <text:p text:style-name="Preformatted_20_Text"><text:span text:style-name="Source_20_Text">spanning [specific cities engaged: Melbourne, Sydney, Brisbane, Adelaide]. </text:span></text:p>
      <text:p text:style-name="Preformatted_20_Text"><text:span text:style-name="Source_20_Text">The chronicle holds chronicle-mode plurality with [specific modes: </text:span></text:p>
      <text:p text:style-name="Preformatted_20_Text"><text:span text:style-name="Source_20_Text">Camarilla orthodox, methuselah-tempo, Sabbat-survivor, cross-supernatural </text:span></text:p>
      <text:p text:style-name="Preformatted_20_Text"><text:span text:style-name="Source_20_Text">diplomatic] simultaneously across continental scope.</text:span></text:p>
      <text:p text:style-name="Preformatted_20_Text"/>
      <text:p text:style-name="Preformatted_20_Text"><text:span text:style-name="Source_20_Text">Continental scope distinguishing characteristics:</text:span></text:p>
      <text:p text:style-name="Preformatted_20_Text"><text:span text:style-name="Source_20_Text">- Chronicle-mode plurality (multiple chronicle modes held simultaneously </text:span></text:p>
      <text:p text:style-name="Preformatted_20_Text"><text:span text:style-name="Source_20_Text"><text:s text:c="2"/>with mode-pivot handling between cities)</text:span></text:p>
      <text:p text:style-name="Preformatted_20_Text"><text:span text:style-name="Source_20_Text">- Continental geographic rhythm (4 temporal scales: hour-scale </text:span></text:p>
      <text:p text:style-name="Preformatted_20_Text"><text:span text:style-name="Source_20_Text"><text:s text:c="2"/>within-city, day-scale inter-city travel, week-scale inter-city </text:span></text:p>
      <text:p text:style-name="Preformatted_20_Text"><text:span text:style-name="Source_20_Text"><text:s text:c="2"/>correspondence, month-scale continental institutional coordination)</text:span></text:p>
      <text:p text:style-name="Preformatted_20_Text"><text:span text:style-name="Source_20_Text">- Multi-authority political geography (Princely, methuselah, Sabbat </text:span></text:p>
      <text:p text:style-name="Preformatted_20_Text"><text:span text:style-name="Source_20_Text"><text:s text:c="2"/>ecclesiastical authorities with continuing inter-authority </text:span></text:p>
      <text:p text:style-name="Preformatted_20_Text"><text:span text:style-name="Source_20_Text"><text:s text:c="2"/>correspondence patterns)</text:span></text:p>
      <text:p text:style-name="Preformatted_20_Text"><text:span text:style-name="Source_20_Text">- Continental pressure convergence (Phase Two continental operation, </text:span></text:p>
      <text:p text:style-name="Preformatted_20_Text"><text:span text:style-name="Source_20_Text"><text:s text:c="2"/>Beckoning trajectory convergence, 2026 operation cross-Pacific </text:span></text:p>
      <text:p text:style-name="Preformatted_20_Text"><text:span text:style-name="Source_20_Text"><text:s text:c="2"/>coordination, AFP-Twilight-Project intelligence pressure, Cress </text:span></text:p>
      <text:p text:style-name="Preformatted_20_Text"><text:span text:style-name="Source_20_Text"><text:s text:c="2"/>Truce centennial implications)</text:span></text:p>
      <text:p text:style-name="Preformatted_20_Text"><text:span text:style-name="Source_20_Text">- Continental scope character competence (continental geographic </text:span></text:p>
      <text:p text:style-name="Preformatted_20_Text"><text:span text:style-name="Source_20_Text"><text:s text:c="2"/>rhythm awareness, multi-authority political geography navigation, </text:span></text:p>
      <text:p text:style-name="P1"><text:span text:style-name="Source_20_Text"><text:s text:c="2"/>chronicle-mode plurality operational competence)</text:span></text:p>
      <text:p text:style-name="Text_20_body"><text:span text:style-name="Strong_20_Emphasis">2. Mode-pivot handling:</text:span></text:p>
      <text:p text:style-name="Preformatted_20_Text"><text:span text:style-name="Source_20_Text">Render explicit chronicle-mode pivots between cities. Apply specific </text:span></text:p>
      <text:p text:style-name="Preformatted_20_Text"><text:span text:style-name="Source_20_Text">mode-pivot handling per Part 3 of the Continental Coordination Guide:</text:span></text:p>
      <text:p text:style-name="Preformatted_20_Text"/>
      <text:p text:style-name="Preformatted_20_Text"><text:span text:style-name="Source_20_Text">Melbourne ↔ Sydney: Camarilla orthodox ↔ methuselah-tempo. Restore </text:span></text:p>
      <text:p text:style-name="Preformatted_20_Text"><text:span text:style-name="Source_20_Text">deliberate temporal-rhythm shifts (Melbourne session-resolution to </text:span></text:p>
      <text:p text:style-name="Preformatted_20_Text"><text:span text:style-name="Source_20_Text">Sydney season-resolution), information-pattern shifts (Melbourne </text:span></text:p>
      <text:p text:style-name="Preformatted_20_Text"><text:span text:style-name="Source_20_Text">institutional cooperation to Sydney deliberate secrecy), register </text:span></text:p>
      <text:p text:style-name="Preformatted_20_Text"><text:span text:style-name="Source_20_Text">shifts (Australian-informal Camarilla to Toreador-passing methuselah-tempo).</text:span></text:p>
      <text:p text:style-name="Preformatted_20_Text"><text:soft-page-break/></text:p>
      <text:p text:style-name="Preformatted_20_Text"><text:span text:style-name="Source_20_Text">Melbourne ↔ Brisbane: Camarilla orthodox ↔ Sabbat-survivor at maximum </text:span></text:p>
      <text:p text:style-name="Preformatted_20_Text"><text:span text:style-name="Source_20_Text">continental sect-political distance. Restore deliberate ethical-character </text:span></text:p>
      <text:p text:style-name="Preformatted_20_Text"><text:span text:style-name="Source_20_Text">pressure adjustments (Melbourne Humanity 7+ to Brisbane Humanity 4-5 </text:span></text:p>
      <text:p text:style-name="Preformatted_20_Text"><text:span text:style-name="Source_20_Text">register), institutional-coherence rendering at both cities, hostile-formal </text:span></text:p>
      <text:p text:style-name="Preformatted_20_Text"><text:span text:style-name="Source_20_Text">register at continuing inter-authority interfaces.</text:span></text:p>
      <text:p text:style-name="Preformatted_20_Text"/>
      <text:p text:style-name="Preformatted_20_Text"><text:span text:style-name="Source_20_Text">Sydney ↔ Brisbane: methuselah-tempo ↔ Sabbat-survivor at minimal-formal </text:span></text:p>
      <text:p text:style-name="Preformatted_20_Text"><text:span text:style-name="Source_20_Text">continental cross-sect distance. Restore deliberate operational-character </text:span></text:p>
      <text:p text:style-name="Preformatted_20_Text"><text:span text:style-name="Source_20_Text">adjustments (Sydney patient methuselah-tempo to Brisbane acute </text:span></text:p>
      <text:p text:style-name="Preformatted_20_Text"><text:span text:style-name="Source_20_Text">survival-accumulation pacing), continental cross-sect minimum-institutional </text:span></text:p>
      <text:p text:style-name="Preformatted_20_Text"><text:span text:style-name="Source_20_Text">register.</text:span></text:p>
      <text:p text:style-name="Preformatted_20_Text"/>
      <text:p text:style-name="Preformatted_20_Text"><text:span text:style-name="Source_20_Text">Melbourne ↔ Adelaide: Camarilla orthodox ↔ Camarilla orthodox at </text:span></text:p>
      <text:p text:style-name="Preformatted_20_Text"><text:span text:style-name="Source_20_Text">register variation between Australian-informal accommodation and </text:span></text:p>
      <text:p text:style-name="Preformatted_20_Text"><text:span text:style-name="Source_20_Text">Edwardian-influenced orthodoxy. Restore deliberate register-variation </text:span></text:p>
      <text:p text:style-name="Preformatted_20_Text"><text:span text:style-name="Source_20_Text">shifts (Melbourne first-name address among long-tenured court members </text:span></text:p>
      <text:p text:style-name="Preformatted_20_Text"><text:span text:style-name="Source_20_Text">to Adelaide formal title-address as continuing institutional norm), </text:span></text:p>
      <text:p text:style-name="Preformatted_20_Text"><text:span text:style-name="Source_20_Text">institutional-scale shifts (Melbourne larger-domain to Adelaide </text:span></text:p>
      <text:p text:style-name="Preformatted_20_Text"><text:span text:style-name="Source_20_Text">smaller-domain intimate scale).</text:span></text:p>
      <text:p text:style-name="Preformatted_20_Text"/>
      <text:p text:style-name="Preformatted_20_Text"><text:span text:style-name="Source_20_Text">Sydney ↔ Adelaide: methuselah-tempo ↔ Camarilla orthodox at maximum </text:span></text:p>
      <text:p text:style-name="Preformatted_20_Text"><text:span text:style-name="Source_20_Text">continental cross-sect operational character distance. Restore </text:span></text:p>
      <text:p text:style-name="Preformatted_20_Text"><text:span text:style-name="Source_20_Text">deliberate institutional-scale adjustments (Sydney continental </text:span></text:p>
      <text:p text:style-name="Preformatted_20_Text"><text:span text:style-name="Source_20_Text">methuselah-tier scale to Adelaide smaller-domain intimate scale).</text:span></text:p>
      <text:p text:style-name="Preformatted_20_Text"/>
      <text:p text:style-name="Preformatted_20_Text"><text:span text:style-name="Source_20_Text">Brisbane ↔ Adelaide: Sabbat-survivor ↔ Camarilla orthodox at </text:span></text:p>
      <text:p text:style-name="Preformatted_20_Text"><text:span text:style-name="Source_20_Text">smaller-domain-formal continental cross-sect distance. Restore </text:span></text:p>
      <text:p text:style-name="Preformatted_20_Text"><text:span text:style-name="Source_20_Text">deliberate smaller-domain-Camarilla-versus-Sabbat-survivor handling </text:span></text:p>
      <text:p text:style-name="Preformatted_20_Text"><text:span text:style-name="Source_20_Text">through Adelaide intimate continental scale rendering distinct from </text:span></text:p>
      <text:p text:style-name="P1"><text:span text:style-name="Source_20_Text">Melbourne larger continental Camarilla scale.</text:span></text:p>
      <text:p text:style-name="Text_20_body"><text:span text:style-name="Strong_20_Emphasis">3. Continental geographic rhythm pacing:</text:span></text:p>
      <text:p text:style-name="Preformatted_20_Text"><text:span text:style-name="Source_20_Text">Pace chronicle scenes at four temporal scales simultaneously:</text:span></text:p>
      <text:p text:style-name="Preformatted_20_Text"><text:span text:style-name="Source_20_Text">- Hour-scale: within-city chronicle scenes resolving within sessions</text:span></text:p>
      <text:p text:style-name="Preformatted_20_Text"><text:span text:style-name="Source_20_Text">- Day-scale: inter-city travel operations resolving across multiple </text:span></text:p>
      <text:p text:style-name="Preformatted_20_Text"><text:span text:style-name="Source_20_Text"><text:s text:c="2"/>sessions</text:span></text:p>
      <text:p text:style-name="Preformatted_20_Text"><text:span text:style-name="Source_20_Text">- Week-scale: inter-city correspondence operations resolving across </text:span></text:p>
      <text:p text:style-name="Preformatted_20_Text"><text:span text:style-name="Source_20_Text"><text:s text:c="2"/>one chronicle arc</text:span></text:p>
      <text:p text:style-name="Preformatted_20_Text"><text:span text:style-name="Source_20_Text">- Month-scale: continental institutional coordination operations </text:span></text:p>
      <text:p text:style-name="Preformatted_20_Text"><text:span text:style-name="Source_20_Text"><text:s text:c="2"/>resolving across multi-arc chronicle scope</text:span></text:p>
      <text:p text:style-name="Preformatted_20_Text"/>
      <text:p text:style-name="Preformatted_20_Text"><text:span text:style-name="Source_20_Text">Apply continental calendar alignment for continental institutional </text:span></text:p>
      <text:p text:style-name="Preformatted_20_Text"><text:span text:style-name="Source_20_Text">rhythm:</text:span></text:p>
      <text:p text:style-name="Preformatted_20_Text"><text:span text:style-name="Source_20_Text">- Anzac Day (April 25): continental Camarilla Australian Princely </text:span></text:p>
      <text:p text:style-name="Preformatted_20_Text"><text:span text:style-name="Source_20_Text"><text:s text:c="2"/>formal occasions</text:span></text:p>
      <text:p text:style-name="Preformatted_20_Text"><text:span text:style-name="Source_20_Text">- Adelaide Festival (March): Octavia continental Camarilla cultural-cover </text:span></text:p>
      <text:p text:style-name="Preformatted_20_Text"><text:span text:style-name="Source_20_Text"><text:s text:c="2"/>infrastructure</text:span></text:p>
      <text:p text:style-name="Preformatted_20_Text"><text:span text:style-name="Source_20_Text">- Australian winter (June-August): temperate-climate operational </text:span></text:p>
      <text:p text:style-name="Preformatted_20_Text"><text:span text:style-name="Source_20_Text"><text:s text:c="2"/>reduction in Adelaide and Melbourne, continental Cress Truce </text:span></text:p>
      <text:p text:style-name="Preformatted_20_Text"><text:span text:style-name="Source_20_Text"><text:s text:c="2"/>intensification</text:span></text:p>
      <text:p text:style-name="Preformatted_20_Text"><text:span text:style-name="Source_20_Text">- Brisbane Sabbat liturgical calendar (February Festivo, late-April </text:span></text:p>
      <text:p text:style-name="Preformatted_20_Text"><text:span text:style-name="Source_20_Text"><text:s text:c="2"/>Fire Dance, late-December Wild Hunt, late-October Palla Grande)</text:span></text:p>
      <text:p text:style-name="Preformatted_20_Text"><text:span text:style-name="Source_20_Text">- Australia Day Sarrasine Reception (January 26): annual Sarrasine </text:span></text:p>
      <text:p text:style-name="Preformatted_20_Text"><text:span text:style-name="Source_20_Text"><text:s text:c="2"/>Sydney continental institutional formal occasion</text:span></text:p>
      <text:p text:style-name="Preformatted_20_Text"><text:span text:style-name="Source_20_Text">- Cress Truce centennial renewal continuing post-2024 continental </text:span></text:p>
      <text:p text:style-name="P1"><text:span text:style-name="Source_20_Text"><text:s text:c="2"/>cross-supernatural diplomatic infrastructure development</text:span></text:p>
      <text:p text:style-name="Text_20_body"><text:span text:style-name="Strong_20_Emphasis">4. Continental pressure convergence handling:</text:span></text:p>
      <text:p text:style-name="Preformatted_20_Text"><text:span text:style-name="Source_20_Text">Engage continental pressure convergence as chronicle-central operational </text:span></text:p>
      <text:p text:style-name="Preformatted_20_Text"><text:span text:style-name="Source_20_Text">infrastructure:</text:span></text:p>
      <text:p text:style-name="Preformatted_20_Text"><text:soft-page-break/><text:span text:style-name="Source_20_Text">- Phase Two continental operation (Sarrasine 2026-2028 continental </text:span></text:p>
      <text:p text:style-name="Preformatted_20_Text"><text:span text:style-name="Source_20_Text"><text:s text:c="2"/>destabilisation affecting Sydney primary domain plus Melbourne, </text:span></text:p>
      <text:p text:style-name="Preformatted_20_Text"><text:span text:style-name="Source_20_Text"><text:s text:c="2"/>Adelaide, Brisbane peripheral involvement)</text:span></text:p>
      <text:p text:style-name="Preformatted_20_Text"><text:span text:style-name="Source_20_Text">- Senior-figure Beckoning trajectory convergence (Lytton 3 episodes </text:span></text:p>
      <text:p text:style-name="Preformatted_20_Text"><text:span text:style-name="Source_20_Text"><text:s text:c="2"/>since 2018, Octavia 2 episodes since 2020, Bishop Callista parallel </text:span></text:p>
      <text:p text:style-name="Preformatted_20_Text"><text:span text:style-name="Source_20_Text"><text:s text:c="2"/>pattern across continuing 50-year Brisbane Sabbat tenure)</text:span></text:p>
      <text:p text:style-name="Preformatted_20_Text"><text:span text:style-name="Source_20_Text">- 2026 Brisbane operation cross-Pacific coordination (October 2026 </text:span></text:p>
      <text:p text:style-name="Preformatted_20_Text"><text:span text:style-name="Source_20_Text"><text:s text:c="2"/>Glass Walker northern septs operation with continuing continental </text:span></text:p>
      <text:p text:style-name="Preformatted_20_Text"><text:span text:style-name="Source_20_Text"><text:s text:c="2"/>Camarilla institutional positioning at Melbourne and Adelaide plus </text:span></text:p>
      <text:p text:style-name="Preformatted_20_Text"><text:span text:style-name="Source_20_Text"><text:s text:c="2"/>continuing continental Independent positioning at Sydney)</text:span></text:p>
      <text:p text:style-name="Preformatted_20_Text"><text:span text:style-name="Source_20_Text">- AFP-Twilight-Project intelligence pressure (continental Australian </text:span></text:p>
      <text:p text:style-name="Preformatted_20_Text"><text:span text:style-name="Source_20_Text"><text:s text:c="2"/>intelligence cooperation across all four cities with city-specific </text:span></text:p>
      <text:p text:style-name="Preformatted_20_Text"><text:span text:style-name="Source_20_Text"><text:s text:c="2"/>operational tempo)</text:span></text:p>
      <text:p text:style-name="Preformatted_20_Text"><text:span text:style-name="Source_20_Text">- Cress Truce centennial renewal continuing implications (continuing </text:span></text:p>
      <text:p text:style-name="Preformatted_20_Text"><text:span text:style-name="Source_20_Text"><text:s text:c="2"/>post-2024 continental cross-supernatural diplomatic infrastructure </text:span></text:p>
      <text:p text:style-name="P1"><text:span text:style-name="Source_20_Text"><text:s text:c="2"/>development)</text:span></text:p>
      <text:p text:style-name="Text_20_body"><text:span text:style-name="Strong_20_Emphasis">5. Multi-authority political geography handling:</text:span></text:p>
      <text:p text:style-name="Preformatted_20_Text"><text:span text:style-name="Source_20_Text">Render continuing inter-authority correspondence patterns as continuing </text:span></text:p>
      <text:p text:style-name="Preformatted_20_Text"><text:span text:style-name="Source_20_Text">chronicle infrastructure:</text:span></text:p>
      <text:p text:style-name="Preformatted_20_Text"><text:span text:style-name="Source_20_Text">- Lytton-Octavia continental Camarilla coordination (weekly correspondence, </text:span></text:p>
      <text:p text:style-name="Preformatted_20_Text"><text:span text:style-name="Source_20_Text"><text:s text:c="2"/>136-year personal friendship, parallel operational coordination, </text:span></text:p>
      <text:p text:style-name="Preformatted_20_Text"><text:span text:style-name="Source_20_Text"><text:s text:c="2"/>succession-relationship complexity)</text:span></text:p>
      <text:p text:style-name="Preformatted_20_Text"><text:span text:style-name="Source_20_Text">- Lytton-Sarrasine Camarilla-Independent diplomatic correspondence </text:span></text:p>
      <text:p text:style-name="Preformatted_20_Text"><text:span text:style-name="Source_20_Text"><text:s text:c="2"/>(quarterly correspondence at cordial-distant register, continuing </text:span></text:p>
      <text:p text:style-name="Preformatted_20_Text"><text:span text:style-name="Source_20_Text"><text:s text:c="2"/>intensification around chronicle-active continental pressures)</text:span></text:p>
      <text:p text:style-name="Preformatted_20_Text"><text:span text:style-name="Source_20_Text">- Sarrasine-Bishop Callista Independent-Sabbat formal correspondence </text:span></text:p>
      <text:p text:style-name="Preformatted_20_Text"><text:span text:style-name="Source_20_Text"><text:s text:c="2"/>(twice-yearly correspondence at minimal-formal register, continuing </text:span></text:p>
      <text:p text:style-name="Preformatted_20_Text"><text:span text:style-name="Source_20_Text"><text:s text:c="2"/>post-1990s minimum-institutional stabilisation)</text:span></text:p>
      <text:p text:style-name="Preformatted_20_Text"><text:span text:style-name="Source_20_Text">- Lytton-Bishop Callista Camarilla-Sabbat hostile-formal correspondence </text:span></text:p>
      <text:p text:style-name="Preformatted_20_Text"><text:span text:style-name="Source_20_Text"><text:s text:c="2"/>(annual correspondence at hostile-formal register, continuing </text:span></text:p>
      <text:p text:style-name="Preformatted_20_Text"><text:span text:style-name="Source_20_Text"><text:s text:c="2"/>50-year continental Camarilla-Sabbat operational conflict context)</text:span></text:p>
      <text:p text:style-name="Preformatted_20_Text"><text:span text:style-name="Source_20_Text">- Octavia-Bishop Callista smaller-domain-formal correspondence </text:span></text:p>
      <text:p text:style-name="Preformatted_20_Text"><text:span text:style-name="Source_20_Text"><text:s text:c="2"/>(annual correspondence at smaller-domain-formal register, continuing </text:span></text:p>
      <text:p text:style-name="Preformatted_20_Text"><text:span text:style-name="Source_20_Text"><text:s text:c="2"/>minimum-institutional-recognition)</text:span></text:p>
      <text:p text:style-name="Preformatted_20_Text"><text:span text:style-name="Source_20_Text">- Continental Cress Truce infrastructure (Melbourne-Adelaide full </text:span></text:p>
      <text:p text:style-name="P1"><text:span text:style-name="Source_20_Text"><text:s text:c="2"/>framework, Sydney bilateral protocols, Brisbane continental exclusion)</text:span></text:p>
      <text:p text:style-name="Text_20_body"><text:span text:style-name="Strong_20_Emphasis">6. Continental failure mode recognition:</text:span></text:p>
      <text:p text:style-name="Preformatted_20_Text"><text:span text:style-name="Source_20_Text">Apply continental chronicle failure mode recognition:</text:span></text:p>
      <text:p text:style-name="Preformatted_20_Text"><text:span text:style-name="Source_20_Text">- Single-city dominance (corrective: restore scene-density distribution </text:span></text:p>
      <text:p text:style-name="Preformatted_20_Text"><text:span text:style-name="Source_20_Text"><text:s text:c="2"/>per Part 4 recommendations)</text:span></text:p>
      <text:p text:style-name="Preformatted_20_Text"><text:span text:style-name="Source_20_Text">- Mode-blur collapse (corrective: restore deliberate register-marker </text:span></text:p>
      <text:p text:style-name="Preformatted_20_Text"><text:span text:style-name="Source_20_Text"><text:s text:c="2"/>scenes at each city, apply chronicle-mode prep guides per city </text:span></text:p>
      <text:p text:style-name="Preformatted_20_Text"><text:span text:style-name="Source_20_Text"><text:s text:c="2"/>specific mode)</text:span></text:p>
      <text:p text:style-name="Preformatted_20_Text"><text:span text:style-name="Source_20_Text">- Continental pressure underdevelopment (corrective: foreground </text:span></text:p>
      <text:p text:style-name="Preformatted_20_Text"><text:span text:style-name="Source_20_Text"><text:s text:c="2"/>continental pressure convergence, render continental pressure </text:span></text:p>
      <text:p text:style-name="Preformatted_20_Text"><text:span text:style-name="Source_20_Text"><text:s text:c="2"/>operational implications across multiple cities)</text:span></text:p>
      <text:p text:style-name="Preformatted_20_Text"><text:span text:style-name="Source_20_Text">- Authority-flatness collapse (corrective: restore distinctive </text:span></text:p>
      <text:p text:style-name="Preformatted_20_Text"><text:span text:style-name="Source_20_Text"><text:s text:c="2"/>authority rendering at each city, foreground continuing inter-authority </text:span></text:p>
      <text:p text:style-name="Preformatted_20_Text"><text:span text:style-name="Source_20_Text"><text:s text:c="2"/>correspondence patterns)</text:span></text:p>
      <text:p text:style-name="Preformatted_20_Text"><text:span text:style-name="Source_20_Text">- Continental geographic rhythm flattening (corrective: restore </text:span></text:p>
      <text:p text:style-name="Preformatted_20_Text"><text:span text:style-name="Source_20_Text"><text:s text:c="2"/>continental geographic rhythm at four temporal scales, engage </text:span></text:p>
      <text:p text:style-name="Preformatted_20_Text"><text:span text:style-name="Source_20_Text"><text:s text:c="2"/>continental calendar alignment)</text:span></text:p>
      <text:p text:style-name="Preformatted_20_Text"><text:span text:style-name="Source_20_Text">- Character-continental-competence mismatch (corrective: build </text:span></text:p>
      <text:p text:style-name="Preformatted_20_Text"><text:span text:style-name="Source_20_Text"><text:s text:c="2"/>continental scope competence requirements, engage continental </text:span></text:p>
      <text:p text:style-name="Preformatted_20_Text"><text:span text:style-name="Source_20_Text"><text:s text:c="2"/>scope competence development through specific competence-testing </text:span></text:p>
      <text:p text:style-name="P1"><text:span text:style-name="Source_20_Text"><text:s text:c="2"/>scenes)</text:span></text:p>
      <text:h text:style-name="Heading_20_3" text:outline-level="3"><text:soft-page-break/><text:span text:style-name="Strong_20_Emphasis">AI Prompt Iteration Patterns for Continental Chronicles</text:span></text:h>
      <text:p text:style-name="Text_20_body">Continental chronicle AI prompts benefit from specific iteration patterns:</text:p>
      <text:p text:style-name="Text_20_body"><text:span text:style-name="Strong_20_Emphasis">Initial deployment:</text:span> Deploy continental chronicle prompt with full configuration. Run 3-5 chronicle sessions to identify continental scope coherence stability and chronicle-mode plurality handling capacity.</text:p>
      <text:p text:style-name="Text_20_body"><text:span text:style-name="Strong_20_Emphasis">First iteration adjustment (sessions 5-8):</text:span> Evaluate continental failure mode pattern emergence. Apply corrective adjustments through prompt updates if specific failure modes appear in continental scope coherence drift.</text:p>
      <text:p text:style-name="Text_20_body"><text:span text:style-name="Strong_20_Emphasis">Sustained continental iteration (sessions 9+):</text:span> Continuing chronicle scope continues at continuing maximum complexity; continental chronicle AI prompts require ongoing iteration support across continuing chronicle sessions due to continental chronicle mode operating at the kit's most demanding chronicle scope for AI prompt configuration.</text:p>
      <text:p text:style-name="Text_20_body"><text:span text:style-name="Strong_20_Emphasis">Multi-chronicle continental campaign:</text:span> Continental campaigns spanning multiple chronicles benefit from prompt versioning with specific session-cluster prompt adjustments calibrated to current chronicle scope and continental pressure convergence dynamics.</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Text_20_body"><text:soft-page-break/>The Continental Coordination Guide integrates with existing kit modules at maximum cross-reference scope. Continental chronicles draw from chronicle-mode prep guides, city supplements, and continental institutional infrastructure simultaneously.</text:p>
      <text:h text:style-name="Heading_20_3" text:outline-level="3"><text:span text:style-name="Strong_20_Emphasis">Chronicle-Mode Prep Guide Cross-References</text:span></text:h>
      <table:table table:name="Table1" table:style-name="Table1">
        <table:table-column table:style-name="Table1.A"/>
        <table:table-column table:style-name="Table1.B"/>
        <table:table-header-rows>
          <table:table-row>
            <table:table-cell table:style-name="Table1.A1" office:value-type="string">
              <text:p text:style-name="Table_20_Heading">Mode Prep Guide</text:p>
            </table:table-cell>
            <table:table-cell table:style-name="Table1.A1" office:value-type="string">
              <text:p text:style-name="Table_20_Heading">Continental Application</text:p>
            </table:table-cell>
          </table:table-row>
        </table:table-header-rows>
        <table:table-row>
          <table:table-cell table:style-name="Table1.A1" office:value-type="string">
            <text:p text:style-name="Table_20_Contents"><text:span text:style-name="Strong_20_Emphasis">Camarilla Orthodox</text:span></text:p>
          </table:table-cell>
          <table:table-cell table:style-name="Table1.A1" office:value-type="string">
            <text:p text:style-name="Table_20_Contents">Apply for Melbourne and Adelaide scenes; engage register variation between Australian-informal accommodation (Melbourne) and Edwardian-influenced orthodoxy (Adelaide)</text:p>
          </table:table-cell>
        </table:table-row>
        <table:table-row>
          <table:table-cell table:style-name="Table1.A1" office:value-type="string">
            <text:p text:style-name="Table_20_Contents"><text:span text:style-name="Strong_20_Emphasis">Methuselah-Tempo</text:span></text:p>
          </table:table-cell>
          <table:table-cell table:style-name="Table1.A1" office:value-type="string">
            <text:p text:style-name="Table_20_Contents">Apply for Sydney scenes; engage Sarrasine domain operations</text:p>
          </table:table-cell>
        </table:table-row>
        <table:table-row>
          <table:table-cell table:style-name="Table1.A1" office:value-type="string">
            <text:p text:style-name="Table_20_Contents"><text:span text:style-name="Strong_20_Emphasis">Sabbat-Survivor</text:span></text:p>
          </table:table-cell>
          <table:table-cell table:style-name="Table1.A1" office:value-type="string">
            <text:p text:style-name="Table_20_Contents">Apply for Brisbane scenes; engage Bishop Callista's Brisbane Sabbat-survivor mode</text:p>
          </table:table-cell>
        </table:table-row>
        <table:table-row>
          <table:table-cell table:style-name="Table1.A1" office:value-type="string">
            <text:p text:style-name="Table_20_Contents"><text:span text:style-name="Strong_20_Emphasis">Anarch Movement</text:span></text:p>
          </table:table-cell>
          <table:table-cell table:style-name="Table1.A1" office:value-type="string">
            <text:p text:style-name="Table_20_Contents">Apply for Melbourne Footscray scenes if continental chronicle engages Footscray operations</text:p>
          </table:table-cell>
        </table:table-row>
        <table:table-row>
          <table:table-cell table:style-name="Table1.A1" office:value-type="string">
            <text:p text:style-name="Table_20_Contents"><text:span text:style-name="Strong_20_Emphasis">Hecata Family</text:span></text:p>
          </table:table-cell>
          <table:table-cell table:style-name="Table1.A1" office:value-type="string">
            <text:p text:style-name="Table_20_Contents">Apply for Melbourne Calabria Branch scenes if continental chronicle engages Calabria operations</text:p>
          </table:table-cell>
        </table:table-row>
        <table:table-row>
          <table:table-cell table:style-name="Table1.A1" office:value-type="string">
            <text:p text:style-name="Table_20_Contents"><text:span text:style-name="Strong_20_Emphasis">Cross-Supernatural Diplomatic</text:span></text:p>
          </table:table-cell>
          <table:table-cell table:style-name="Table1.A1" office:value-type="string">
            <text:p text:style-name="Table_20_Contents">Apply for continental Cress Truce scenes (Melbourne and Adelaide), modified bilateral protocols (Sydney), continental Cress Truce exclusion (Brisbane)</text:p>
          </table:table-cell>
        </table:table-row>
      </table:table>
      <text:h text:style-name="Heading_20_3" text:outline-level="3"><text:span text:style-name="Strong_20_Emphasis">City Supplement Cross-References</text:span></text:h>
      <table:table table:name="Table2" table:style-name="Table2">
        <table:table-column table:style-name="Table2.A"/>
        <table:table-column table:style-name="Table2.B"/>
        <table:table-header-rows>
          <table:table-row>
            <table:table-cell table:style-name="Table2.A1" office:value-type="string">
              <text:p text:style-name="Table_20_Heading">City Supplement</text:p>
            </table:table-cell>
            <table:table-cell table:style-name="Table2.A1" office:value-type="string">
              <text:p text:style-name="Table_20_Heading">Continental Application</text:p>
            </table:table-cell>
          </table:table-row>
        </table:table-header-rows>
        <table:table-row>
          <table:table-cell table:style-name="Table2.A1" office:value-type="string">
            <text:p text:style-name="P2"><text:span text:style-name="Strong_20_Emphasis">Melbourne</text:span> (<text:span text:style-name="Source_20_Text"><text:span text:style-name="T1">vtm_melbourne_by_night.json</text:span></text:span>)</text:p>
          </table:table-cell>
          <table:table-cell table:style-name="Table2.A1" office:value-type="string">
            <text:p text:style-name="Table_20_Contents">Primary or secondary city in most continental Australian chronicles; engages Toorak Circle, Lytton's court, Footscray Crew, Calabria Branch, Royal Park Sept</text:p>
          </table:table-cell>
        </table:table-row>
        <table:table-row>
          <table:table-cell table:style-name="Table2.A1" office:value-type="string">
            <text:p text:style-name="P2"><text:span text:style-name="Strong_20_Emphasis">Sydney</text:span> (<text:span text:style-name="Source_20_Text"><text:span text:style-name="T1">vtm_sydney_by_night.json</text:span></text:span>)</text:p>
          </table:table-cell>
          <table:table-cell table:style-name="Table2.A1" office:value-type="string">
            <text:p text:style-name="Table_20_Contents">Primary or secondary city engaging Sarrasine domain operations; engages Sydney Council, Vaucluse Five, Phase Two continental operation</text:p>
          </table:table-cell>
        </table:table-row>
        <table:table-row>
          <table:table-cell table:style-name="Table2.A1" office:value-type="string">
            <text:p text:style-name="P2"><text:span text:style-name="Strong_20_Emphasis">Brisbane</text:span> (<text:span text:style-name="Source_20_Text"><text:span text:style-name="T1">vtm_brisbane_by_night.json</text:span></text:span>)</text:p>
          </table:table-cell>
          <table:table-cell table:style-name="Table2.A1" office:value-type="string">
            <text:p text:style-name="Table_20_Contents">Primary or secondary city engaging Bishop Callista's Sabbat-survivor mode; engages 2026 Glass Walker operation, continuing Cress Truce exclusion</text:p>
          </table:table-cell>
        </table:table-row>
        <table:table-row>
          <table:table-cell table:style-name="Table2.A1" office:value-type="string">
            <text:p text:style-name="P2"><text:span text:style-name="Strong_20_Emphasis">Adelaide</text:span> (<text:span text:style-name="Source_20_Text"><text:span text:style-name="T1">vtm_adelaide_by_night.json</text:span></text:span>)</text:p>
          </table:table-cell>
          <table:table-cell table:style-name="Table2.A1" office:value-type="string">
            <text:p text:style-name="Table_20_Contents">Primary or secondary city engaging Octavia's smaller-domain Camarilla orthodox; engages Lytton-Octavia continental coordination</text:p>
          </table:table-cell>
        </table:table-row>
      </table:table>
      <text:h text:style-name="Heading_20_3" text:outline-level="3"><text:span text:style-name="Strong_20_Emphasis">Cross-Splat &amp; Diplomatic Infrastructure Cross-References</text:span></text:h>
      <table:table table:name="Table3" table:style-name="Table3">
        <table:table-column table:style-name="Table3.A"/>
        <table:table-column table:style-name="Table3.B"/>
        <table:table-header-rows>
          <table:table-row>
            <table:table-cell table:style-name="Table3.A1" office:value-type="string">
              <text:p text:style-name="Table_20_Heading">Module</text:p>
            </table:table-cell>
            <table:table-cell table:style-name="Table3.A1" office:value-type="string">
              <text:p text:style-name="Table_20_Heading">Continental Application</text:p>
            </table:table-cell>
          </table:table-row>
        </table:table-header-rows>
        <table:table-row>
          <table:table-cell table:style-name="Table3.A1" office:value-type="string">
            <text:p text:style-name="P2"><text:span text:style-name="Strong_20_Emphasis">Garou Diplomatic Supplement</text:span> (<text:span text:style-name="Source_20_Text"><text:span text:style-name="T1">vtm_garou_diplomatic.json</text:span></text:span>)</text:p>
          </table:table-cell>
          <table:table-cell table:style-name="Table3.A1" office:value-type="string">
            <text:p text:style-name="Table_20_Contents">Continental Cress Truce framework, Royal Park Sept, Adelaide Hills Glass Walker sept, Tomás Schreckenberg Sydney bilateral protocols, continuing Brisbane continental exclusion</text:p>
          </table:table-cell>
        </table:table-row>
        <table:table-row>
          <table:table-cell table:style-name="Table3.A1" office:value-type="string">
            <text:p text:style-name="P2"><text:span text:style-name="Strong_20_Emphasis">Cross-Pacific Refusenik Supplement</text:span> (<text:span text:style-name="Source_20_Text"><text:span text:style-name="T1">vtm_cross_pacific_refusenik.json</text:span></text:span>)</text:p>
          </table:table-cell>
          <table:table-cell table:style-name="Table3.A1" office:value-type="string">
            <text:p text:style-name="Table_20_Contents">Continuing Templar Abernathy Brisbane connection to continental cross-Pacific Sabbat-refusenik infrastructure with continuing institutional implications for continental Australian chronicle work</text:p>
          </table:table-cell>
        </table:table-row>
      </table:table>
      <text:h text:style-name="Heading_20_3" text:outline-level="3"><text:soft-page-break/><text:span text:style-name="Strong_20_Emphasis">Antagonist Pack Cross-References</text:span></text:h>
      <table:table table:name="Table4" table:style-name="Table4">
        <table:table-column table:style-name="Table4.A"/>
        <table:table-column table:style-name="Table4.B"/>
        <table:table-header-rows>
          <table:table-row>
            <table:table-cell table:style-name="Table4.A1" office:value-type="string">
              <text:p text:style-name="Table_20_Heading">Antagonist Pack Section</text:p>
            </table:table-cell>
            <table:table-cell table:style-name="Table4.A1" office:value-type="string">
              <text:p text:style-name="Table_20_Heading">Continental Application</text:p>
            </table:table-cell>
          </table:table-row>
        </table:table-header-rows>
        <table:table-row>
          <table:table-cell table:style-name="Table4.A1" office:value-type="string">
            <text:p text:style-name="Table_20_Contents"><text:span text:style-name="Strong_20_Emphasis">Section 1 (Sarrasine)</text:span></text:p>
          </table:table-cell>
          <table:table-cell table:style-name="Table4.A1" office:value-type="string">
            <text:p text:style-name="Table_20_Contents">Sydney domain authority; continental Phase Two operation; continuing inter-authority correspondence with Lytton, Bishop Callista, Octavia</text:p>
          </table:table-cell>
        </table:table-row>
        <table:table-row>
          <table:table-cell table:style-name="Table4.A1" office:value-type="string">
            <text:p text:style-name="Table_20_Contents"><text:span text:style-name="Strong_20_Emphasis">Section 2 (Bishop Callista Vox)</text:span></text:p>
          </table:table-cell>
          <table:table-cell table:style-name="Table4.A1" office:value-type="string">
            <text:p text:style-name="Table_20_Contents">Brisbane domain authority; continuing 2026 operation; continuing inter-authority correspondence with Lytton, Sarrasine, Octavia</text:p>
          </table:table-cell>
        </table:table-row>
        <table:table-row>
          <table:table-cell table:style-name="Table4.A1" office:value-type="string">
            <text:p text:style-name="Table_20_Contents"><text:span text:style-name="Strong_20_Emphasis">Section 3 (Hardacre AFP-TP)</text:span></text:p>
          </table:table-cell>
          <table:table-cell table:style-name="Table4.A1" office:value-type="string">
            <text:p text:style-name="Table_20_Contents">Continental AFP-Twilight-Project intelligence pressure across all four cities</text:p>
          </table:table-cell>
        </table:table-row>
        <table:table-row>
          <table:table-cell table:style-name="Table4.A1" office:value-type="string">
            <text:p text:style-name="Table_20_Contents"><text:span text:style-name="Strong_20_Emphasis">Section 4 (Red Mag)</text:span></text:p>
          </table:table-cell>
          <table:table-cell table:style-name="Table4.A1" office:value-type="string">
            <text:p text:style-name="Table_20_Contents">Footscray Crew operations producing continuing Anarch Movement implications</text:p>
          </table:table-cell>
        </table:table-row>
        <table:table-row>
          <table:table-cell table:style-name="Table4.A1" office:value-type="string">
            <text:p text:style-name="Table_20_Contents"><text:span text:style-name="Strong_20_Emphasis">Section 5 (Lumley)</text:span></text:p>
          </table:table-cell>
          <table:table-cell table:style-name="Table4.A1" office:value-type="string">
            <text:p text:style-name="Table_20_Contents">Tremere Drummond Institute operations producing continuing continental cross-Cardinal correspondence implications</text:p>
          </table:table-cell>
        </table:table-row>
        <table:table-row>
          <table:table-cell table:style-name="Table4.A1" office:value-type="string">
            <text:p text:style-name="Table_20_Contents"><text:span text:style-name="Strong_20_Emphasis">Section 9 (Last Days of Brisbane pack)</text:span></text:p>
          </table:table-cell>
          <table:table-cell table:style-name="Table4.A1" office:value-type="string">
            <text:p text:style-name="Table_20_Contents">2026 Glass Walker operation pack producing continuing continental cross-supernatural implications</text:p>
          </table:table-cell>
        </table:table-row>
      </table:table>
      <text:h text:style-name="Heading_20_3" text:outline-level="3"><text:span text:style-name="Strong_20_Emphasis">Coterie Pack Cross-References</text:span></text:h>
      <table:table table:name="Table5" table:style-name="Table5">
        <table:table-column table:style-name="Table5.A"/>
        <table:table-column table:style-name="Table5.B"/>
        <table:table-header-rows>
          <table:table-row>
            <table:table-cell table:style-name="Table5.A1" office:value-type="string">
              <text:p text:style-name="Table_20_Heading">Coterie</text:p>
            </table:table-cell>
            <table:table-cell table:style-name="Table5.A1" office:value-type="string">
              <text:p text:style-name="Table_20_Heading">Continental Application</text:p>
            </table:table-cell>
          </table:table-row>
        </table:table-header-rows>
        <table:table-row>
          <table:table-cell table:style-name="Table5.A1" office:value-type="string">
            <text:p text:style-name="Table_20_Contents"><text:span text:style-name="Strong_20_Emphasis">Toorak Circle</text:span> (Coterie 1)</text:p>
          </table:table-cell>
          <table:table-cell table:style-name="Table5.A1" office:value-type="string">
            <text:p text:style-name="Table_20_Contents">Melbourne Camarilla institutional infrastructure</text:p>
          </table:table-cell>
        </table:table-row>
        <table:table-row>
          <table:table-cell table:style-name="Table5.A1" office:value-type="string">
            <text:p text:style-name="Table_20_Contents"><text:span text:style-name="Strong_20_Emphasis">Footscray Crew</text:span> (Coterie 8)</text:p>
          </table:table-cell>
          <table:table-cell table:style-name="Table5.A1" office:value-type="string">
            <text:p text:style-name="Table_20_Contents">Melbourne Anarch operations</text:p>
          </table:table-cell>
        </table:table-row>
        <table:table-row>
          <table:table-cell table:style-name="Table5.A1" office:value-type="string">
            <text:p text:style-name="Table_20_Contents"><text:span text:style-name="Strong_20_Emphasis">Calabria Branch</text:span> (Coterie 9)</text:p>
          </table:table-cell>
          <table:table-cell table:style-name="Table5.A1" office:value-type="string">
            <text:p text:style-name="Table_20_Contents">Melbourne Hecata operations with continuing cross-supernatural diplomatic infrastructure</text:p>
          </table:table-cell>
        </table:table-row>
        <table:table-row>
          <table:table-cell table:style-name="Table5.A1" office:value-type="string">
            <text:p text:style-name="Table_20_Contents"><text:span text:style-name="Strong_20_Emphasis">Royal Park Sept</text:span> (Coterie 10)</text:p>
          </table:table-cell>
          <table:table-cell table:style-name="Table5.A1" office:value-type="string">
            <text:p text:style-name="Table_20_Contents">Melbourne Glass Walker sept producing continental continuing Cress Truce infrastructure</text:p>
          </table:table-cell>
        </table:table-row>
        <table:table-row>
          <table:table-cell table:style-name="Table5.A1" office:value-type="string">
            <text:p text:style-name="Table_20_Contents"><text:span text:style-name="Strong_20_Emphasis">(Sydney coteries)</text:span></text:p>
          </table:table-cell>
          <table:table-cell table:style-name="Table5.A1" office:value-type="string">
            <text:p text:style-name="Table_20_Contents">Sydney operations engaging Sarrasine domain</text:p>
          </table:table-cell>
        </table:table-row>
        <table:table-row>
          <table:table-cell table:style-name="Table5.A1" office:value-type="string">
            <text:p text:style-name="Table_20_Contents"><text:span text:style-name="Strong_20_Emphasis">(Brisbane coteries)</text:span></text:p>
          </table:table-cell>
          <table:table-cell table:style-name="Table5.A1" office:value-type="string">
            <text:p text:style-name="Table_20_Contents">Brisbane operations engaging Bishop Callista's Sabbat-survivor mode</text:p>
          </table:table-cell>
        </table:table-row>
        <table:table-row>
          <table:table-cell table:style-name="Table5.A1" office:value-type="string">
            <text:p text:style-name="Table_20_Contents"><text:span text:style-name="Strong_20_Emphasis">(Adelaide coteries)</text:span></text:p>
          </table:table-cell>
          <table:table-cell table:style-name="Table5.A1" office:value-type="string">
            <text:p text:style-name="Table_20_Contents">Adelaide operations engaging Octavia's smaller-domain</text:p>
          </table:table-cell>
        </table:table-row>
      </table:table>
      <text:h text:style-name="Heading_20_3" text:outline-level="3"><text:span text:style-name="Strong_20_Emphasis">Scenario Cross-References</text:span></text:h>
      <table:table table:name="Table6" table:style-name="Table6">
        <table:table-column table:style-name="Table6.A"/>
        <table:table-column table:style-name="Table6.B"/>
        <table:table-header-rows>
          <table:table-row>
            <table:table-cell table:style-name="Table6.A1" office:value-type="string">
              <text:p text:style-name="Table_20_Heading">Scenario</text:p>
            </table:table-cell>
            <table:table-cell table:style-name="Table6.A1" office:value-type="string">
              <text:p text:style-name="Table_20_Heading">Continental Application</text:p>
            </table:table-cell>
          </table:table-row>
        </table:table-header-rows>
        <table:table-row>
          <table:table-cell table:style-name="Table6.A1" office:value-type="string">
            <text:p text:style-name="Table_20_Contents"><text:span text:style-name="Strong_20_Emphasis">Melbourne scenarios</text:span></text:p>
          </table:table-cell>
          <table:table-cell table:style-name="Table6.A1" office:value-type="string">
            <text:p text:style-name="Table_20_Contents">Continental chronicles engaging Melbourne primary or secondary positioning</text:p>
          </table:table-cell>
        </table:table-row>
        <table:table-row>
          <table:table-cell table:style-name="Table6.A1" office:value-type="string">
            <text:p text:style-name="Table_20_Contents"><text:span text:style-name="Strong_20_Emphasis">Sydney scenarios</text:span></text:p>
          </table:table-cell>
          <table:table-cell table:style-name="Table6.A1" office:value-type="string">
            <text:p text:style-name="Table_20_Contents">Continental chronicles engaging Sydney primary or secondary positioning</text:p>
          </table:table-cell>
        </table:table-row>
        <table:table-row>
          <table:table-cell table:style-name="Table6.A1" office:value-type="string">
            <text:p text:style-name="Table_20_Contents"><text:span text:style-name="Strong_20_Emphasis">Brisbane scenarios</text:span></text:p>
          </table:table-cell>
          <table:table-cell table:style-name="Table6.A1" office:value-type="string">
            <text:p text:style-name="Table_20_Contents">Continental chronicles engaging Brisbane primary or secondary positioning</text:p>
          </table:table-cell>
        </table:table-row>
        <table:table-row>
          <table:table-cell table:style-name="Table6.A1" office:value-type="string">
            <text:p text:style-name="Table_20_Contents"><text:span text:style-name="Strong_20_Emphasis">Adelaide scenarios</text:span></text:p>
          </table:table-cell>
          <table:table-cell table:style-name="Table6.A1" office:value-type="string">
            <text:p text:style-name="Table_20_Contents">Continental chronicles engaging Adelaide primary or secondary positioning</text:p>
          </table:table-cell>
        </table:table-row>
        <table:table-row>
          <table:table-cell table:style-name="Table6.A1" office:value-type="string">
            <text:p text:style-name="Table_20_Contents"><text:span text:style-name="Strong_20_Emphasis">Cross-Pacific scenarios</text:span></text:p>
          </table:table-cell>
          <table:table-cell table:style-name="Table6.A1" office:value-type="string">
            <text:p text:style-name="Table_20_Contents">Continental chronicles engaging continuing continental Australian-Pacific bridging operations through Templar Abernathy correspondence channel</text:p>
          </table:table-cell>
        </table:table-row>
      </table:table>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Text_20_body"><text:soft-page-break/>Five sample continental chronicle configurations demonstrating continental coordination chronicle design at varying scope and chronicle-active emphasis. Each configuration provides starting infrastructure for Storyteller / AI continental chronicle preparation.</text:p>
      <text:h text:style-name="Heading_20_3" text:outline-level="3"><text:span text:style-name="Strong_20_Emphasis">Configuration 1: The Lytton-Octavia Continental Coordination Chronicle</text:span></text:h>
      <text:p text:style-name="Text_20_body"><text:span text:style-name="Strong_20_Emphasis">Scope:</text:span> Two-city continental chronicle (Melbourne + Adelaide) at continuing Lytton-Octavia continental Camarilla coordination focus.</text:p>
      <text:p text:style-name="Text_20_body"><text:span text:style-name="Strong_20_Emphasis">Chronicle modes:</text:span> Camarilla orthodox at both cities with register variation between Australian-informal accommodation (Melbourne) and Edwardian-influenced orthodoxy (Adelaide).</text:p>
      <text:p text:style-name="Text_20_body"><text:span text:style-name="Strong_20_Emphasis">Chronicle-active continental pressure:</text:span> Continuing parallel Beckoning trajectories of Lytton (3 episodes since 2018) and Octavia (2 episodes since 2020); continuing Phase Two continental operation affecting both Melbourne and Adelaide; continuing 136-year personal friendship producing continuing succession-relationship complexity.</text:p>
      <text:p text:style-name="Text_20_body"><text:span text:style-name="Strong_20_Emphasis">Mode-pivot frequency:</text:span> Light-to-moderate (1-2 pivots per session through register variation rather than mode transition).</text:p>
      <text:p text:style-name="Text_20_body"><text:span text:style-name="Strong_20_Emphasis">Scene-density distribution:</text:span> Melbourne 60% / Adelaide 35% / Inter-city correspondence 5%.</text:p>
      <text:p text:style-name="Text_20_body"><text:span text:style-name="Strong_20_Emphasis">Chronicle length recommendation:</text:span> 15-20 sessions (extended chronicle for continuing succession-relationship development).</text:p>
      <text:p text:style-name="Text_20_body"><text:span text:style-name="Strong_20_Emphasis">Lorebook layering:</text:span></text:p>
      <text:p text:style-name="Preformatted_20_Text"><text:span text:style-name="Source_20_Text">vtm_modern_nights.json</text:span></text:p>
      <text:p text:style-name="Preformatted_20_Text"><text:span text:style-name="Source_20_Text">+ vtm_melbourne_by_night.json</text:span></text:p>
      <text:p text:style-name="Preformatted_20_Text"><text:span text:style-name="Source_20_Text">+ vtm_adelaide_by_night.json</text:span></text:p>
      <text:p text:style-name="P1"><text:span text:style-name="Source_20_Text">+ vtm_garou_diplomatic.json (for continental Cress Truce engagement)</text:span></text:p>
      <text:p text:style-name="Text_20_body"><text:span text:style-name="Strong_20_Emphasis">Recommended chronicle prep guides:</text:span> Camarilla Orthodox Chronicle Prep Guide (primary), Cross-Supernatural Diplomatic Chronicle Prep Guide (secondary).</text:p>
      <text:h text:style-name="Heading_20_3" text:outline-level="3"><text:span text:style-name="Strong_20_Emphasis">Configuration 2: The Continental Phase Two Chronicle</text:span></text:h>
      <text:p text:style-name="Text_20_body"><text:span text:style-name="Strong_20_Emphasis">Scope:</text:span> Three-city continental chronicle (Sydney + Melbourne + Adelaide) at continuing Sarrasine Phase Two continental operation focus.</text:p>
      <text:p text:style-name="Text_20_body"><text:span text:style-name="Strong_20_Emphasis">Chronicle modes:</text:span> Methuselah-tempo (Sydney), Camarilla orthodox (Melbourne and Adelaide).</text:p>
      <text:p text:style-name="Text_20_body"><text:span text:style-name="Strong_20_Emphasis">Chronicle-active continental pressure:</text:span> Continuing 2026-2028 Phase Two continental destabilisation operation with continuing Sydney as primary domain, continuing Melbourne as secondary continental Camarilla institutional positioning, continuing Adelaide as secondary continental Camarilla smaller-domain positioning.</text:p>
      <text:p text:style-name="Text_20_body"><text:span text:style-name="Strong_20_Emphasis">Mode-pivot frequency:</text:span> Moderate-to-heavy (2-3 pivots per session through methuselah-tempo to Camarilla orthodox transitions).</text:p>
      <text:p text:style-name="Text_20_body"><text:span text:style-name="Strong_20_Emphasis">Scene-density distribution:</text:span> Sydney 40% / Melbourne 30% / Adelaide 20% / Inter-city correspondence 10%.</text:p>
      <text:p text:style-name="Text_20_body"><text:span text:style-name="Strong_20_Emphasis">Chronicle length recommendation:</text:span> 20+ sessions (extended chronicle for continuing 2026-2028 Phase Two continental operation development).</text:p>
      <text:p text:style-name="Text_20_body"><text:soft-page-break/><text:span text:style-name="Strong_20_Emphasis">Lorebook layering:</text:span></text:p>
      <text:p text:style-name="Preformatted_20_Text"><text:span text:style-name="Source_20_Text">vtm_modern_nights.json</text:span></text:p>
      <text:p text:style-name="Preformatted_20_Text"><text:span text:style-name="Source_20_Text">+ vtm_sydney_by_night.json</text:span></text:p>
      <text:p text:style-name="Preformatted_20_Text"><text:span text:style-name="Source_20_Text">+ vtm_melbourne_by_night.json</text:span></text:p>
      <text:p text:style-name="Preformatted_20_Text"><text:span text:style-name="Source_20_Text">+ vtm_adelaide_by_night.json</text:span></text:p>
      <text:p text:style-name="P1"><text:span text:style-name="Source_20_Text">+ vtm_garou_diplomatic.json (for continental Cress Truce engagement)</text:span></text:p>
      <text:p text:style-name="Text_20_body"><text:span text:style-name="Strong_20_Emphasis">Recommended chronicle prep guides:</text:span> Methuselah-Tempo Chronicle Prep Guide (primary), Camarilla Orthodox Chronicle Prep Guide (secondary), Cross-Supernatural Diplomatic Chronicle Prep Guide (tertiary).</text:p>
      <text:h text:style-name="Heading_20_3" text:outline-level="3"><text:span text:style-name="Strong_20_Emphasis">Configuration 3: The 2026 Brisbane Operation Continental Chronicle</text:span></text:h>
      <text:p text:style-name="Text_20_body"><text:span text:style-name="Strong_20_Emphasis">Scope:</text:span> Three-city continental chronicle (Brisbane + Melbourne + Sydney) at continuing 2026 Glass Walker northern septs operation focus with continuing continental cross-Pacific implications.</text:p>
      <text:p text:style-name="Text_20_body"><text:span text:style-name="Strong_20_Emphasis">Chronicle modes:</text:span> Sabbat-survivor (Brisbane), Camarilla orthodox (Melbourne), methuselah-tempo (Sydney).</text:p>
      <text:p text:style-name="Text_20_body"><text:span text:style-name="Strong_20_Emphasis">Chronicle-active continental pressure:</text:span> Continuing October 2026 Brisbane operation with continuing continental Camarilla institutional positioning at Melbourne, continuing continental Independent positioning at Sydney, continuing cross-Pacific institutional coordination through Templar Abernathy-Cardinal Reyna correspondence channel.</text:p>
      <text:p text:style-name="Text_20_body"><text:span text:style-name="Strong_20_Emphasis">Mode-pivot frequency:</text:span> Heavy (3+ pivots per session through Sabbat-survivor to Camarilla orthodox to methuselah-tempo transitions).</text:p>
      <text:p text:style-name="Text_20_body"><text:span text:style-name="Strong_20_Emphasis">Scene-density distribution:</text:span> Brisbane 40% / Melbourne 25% / Sydney 25% / Inter-city correspondence 10%.</text:p>
      <text:p text:style-name="Text_20_body"><text:span text:style-name="Strong_20_Emphasis">Chronicle length recommendation:</text:span> 18-22 sessions (extended chronicle for continuing 2025-2027 chronicle-active period including pre-operation, October 2026 operation, post-operation continental implications).</text:p>
      <text:p text:style-name="Text_20_body"><text:span text:style-name="Strong_20_Emphasis">Lorebook layering:</text:span></text:p>
      <text:p text:style-name="Preformatted_20_Text"><text:span text:style-name="Source_20_Text">vtm_modern_nights.json</text:span></text:p>
      <text:p text:style-name="Preformatted_20_Text"><text:span text:style-name="Source_20_Text">+ vtm_brisbane_by_night.json</text:span></text:p>
      <text:p text:style-name="Preformatted_20_Text"><text:span text:style-name="Source_20_Text">+ vtm_melbourne_by_night.json</text:span></text:p>
      <text:p text:style-name="Preformatted_20_Text"><text:span text:style-name="Source_20_Text">+ vtm_sydney_by_night.json</text:span></text:p>
      <text:p text:style-name="Preformatted_20_Text"><text:span text:style-name="Source_20_Text">+ vtm_garou_diplomatic.json</text:span></text:p>
      <text:p text:style-name="P1"><text:span text:style-name="Source_20_Text">+ vtm_cross_pacific_refusenik.json (for continuing continental cross-Pacific implications)</text:span></text:p>
      <text:p text:style-name="Text_20_body"><text:span text:style-name="Strong_20_Emphasis">Recommended chronicle prep guides:</text:span> Sabbat-Survivor Chronicle Prep Guide (primary), Cross-Supernatural Diplomatic Chronicle Prep Guide (primary), Camarilla Orthodox Chronicle Prep Guide (secondary), Methuselah-Tempo Chronicle Prep Guide (secondary).</text:p>
      <text:h text:style-name="Heading_20_3" text:outline-level="3"><text:span text:style-name="Strong_20_Emphasis">Configuration 4: The Continental Senior-Figure Convergence Chronicle</text:span></text:h>
      <text:p text:style-name="Text_20_body"><text:span text:style-name="Strong_20_Emphasis">Scope:</text:span> Four-city continental chronicle (Melbourne + Sydney + Brisbane + Adelaide) at continuing senior-figure Beckoning trajectory convergence focus.</text:p>
      <text:p text:style-name="Text_20_body"><text:span text:style-name="Strong_20_Emphasis">Chronicle modes:</text:span> All four primary modes simultaneously (Camarilla orthodox at Melbourne and Adelaide, methuselah-tempo at Sydney, Sabbat-survivor at Brisbane).</text:p>
      <text:p text:style-name="Text_20_body"><text:soft-page-break/><text:span text:style-name="Strong_20_Emphasis">Chronicle-active continental pressure:</text:span> Continuing parallel senior-figure Beckoning trajectories at Lytton (Melbourne, 3 episodes since 2018), Octavia (Adelaide, 2 episodes since 2020), Bishop Callista (Brisbane, parallel pattern across continuing 50-year tenure), continuing Sarrasine continuing methuselah-tier operational positioning at Sydney that complicates continuing Beckoning trajectory pressure on continuing other senior figures through continuing continental cross-sect institutional positioning.</text:p>
      <text:p text:style-name="Text_20_body"><text:span text:style-name="Strong_20_Emphasis">Mode-pivot frequency:</text:span> Heavy (4+ pivots per session through full chronicle-mode plurality).</text:p>
      <text:p text:style-name="Text_20_body"><text:span text:style-name="Strong_20_Emphasis">Scene-density distribution:</text:span> Each city 22-24% / Inter-city correspondence 6-12%.</text:p>
      <text:p text:style-name="Text_20_body"><text:span text:style-name="Strong_20_Emphasis">Chronicle length recommendation:</text:span> 25+ sessions (multi-chronicle campaign engagement preferred for continuing chronicle scope at continuing maximum continental complexity).</text:p>
      <text:p text:style-name="Text_20_body"><text:span text:style-name="Strong_20_Emphasis">Lorebook layering:</text:span></text:p>
      <text:p text:style-name="Preformatted_20_Text"><text:span text:style-name="Source_20_Text">vtm_modern_nights.json</text:span></text:p>
      <text:p text:style-name="Preformatted_20_Text"><text:span text:style-name="Source_20_Text">+ vtm_melbourne_by_night.json</text:span></text:p>
      <text:p text:style-name="Preformatted_20_Text"><text:span text:style-name="Source_20_Text">+ vtm_sydney_by_night.json</text:span></text:p>
      <text:p text:style-name="Preformatted_20_Text"><text:span text:style-name="Source_20_Text">+ vtm_brisbane_by_night.json</text:span></text:p>
      <text:p text:style-name="Preformatted_20_Text"><text:span text:style-name="Source_20_Text">+ vtm_adelaide_by_night.json</text:span></text:p>
      <text:p text:style-name="Preformatted_20_Text"><text:span text:style-name="Source_20_Text">+ vtm_garou_diplomatic.json</text:span></text:p>
      <text:p text:style-name="P1"><text:span text:style-name="Source_20_Text">+ vtm_cross_pacific_refusenik.json</text:span></text:p>
      <text:p text:style-name="Text_20_body"><text:span text:style-name="Strong_20_Emphasis">Recommended chronicle prep guides:</text:span> All six existing chronicle-mode prep guides applied simultaneously per city's specific mode plus continental coordination guide (this document) as central handling guidance.</text:p>
      <text:h text:style-name="Heading_20_3" text:outline-level="3"><text:span text:style-name="Strong_20_Emphasis">Configuration 5: The Continental Cress Truce Continuing Renewal Chronicle</text:span></text:h>
      <text:p text:style-name="Text_20_body"><text:span text:style-name="Strong_20_Emphasis">Scope:</text:span> Three-city continental chronicle (Melbourne + Adelaide + Sydney) at continuing post-2024-centennial-renewal continental cross-supernatural diplomatic infrastructure development focus.</text:p>
      <text:p text:style-name="Text_20_body"><text:span text:style-name="Strong_20_Emphasis">Chronicle modes:</text:span> Camarilla orthodox (Melbourne and Adelaide), methuselah-tempo (Sydney), cross-supernatural diplomatic at maximum continental scope across continental Cress Truce framework cities plus continuing Sydney bilateral protocols.</text:p>
      <text:p text:style-name="Text_20_body"><text:span text:style-name="Strong_20_Emphasis">Chronicle-active continental pressure:</text:span> Continuing post-2024 continental Cress Truce centennial renewal continuing institutional development including continuing Royal Park Sept-Toorak Circle continuing institutional integration, continuing Adelaide Hills Glass Walker sept-Octavia continuing institutional cooperation, continuing Sarrasine-Tomás Schreckenberg bilateral protocols, continuing Brisbane continental Cress Truce exclusion implications for continuing 2026 operation cross-Pacific coordination.</text:p>
      <text:p text:style-name="Text_20_body"><text:span text:style-name="Strong_20_Emphasis">Mode-pivot frequency:</text:span> Moderate (2-3 pivots per session through cross-supernatural diplomatic operations producing continuing continental cross-mode coordination).</text:p>
      <text:p text:style-name="Text_20_body"><text:span text:style-name="Strong_20_Emphasis">Scene-density distribution:</text:span> Melbourne 35% / Adelaide 30% / Sydney 25% / Inter-city correspondence 10%.</text:p>
      <text:p text:style-name="Text_20_body"><text:span text:style-name="Strong_20_Emphasis">Chronicle length recommendation:</text:span> 18-22 sessions (extended chronicle for continuing post-2024 continental cross-supernatural diplomatic infrastructure development).</text:p>
      <text:p text:style-name="Text_20_body"><text:span text:style-name="Strong_20_Emphasis">Lorebook layering:</text:span></text:p>
      <text:p text:style-name="Preformatted_20_Text"><text:soft-page-break/><text:span text:style-name="Source_20_Text">vtm_modern_nights.json</text:span></text:p>
      <text:p text:style-name="Preformatted_20_Text"><text:span text:style-name="Source_20_Text">+ vtm_melbourne_by_night.json</text:span></text:p>
      <text:p text:style-name="Preformatted_20_Text"><text:span text:style-name="Source_20_Text">+ vtm_adelaide_by_night.json</text:span></text:p>
      <text:p text:style-name="Preformatted_20_Text"><text:span text:style-name="Source_20_Text">+ vtm_sydney_by_night.json</text:span></text:p>
      <text:p text:style-name="P1"><text:span text:style-name="Source_20_Text">+ vtm_garou_diplomatic.json</text:span></text:p>
      <text:p text:style-name="Text_20_body"><text:span text:style-name="Strong_20_Emphasis">Recommended chronicle prep guides:</text:span> Cross-Supernatural Diplomatic Chronicle Prep Guide (primary), Camarilla Orthodox Chronicle Prep Guide (secondary), Methuselah-Tempo Chronicle Prep Guide (secondary).</text:p>
      <text:p text:style-name="Preformatted_20_Text"><text:span text:style-name="Strong_20_Emphasis">The Continental Coordination Guide is complete.</text:span> A comprehensive eight-part meta-document for designing and running continental Australian cross-city chronicles, covering: what makes continental coordination chronicles different (five structural axes — chronicle-mode plurality, continental geographic rhythm, continental political geography, continental pressure convergence, cross-city character mobility); continental Australian political geography (Lytton-Octavia continental Camarilla coordination, Lytton-Sarrasine cross-sect correspondence, Sarrasine-Bishop Callista minimal-formal correspondence, Lytton-Bishop Callista hostile-formal correspondence, Octavia-Bishop Callista smaller-domain-formal correspondence, continental Cress Truce infrastructure, continental AFP-Twilight-Project intelligence pressure); cross-city mode pivot handling (six primary mode-pivot patterns with specific handling guidance plus mode-pivot frequency calibration); continental pacing patterns (continental convergence arc structures, scene-density distribution, four-temporal-scale geographic rhythm, continental calendar alignment); six common continental chronicle failure modes with diagnostic indicators and corrective adjustments; AI prompt configuration guidance with continental scope-specific prompt components and failure mode recognition; cross-references with existing kit modules at maximum cross-reference scope; five sample continental chronicle configurations demonstrating chronicle design at varying scope from two-city continental through four-city continental and continental Australian-Pacific bridg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5-13T20:32:22.454829659</dc:date>
    <meta:editing-duration>PT7M4S</meta:editing-duration>
    <meta:editing-cycles>1</meta:editing-cycles>
    <meta:document-statistic meta:table-count="6" meta:image-count="0" meta:object-count="0" meta:page-count="28" meta:paragraph-count="516" meta:word-count="7760" meta:character-count="71643" meta:non-whitespace-character-count="64160"/>
    <meta:generator>LibreOffice/24.2.7.2$Linux_X86_64 LibreOffice_project/420$Build-2</meta:generator>
  </office:meta>
</office:document-meta>
</file>