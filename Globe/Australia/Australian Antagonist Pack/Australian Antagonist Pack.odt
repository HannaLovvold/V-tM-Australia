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902cm" table:align="left"/>
    </style:style>
    <style:style style:name="Table1.A" style:family="table-column">
      <style:table-column-properties style:column-width="0.637cm"/>
    </style:style>
    <style:style style:name="Table1.B" style:family="table-column">
      <style:table-column-properties style:column-width="6.523cm"/>
    </style:style>
    <style:style style:name="Table1.C" style:family="table-column">
      <style:table-column-properties style:column-width="2.244cm"/>
    </style:style>
    <style:style style:name="Table1.D" style:family="table-column">
      <style:table-column-properties style:column-width="7.498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198cm"/>
    </style:style>
    <style:style style:name="Table2.B" style:family="table-column">
      <style:table-column-properties style:column-width="12.80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919cm"/>
    </style:style>
    <style:style style:name="Table3.B" style:family="table-column">
      <style:table-column-properties style:column-width="4.11cm"/>
    </style:style>
    <style:style style:name="Table3.C" style:family="table-column">
      <style:table-column-properties style:column-width="8.971cm"/>
    </style:style>
    <style:style style:name="Table3.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comprehensive antagonist roster for Australian V:tM chronicles, parallel to the original Antagonist NPC Pack but tuned to the continent's distinctive politics: Sarrasine as central gravitational threat, the Brisbane Sabbat as active military pressure, the AFP-Twilight-Project partnership as procedural mortal threat, and the original-six surviving founders as both historical infrastructure and complicated chronicle-active presences.</text:p>
      <text:p text:style-name="Text_20_body"><text:span text:style-name="Strong_20_Emphasis">Design principle:</text:span> Antagonists with codes, internal contradictions, and paths-other-than-combat. The Australian context produces specific antagonist textures the Chicago kit does not — methuselah-scale hidden threat, cross-supernatural-aware Sabbat, Five-Eyes-aligned Inquisition, and original-founders whose 235-year political quarrels remain operationally activ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p>
            </table:table-cell>
            <table:table-cell table:style-name="Table1.A1" office:value-type="string">
              <text:p text:style-name="Table_20_Heading">Antagonist</text:p>
            </table:table-cell>
            <table:table-cell table:style-name="Table1.A1" office:value-type="string">
              <text:p text:style-name="Table_20_Heading">Category</text:p>
            </table:table-cell>
            <table:table-cell table:style-name="Table1.A1" office:value-type="string">
              <text:p text:style-name="Table_20_Heading">Threat profile</text:p>
            </table:table-cell>
          </table:table-row>
        </table:table-header-rows>
        <table:table-row>
          <table:table-cell table:style-name="Table1.A1" office:value-type="string">
            <text:p text:style-name="Table_20_Contents">15</text:p>
          </table:table-cell>
          <table:table-cell table:style-name="Table1.A1" office:value-type="string">
            <text:p text:style-name="Table_20_Contents">Sarrasine</text:p>
          </table:table-cell>
          <table:table-cell table:style-name="Table1.A1" office:value-type="string">
            <text:p text:style-name="Table_20_Contents">Methuselah</text:p>
          </table:table-cell>
          <table:table-cell table:style-name="Table1.A1" office:value-type="string">
            <text:p text:style-name="Table_20_Contents">Continental hidden threat, methuselah-tier</text:p>
          </table:table-cell>
        </table:table-row>
        <table:table-row>
          <table:table-cell table:style-name="Table1.A1" office:value-type="string">
            <text:p text:style-name="Table_20_Contents">16</text:p>
          </table:table-cell>
          <table:table-cell table:style-name="Table1.A1" office:value-type="string">
            <text:p text:style-name="Table_20_Contents">Bishop Callista Vox</text:p>
          </table:table-cell>
          <table:table-cell table:style-name="Table1.A1" office:value-type="string">
            <text:p text:style-name="Table_20_Contents">Sabbat</text:p>
          </table:table-cell>
          <table:table-cell table:style-name="Table1.A1" office:value-type="string">
            <text:p text:style-name="Table_20_Contents">Tzimisce military commander</text:p>
          </table:table-cell>
        </table:table-row>
        <table:table-row>
          <table:table-cell table:style-name="Table1.A1" office:value-type="string">
            <text:p text:style-name="Table_20_Contents">17</text:p>
          </table:table-cell>
          <table:table-cell table:style-name="Table1.A1" office:value-type="string">
            <text:p text:style-name="Table_20_Contents">Superintendent Neil Hardacre</text:p>
          </table:table-cell>
          <table:table-cell table:style-name="Table1.A1" office:value-type="string">
            <text:p text:style-name="Table_20_Contents">Hunter</text:p>
          </table:table-cell>
          <table:table-cell table:style-name="Table1.A1" office:value-type="string">
            <text:p text:style-name="Table_20_Contents">AFP-Twilight Project lead</text:p>
          </table:table-cell>
        </table:table-row>
        <table:table-row>
          <table:table-cell table:style-name="Table1.A1" office:value-type="string">
            <text:p text:style-name="Table_20_Contents">18</text:p>
          </table:table-cell>
          <table:table-cell table:style-name="Table1.A1" office:value-type="string">
            <text:p text:style-name="Table_20_Contents">Red Mag — full antagonist treatment</text:p>
          </table:table-cell>
          <table:table-cell table:style-name="Table1.A1" office:value-type="string">
            <text:p text:style-name="Table_20_Contents">Original-six</text:p>
          </table:table-cell>
          <table:table-cell table:style-name="Table1.A1" office:value-type="string">
            <text:p text:style-name="Table_20_Contents">Anarch ideological pressure</text:p>
          </table:table-cell>
        </table:table-row>
        <table:table-row>
          <table:table-cell table:style-name="Table1.A1" office:value-type="string">
            <text:p text:style-name="Table_20_Contents">19</text:p>
          </table:table-cell>
          <table:table-cell table:style-name="Table1.A1" office:value-type="string">
            <text:p text:style-name="Table_20_Contents">Wid</text:p>
          </table:table-cell>
          <table:table-cell table:style-name="Table1.A1" office:value-type="string">
            <text:p text:style-name="Table_20_Contents">Original-six</text:p>
          </table:table-cell>
          <table:table-cell table:style-name="Table1.A1" office:value-type="string">
            <text:p text:style-name="Table_20_Contents">Information broker, neutral pressure</text:p>
          </table:table-cell>
        </table:table-row>
        <table:table-row>
          <table:table-cell table:style-name="Table1.A1" office:value-type="string">
            <text:p text:style-name="Table_20_Contents">20</text:p>
          </table:table-cell>
          <table:table-cell table:style-name="Table1.A1" office:value-type="string">
            <text:p text:style-name="Table_20_Contents">Agaricus</text:p>
          </table:table-cell>
          <table:table-cell table:style-name="Table1.A1" office:value-type="string">
            <text:p text:style-name="Table_20_Contents">Original-six</text:p>
          </table:table-cell>
          <table:table-cell table:style-name="Table1.A1" office:value-type="string">
            <text:p text:style-name="Table_20_Contents">Malkavian wildcard</text:p>
          </table:table-cell>
        </table:table-row>
        <table:table-row>
          <table:table-cell table:style-name="Table1.A1" office:value-type="string">
            <text:p text:style-name="Table_20_Contents">21</text:p>
          </table:table-cell>
          <table:table-cell table:style-name="Table1.A1" office:value-type="string">
            <text:p text:style-name="Table_20_Contents">Lumley — full antagonist treatment</text:p>
          </table:table-cell>
          <table:table-cell table:style-name="Table1.A1" office:value-type="string">
            <text:p text:style-name="Table_20_Contents">Original-six</text:p>
          </table:table-cell>
          <table:table-cell table:style-name="Table1.A1" office:value-type="string">
            <text:p text:style-name="Table_20_Contents">Tremere institutional pressure (situational)</text:p>
          </table:table-cell>
        </table:table-row>
        <table:table-row>
          <table:table-cell table:style-name="Table1.A1" office:value-type="string">
            <text:p text:style-name="Table_20_Contents">22</text:p>
          </table:table-cell>
          <table:table-cell table:style-name="Table1.A1" office:value-type="string">
            <text:p text:style-name="Table_20_Contents">Lytton — full antagonist treatment</text:p>
          </table:table-cell>
          <table:table-cell table:style-name="Table1.A1" office:value-type="string">
            <text:p text:style-name="Table_20_Contents">Original-six</text:p>
          </table:table-cell>
          <table:table-cell table:style-name="Table1.A1" office:value-type="string">
            <text:p text:style-name="Table_20_Contents">Camarilla establishment (situational)</text:p>
          </table:table-cell>
        </table:table-row>
        <table:table-row>
          <table:table-cell table:style-name="Table1.A1" office:value-type="string">
            <text:p text:style-name="Table_20_Contents">23</text:p>
          </table:table-cell>
          <table:table-cell table:style-name="Table1.A1" office:value-type="string">
            <text:p text:style-name="Table_20_Contents">The Last Days of Brisbane</text:p>
          </table:table-cell>
          <table:table-cell table:style-name="Table1.A1" office:value-type="string">
            <text:p text:style-name="Table_20_Contents">Sabbat pack</text:p>
          </table:table-cell>
          <table:table-cell table:style-name="Table1.A1" office:value-type="string">
            <text:p text:style-name="Table_20_Contents">The Bishop's senior strike pack</text:p>
          </table:table-cell>
        </table:table-row>
      </table:table>
      <text:p text:style-name="Text_20_body"><text:span text:style-name="Strong_20_Emphasis"/></text:p>
      <text:p text:style-name="Text_20_body"><text:span text:style-name="Strong_20_Emphasis">Note on the original-six:</text:span> Lytton, Lumley, and Red Mag are <text:span text:style-name="Emphasis">protagonist-side NPCs</text:span> in their existing Melbourne scenarios (11, 12, 13) and their existing coterie builds (Toorak Circle, Footscray Crew). Their entries here treat them as <text:span text:style-name="Emphasis">potential antagonists</text:span> depending on chronicle alignment — a Camarilla {{user}} working with Lytton against the Anarchs experiences Red Mag as antagonist; an Anarch {{user}} resisting institutional Camarilla experiences Lytton as antagonist; a {{user}} crossing Tremere ritual concerns experiences Lumley as antagonist. The entries highlight the antagonist-shaped facets of these characters that the protagonist scenarios do not foreground.</text:p>
      <text:p text:style-name="P1"><text:span text:style-name="Source_20_Text">SARRASINE — THE CONTINENTAL METHUSELAH</text:span></text:p>
      <text:p text:style-name="Preformatted_20_Text">The Setite/Ministry methuselah whose 235-year masquerade as Toreador has shaped every modern Australian Kindred political decision. Already detailed extensively in Scenario 14; this entry consolidates and extends his antagonist-side material — operational pattern, agent network, current preparations, and chronicle-handling guidelines.</text:p>
      <text:p text:style-name="Preformatted_20_Text"/>
      <text:p text:style-name="P1"><text:span text:style-name="Source_20_Text">BISHOP CALLISTA VOX</text:span></text:p>
      <text:p text:style-name="Preformatted_20_Text">The Tzimisce who took Brisbane in 1976 and has held it for fifty years. The continent's Sabbat military mind. Older Sabbat than Bishop Kovacs of the Chicago kit; better-resourced; more institutionally entrenched.</text:p>
      <text:p text:style-name="Preformatted_20_Text"/>
      <text:p text:style-name="P1"><text:span text:style-name="Source_20_Text">SUPERINTENDENT NEIL HARDACRE</text:span></text:p>
      <text:p text:style-name="Preformatted_20_Text">The AFP-Twilight-Project lead in Australia. The Australian counterpart to Carruth — but with different architecture, different ethical frame, and different operational constraints. Five Eyes-aligned, ASIO-experienced, methodical.</text:p>
      <text:p text:style-name="Preformatted_20_Text"/>
      <text:p text:style-name="Preformatted_20_Text"/>
      <text:p text:style-name="P1"><text:soft-page-break/><text:span text:style-name="Source_20_Text">RED MAG — ANTAGONIST TREATMENT</text:span></text:p>
      <text:p text:style-name="Preformatted_20_Text">The full antagonist-side treatment of Red Mag — the facets that protagonist scenarios do not foreground. Bristol working-class Brujah ideology is appealing from inside; from outside, particularly from Camarilla institutional perspective, it is hostile pressure with 60 years of operational depth.</text:p>
      <text:p text:style-name="Preformatted_20_Text"/>
      <text:p text:style-name="P1"><text:span text:style-name="Source_20_Text">WID</text:span></text:p>
      <text:p text:style-name="Preformatted_20_Text">The Nosferatu of the original six. Operates SchreckNet's Australian node from beneath Flinders Street Station. Neutral information broker for over a century. Powerful enough to be antagonist when {{user}}'s operations cross his information-economy interests.</text:p>
      <text:p text:style-name="Preformatted_20_Text"/>
      <text:p text:style-name="P1"><text:span text:style-name="Source_20_Text">AGARICUS</text:span></text:p>
      <text:p text:style-name="Preformatted_20_Text">The Malkavian botanist of the original six. Lives in Carlton near the University of Melbourne. Holds a perpetual visiting research position under serial mortal identities. The Madness Network's Australian node. Considered eccentric even by Malkavian standards. Functions as antagonist when his Madness Network insights conflict with chronicle-active operational considerations.</text:p>
      <text:p text:style-name="Preformatted_20_Text"/>
      <text:p text:style-name="P1"><text:span text:style-name="Source_20_Text">LUMLEY — ANTAGONIST TREATMENT</text:span></text:p>
      <text:p text:style-name="Preformatted_20_Text">The full antagonist-side treatment of Lumley. Tremere institutional pressure, ritual specialist who has not shared full Sarrasine investigation findings with anyone, manages secrets across 239 years that even Lytton does not fully know.</text:p>
      <text:p text:style-name="Preformatted_20_Text"/>
      <text:p text:style-name="P1"><text:span text:style-name="Source_20_Text">LYTTON — ANTAGONIST TREATMENT</text:span></text:p>
      <text:p text:style-name="Preformatted_20_Text">The full antagonist-side treatment of Lytton. From outside Camarilla institutional alignment — particularly from Anarch movement perspective, from Hecata family perspective when family interests diverge, from Sarrasine's perspective on the long game — Lytton is Camarilla establishment with 137 years of Princely authority and the institutional pressure that comes with it.</text:p>
      <text:p text:style-name="Preformatted_20_Text"/>
      <text:p text:style-name="P1"><text:span text:style-name="Source_20_Text">THE LAST DAYS OF BRISBANE</text:span></text:p>
      <text:p text:style-name="Preformatted_20_Text">Bishop Callista Vox's senior strike pack — the Brisbane Sabbat's most experienced and most operationally significant pack. The continental Sabbat threat Australian chronicles encounter when Brisbane operations push south or when {{user}} characters cross into Sabbat territory.</text:p>
      <text:p text:style-name="Preformatted_20_Text"/>
      <text:h text:style-name="Heading_20_3" text:outline-level="3"><text:span text:style-name="Strong_20_Emphasis">Distribution by chronicle type</text:span></text:h>
      <table:table table:name="Table2" table:style-name="Table2">
        <table:table-column table:style-name="Table2.A"/>
        <table:table-column table:style-name="Table2.B"/>
        <table:table-header-rows>
          <table:table-row>
            <table:table-cell table:style-name="Table2.A1" office:value-type="string">
              <text:p text:style-name="Table_20_Heading">Chronicle Focus</text:p>
            </table:table-cell>
            <table:table-cell table:style-name="Table2.A1" office:value-type="string">
              <text:p text:style-name="Table_20_Heading">Recommended Antagonists</text:p>
            </table:table-cell>
          </table:table-row>
        </table:table-header-rows>
        <table:table-row>
          <table:table-cell table:style-name="Table2.A1" office:value-type="string">
            <text:p text:style-name="Table_20_Contents">Sarrasine investigation chronicle</text:p>
          </table:table-cell>
          <table:table-cell table:style-name="Table2.A1" office:value-type="string">
            <text:p text:style-name="Table_20_Contents">Sarrasine (central); Wid (information-economy obstacle); Lumley (withheld 90-year intelligence); Hardacre (parallel mortal investigation)</text:p>
          </table:table-cell>
        </table:table-row>
        <table:table-row>
          <table:table-cell table:style-name="Table2.A1" office:value-type="string">
            <text:p text:style-name="Table_20_Contents">Camarilla high-politics chronicle</text:p>
          </table:table-cell>
          <table:table-cell table:style-name="Table2.A1" office:value-type="string">
            <text:p text:style-name="Table_20_Contents">Lytton-as-establishment (when {{user}} is Anarch); Wid (information broker); Agaricus (unreliable narrator); Sarrasine (gravitational threat)</text:p>
          </table:table-cell>
        </table:table-row>
        <table:table-row>
          <table:table-cell table:style-name="Table2.A1" office:value-type="string">
            <text:p text:style-name="Table_20_Contents">Anarch movement chronicle</text:p>
          </table:table-cell>
          <table:table-cell table:style-name="Table2.A1" office:value-type="string">
            <text:p text:style-name="Table_20_Contents">Lytton-as-Camarilla-establishment; Wid (information costs); Sarrasine's agents (Phase Two destabilisation); Hardacre (procedural pressure)</text:p>
          </table:table-cell>
        </table:table-row>
        <table:table-row>
          <table:table-cell table:style-name="Table2.A1" office:value-type="string">
            <text:p text:style-name="Table_20_Contents">Hecata family chronicle</text:p>
          </table:table-cell>
          <table:table-cell table:style-name="Table2.A1" office:value-type="string">
            <text:p text:style-name="Table_20_Contents">Sarrasine (continental gravity); Brisbane Sabbat (Hecata-territory threat); Hardacre (Catholic-community surveillance); Lytton-as-Camarilla-institutional-pressure</text:p>
          </table:table-cell>
        </table:table-row>
        <table:table-row>
          <table:table-cell table:style-name="Table2.A1" office:value-type="string">
            <text:p text:style-name="Table_20_Contents">Brisbane operations chronicle</text:p>
          </table:table-cell>
          <table:table-cell table:style-name="Table2.A1" office:value-type="string">
            <text:p text:style-name="Table_20_Contents">Bishop Callista Vox (central); The Last Days of Brisbane (military pressure); Hardacre (parallel surveillance); other Brisbane Sabbat packs <text:soft-page-break/>(mid-tier)</text:p>
          </table:table-cell>
        </table:table-row>
        <table:table-row>
          <table:table-cell table:style-name="Table2.A1" office:value-type="string">
            <text:p text:style-name="Table_20_Contents">Cross-supernatural diplomatic chronicle</text:p>
          </table:table-cell>
          <table:table-cell table:style-name="Table2.A1" office:value-type="string">
            <text:p text:style-name="Table_20_Contents">Sarrasine (cultivated Tomás relationship); Brisbane Sabbat (Garou-hostile); Hardacre (Twilight Project unaware of Garou); Lytton-as-cultural-imposition</text:p>
          </table:table-cell>
        </table:table-row>
        <table:table-row>
          <table:table-cell table:style-name="Table2.A1" office:value-type="string">
            <text:p text:style-name="Table_20_Contents">Mortal-stakes / personal-horror chronicle</text:p>
          </table:table-cell>
          <table:table-cell table:style-name="Table2.A1" office:value-type="string">
            <text:p text:style-name="Table_20_Contents">Hardacre (procedural threat with East Timor channel); Hardacre's deputy Kara Ofosu (more aggressive replacement); Wid (information vulnerability); Agaricus (serial-identity vulnerability)</text:p>
          </table:table-cell>
        </table:table-row>
      </table:table>
      <text:h text:style-name="Heading_20_3" text:outline-level="3"><text:span text:style-name="Strong_20_Emphasis">Antagonist density per chronicle</text:span></text:h>
      <text:p text:style-name="Text_20_body">For a typical 10-15 session Australian V:tM chronicle:</text:p>
      <text:list text:style-name="L1">
        <text:list-item>
          <text:p text:style-name="P3"><text:span text:style-name="Strong_20_Emphasis">1 primary antagonist</text:span> — usually Sarrasine for chronicles engaging continental politics, Bishop Callista for chronicles engaging Brisbane operations, or Hardacre for procedural-mortal chronicles </text:p>
        </text:list-item>
        <text:list-item>
          <text:p text:style-name="P3"><text:span text:style-name="Strong_20_Emphasis">2-3 secondary pressures</text:span> — antagonist-treatment original-six providing factional pressure, Wid providing information-economy obstacle, Brisbane Sabbat providing military pressure </text:p>
        </text:list-item>
        <text:list-item>
          <text:p text:style-name="P3"><text:span text:style-name="Strong_20_Emphasis">1-2 background presences</text:span> — agents, surveillance, correspondence, ambient continental-political pressure </text:p>
        </text:list-item>
        <text:list-item>
          <text:p text:style-name="P2"><text:span text:style-name="Strong_20_Emphasis">0-1 cosmic-tier presence</text:span> — Sarrasine reserved for chronicle climactic engagement, Bishop Callista for Brisbane-operations climax </text:p>
        </text:list-item>
      </text:list>
      <text:p text:style-name="Text_20_body">Don't deploy all nine antagonists at once. Pick what fits the chronicle.</text:p>
      <text:h text:style-name="Heading_20_3" text:outline-level="3"><text:span text:style-name="Strong_20_Emphasis">Power calibration summary</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ntagonist</text:p>
            </table:table-cell>
            <table:table-cell table:style-name="Table3.A1" office:value-type="string">
              <text:p text:style-name="Table_20_Heading">Power Tier</text:p>
            </table:table-cell>
            <table:table-cell table:style-name="Table3.A1" office:value-type="string">
              <text:p text:style-name="Table_20_Heading">Combat Note</text:p>
            </table:table-cell>
          </table:table-row>
        </table:table-header-rows>
        <table:table-row>
          <table:table-cell table:style-name="Table3.A1" office:value-type="string">
            <text:p text:style-name="Table_20_Contents">Sarrasine</text:p>
          </table:table-cell>
          <table:table-cell table:style-name="Table3.A1" office:value-type="string">
            <text:p text:style-name="Table_20_Contents">Methuselah (5th gen)</text:p>
          </table:table-cell>
          <table:table-cell table:style-name="Table3.A1" office:value-type="string">
            <text:p text:style-name="Table_20_Contents">Combat is automatic Final Death; engage through other paths</text:p>
          </table:table-cell>
        </table:table-row>
        <table:table-row>
          <table:table-cell table:style-name="Table3.A1" office:value-type="string">
            <text:p text:style-name="Table_20_Contents">Bishop Callista Vox</text:p>
          </table:table-cell>
          <table:table-cell table:style-name="Table3.A1" office:value-type="string">
            <text:p text:style-name="Table_20_Contents">Methuselah-track (8th gen)</text:p>
          </table:table-cell>
          <table:table-cell table:style-name="Table3.A1" office:value-type="string">
            <text:p text:style-name="Table_20_Contents">Combat is severe-tier; ~70% Final Death risk</text:p>
          </table:table-cell>
        </table:table-row>
        <table:table-row>
          <table:table-cell table:style-name="Table3.A1" office:value-type="string">
            <text:p text:style-name="Table_20_Contents">The Last Days of Brisbane</text:p>
          </table:table-cell>
          <table:table-cell table:style-name="Table3.A1" office:value-type="string">
            <text:p text:style-name="Table_20_Contents">Mid-tier military pack</text:p>
          </table:table-cell>
          <table:table-cell table:style-name="Table3.A1" office:value-type="string">
            <text:p text:style-name="Table_20_Contents">Combat is dangerous but survivable with preparation</text:p>
          </table:table-cell>
        </table:table-row>
        <table:table-row>
          <table:table-cell table:style-name="Table3.A1" office:value-type="string">
            <text:p text:style-name="Table_20_Contents">Original-six survivors (each)</text:p>
          </table:table-cell>
          <table:table-cell table:style-name="Table3.A1" office:value-type="string">
            <text:p text:style-name="Table_20_Contents">Senior elder (8th gen)</text:p>
          </table:table-cell>
          <table:table-cell table:style-name="Table3.A1" office:value-type="string">
            <text:p text:style-name="Table_20_Contents">Combat is severe-tier individually; political engagement preferred</text:p>
          </table:table-cell>
        </table:table-row>
        <table:table-row>
          <table:table-cell table:style-name="Table3.A1" office:value-type="string">
            <text:p text:style-name="Table_20_Contents">Wid</text:p>
          </table:table-cell>
          <table:table-cell table:style-name="Table3.A1" office:value-type="string">
            <text:p text:style-name="Table_20_Contents">Senior Nosferatu (8th gen)</text:p>
          </table:table-cell>
          <table:table-cell table:style-name="Table3.A1" office:value-type="string">
            <text:p text:style-name="Table_20_Contents">Combat is unlikely; engagement is through information economy</text:p>
          </table:table-cell>
        </table:table-row>
        <table:table-row>
          <table:table-cell table:style-name="Table3.A1" office:value-type="string">
            <text:p text:style-name="Table_20_Contents">Hardacre</text:p>
          </table:table-cell>
          <table:table-cell table:style-name="Table3.A1" office:value-type="string">
            <text:p text:style-name="Table_20_Contents">Mortal augmented</text:p>
          </table:table-cell>
          <table:table-cell table:style-name="Table3.A1" office:value-type="string">
            <text:p text:style-name="Table_20_Contents">Combat is moderate; political engagement through AFP procedural framework</text:p>
          </table:table-cell>
        </table:table-row>
      </table:table>
      <text:h text:style-name="Heading_20_3" text:outline-level="3"><text:span text:style-name="Strong_20_Emphasis">Cross-references with existing kit</text:span></text:h>
      <text:p text:style-name="Text_20_body">The Australian antagonist pack connects to existing kit material:</text:p>
      <text:list text:style-name="L2">
        <text:list-item>
          <text:p text:style-name="P5"><text:span text:style-name="Strong_20_Emphasis">Sarrasine</text:span> ↔ Scenario 14 (the Sydney audience), Toorak Circle's central pressure, every Australian chronicle's gravitational mass </text:p>
        </text:list-item>
        <text:list-item>
          <text:p text:style-name="P5"><text:span text:style-name="Strong_20_Emphasis">Bishop Callista Vox</text:span> ↔ Royal Park Sept's primary enemy, Brisbane supplement (if developed), Marcus Cobalt 2017 incident foundation </text:p>
        </text:list-item>
        <text:list-item>
          <text:p text:style-name="P5"><text:span text:style-name="Strong_20_Emphasis">Hardacre</text:span> ↔ Carruth's parallel in Chicago kit (Five Eyes-aligned operations), Toorak Circle's mortal-threat pressure, AFP-TP institutional context </text:p>
        </text:list-item>
        <text:list-item>
          <text:p text:style-name="P5"><text:soft-page-break/><text:span text:style-name="Strong_20_Emphasis">Red Mag (antagonist treatment)</text:span> ↔ Scenario 13, Footscray Crew, the contingency-card network as Camarilla-perspective threat </text:p>
        </text:list-item>
        <text:list-item>
          <text:p text:style-name="P5"><text:span text:style-name="Strong_20_Emphasis">Wid</text:span> ↔ Toorak Circle (Camarilla Primogen), Footscray Crew (Anarch-side intelligence customer), all chronicle information operations </text:p>
        </text:list-item>
        <text:list-item>
          <text:p text:style-name="P5"><text:span text:style-name="Strong_20_Emphasis">Agaricus</text:span> ↔ Toorak Circle (irregular Primogen), original-six-cohort relationships, Madness Network plot opportunities </text:p>
        </text:list-item>
        <text:list-item>
          <text:p text:style-name="P5"><text:span text:style-name="Strong_20_Emphasis">Lumley (antagonist treatment)</text:span> ↔ Scenario 12, Drummond Chantry, the 90-year Sarrasine investigation lever </text:p>
        </text:list-item>
        <text:list-item>
          <text:p text:style-name="P5"><text:span text:style-name="Strong_20_Emphasis">Lytton (antagonist treatment)</text:span> ↔ Scenario 11, Toorak Circle, the Beckoning succession question </text:p>
        </text:list-item>
        <text:list-item>
          <text:p text:style-name="P4"><text:span text:style-name="Strong_20_Emphasis">The Last Days of Brisbane</text:span> ↔ Brisbane supplement (if developed), Bishop Callista's strike force, Royal Park Sept's central threat </text:p>
        </text:list-item>
      </text:list>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18:33:26.807238896</dc:date>
    <meta:editing-duration>PT4M39S</meta:editing-duration>
    <meta:editing-cycles>1</meta:editing-cycles>
    <meta:document-statistic meta:table-count="3" meta:image-count="0" meta:object-count="0" meta:page-count="4" meta:paragraph-count="118" meta:word-count="1098" meta:character-count="8869" meta:non-whitespace-character-count="7870"/>
    <meta:generator>LibreOffice/24.2.7.2$Linux_X86_64 LibreOffice_project/420$Build-2</meta:generator>
  </office:meta>
</office:document-meta>
</file>