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25cm"/>
    </style:style>
    <style:style style:name="Table1.B" style:family="table-column">
      <style:table-column-properties style:column-width="4.957cm"/>
    </style:style>
    <style:style style:name="Table1.C" style:family="table-column">
      <style:table-column-properties style:column-width="6.165cm"/>
    </style:style>
    <style:style style:name="Table1.D" style:family="table-column">
      <style:table-column-properties style:column-width="5.45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643cm"/>
    </style:style>
    <style:style style:name="Table2.B" style:family="table-column">
      <style:table-column-properties style:column-width="12.35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217cm"/>
    </style:style>
    <style:style style:name="Table3.B" style:family="table-column">
      <style:table-column-properties style:column-width="4.247cm"/>
    </style:style>
    <style:style style:name="Table3.C" style:family="table-column">
      <style:table-column-properties style:column-width="2.88cm"/>
    </style:style>
    <style:style style:name="Table3.D" style:family="table-column">
      <style:table-column-properties style:column-width="2.171cm"/>
    </style:style>
    <style:style style:name="Table3.E" style:family="table-column">
      <style:table-column-properties style:column-width="5.48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5.121cm"/>
    </style:style>
    <style:style style:name="Table4.B" style:family="table-column">
      <style:table-column-properties style:column-width="11.8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443cm"/>
    </style:style>
    <style:style style:name="Table5.B" style:family="table-column">
      <style:table-column-properties style:column-width="11.55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316cm"/>
    </style:style>
    <style:style style:name="Table6.B" style:family="table-column">
      <style:table-column-properties style:column-width="3.842cm"/>
    </style:style>
    <style:style style:name="Table6.C" style:family="table-column">
      <style:table-column-properties style:column-width="3.642cm"/>
    </style:style>
    <style:style style:name="Table6.D" style:family="table-column">
      <style:table-column-properties style:column-width="1.94cm"/>
    </style:style>
    <style:style style:name="Table6.E" style:family="table-column">
      <style:table-column-properties style:column-width="5.2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891cm"/>
    </style:style>
    <style:style style:name="Table7.B" style:family="table-column">
      <style:table-column-properties style:column-width="12.109cm"/>
    </style:style>
    <style:style style:name="Table7.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02a36" officeooo:paragraph-rsid="00102a36"/>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text-properties officeooo:rsid="00102a36" officeooo:paragraph-rsid="00102a36"/>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ve Adelaide chronicle scenarios paralleling the Melbourne, Sydney, and Brisbane scenario sets, plus a four-coterie pack covering Octavia Marsh's smaller-domain institutional infrastructure: Octavia's Inner Circle as senior coterie, the Priestly Chantry as Tremere coterie-equivalent, the three Adelaide Anarch-tolerated operatives as informal coterie, and the Adelaide Hills Sept under Septleader Hartley as Glass Walker coterie-equivalent.</text:p>
      <text:p text:style-name="Text_20_body"><text:span text:style-name="Strong_20_Emphasis">Editorial note up front:</text:span> Adelaide's Edwardian-influenced orthodoxy register produces its own characteristic prose patterns — formal title-address among senior operatives, deliberate institutional restraint, smaller-domain intimacy at scale that Sydney and Melbourne do not match. </text:p>
      <text:p text:style-name="Horizontal_20_Line"/>
      <text:h text:style-name="Heading_20_1" text:outline-level="1"><text:span text:style-name="Strong_20_Emphasis">Part 1: Five Adelaide Chronicle Scenario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Engagement</text:p>
            </table:table-cell>
            <table:table-cell table:style-name="Table1.A1" office:value-type="string">
              <text:p text:style-name="Table_20_Heading">Position in Octavia's Adelaid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The Strategic Depth Operative</text:span></text:p>
          </table:table-cell>
          <table:table-cell table:style-name="Table1.A1" office:value-type="string">
            <text:p text:style-name="Table_20_Contents">Junior operative cultivated for continental Camarilla preservation</text:p>
          </table:table-cell>
          <table:table-cell table:style-name="Table1.A1" office:value-type="string">
            <text:p text:style-name="Table_20_Contents">Senior strategic-depth cultivation track</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The Tremere Coordination Crisis</text:span></text:p>
          </table:table-cell>
          <table:table-cell table:style-name="Table1.A1" office:value-type="string">
            <text:p text:style-name="Table_20_Contents">Junior Tremere navigating Priestly chantry institutional positioning</text:p>
          </table:table-cell>
          <table:table-cell table:style-name="Table1.A1" office:value-type="string">
            <text:p text:style-name="Table_20_Contents">Adelaide Tremere institutional infrastructure</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The Octavia Beckoning Crisis Operative</text:span></text:p>
          </table:table-cell>
          <table:table-cell table:style-name="Table1.A1" office:value-type="string">
            <text:p text:style-name="Table_20_Contents">Senior operative engaged with Octavia's trajectory</text:p>
          </table:table-cell>
          <table:table-cell table:style-name="Table1.A1" office:value-type="string">
            <text:p text:style-name="Table_20_Contents">Direct Octavia institutional cultivation</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Strong_20_Emphasis">The Cress Truce Liaison</text:span></text:p>
          </table:table-cell>
          <table:table-cell table:style-name="Table1.A1" office:value-type="string">
            <text:p text:style-name="Table_20_Contents">Cross-supernatural diplomatic operative with Septleader Hartley</text:p>
          </table:table-cell>
          <table:table-cell table:style-name="Table1.A1" office:value-type="string">
            <text:p text:style-name="Table_20_Contents">Adelaide cross-supernatural institutional infrastructure</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Strong_20_Emphasis">The Adelaide Anarch-Tolerated Operative</text:span></text:p>
          </table:table-cell>
          <table:table-cell table:style-name="Table1.A1" office:value-type="string">
            <text:p text:style-name="Table_20_Contents">One of the three Anarch operatives Octavia permits</text:p>
          </table:table-cell>
          <table:table-cell table:style-name="Table1.A1" office:value-type="string">
            <text:p text:style-name="Table_20_Contents">Outside formal Adelaide institutions</text:p>
          </table:table-cell>
        </table:table-row>
      </table:table>
      <text:p text:style-name="Preformatted_20_Text"/>
      <text:p text:style-name="P1"><text:span text:style-name="Source_20_Text">HARRIET WHITWORTH-SCRIBE</text:span></text:p>
      <text:p text:style-name="P1"><text:span text:style-name="Source_20_Text">AUGUSTIN BEVERIDGE-SCHMIDT</text:span></text:p>
      <text:p text:style-name="P1"><text:span text:style-name="Source_20_Text">ALISTAIR THORN-PEMBROKE</text:span></text:p>
      <text:p text:style-name="P1"><text:span text:style-name="Source_20_Text">BROTHER QUENTIN MACAULAY-OSEI</text:span></text:p>
      <text:p text:style-name="P1"><text:span text:style-name="Source_20_Text">SAOIRSE BLACKWOOD-CHEN</text:span></text:p>
      <text:h text:style-name="Heading_20_1" text:outline-level="1"><text:span text:style-name="Strong_20_Emphasis"/></text:h>
      <text:h text:style-name="Heading_20_1" text:outline-level="1"><text:span text:style-name="Strong_20_Emphasis">The Adelaide Coterie Pack</text:span></text:h>
      <text:p text:style-name="Text_20_body">Four coteries covering Octavia's smaller-domain institutional infrastructure. Each coterie operates at scale appropriate to Adelaide smaller-domain context distinct from Sydney's continental Vaucluse Five scale or Brisbane's chronicle-active institutional infrastructure scale.</text:p>
      <text:p text:style-name="P2">Octavia’s Inner Circle</text:p>
      <text:p text:style-name="P2"/>
      <text:p text:style-name="P17"><text:span text:style-name="Strong_20_Emphasis">Coterie type:</text:span> Senior Camarilla institutional executive (Octavia's smaller-domain institutional executive infrastructure)<text:line-break/><text:soft-page-break/><text:span text:style-name="Strong_20_Emphasis">Established:</text:span> 1923 alongside Octavia's Princely elevation<text:line-break/><text:span text:style-name="Strong_20_Emphasis">tenure:</text:span> 102 years<text:line-break/><text:span text:style-name="Strong_20_Emphasis">Composition:</text:span> Octavia plus four senior Kindred operating as smaller-domain institutional executive infrastructure</text:p>
      <text:p text:style-name="Text_20_body">The Inner Circle operates as Octavia's senior institutional executive structure at smaller-domain scale that distinguishes Adelaide register from Sydney's Vaucluse Five (five core members under Sarrasine, plus Sarrasine himself) or Melbourne's Toorak Circle (eight members across diverse clan-specialty positions under Lytton's leadership). The Inner Circle has remained four-member-plus-Octavia since 1923 establishment — the smaller continental scale produces intimate institutional cooperation infrastructure at scale that Sydney and Melbourne do not match.</text:p>
      <text:h text:style-name="Heading_20_3" text:outline-level="3"><text:span text:style-name="Strong_20_Emphasis">Octavia Marsh</text:span> (Princely figure)</text:h>
      <text:list text:style-name="L1">
        <text:list-item>
          <text:p text:style-name="P4"><text:span text:style-name="Strong_20_Emphasis">Clan / generation / tenure:</text:span> Ventrue, 7th gen, ~132 years Embraced (Embraced ~1893 in colonial-period Adelaide) </text:p>
        </text:list-item>
        <text:list-item>
          <text:p text:style-name="P4"><text:span text:style-name="Strong_20_Emphasis">Princely tenure:</text:span> 102 years (since 1923 institutional elevation) </text:p>
        </text:list-item>
        <text:list-item>
          <text:p text:style-name="P4"><text:span text:style-name="Strong_20_Emphasis">Operational specialty:</text:span> Continental Adelaide Camarilla institutional executive authority; strategic-depth institutional preservation cultivation; Lytton-Octavia personal friendship at continental scale </text:p>
        </text:list-item>
        <text:list-item>
          <text:p text:style-name="P4"><text:span text:style-name="Strong_20_Emphasis">Disciplines:</text:span> Auspex 5, Dominate 6, Fortitude 5, Presence 4 (near-methuselah-track Ventrue loadout) </text:p>
        </text:list-item>
        <text:list-item>
          <text:p text:style-name="P3"><text:span text:style-name="Strong_20_Emphasis">Apparent age:</text:span> 33, she/her pronouns; Edwardian-influenced traditional aesthetic preservation across 102-year Princely tenure </text:p>
        </text:list-item>
      </text:list>
      <text:h text:style-name="Heading_20_3" text:outline-level="3"><text:span text:style-name="Strong_20_Emphasis">Member 1: Madeleine Ashworth-Quill</text:span></text:h>
      <text:list text:style-name="L2">
        <text:list-item>
          <text:p text:style-name="P6"><text:span text:style-name="Strong_20_Emphasis">Clan / generation / tenure:</text:span> Toreador, 8th gen, 91 years Embraced </text:p>
        </text:list-item>
        <text:list-item>
          <text:p text:style-name="P6"><text:span text:style-name="Strong_20_Emphasis">Embraced:</text:span> 1934 in pre-WWII London by an English Toreador operative during inter-war period continental cultivation </text:p>
        </text:list-item>
        <text:list-item>
          <text:p text:style-name="P6"><text:span text:style-name="Strong_20_Emphasis">Adelaide arrival:</text:span> 1949 fleeing post-WWII continental European institutional restructuring under Octavia's institutional cooperation </text:p>
        </text:list-item>
        <text:list-item>
          <text:p text:style-name="P6"><text:span text:style-name="Strong_20_Emphasis">Institutional position:</text:span> Senior Inner Circle member responsible for Adelaide Festival programming cultivation and Adelaide cultural-cultivation infrastructure including Adelaide Symphony Orchestra institutional cooperation, Festival Theatre institutional cooperation, and continental Australian classical-music continental cultural-cultivation operations </text:p>
        </text:list-item>
        <text:list-item>
          <text:p text:style-name="P6"><text:span text:style-name="Strong_20_Emphasis">Apparent age:</text:span> 38, she/her pronouns. Tall (175cm), greying dark brown hair worn in deliberate Edwardian-influenced traditional styling, sharp grey-blue eyes with Auspex precision developed at senior scale. Dresses in elegant Adelaide cultural-cultivation appropriate formal attire with subtle continental European cultural inflections </text:p>
        </text:list-item>
        <text:list-item>
          <text:p text:style-name="P6"><text:span text:style-name="Strong_20_Emphasis">Disciplines:</text:span> Auspex 4, Celerity 3, Dominate 3, Presence 6 (Toreador specialty at near-methuselah-track scale) </text:p>
        </text:list-item>
        <text:list-item>
          <text:p text:style-name="P6"><text:span text:style-name="Strong_20_Emphasis">Operational specialty:</text:span> Adelaide cultural-cultivation infrastructure at maximum smaller-domain continental scale </text:p>
        </text:list-item>
        <text:list-item>
          <text:p text:style-name="P5"><text:span text:style-name="Strong_20_Emphasis">Internal positioning:</text:span> Sponsoring sire to Alistair Thorn-Pembroke (Scenario 3); close institutional cooperation with Octavia at scale that 91-year tenure produces </text:p>
        </text:list-item>
      </text:list>
      <text:h text:style-name="Heading_20_3" text:outline-level="3"><text:soft-page-break/><text:span text:style-name="Strong_20_Emphasis">Member 2: Doctor Alasdair Priestly-Mendoza</text:span></text:h>
      <text:list text:style-name="L3">
        <text:list-item>
          <text:p text:style-name="P8"><text:span text:style-name="Strong_20_Emphasis">Clan / generation / tenure:</text:span> Tremere, generation uncertain (pre-1962 institutional history undisclosed) </text:p>
        </text:list-item>
        <text:list-item>
          <text:p text:style-name="P8"><text:span text:style-name="Strong_20_Emphasis">Adelaide arrival / chantry tenure:</text:span> 1962 chantry establishment, 63-year Adelaide chantry leadership </text:p>
        </text:list-item>
        <text:list-item>
          <text:p text:style-name="P8"><text:span text:style-name="Strong_20_Emphasis">Institutional position:</text:span> Senior Inner Circle member responsible for Adelaide Tremere chantry institutional positioning plus continental cross-sect intelligence-cooperation infrastructure (Doctor Priestly's Inner Circle position is unique — Tremere chantry leaders ordinarily operate at institutional positioning below Princely Inner Circle scale, but Octavia's accommodation arrangement with Adelaide Tremere chantry has produced Inner Circle membership across 63-year chantry tenure) </text:p>
        </text:list-item>
        <text:list-item>
          <text:p text:style-name="P8"><text:span text:style-name="Strong_20_Emphasis">Apparent age:</text:span> Mid-30s, he/him pronouns. Medium-tall (175cm), greying auburn hair, sharp grey-green eyes </text:p>
        </text:list-item>
        <text:list-item>
          <text:p text:style-name="P8"><text:span text:style-name="Strong_20_Emphasis">Disciplines:</text:span> Auspex 5, Blood Sorcery 6 (advanced Tremere ritual practice), Dominate 4, Fortitude 3 </text:p>
        </text:list-item>
        <text:list-item>
          <text:p text:style-name="P8"><text:span text:style-name="Strong_20_Emphasis">Operational specialty:</text:span> Adelaide Tremere chantry institutional administration plus continental cross-sect institutional cooperation </text:p>
        </text:list-item>
        <text:list-item>
          <text:p text:style-name="P7"><text:span text:style-name="Strong_20_Emphasis">Internal positioning:</text:span> Provides Inner Circle Tremere institutional positioning at scale that Sydney's Doctor Baudin and Melbourne's Tremere institutional positioning do not match (Sydney and Melbourne Tremere chantry leaders operate outside Princely Inner Circle institutional positioning; Doctor Priestly's Adelaide Inner Circle membership produces chronicle-significant institutional positioning at chronicle-active scale) </text:p>
        </text:list-item>
      </text:list>
      <text:h text:style-name="Heading_20_3" text:outline-level="3"><text:span text:style-name="Strong_20_Emphasis">Member 3: Brother Owen O'Connor</text:span></text:h>
      <text:list text:style-name="L4">
        <text:list-item>
          <text:p text:style-name="P10"><text:span text:style-name="Strong_20_Emphasis">Clan / generation / tenure:</text:span> Ventrue, 9th gen, 73 years Embraced </text:p>
        </text:list-item>
        <text:list-item>
          <text:p text:style-name="P10"><text:span text:style-name="Strong_20_Emphasis">Embraced:</text:span> 1952 in post-WWII continental Dublin by an Irish Ventrue Camarilla operative </text:p>
        </text:list-item>
        <text:list-item>
          <text:p text:style-name="P10"><text:span text:style-name="Strong_20_Emphasis">Adelaide arrival:</text:span> 1968 fleeing Northern Ireland Troubles operational pressure under Octavia's institutional cooperation </text:p>
        </text:list-item>
        <text:list-item>
          <text:p text:style-name="P10"><text:span text:style-name="Strong_20_Emphasis">Institutional position:</text:span> Senior Inner Circle member responsible for Adelaide cross-supernatural diplomatic infrastructure including Adelaide Hills Glass Walker sept institutional cooperation through direct Septleader Hartley correspondence channel (operating at parallel continental Camarilla-Cress-Truce coordination scale to Brother Owen O'Connor's role — yes, same name as the Brother Owen O'Connor referenced in Continental Coordination Guide context, who operates as Adelaide-side Cress Truce coordination figure) </text:p>
        </text:list-item>
        <text:list-item>
          <text:p text:style-name="P10"><text:span text:style-name="Strong_20_Emphasis">Apparent age:</text:span> 31, he/him pronouns. Medium-tall (175cm), greying dark brown hair worn in deliberate Adelaide established-professional traditional styling, sharp grey-blue eyes with Auspex precision developed across 73-year tenure. Dresses in conservative Adelaide established-professional formal attire with subtle Irish-cultural inflections </text:p>
        </text:list-item>
        <text:list-item>
          <text:p text:style-name="P10"><text:span text:style-name="Strong_20_Emphasis">Disciplines:</text:span> Auspex 4, Dominate 5, Fortitude 4, Presence 3 </text:p>
        </text:list-item>
        <text:list-item>
          <text:p text:style-name="P10"><text:span text:style-name="Strong_20_Emphasis">Operational specialty:</text:span> Adelaide cross-supernatural diplomatic infrastructure at chronicle-active continental scale; Adelaide cross-supernatural framework institutional positioning under Quentin Macaulay-Osei senior liaison cooperation (Quentin Macaulay-Osei reports to Brother Owen O'Connor at Inner Circle institutional level) </text:p>
        </text:list-item>
        <text:list-item>
          <text:p text:style-name="P9"><text:span text:style-name="Strong_20_Emphasis">Internal positioning:</text:span> Provides Inner Circle cross-supernatural diplomatic institutional positioning at chronicle-active continental scale; direct institutional cooperation with <text:soft-page-break/>Septleader Hartley through 57-year Adelaide cross-supernatural framework operational tenure </text:p>
        </text:list-item>
      </text:list>
      <text:h text:style-name="Heading_20_3" text:outline-level="3"><text:span text:style-name="Strong_20_Emphasis">Member 4: Lady Eveline Hartley-Carstairs</text:span></text:h>
      <text:list text:style-name="L5">
        <text:list-item>
          <text:p text:style-name="P12"><text:span text:style-name="Strong_20_Emphasis">Clan / generation / tenure:</text:span> Toreador, 8th gen, 88 years Embraced </text:p>
        </text:list-item>
        <text:list-item>
          <text:p text:style-name="P12"><text:span text:style-name="Strong_20_Emphasis">Embraced:</text:span> 1937 in pre-WWII continental Edinburgh by a Scottish Toreador operative during inter-war period continental cultivation </text:p>
        </text:list-item>
        <text:list-item>
          <text:p text:style-name="P12"><text:span text:style-name="Strong_20_Emphasis">Adelaide arrival:</text:span> 1947 fleeing post-WWII continental Scottish institutional restructuring under Octavia's institutional cooperation </text:p>
        </text:list-item>
        <text:list-item>
          <text:p text:style-name="P12"><text:span text:style-name="Strong_20_Emphasis">Institutional position:</text:span> Senior Inner Circle member responsible for Adelaide established-cultural-aristocratic institutional infrastructure including North Adelaide established-cultural cooperation, Adelaide Club institutional cooperation, and continental Australian established-cultural-aristocratic continental cultural-cultivation operations </text:p>
        </text:list-item>
        <text:list-item>
          <text:p text:style-name="P12"><text:span text:style-name="Strong_20_Emphasis">Apparent age:</text:span> 35, she/her pronouns. Tall (177cm), straight grey-blonde hair worn in deliberate Edwardian-traditional styling she has maintained across post-Embrace tenure, sharp grey-green eyes with Auspex precision developed at senior scale. Dresses in elegant continental Scottish-influenced established-cultural-aristocratic continental formal attire with subtle Highland-cultural inflections </text:p>
        </text:list-item>
        <text:list-item>
          <text:p text:style-name="P12"><text:span text:style-name="Strong_20_Emphasis">Disciplines:</text:span> Auspex 4, Celerity 3, Dominate 4, Presence 5 (Toreador specialty at senior scale) </text:p>
        </text:list-item>
        <text:list-item>
          <text:p text:style-name="P12"><text:span text:style-name="Strong_20_Emphasis">Operational specialty:</text:span> Adelaide established-cultural-aristocratic infrastructure at continental smaller-domain scale </text:p>
        </text:list-item>
        <text:list-item>
          <text:p text:style-name="P11"><text:span text:style-name="Strong_20_Emphasis">Internal positioning:</text:span> distant cousin (pre-Embrace mortal-life genealogical relationship preserved across 88-year post-Embrace tenure through Hartley family infrastructure documentation) of Septleader Hartley — the family-cousinage relationship operates as chronicle-significant cross-supernatural cooperation infrastructure that Adelaide cross-supernatural framework operations have institutionally accommodated across decades </text:p>
        </text:list-item>
      </text:list>
      <text:h text:style-name="Heading_20_3" text:outline-level="3"><text:span text:style-name="Strong_20_Emphasis">Inner Circle internal dynamics:</text:span></text:h>
      <text:list text:style-name="L6">
        <text:list-item>
          <text:p text:style-name="P14"><text:span text:style-name="Strong_20_Emphasis">strategic-depth cultivation institutional foundation</text:span> — Inner Circle members provide institutional support for Octavia's strategic-depth cultivation track operations including Harriet Whitworth-Scribe cultivation </text:p>
        </text:list-item>
        <text:list-item>
          <text:p text:style-name="P14"><text:span text:style-name="Strong_20_Emphasis">chronicle-active Octavia Beckoning trajectory operational pressure</text:span> — Inner Circle members coordinate trajectory-management operations through Madeleine Ashworth-Quill (Alistair Thorn-Pembroke's sponsoring sire, who continues institutional support for Alistair's trajectory-management operational positioning) plus other Inner Circle institutional cooperation </text:p>
        </text:list-item>
        <text:list-item>
          <text:p text:style-name="P14"><text:span text:style-name="Strong_20_Emphasis">chronicle-active continental Article 8 operational pressure</text:span> — Inner Circle members coordinate continental cross-supernatural operations through Brother Owen O'Connor (senior Cress Truce framework figure) plus Lady Eveline Hartley-Carstairs (Septleader Hartley family-cousinage cooperation infrastructure) </text:p>
        </text:list-item>
        <text:list-item>
          <text:p text:style-name="P13"><text:span text:style-name="Strong_20_Emphasis">102-year intimate institutional cooperation</text:span> — Inner Circle members operate at intimate institutional cooperation scale that Sydney's Vaucluse Five and Melbourne's Toorak Circle do not match through scale variations </text:p>
        </text:list-item>
      </text:list>
      <text:h text:style-name="Heading_20_3" text:outline-level="3"><text:soft-page-break/><text:span text:style-name="Strong_20_Emphasis">Inner Circle operations:</text:span></text:h>
      <text:list text:style-name="L7">
        <text:list-item>
          <text:p text:style-name="P16"><text:span text:style-name="Strong_20_Emphasis">monthly formal Inner Circle meetings</text:span> at Octavia's North Adelaide residence with all four members plus Octavia personal participation. meetings operate at maximum Adelaide institutional formality scale across approximately 4-6 hours per meeting </text:p>
        </text:list-item>
        <text:list-item>
          <text:p text:style-name="P16"><text:span text:style-name="Strong_20_Emphasis">weekly bilateral coordination</text:span> between specific member pairs based on operational specialty intersections </text:p>
        </text:list-item>
        <text:list-item>
          <text:p text:style-name="P16"><text:span text:style-name="Strong_20_Emphasis">direct Lytton-Octavia continental correspondence support</text:span> — Inner Circle members provide institutional support for Octavia's weekly Lytton correspondence at 136-year continental friendship continental scale </text:p>
        </text:list-item>
        <text:list-item>
          <text:p text:style-name="P15"><text:span text:style-name="Strong_20_Emphasis">chronicle-active continental operations coordination</text:span> at chronicle-active scale across all four members during 2025-2026 chronicle-active period </text:p>
        </text:list-item>
      </text:list>
      <text:h text:style-name="Heading_20_3" text:outline-level="3"><text:span text:style-name="Strong_20_Emphasis">Chronicle hook integration:</text:span></text:h>
      <table:table table:name="Table2" table:style-name="Table2">
        <table:table-column table:style-name="Table2.A"/>
        <table:table-column table:style-name="Table2.B"/>
        <table:table-header-rows>
          <table:table-row>
            <table:table-cell table:style-name="Table2.A1" office:value-type="string">
              <text:p text:style-name="Table_20_Heading">Chronicle scope</text:p>
            </table:table-cell>
            <table:table-cell table:style-name="Table2.A1" office:value-type="string">
              <text:p text:style-name="Table_20_Heading">Inner Circle engagement</text:p>
            </table:table-cell>
          </table:table-row>
        </table:table-header-rows>
        <table:table-row>
          <table:table-cell table:style-name="Table2.A1" office:value-type="string">
            <text:p text:style-name="Table_20_Contents"><text:span text:style-name="Strong_20_Emphasis">Single-member cultivation chronicle</text:span></text:p>
          </table:table-cell>
          <table:table-cell table:style-name="Table2.A1" office:value-type="string">
            <text:p text:style-name="Table_20_Contents">{{user}} cultivation under specific Inner Circle member at apprentice scale</text:p>
          </table:table-cell>
        </table:table-row>
        <table:table-row>
          <table:table-cell table:style-name="Table2.A1" office:value-type="string">
            <text:p text:style-name="Table_20_Contents"><text:span text:style-name="Strong_20_Emphasis">Strategic-depth chronicle</text:span></text:p>
          </table:table-cell>
          <table:table-cell table:style-name="Table2.A1" office:value-type="string">
            <text:p text:style-name="Table_20_Contents">Harriet Whitworth-Scribe positioning during chronicle-defining strategic-depth activation (Scenario 1 template)</text:p>
          </table:table-cell>
        </table:table-row>
        <table:table-row>
          <table:table-cell table:style-name="Table2.A1" office:value-type="string">
            <text:p text:style-name="Table_20_Contents"><text:span text:style-name="Strong_20_Emphasis">Octavia trajectory chronicle</text:span></text:p>
          </table:table-cell>
          <table:table-cell table:style-name="Table2.A1" office:value-type="string">
            <text:p text:style-name="Table_20_Contents">Alistair Thorn-Pembroke positioning during chronicle-defining trajectory crisis (Scenario 3 template)</text:p>
          </table:table-cell>
        </table:table-row>
        <table:table-row>
          <table:table-cell table:style-name="Table2.A1" office:value-type="string">
            <text:p text:style-name="Table_20_Contents"><text:span text:style-name="Strong_20_Emphasis">continental Article 8 chronicle</text:span></text:p>
          </table:table-cell>
          <table:table-cell table:style-name="Table2.A1" office:value-type="string">
            <text:p text:style-name="Table_20_Contents">Brother Owen O'Connor and Lady Eveline Hartley-Carstairs institutional cooperation during continental cross-supernatural operations</text:p>
          </table:table-cell>
        </table:table-row>
        <table:table-row>
          <table:table-cell table:style-name="Table2.A1" office:value-type="string">
            <text:p text:style-name="Table_20_Contents"><text:span text:style-name="Strong_20_Emphasis">Octavia succession chronicle</text:span></text:p>
          </table:table-cell>
          <table:table-cell table:style-name="Table2.A1" office:value-type="string">
            <text:p text:style-name="Table_20_Contents">Adelaide Princely succession question dynamics at chronicle-late-arc scale if Octavia trajectory produces succession opportunity</text:p>
          </table:table-cell>
        </table:table-row>
      </table:table>
      <text:p text:style-name="P2"/>
      <text:p text:style-name="P2"/>
      <text:p text:style-name="P2">The Priestly Chantry</text:p>
      <text:p text:style-name="P2"/>
      <text:p text:style-name="P17"><text:span text:style-name="Strong_20_Emphasis">Coterie type:</text:span> Tremere chantry operating under Octavia accommodation arrangement at smaller-domain scale<text:line-break/><text:span text:style-name="Strong_20_Emphasis">Established:</text:span> 1947 in Adelaide<text:line-break/><text:span text:style-name="Strong_20_Emphasis">tenure:</text:span> 78 years<text:line-break/><text:span text:style-name="Strong_20_Emphasis">Composition:</text:span> Four Tremere operatives operating Adelaide chantry institutional infrastructure under Doctor Priestly chantry leadership</text:p>
      <text:p text:style-name="Text_20_body">The Priestly Chantry operates as continental smallest Tremere chantry in continental Australia at four-member operational scale that Sydney's seven-member Newtown chantry exceeds at operational scope. chantry operates under specific minimum-institutional accommodation arrangement with Octavia — the chantry has Adelaide operational positioning under Octavia's tolerance with operational constraints that have continued since 1947 chantry establishment.</text:p>
      <text:h text:style-name="Heading_20_3" text:outline-level="3"><text:span text:style-name="Strong_20_Emphasis">Chantry membership at-a-glance:</text:span></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Position</text:p>
            </table:table-cell>
            <table:table-cell table:style-name="Table3.A1" office:value-type="string">
              <text:p text:style-name="Table_20_Heading">Holder</text:p>
            </table:table-cell>
            <table:table-cell table:style-name="Table3.A1" office:value-type="string">
              <text:p text:style-name="Table_20_Heading">Clan / Generation</text:p>
            </table:table-cell>
            <table:table-cell table:style-name="Table3.A1" office:value-type="string">
              <text:p text:style-name="Table_20_Heading">Tenure</text:p>
            </table:table-cell>
            <table:table-cell table:style-name="Table3.A1" office:value-type="string">
              <text:p text:style-name="Table_20_Heading">Operational specialty</text:p>
            </table:table-cell>
          </table:table-row>
        </table:table-header-rows>
        <table:table-row>
          <table:table-cell table:style-name="Table3.A1" office:value-type="string">
            <text:p text:style-name="Table_20_Contents"><text:span text:style-name="Strong_20_Emphasis">Chantry Leader</text:span></text:p>
          </table:table-cell>
          <table:table-cell table:style-name="Table3.A1" office:value-type="string">
            <text:p text:style-name="Table_20_Contents">Doctor Priestly-Mendoza</text:p>
          </table:table-cell>
          <table:table-cell table:style-name="Table3.A1" office:value-type="string">
            <text:p text:style-name="Table_20_Contents">Tremere, generation <text:soft-page-break/>uncertain</text:p>
          </table:table-cell>
          <table:table-cell table:style-name="Table3.A1" office:value-type="string">
            <text:p text:style-name="Table_20_Contents">Pre-1962 (uncertain)</text:p>
          </table:table-cell>
          <table:table-cell table:style-name="Table3.A1" office:value-type="string">
            <text:p text:style-name="Table_20_Contents">chantry institutional administration; Inner Circle <text:soft-page-break/>institutional positioning</text:p>
          </table:table-cell>
        </table:table-row>
        <table:table-row>
          <table:table-cell table:style-name="Table3.A1" office:value-type="string">
            <text:p text:style-name="Table_20_Contents"><text:span text:style-name="Strong_20_Emphasis">Senior Operative</text:span></text:p>
          </table:table-cell>
          <table:table-cell table:style-name="Table3.A1" office:value-type="string">
            <text:p text:style-name="Table_20_Contents">Brother Eustace Whitlam-Anderson</text:p>
          </table:table-cell>
          <table:table-cell table:style-name="Table3.A1" office:value-type="string">
            <text:p text:style-name="Table_20_Contents">Tremere, 9th gen</text:p>
          </table:table-cell>
          <table:table-cell table:style-name="Table3.A1" office:value-type="string">
            <text:p text:style-name="Table_20_Contents">31 years</text:p>
          </table:table-cell>
          <table:table-cell table:style-name="Table3.A1" office:value-type="string">
            <text:p text:style-name="Table_20_Contents">Continental occult-studies academic cooperation</text:p>
          </table:table-cell>
        </table:table-row>
        <table:table-row>
          <table:table-cell table:style-name="Table3.A1" office:value-type="string">
            <text:p text:style-name="Table_20_Contents"><text:span text:style-name="Strong_20_Emphasis">Senior Operative</text:span></text:p>
          </table:table-cell>
          <table:table-cell table:style-name="Table3.A1" office:value-type="string">
            <text:p text:style-name="Table_20_Contents">Sister Catriona MacLeod-Tjapaltjarri</text:p>
          </table:table-cell>
          <table:table-cell table:style-name="Table3.A1" office:value-type="string">
            <text:p text:style-name="Table_20_Contents">Tremere, 10th gen</text:p>
          </table:table-cell>
          <table:table-cell table:style-name="Table3.A1" office:value-type="string">
            <text:p text:style-name="Table_20_Contents">22 years</text:p>
          </table:table-cell>
          <table:table-cell table:style-name="Table3.A1" office:value-type="string">
            <text:p text:style-name="Table_20_Contents">Continental Aboriginal-cultural cooperation infrastructure</text:p>
          </table:table-cell>
        </table:table-row>
        <table:table-row>
          <table:table-cell table:style-name="Table3.A1" office:value-type="string">
            <text:p text:style-name="Table_20_Contents"><text:span text:style-name="Strong_20_Emphasis">Junior Operative</text:span></text:p>
          </table:table-cell>
          <table:table-cell table:style-name="Table3.A1" office:value-type="string">
            <text:p text:style-name="Table_20_Contents">Augustin Beveridge-Schmidt</text:p>
          </table:table-cell>
          <table:table-cell table:style-name="Table3.A1" office:value-type="string">
            <text:p text:style-name="Table_20_Contents">Tremere, 11th gen</text:p>
          </table:table-cell>
          <table:table-cell table:style-name="Table3.A1" office:value-type="string">
            <text:p text:style-name="Table_20_Contents">14 years</text:p>
          </table:table-cell>
          <table:table-cell table:style-name="Table3.A1" office:value-type="string">
            <text:p text:style-name="Table_20_Contents">Adelaide colonial history academic cooperation (Scenario 2 character)</text:p>
          </table:table-cell>
        </table:table-row>
      </table:table>
      <text:h text:style-name="Heading_20_3" text:outline-level="3"><text:span text:style-name="Strong_20_Emphasis">Doctor Alasdair Priestly-Mendoza</text:span> (full character build)</text:h>
      <text:list text:style-name="L8">
        <text:list-item>
          <text:p text:style-name="P19"><text:span text:style-name="Strong_20_Emphasis">Background:</text:span> pre-1962 institutional history undisclosed (institutional mystery at scale similar to Doctor Baudin's Sydney chantry positioning); Adelaide chantry leadership since 1962 establishment producing 63-year tenure </text:p>
        </text:list-item>
        <text:list-item>
          <text:p text:style-name="P19"><text:span text:style-name="Strong_20_Emphasis">Apparent age:</text:span> Mid-30s, he/him pronouns. Medium-tall (175cm), greying auburn hair worn in deliberate Edwardian-traditional styling, sharp grey-green eyes with significant Auspex precision developed across uncertain tenure </text:p>
        </text:list-item>
        <text:list-item>
          <text:p text:style-name="P19"><text:span text:style-name="Strong_20_Emphasis">Disciplines:</text:span> Auspex 5, Blood Sorcery 6 (advanced Tremere ritual practice), Dominate 4, Fortitude 3, Presence 3 </text:p>
        </text:list-item>
        <text:list-item>
          <text:p text:style-name="P18"><text:span text:style-name="Strong_20_Emphasis">chronicle-significant institutional history:</text:span> Doctor Priestly's pre-1962 institutional positioning may emerge across chronicle arc as institutional positioning develops; chronicle-significant continental Tremere institutional implications </text:p>
        </text:list-item>
      </text:list>
      <text:h text:style-name="Heading_20_3" text:outline-level="3"><text:span text:style-name="Strong_20_Emphasis">Chantry operational character:</text:span></text:h>
      <text:list text:style-name="L9">
        <text:list-item>
          <text:p text:style-name="P21"><text:span text:style-name="Strong_20_Emphasis">The Norwood chantry building</text:span> operates from a converted late-Victorian two-storey villa on Magill Road that the chantry has occupied since 1962 acquisition. chantry building includes institutional infrastructure including ritual-practice chambers, chantry library (substantial pre-1962 institutional library that Doctor Priestly transferred to Adelaide during 1962 establishment), chantry feeding infrastructure, and administrative chambers </text:p>
        </text:list-item>
        <text:list-item>
          <text:p text:style-name="P21"><text:span text:style-name="Strong_20_Emphasis">Octavia accommodation arrangement</text:span> operates at minimum-institutional cooperation scale with intelligence-cooperation obligation activation as chronicle-active operational requirements emerge. arrangement has produced intelligence cooperation across 78-year tenure </text:p>
        </text:list-item>
        <text:list-item>
          <text:p text:style-name="P21"><text:span text:style-name="Strong_20_Emphasis">Doctor Priestly Inner Circle membership</text:span> distinguishes chantry from Sydney Newtown chantry and Melbourne Tremere chantry — Adelaide chantry leader operates at Princely Inner Circle institutional positioning that other continental Australian Tremere chantry leaders do not match </text:p>
        </text:list-item>
        <text:list-item>
          <text:p text:style-name="P20"><text:span text:style-name="Strong_20_Emphasis">continental Tremere institutional reorganisation pressure</text:span> during chronicle-active 2025-2026 period at chronicle-defining continental scale (Scenario 2 chronicle-active institutional crisis) </text:p>
        </text:list-item>
      </text:list>
      <text:h text:style-name="Heading_20_3" text:outline-level="3"><text:span text:style-name="Strong_20_Emphasis">Chronicle hook integration:</text:span></text:h>
      <table:table table:name="Table4" table:style-name="Table4">
        <table:table-column table:style-name="Table4.A"/>
        <table:table-column table:style-name="Table4.B"/>
        <table:table-header-rows>
          <table:table-row>
            <table:table-cell table:style-name="Table4.A1" office:value-type="string">
              <text:p text:style-name="Table_20_Heading">Chronicle scope</text:p>
            </table:table-cell>
            <table:table-cell table:style-name="Table4.A1" office:value-type="string">
              <text:p text:style-name="Table_20_Heading">Chantry engagement</text:p>
            </table:table-cell>
          </table:table-row>
        </table:table-header-rows>
        <table:table-row>
          <table:table-cell table:style-name="Table4.A1" office:value-type="string">
            <text:p text:style-name="Table_20_Contents"><text:span text:style-name="Strong_20_Emphasis">Junior chantry operative chronicle</text:span></text:p>
          </table:table-cell>
          <table:table-cell table:style-name="Table4.A1" office:value-type="string">
            <text:p text:style-name="Table_20_Contents">{{user}} cultivation under Doctor Priestly (Augustin Beveridge-Schmidt template, Scenario 2)</text:p>
          </table:table-cell>
        </table:table-row>
        <text:soft-page-break/>
        <table:table-row>
          <table:table-cell table:style-name="Table4.A1" office:value-type="string">
            <text:p text:style-name="Table_20_Contents"><text:span text:style-name="Strong_20_Emphasis">chantry institutional crisis chronicle</text:span></text:p>
          </table:table-cell>
          <table:table-cell table:style-name="Table4.A1" office:value-type="string">
            <text:p text:style-name="Table_20_Contents">continental Tremere institutional reorganisation pressure during Phase Two</text:p>
          </table:table-cell>
        </table:table-row>
        <table:table-row>
          <table:table-cell table:style-name="Table4.A1" office:value-type="string">
            <text:p text:style-name="Table_20_Contents"><text:span text:style-name="Strong_20_Emphasis">continental Tremere chronicle</text:span></text:p>
          </table:table-cell>
          <table:table-cell table:style-name="Table4.A1" office:value-type="string">
            <text:p text:style-name="Table_20_Contents">Adelaide chantry continental Tremere institutional positioning at chronicle-active scale</text:p>
          </table:table-cell>
        </table:table-row>
        <table:table-row>
          <table:table-cell table:style-name="Table4.A1" office:value-type="string">
            <text:p text:style-name="Table_20_Contents"><text:span text:style-name="Strong_20_Emphasis">Doctor Priestly mystery chronicle</text:span></text:p>
          </table:table-cell>
          <table:table-cell table:style-name="Table4.A1" office:value-type="string">
            <text:p text:style-name="Table_20_Contents">pre-1962 institutional history emergence at chronicle-significant scale</text:p>
          </table:table-cell>
        </table:table-row>
        <table:table-row>
          <table:table-cell table:style-name="Table4.A1" office:value-type="string">
            <text:p text:style-name="Table_20_Contents"><text:span text:style-name="Strong_20_Emphasis">continental Article 8 chronicle</text:span></text:p>
          </table:table-cell>
          <table:table-cell table:style-name="Table4.A1" office:value-type="string">
            <text:p text:style-name="Table_20_Contents">chantry institutional cooperation during chronicle-defining continental cross-supernatural operations</text:p>
          </table:table-cell>
        </table:table-row>
      </table:table>
      <text:p text:style-name="P2"/>
      <text:p text:style-name="P2"/>
      <text:p text:style-name="P2"/>
      <text:p text:style-name="P2"/>
      <text:p text:style-name="P2"/>
      <text:p text:style-name="P2"/>
      <text:p text:style-name="P2">The three Adelaide Anarch-tolerated operatives</text:p>
      <text:p text:style-name="P2"/>
      <text:p text:style-name="P17"><text:span text:style-name="Strong_20_Emphasis">Coterie type:</text:span> Informal coterie of irregular-Embrace Anarch-tolerated operatives operating outside formal Adelaide institutional infrastructure<text:line-break/><text:span text:style-name="Strong_20_Emphasis">Established:</text:span> Informally constituted around 2019 through accumulating operational cooperation<text:line-break/><text:span text:style-name="Strong_20_Emphasis">tenure:</text:span> ~6 years informal coterie tenure<text:line-break/><text:span text:style-name="Strong_20_Emphasis">Composition:</text:span> Three Anarch-tolerated operatives operating in distinct Adelaide geographic territories under Octavia's minimum-institutional tolerance</text:p>
      <text:p text:style-name="Text_20_body">The three Adelaide Anarch-tolerated operatives form informal coterie operating at minimum-institutional cooperation scale parallel to Sydney's three Anarch-tolerated operatives infrastructure. positioning under Octavia's tolerance produces chronicle-active opportunity for Anarch-Movement-mode chronicle work within continental Adelaide operational scope.</text:p>
      <text:h text:style-name="Heading_20_3" text:outline-level="3"><text:span text:style-name="Strong_20_Emphasis">Member 1: Saoirse Blackwood-Chen</text:span> (full character build in Scenario 5)</text:h>
      <text:list text:style-name="L10">
        <text:list-item>
          <text:p text:style-name="P23"><text:span text:style-name="Strong_20_Emphasis">Clan / generation / tenure:</text:span> Brujah, 11th gen, 6 years Embraced (2019 irregular Embrace) </text:p>
        </text:list-item>
        <text:list-item>
          <text:p text:style-name="P23"><text:span text:style-name="Strong_20_Emphasis">Geographic territory:</text:span> Norwood-Hindley Street </text:p>
        </text:list-item>
        <text:list-item>
          <text:p text:style-name="P23"><text:span text:style-name="Strong_20_Emphasis">Operational character:</text:span> Aboriginal-Kaurna-Irish-Chinese working-class community-organising positioning </text:p>
        </text:list-item>
        <text:list-item>
          <text:p text:style-name="P22"><text:span text:style-name="Strong_20_Emphasis">Internal positioning:</text:span> newest of three operatives; community-organising operational specialty </text:p>
        </text:list-item>
      </text:list>
      <text:h text:style-name="Heading_20_3" text:outline-level="3"><text:span text:style-name="Strong_20_Emphasis">Member 2: Brendan O'Faolain-Williams</text:span></text:h>
      <text:list text:style-name="L11">
        <text:list-item>
          <text:p text:style-name="P25"><text:span text:style-name="Strong_20_Emphasis">Clan / generation / tenure:</text:span> Brujah, 10th gen, 14 years Embraced (2011 irregular Embrace) </text:p>
        </text:list-item>
        <text:list-item>
          <text:p text:style-name="P25"><text:span text:style-name="Strong_20_Emphasis">Geographic territory:</text:span> Port Adelaide working-class </text:p>
        </text:list-item>
        <text:list-item>
          <text:p text:style-name="P25"><text:span text:style-name="Strong_20_Emphasis">Background:</text:span> Brendan was born 1979 in Adelaide to Irish-Australian working-class parents, completed limited mortal academic study at Port Adelaide TAFE (vocational mechanical-engineering training), and worked as dock-worker at Port Adelaide maritime infrastructure when Anarch Brujah operative passing through Adelaide identified him as appropriate Embrace candidate during 2011 brief Anarch operational positioning. Embrace was conducted without Octavia authorisation; Embracing operative departed Adelaide within weeks </text:p>
        </text:list-item>
        <text:list-item>
          <text:p text:style-name="P25"><text:span text:style-name="Strong_20_Emphasis">Apparent age:</text:span> 32, he/him pronouns. Tall (185cm), close-cropped reddish-brown hair, sharp <text:soft-page-break/>grey-blue eyes with Anarch operational awareness. Dresses in functional Port Adelaide working-class attire — second-hand work boots, dark trousers, plain dark shirts, no institutional jewelry </text:p>
        </text:list-item>
        <text:list-item>
          <text:p text:style-name="P25"><text:span text:style-name="Strong_20_Emphasis">Disciplines:</text:span> Celerity 2, Potence 3, Presence 1 </text:p>
        </text:list-item>
        <text:list-item>
          <text:p text:style-name="P25"><text:span text:style-name="Strong_20_Emphasis">Operational character:</text:span> Port Adelaide working-class dock-worker positioning; pre-Embrace working-class formation with post-Embrace working-class operational continuity through Port Adelaide working-class mortal-network cooperation infrastructure </text:p>
        </text:list-item>
        <text:list-item>
          <text:p text:style-name="P24"><text:span text:style-name="Strong_20_Emphasis">Internal positioning:</text:span> most operationally cautious of three members through 14-year tolerance under Octavia. Port Adelaide maritime-infrastructure operational specialty distinguishes operational character from other two members </text:p>
        </text:list-item>
      </text:list>
      <text:h text:style-name="Heading_20_3" text:outline-level="3"><text:span text:style-name="Strong_20_Emphasis">Member 3: Diane Halliday-Park</text:span></text:h>
      <text:list text:style-name="L12">
        <text:list-item>
          <text:p text:style-name="P27"><text:span text:style-name="Strong_20_Emphasis">Clan / generation / tenure:</text:span> Caitiff, 9 years Embraced (2016 irregular Embrace during brief continental Anarch operation in Adelaide) </text:p>
        </text:list-item>
        <text:list-item>
          <text:p text:style-name="P27"><text:span text:style-name="Strong_20_Emphasis">Geographic territory:</text:span> Glenelg-Henley Beach </text:p>
        </text:list-item>
        <text:list-item>
          <text:p text:style-name="P27"><text:span text:style-name="Strong_20_Emphasis">Background:</text:span> Diane was born 1990 in Adelaide to Korean-Australian-Anglo professional-class parents, completed mortal academic study at Flinders University in arts (visual arts and photography), and worked at Glenelg-area arts-organisation when Anarch operative whose clan affiliation Diane has never confirmed conducted irregular Embrace during 2016 brief continental Anarch operation. Embracing operative departed within days; Diane has been Caitiff (no clan affiliation) for the entirety of her 9-year post-Embrace tenure </text:p>
        </text:list-item>
        <text:list-item>
          <text:p text:style-name="P27"><text:span text:style-name="Strong_20_Emphasis">Apparent age:</text:span> 28, she/her pronouns. Medium-height (165cm), straight black hair worn in deliberate Glenelg-arts-cultural styling, sharp dark brown eyes with Anarch operational awareness. Dresses in functional Glenelg arts-cultural attire with subtle Korean-cultural inflections — small jade pendant from her pre-Embrace mortal Korean family infrastructure </text:p>
        </text:list-item>
        <text:list-item>
          <text:p text:style-name="P27"><text:span text:style-name="Strong_20_Emphasis">Disciplines:</text:span> Auspex 1, Celerity 2, Potence 1, Presence 1 (Caitiff variable disciplinary loadout developed through operational adaptation) </text:p>
        </text:list-item>
        <text:list-item>
          <text:p text:style-name="P27"><text:span text:style-name="Strong_20_Emphasis">Operational character:</text:span> Glenelg-Henley Beach arts-cultural positioning; pre-Embrace visual-arts formation with post-Embrace arts-cultural operational continuity. Diane is the only female-presenting operative in continental Adelaide-Sydney Anarch-tolerated infrastructure (Sydney has one female-presenting operative — Veronica Saxon-Harper from Sydney Coterie 3) </text:p>
        </text:list-item>
        <text:list-item>
          <text:p text:style-name="P26"><text:span text:style-name="Strong_20_Emphasis">Internal positioning:</text:span> most institutionally vulnerable through Caitiff status. arts-cultural operational specialty distinguishes operational character from other two members </text:p>
        </text:list-item>
      </text:list>
      <text:h text:style-name="Heading_20_3" text:outline-level="3"><text:span text:style-name="Strong_20_Emphasis">Coterie operational character:</text:span></text:h>
      <text:list text:style-name="L13">
        <text:list-item>
          <text:p text:style-name="P29"><text:span text:style-name="Strong_20_Emphasis">informal cooperation patterns</text:span> — three operatives meet informally approximately monthly at rotating Adelaide working-class venues (typically Port Adelaide-area pubs that operate as Anarch-tolerated meeting infrastructure under minimum-Inner-Circle-surveillance positioning) </text:p>
        </text:list-item>
        <text:list-item>
          <text:p text:style-name="P29"><text:span text:style-name="Strong_20_Emphasis">mutual operational support</text:span> — each operative provides operational support for other two within their respective geographic territories </text:p>
        </text:list-item>
        <text:list-item>
          <text:p text:style-name="P29"><text:span text:style-name="Strong_20_Emphasis">Octavia tolerance maintenance</text:span> — coterie operates under minimum-institutional tolerance with operational constraints that three operatives navigate through collective operational caution </text:p>
        </text:list-item>
        <text:list-item>
          <text:p text:style-name="P29"><text:soft-page-break/><text:span text:style-name="Strong_20_Emphasis">chronicle-active 2025-2026 dynamics</text:span> parallel to Sydney's chronicle-active Anarch-tolerated infrastructure — Article 8 activation possibility producing operational scrutiny that exceeds standard Anarch-tolerated operational tempo </text:p>
        </text:list-item>
        <text:list-item>
          <text:p text:style-name="P28"><text:span text:style-name="Strong_20_Emphasis">potential institutional formalisation</text:span> — if Saoirse accepts Inner Circle cooperation proposal (Scenario 5 chronicle-active question), formalisation may produce institutional positioning implications for Brendan and Diane at parallel scale </text:p>
        </text:list-item>
      </text:list>
      <text:h text:style-name="Heading_20_3" text:outline-level="3"><text:span text:style-name="Strong_20_Emphasis">Chronicle hook integration:</text:span></text:h>
      <table:table table:name="Table5" table:style-name="Table5">
        <table:table-column table:style-name="Table5.A"/>
        <table:table-column table:style-name="Table5.B"/>
        <table:table-header-rows>
          <table:table-row>
            <table:table-cell table:style-name="Table5.A1" office:value-type="string">
              <text:p text:style-name="Table_20_Heading">Chronicle scope</text:p>
            </table:table-cell>
            <table:table-cell table:style-name="Table5.A1" office:value-type="string">
              <text:p text:style-name="Table_20_Heading">Three-operative engagement</text:p>
            </table:table-cell>
          </table:table-row>
        </table:table-header-rows>
        <table:table-row>
          <table:table-cell table:style-name="Table5.A1" office:value-type="string">
            <text:p text:style-name="Table_20_Contents"><text:span text:style-name="Strong_20_Emphasis">Single-operative chronicle</text:span></text:p>
          </table:table-cell>
          <table:table-cell table:style-name="Table5.A1" office:value-type="string">
            <text:p text:style-name="Table_20_Contents">{{user}} as one of three operatives at Anarch-tolerated continental scope</text:p>
          </table:table-cell>
        </table:table-row>
        <table:table-row>
          <table:table-cell table:style-name="Table5.A1" office:value-type="string">
            <text:p text:style-name="Table_20_Contents"><text:span text:style-name="Strong_20_Emphasis">Coterie chronicle</text:span></text:p>
          </table:table-cell>
          <table:table-cell table:style-name="Table5.A1" office:value-type="string">
            <text:p text:style-name="Table_20_Contents">{{user}} positioning across all three operatives' informal cooperation infrastructure</text:p>
          </table:table-cell>
        </table:table-row>
        <table:table-row>
          <table:table-cell table:style-name="Table5.A1" office:value-type="string">
            <text:p text:style-name="Table_20_Contents"><text:span text:style-name="Strong_20_Emphasis">Inner Circle institutional engagement chronicle</text:span></text:p>
          </table:table-cell>
          <table:table-cell table:style-name="Table5.A1" office:value-type="string">
            <text:p text:style-name="Table_20_Contents">three-operative response to chronicle-active Article 8 operational pressure (parallel to Scenario 5)</text:p>
          </table:table-cell>
        </table:table-row>
        <table:table-row>
          <table:table-cell table:style-name="Table5.A1" office:value-type="string">
            <text:p text:style-name="Table_20_Contents"><text:span text:style-name="Strong_20_Emphasis">cross-Adelaide-Sydney Anarch chronicle</text:span></text:p>
          </table:table-cell>
          <table:table-cell table:style-name="Table5.A1" office:value-type="string">
            <text:p text:style-name="Table_20_Contents">three-operative continental cooperation with Sydney's three Anarch-tolerated operatives plus Footscray Crew through continental Anarch Movement institutional cooperation infrastructure</text:p>
          </table:table-cell>
        </table:table-row>
      </table:table>
      <text:p text:style-name="P2"/>
      <text:p text:style-name="P2"/>
      <text:p text:style-name="P2">The Adelaide Hills Sept</text:p>
      <text:p text:style-name="P2"/>
      <text:p text:style-name="P17"><text:span text:style-name="Strong_20_Emphasis">Coterie type:</text:span> Glass Walker sept operating Adelaide Hills cross-supernatural territorial infrastructure<text:line-break/><text:span text:style-name="Strong_20_Emphasis">Established:</text:span> 1958<text:line-break/><text:span text:style-name="Strong_20_Emphasis">tenure:</text:span> 67 years<text:line-break/><text:span text:style-name="Strong_20_Emphasis">Composition:</text:span> Eight Garou operatives operating Adelaide Hills Glass Walker sept under Septleader Hartley leadership</text:p>
      <text:p text:style-name="Text_20_body">The Adelaide Hills Sept operates as continental Adelaide cross-supernatural diplomatic infrastructure parallel to Royal Park Sept's Melbourne cross-supernatural diplomatic positioning. sept operates from converted heritage farmhouse territorial site that sept acquired 1987 through institutional cooperation with continental Adelaide Hills heritage-conservation infrastructure.</text:p>
      <text:h text:style-name="Heading_20_3" text:outline-level="3"><text:span text:style-name="Strong_20_Emphasis">Sept membership at-a-glance:</text:span></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Position</text:p>
            </table:table-cell>
            <table:table-cell table:style-name="Table6.A1" office:value-type="string">
              <text:p text:style-name="Table_20_Heading">Holder</text:p>
            </table:table-cell>
            <table:table-cell table:style-name="Table6.A1" office:value-type="string">
              <text:p text:style-name="Table_20_Heading">Tribe / Auspice</text:p>
            </table:table-cell>
            <table:table-cell table:style-name="Table6.A1" office:value-type="string">
              <text:p text:style-name="Table_20_Heading">Tenure</text:p>
            </table:table-cell>
            <table:table-cell table:style-name="Table6.A1" office:value-type="string">
              <text:p text:style-name="Table_20_Heading">Operational specialty</text:p>
            </table:table-cell>
          </table:table-row>
        </table:table-header-rows>
        <table:table-row>
          <table:table-cell table:style-name="Table6.A1" office:value-type="string">
            <text:p text:style-name="Table_20_Contents"><text:span text:style-name="Strong_20_Emphasis">Septleader</text:span></text:p>
          </table:table-cell>
          <table:table-cell table:style-name="Table6.A1" office:value-type="string">
            <text:p text:style-name="Table_20_Contents">Maeve Hartley-Wickham</text:p>
          </table:table-cell>
          <table:table-cell table:style-name="Table6.A1" office:value-type="string">
            <text:p text:style-name="Table_20_Contents">Glass Walker / Philodox</text:p>
          </table:table-cell>
          <table:table-cell table:style-name="Table6.A1" office:value-type="string">
            <text:p text:style-name="Table_20_Contents">67 years Garou tenure</text:p>
          </table:table-cell>
          <table:table-cell table:style-name="Table6.A1" office:value-type="string">
            <text:p text:style-name="Table_20_Contents">sept institutional administration</text:p>
          </table:table-cell>
        </table:table-row>
        <table:table-row>
          <table:table-cell table:style-name="Table6.A1" office:value-type="string">
            <text:p text:style-name="Table_20_Contents"><text:span text:style-name="Strong_20_Emphasis">Theurge</text:span></text:p>
          </table:table-cell>
          <table:table-cell table:style-name="Table6.A1" office:value-type="string">
            <text:p text:style-name="Table_20_Contents">Reuben Wirung-Park</text:p>
          </table:table-cell>
          <table:table-cell table:style-name="Table6.A1" office:value-type="string">
            <text:p text:style-name="Table_20_Contents">Uktena (cross-tribal cooperation) / Theurge</text:p>
          </table:table-cell>
          <table:table-cell table:style-name="Table6.A1" office:value-type="string">
            <text:p text:style-name="Table_20_Contents">41 years</text:p>
          </table:table-cell>
          <table:table-cell table:style-name="Table6.A1" office:value-type="string">
            <text:p text:style-name="Table_20_Contents">spirit-realm operations specialty</text:p>
          </table:table-cell>
        </table:table-row>
        <table:table-row>
          <table:table-cell table:style-name="Table6.A1" office:value-type="string">
            <text:p text:style-name="Table_20_Contents"><text:span text:style-name="Strong_20_Emphasis">Galliard</text:span></text:p>
          </table:table-cell>
          <table:table-cell table:style-name="Table6.A1" office:value-type="string">
            <text:p text:style-name="Table_20_Contents">Charlotte Pemberton-Lin</text:p>
          </table:table-cell>
          <table:table-cell table:style-name="Table6.A1" office:value-type="string">
            <text:p text:style-name="Table_20_Contents">Glass Walker / Galliard</text:p>
          </table:table-cell>
          <table:table-cell table:style-name="Table6.A1" office:value-type="string">
            <text:p text:style-name="Table_20_Contents">38 years</text:p>
          </table:table-cell>
          <table:table-cell table:style-name="Table6.A1" office:value-type="string">
            <text:p text:style-name="Table_20_Contents">tribal-cultural cooperation cultivation</text:p>
          </table:table-cell>
        </table:table-row>
        <table:table-row>
          <table:table-cell table:style-name="Table6.A1" office:value-type="string">
            <text:p text:style-name="Table_20_Contents"><text:span text:style-name="Strong_20_Emphasis">Ahroun (senior)</text:span></text:p>
          </table:table-cell>
          <table:table-cell table:style-name="Table6.A1" office:value-type="string">
            <text:p text:style-name="Table_20_Contents">Mason Wallace-Tjapaltjarri</text:p>
          </table:table-cell>
          <table:table-cell table:style-name="Table6.A1" office:value-type="string">
            <text:p text:style-name="Table_20_Contents">Wendigo (cross-tribal cooperation) / Ahroun</text:p>
          </table:table-cell>
          <table:table-cell table:style-name="Table6.A1" office:value-type="string">
            <text:p text:style-name="Table_20_Contents">31 years</text:p>
          </table:table-cell>
          <table:table-cell table:style-name="Table6.A1" office:value-type="string">
            <text:p text:style-name="Table_20_Contents">combat-operational coordination</text:p>
          </table:table-cell>
        </table:table-row>
        <table:table-row>
          <table:table-cell table:style-name="Table6.A1" office:value-type="string">
            <text:p text:style-name="Table_20_Contents"><text:span text:style-name="Strong_20_Emphasis">Ahroun</text:span></text:p>
          </table:table-cell>
          <table:table-cell table:style-name="Table6.A1" office:value-type="string">
            <text:p text:style-name="Table_20_Contents">Brogan O'Mahony-Cole</text:p>
          </table:table-cell>
          <table:table-cell table:style-name="Table6.A1" office:value-type="string">
            <text:p text:style-name="Table_20_Contents">Glass Walker / Ahroun</text:p>
          </table:table-cell>
          <table:table-cell table:style-name="Table6.A1" office:value-type="string">
            <text:p text:style-name="Table_20_Contents">22 years</text:p>
          </table:table-cell>
          <table:table-cell table:style-name="Table6.A1" office:value-type="string">
            <text:p text:style-name="Table_20_Contents">tactical operations</text:p>
          </table:table-cell>
        </table:table-row>
        <table:table-row>
          <table:table-cell table:style-name="Table6.A1" office:value-type="string">
            <text:p text:style-name="Table_20_Contents"><text:span text:style-name="Strong_20_Emphasis">Philodox</text:span></text:p>
          </table:table-cell>
          <table:table-cell table:style-name="Table6.A1" office:value-type="string">
            <text:p text:style-name="Table_20_Contents">Astrid Halliburton-Park</text:p>
          </table:table-cell>
          <table:table-cell table:style-name="Table6.A1" office:value-type="string">
            <text:p text:style-name="Table_20_Contents">Glass Walker / Philodox</text:p>
          </table:table-cell>
          <table:table-cell table:style-name="Table6.A1" office:value-type="string">
            <text:p text:style-name="Table_20_Contents">18 years</text:p>
          </table:table-cell>
          <table:table-cell table:style-name="Table6.A1" office:value-type="string">
            <text:p text:style-name="Table_20_Contents">tribal-political coordination</text:p>
          </table:table-cell>
        </table:table-row>
        <table:table-row>
          <table:table-cell table:style-name="Table6.A1" office:value-type="string">
            <text:p text:style-name="Table_20_Contents"><text:span text:style-name="Strong_20_Emphasis">Ragabash</text:span></text:p>
          </table:table-cell>
          <table:table-cell table:style-name="Table6.A1" office:value-type="string">
            <text:p text:style-name="Table_20_Contents">Eli Mannheim-Karpf</text:p>
          </table:table-cell>
          <table:table-cell table:style-name="Table6.A1" office:value-type="string">
            <text:p text:style-name="Table_20_Contents">Glass Walker / Ragabash</text:p>
          </table:table-cell>
          <table:table-cell table:style-name="Table6.A1" office:value-type="string">
            <text:p text:style-name="Table_20_Contents">14 years</text:p>
          </table:table-cell>
          <table:table-cell table:style-name="Table6.A1" office:value-type="string">
            <text:p text:style-name="Table_20_Contents">intelligence-and-trickster operations</text:p>
          </table:table-cell>
        </table:table-row>
        <table:table-row>
          <table:table-cell table:style-name="Table6.A1" office:value-type="string">
            <text:p text:style-name="Table_20_Contents"><text:span text:style-name="Strong_20_Emphasis">Junior Garou</text:span></text:p>
          </table:table-cell>
          <table:table-cell table:style-name="Table6.A1" office:value-type="string">
            <text:p text:style-name="Table_20_Contents">Tobias Wickham-Carstairs</text:p>
          </table:table-cell>
          <table:table-cell table:style-name="Table6.A1" office:value-type="string">
            <text:p text:style-name="Table_20_Contents">Glass Walker / Galliard (developing)</text:p>
          </table:table-cell>
          <table:table-cell table:style-name="Table6.A1" office:value-type="string">
            <text:p text:style-name="Table_20_Contents">6 years</text:p>
          </table:table-cell>
          <table:table-cell table:style-name="Table6.A1" office:value-type="string">
            <text:p text:style-name="Table_20_Contents">junior cultivation</text:p>
          </table:table-cell>
        </table:table-row>
      </table:table>
      <text:h text:style-name="Heading_20_3" text:outline-level="3"><text:span text:style-name="Strong_20_Emphasis">Septleader Maeve Hartley-Wickham</text:span> (full character build)</text:h>
      <text:list text:style-name="L14">
        <text:list-item>
          <text:p text:style-name="P31"><text:span text:style-name="Strong_20_Emphasis">Tribe / Auspice:</text:span> Glass Walker / Philodox (tribal-political specialist appropriate to Septleader institutional positioning) </text:p>
        </text:list-item>
        <text:list-item>
          <text:p text:style-name="P31"><text:span text:style-name="Strong_20_Emphasis">Background:</text:span> born 1934 to Anglo-Australian established-rural-aristocratic parents in Adelaide Hills, First Change 1958 producing Garou tenure since 1958. Septleader institutional positioning since 1968 succession following previous Septleader's reaching Final Death during 1968 continental Wyrm-corruption operations </text:p>
        </text:list-item>
        <text:list-item>
          <text:p text:style-name="P31"><text:span text:style-name="Strong_20_Emphasis">Apparent age:</text:span> 41 (Homid form), she/her pronouns. Tall (175cm), greying chestnut-brown hair, sharp grey-green eyes with supernatural perception developed across 67-year Garou tenure </text:p>
        </text:list-item>
        <text:list-item>
          <text:p text:style-name="P31"><text:span text:style-name="Strong_20_Emphasis">Operational capabilities:</text:span> senior Glass Walker tribal-political operational competence; five Garou-form shifting capacities (Homid, Glabro, Crinos, Hispo, Lupus); Rage 6, Gnosis 6, Willpower 8 producing senior Garou-tier operational scale </text:p>
        </text:list-item>
        <text:list-item>
          <text:p text:style-name="P30"><text:span text:style-name="Strong_20_Emphasis">family-cousinage cooperation:</text:span> Pembroke-Hartley family-cousinage relationship with Lady Eveline Hartley-Carstairs (Inner Circle Member 4) plus distantly with Alistair Thorn-Pembroke (Scenario 3) — family-cousinage cooperation operates as chronicle-significant continental cross-supernatural cooperation infrastructure </text:p>
        </text:list-item>
      </text:list>
      <text:h text:style-name="Heading_20_3" text:outline-level="3"><text:span text:style-name="Strong_20_Emphasis">Sept operational character:</text:span></text:h>
      <text:list text:style-name="L15">
        <text:list-item>
          <text:p text:style-name="P33"><text:span text:style-name="Strong_20_Emphasis">Adelaide Hills territorial site</text:span> — sept operates from converted heritage farmhouse on rural property in Bridgewater (approximately 25 km east-southeast of Adelaide CBD in Adelaide Hills heritage region) producing continental sept territorial-operational positioning at rural-heritage scale </text:p>
        </text:list-item>
        <text:list-item>
          <text:p text:style-name="P33"><text:span text:style-name="Strong_20_Emphasis">Cress Truce framework operations</text:span> — sept operates as primary Adelaide cross-supernatural diplomatic infrastructure under continental Cress Truce framework institutional cooperation with continental Camarilla Adelaide infrastructure through Brother Owen O'Connor (Inner Circle Member 3) and Brother Quentin Macaulay-Osei (senior Cress Truce framework liaison; Scenario 4 character) </text:p>
        </text:list-item>
        <text:list-item>
          <text:p text:style-name="P33"><text:span text:style-name="Strong_20_Emphasis">cross-tribal cooperation infrastructure</text:span> — sept includes operatives from other Garou tribes (Reuben Wirung-Park from Uktena, Mason Wallace-Tjapaltjarri from Wendigo) producing cross-tribal continental Australian Garou institutional cooperation at scale that Royal Park Sept does not match </text:p>
        </text:list-item>
        <text:list-item>
          <text:p text:style-name="P33"><text:span text:style-name="Strong_20_Emphasis">chronicle-active continental Article 8 operational positioning</text:span> — sept can field approximately twelve Garou tactical operatives across simultaneous continental operations through tribal-political coordination with adjacent continental Western Australian and <text:soft-page-break/>Queensland Garou tribes </text:p>
        </text:list-item>
        <text:list-item>
          <text:p text:style-name="P32"><text:span text:style-name="Strong_20_Emphasis">chronicle-significant continental family-cousinage cooperation</text:span> — Hartley family-cousinage continental institutional cooperation with Adelaide Camarilla infrastructure produces distinctive continental sept operational character </text:p>
        </text:list-item>
      </text:list>
      <text:h text:style-name="Heading_20_3" text:outline-level="3"><text:span text:style-name="Strong_20_Emphasis">Chronicle hook integration:</text:span></text:h>
      <table:table table:name="Table7" table:style-name="Table7">
        <table:table-column table:style-name="Table7.A"/>
        <table:table-column table:style-name="Table7.B"/>
        <table:table-header-rows>
          <table:table-row>
            <table:table-cell table:style-name="Table7.A1" office:value-type="string">
              <text:p text:style-name="Table_20_Heading">Chronicle scope</text:p>
            </table:table-cell>
            <table:table-cell table:style-name="Table7.A1" office:value-type="string">
              <text:p text:style-name="Table_20_Heading">Sept engagement</text:p>
            </table:table-cell>
          </table:table-row>
        </table:table-header-rows>
        <table:table-row>
          <table:table-cell table:style-name="Table7.A1" office:value-type="string">
            <text:p text:style-name="Table_20_Contents"><text:span text:style-name="Strong_20_Emphasis">junior Garou cultivation chronicle</text:span></text:p>
          </table:table-cell>
          <table:table-cell table:style-name="Table7.A1" office:value-type="string">
            <text:p text:style-name="Table_20_Contents">{{user}} as junior sept operative under Septleader Hartley cultivation</text:p>
          </table:table-cell>
        </table:table-row>
        <table:table-row>
          <table:table-cell table:style-name="Table7.A1" office:value-type="string">
            <text:p text:style-name="Table_20_Contents"><text:span text:style-name="Strong_20_Emphasis">Cress Truce framework chronicle</text:span></text:p>
          </table:table-cell>
          <table:table-cell table:style-name="Table7.A1" office:value-type="string">
            <text:p text:style-name="Table_20_Contents">sept institutional cooperation with Adelaide Camarilla infrastructure during chronicle-active continental operations</text:p>
          </table:table-cell>
        </table:table-row>
        <table:table-row>
          <table:table-cell table:style-name="Table7.A1" office:value-type="string">
            <text:p text:style-name="Table_20_Contents"><text:span text:style-name="Strong_20_Emphasis">continental Article 8 chronicle</text:span></text:p>
          </table:table-cell>
          <table:table-cell table:style-name="Table7.A1" office:value-type="string">
            <text:p text:style-name="Table_20_Contents">sept tactical operational positioning during chronicle-defining continental cross-supernatural operations (parallel to Scenario 4 chronicle-active period)</text:p>
          </table:table-cell>
        </table:table-row>
        <table:table-row>
          <table:table-cell table:style-name="Table7.A1" office:value-type="string">
            <text:p text:style-name="Table_20_Contents"><text:span text:style-name="Strong_20_Emphasis">cross-tribal cooperation chronicle</text:span></text:p>
          </table:table-cell>
          <table:table-cell table:style-name="Table7.A1" office:value-type="string">
            <text:p text:style-name="Table_20_Contents">sept cross-tribal cooperation with Uktena and Wendigo tribal infrastructure</text:p>
          </table:table-cell>
        </table:table-row>
        <table:table-row>
          <table:table-cell table:style-name="Table7.A1" office:value-type="string">
            <text:p text:style-name="Table_20_Contents"><text:span text:style-name="Strong_20_Emphasis">family-cousinage cooperation chronicle</text:span></text:p>
          </table:table-cell>
          <table:table-cell table:style-name="Table7.A1" office:value-type="string">
            <text:p text:style-name="Table_20_Contents">chronicle-significant continental Hartley family-cousinage cooperation infrastructure between sept and Adelaide Camarilla institutional positioning</text:p>
          </table:table-cell>
        </table:table-row>
      </table:table>
      <text:p text:style-name="P2"/>
      <text:p text:style-name="P2"/>
      <text:p text:style-name="P2"><text:span text:style-name="Strong_20_Emphasis">The Adelaide scenarios and coterie pack are complete.</text:span> Five {{user}} character cards covering distinct Adelaide chronicle starting positions (Strategic Depth Operative with Harriet Whitworth-Scribe full build, Tremere Coordination Crisis with Augustin Beveridge-Schmidt, Octavia Beckoning Crisis Operative with Alistair Thorn-Pembroke, Cress Truce Liaison with Brother Quentin Macaulay-Osei, Adelaide Anarch-Tolerated Operative with Saoirse Blackwood-Chen), plus four coteries covering the full Adelaide institutional structure under Octavia's smaller-domain Princely authority (Inner Circle with Octavia plus four senior members fully built including Madeleine Ashworth-Quill, Doctor Priestly-Mendoza, Brother Owen O'Connor, and Lady Eveline Hartley-Carstairs; Priestly Chantry with Tremere chantry institutional structure; Three Adelaide Anarch-Tolerated Operatives with full builds for Brendan O'Faolain-Williams and Diane Halliday-Park beyond Saoirse; Adelaide Hills Sept with Septleader Maeve Hartley-Wickham full build plus seven other sept memb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3:05:27.428089088</dc:date>
    <meta:editing-duration>PT55M39S</meta:editing-duration>
    <meta:editing-cycles>2</meta:editing-cycles>
    <meta:generator>LibreOffice/24.2.7.2$Linux_X86_64 LibreOffice_project/420$Build-2</meta:generator>
    <meta:document-statistic meta:table-count="7" meta:image-count="0" meta:object-count="0" meta:page-count="11" meta:paragraph-count="269" meta:word-count="3324" meta:character-count="28985" meta:non-whitespace-character-count="25903"/>
  </office:meta>
</office:document-meta>
</file>