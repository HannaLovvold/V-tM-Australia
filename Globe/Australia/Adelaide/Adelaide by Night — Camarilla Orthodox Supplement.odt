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977cm"/>
    </style:style>
    <style:style style:name="Table1.B" style:family="table-column">
      <style:table-column-properties style:column-width="2.05cm"/>
    </style:style>
    <style:style style:name="Table1.C" style:family="table-column">
      <style:table-column-properties style:column-width="3.651cm"/>
    </style:style>
    <style:style style:name="Table1.D" style:family="table-column">
      <style:table-column-properties style:column-width="4.149cm"/>
    </style:style>
    <style:style style:name="Table1.E" style:family="table-column">
      <style:table-column-properties style:column-width="4.17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566cm"/>
    </style:style>
    <style:style style:name="Table2.B" style:family="table-column">
      <style:table-column-properties style:column-width="3.595cm"/>
    </style:style>
    <style:style style:name="Table2.C" style:family="table-column">
      <style:table-column-properties style:column-width="2.11cm"/>
    </style:style>
    <style:style style:name="Table2.D" style:family="table-column">
      <style:table-column-properties style:column-width="2.704cm"/>
    </style:style>
    <style:style style:name="Table2.E" style:family="table-column">
      <style:table-column-properties style:column-width="6.02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658cm"/>
    </style:style>
    <style:style style:name="Table3.B" style:family="table-column">
      <style:table-column-properties style:column-width="4.032cm"/>
    </style:style>
    <style:style style:name="Table3.C" style:family="table-column">
      <style:table-column-properties style:column-width="9.31cm"/>
    </style:style>
    <style:style style:name="Table3.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n Adelaide supplement treating the city as a playable smaller-domain Camarilla — distinct in register from Lytton's institutional-but-Australian-informal Melbourne, Sarrasine's patient methuselah Sydney, or Bishop Callista's doctrinal Sabbat Brisbane. Adelaide is <text:span text:style-name="Strong_20_Emphasis">the orthodoxy that holds because it must</text:span> — Octavia Marsh's smaller Camarilla domain operating under deliberate institutional traditionalism, sustained by 102 years of Princely commitment, structurally less politically complex than Melbourne but operationally significant as continental Camarilla strategic depth.</text:p>
      <text:p text:style-name="Text_20_body"><text:span text:style-name="Strong_20_Emphasis">Distinctive features of Adelaide:</text:span></text:p>
      <text:list text:style-name="L1">
        <text:list-item>
          <text:p text:style-name="P4"><text:span text:style-name="Strong_20_Emphasis">Smaller-scale Camarilla domain</text:span> — approximately twenty-five Kindred citywide, operating without Melbourne's institutional complexity </text:p>
        </text:list-item>
        <text:list-item>
          <text:p text:style-name="P4"><text:span text:style-name="Strong_20_Emphasis">Orthodox Camarilla traditionalism</text:span> — Octavia Marsh's deliberately-conservative Princely register that emphasises Tower-formal practice over Australian-informal accommodation </text:p>
        </text:list-item>
        <text:list-item>
          <text:p text:style-name="P4"><text:span text:style-name="Strong_20_Emphasis">Continental strategic depth</text:span> — Adelaide is Lytton's Camarilla-loyal western flank and his closest Princely ally; the relationship has shaped both domains across 102 years </text:p>
        </text:list-item>
        <text:list-item>
          <text:p text:style-name="P4"><text:span text:style-name="Strong_20_Emphasis">Geographic isolation as operational character</text:span> — Adelaide's continental position (1,400 km west of Melbourne, 2,700 km south of Perth) produces operational distinctness that smaller-scale population reinforces </text:p>
        </text:list-item>
        <text:list-item>
          <text:p text:style-name="P4"><text:span text:style-name="Strong_20_Emphasis">Quiet ongoing crises</text:span> — Adelaide is materially stable but operationally pressured by the same continental forces affecting Melbourne (Sarrasine Phase Two, Beckoning trajectory, AFP-Twilight-Project, succession questions); the smaller domain has fewer institutional resources to absorb the pressures </text:p>
        </text:list-item>
        <text:list-item>
          <text:p text:style-name="P3"><text:span text:style-name="Strong_20_Emphasis">Smaller-town intimacy</text:span> — Adelaide Kindred know each other personally in ways larger-city Kindred do not; the social register is more familial and the political register has fewer formal mediating channels </text:p>
        </text:list-item>
      </text:list>
      <text:p text:style-name="P1">A 14-entry lorebook providing Adelaide's geography, court structure, politics, and operational character. Designed to layer alongside <text:span text:style-name="Source_20_Text"><text:span text:style-name="T1">vtm_modern_nights.json</text:span></text:span> for Adelaide-focused chronicles or alongside <text:span text:style-name="Source_20_Text"><text:span text:style-name="T1">vtm_melbourne_by_night.json</text:span></text:span> for cross-domain Camarilla operations.</text:p>
      <text:p text:style-name="P1"/>
      <text:p text:style-name="P1">load alongside <text:span text:style-name="Source_20_Text"><text:span text:style-name="T1">vtm_modern_nights.json</text:span></text:span> for Adelaide-focused chronicles. Optionally layer with <text:span text:style-name="Source_20_Text"><text:span text:style-name="T1">vtm_melbourne_by_night.json</text:span></text:span> for cross-domain Camarilla operations engaging Lytton-Octavia coordination, with <text:span text:style-name="Source_20_Text"><text:span text:style-name="T1">vtm_garou_diplomatic.json</text:span></text:span> for chronicles engaging Septleader Hartley's Adelaide Hills sept, or with the full Australian kit for continental coordination chronic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District</text:p>
            </table:table-cell>
            <table:table-cell table:style-name="Table1.A1" office:value-type="string">
              <text:p text:style-name="Table_20_Heading">Status</text:p>
            </table:table-cell>
            <table:table-cell table:style-name="Table1.A1" office:value-type="string">
              <text:p text:style-name="Table_20_Heading">Authority</text:p>
            </table:table-cell>
            <table:table-cell table:style-name="Table1.A1" office:value-type="string">
              <text:p text:style-name="Table_20_Heading">Key NPCs</text:p>
            </table:table-cell>
            <table:table-cell table:style-name="Table1.A1" office:value-type="string">
              <text:p text:style-name="Table_20_Heading">Key Sites</text:p>
            </table:table-cell>
          </table:table-row>
        </table:table-header-rows>
        <table:table-row>
          <table:table-cell table:style-name="Table1.A1" office:value-type="string">
            <text:p text:style-name="Table_20_Contents"><text:span text:style-name="Strong_20_Emphasis">Adelaide CBD</text:span></text:p>
          </table:table-cell>
          <table:table-cell table:style-name="Table1.A1" office:value-type="string">
            <text:p text:style-name="Table_20_Contents">Kindred Zone</text:p>
          </table:table-cell>
          <table:table-cell table:style-name="Table1.A1" office:value-type="string">
            <text:p text:style-name="Table_20_Contents">Octavia (institutional)</text:p>
          </table:table-cell>
          <table:table-cell table:style-name="Table1.A1" office:value-type="string">
            <text:p text:style-name="Table_20_Contents">Court attendees, formal occasions</text:p>
          </table:table-cell>
          <table:table-cell table:style-name="Table1.A1" office:value-type="string">
            <text:p text:style-name="Table_20_Contents">Adelaide Town Hall, Government House, Festival Centre, State Library SA</text:p>
          </table:table-cell>
        </table:table-row>
        <table:table-row>
          <table:table-cell table:style-name="Table1.A1" office:value-type="string">
            <text:p text:style-name="Table_20_Contents"><text:span text:style-name="Strong_20_Emphasis">North Adelaide</text:span></text:p>
          </table:table-cell>
          <table:table-cell table:style-name="Table1.A1" office:value-type="string">
            <text:p text:style-name="Table_20_Contents">Kindred Zone</text:p>
          </table:table-cell>
          <table:table-cell table:style-name="Table1.A1" office:value-type="string">
            <text:p text:style-name="Table_20_Contents">Octavia (residential heart)</text:p>
          </table:table-cell>
          <table:table-cell table:style-name="Table1.A1" office:value-type="string">
            <text:p text:style-name="Table_20_Contents">Octavia, Harriet, Genevieve, Benjamin</text:p>
          </table:table-cell>
          <table:table-cell table:style-name="Table1.A1" office:value-type="string">
            <text:p text:style-name="Table_20_Contents">Octavia's mansion, Astor-Moss Strangways residence</text:p>
          </table:table-cell>
        </table:table-row>
        <table:table-row>
          <table:table-cell table:style-name="Table1.A1" office:value-type="string">
            <text:p text:style-name="Table_20_Contents"><text:span text:style-name="Strong_20_Emphasis">Norwood / Burnside / Eastern Suburbs</text:span></text:p>
          </table:table-cell>
          <table:table-cell table:style-name="Table1.A1" office:value-type="string">
            <text:p text:style-name="Table_20_Contents">Kindred Zone</text:p>
          </table:table-cell>
          <table:table-cell table:style-name="Table1.A1" office:value-type="string">
            <text:p text:style-name="Table_20_Contents">Octavia (mature stable)</text:p>
          </table:table-cell>
          <table:table-cell table:style-name="Table1.A1" office:value-type="string">
            <text:p text:style-name="Table_20_Contents">Doctor Priestly, Robert, Priscilla, Miriam</text:p>
          </table:table-cell>
          <table:table-cell table:style-name="Table1.A1" office:value-type="string">
            <text:p text:style-name="Table_20_Contents">Adelaide Tremere chantry, eastern-suburbs heritage</text:p>
          </table:table-cell>
        </table:table-row>
        <table:table-row>
          <table:table-cell table:style-name="Table1.A1" office:value-type="string">
            <text:p text:style-name="Table_20_Contents"><text:span text:style-name="Strong_20_Emphasis">Port Adelaide / Western Suburbs</text:span></text:p>
          </table:table-cell>
          <table:table-cell table:style-name="Table1.A1" office:value-type="string">
            <text:p text:style-name="Table_20_Contents">Kindred Zone</text:p>
          </table:table-cell>
          <table:table-cell table:style-name="Table1.A1" office:value-type="string">
            <text:p text:style-name="Table_20_Contents">Octavia (Anarch-tolerated)</text:p>
          </table:table-cell>
          <table:table-cell table:style-name="Table1.A1" office:value-type="string">
            <text:p text:style-name="Table_20_Contents">Padraig O'Connor, Niamh Brennan, William Preston-Carr</text:p>
          </table:table-cell>
          <table:table-cell table:style-name="Table1.A1" office:value-type="string">
            <text:p text:style-name="Table_20_Contents">Port Adelaide Community Arts Centre, Semaphore</text:p>
          </table:table-cell>
        </table:table-row>
        <table:table-row>
          <table:table-cell table:style-name="Table1.A1" office:value-type="string">
            <text:p text:style-name="Table_20_Contents"><text:span text:style-name="Strong_20_Emphasis">Adelaide Hills (villages)</text:span></text:p>
          </table:table-cell>
          <table:table-cell table:style-name="Table1.A1" office:value-type="string">
            <text:p text:style-name="Table_20_Contents">Kindred Zone</text:p>
          </table:table-cell>
          <table:table-cell table:style-name="Table1.A1" office:value-type="string">
            <text:p text:style-name="Table_20_Contents">Octavia (extended)</text:p>
          </table:table-cell>
          <table:table-cell table:style-name="Table1.A1" office:value-type="string">
            <text:p text:style-name="Table_20_Contents">Doctor Priestly secondary, Hills residences</text:p>
          </table:table-cell>
          <table:table-cell table:style-name="Table1.A1" office:value-type="string">
            <text:p text:style-name="Table_20_Contents">Stirling, Crafers, Hahndorf</text:p>
          </table:table-cell>
        </table:table-row>
        <table:table-row>
          <table:table-cell table:style-name="Table1.A1" office:value-type="string">
            <text:p text:style-name="Table_20_Contents"><text:span text:style-name="Strong_20_Emphasis">Mount Lofty Ranges (bushland)</text:span></text:p>
          </table:table-cell>
          <table:table-cell table:style-name="Table1.A1" office:value-type="string">
            <text:p text:style-name="Table_20_Contents">Garou Zone</text:p>
          </table:table-cell>
          <table:table-cell table:style-name="Table1.A1" office:value-type="string">
            <text:p text:style-name="Table_20_Contents">Glass Walker (Hartley sept)</text:p>
          </table:table-cell>
          <table:table-cell table:style-name="Table1.A1" office:value-type="string">
            <text:p text:style-name="Table_20_Contents">Septleader Hartley, sept members</text:p>
          </table:table-cell>
          <table:table-cell table:style-name="Table1.A1" office:value-type="string">
            <text:p text:style-name="Table_20_Contents">Mount Lofty Summit, Belair NP, Cleland Wildlife Park</text:p>
          </table:table-cell>
        </table:table-row>
        <table:table-row>
          <table:table-cell table:style-name="Table1.A1" office:value-type="string">
            <text:p text:style-name="Table_20_Contents"><text:span text:style-name="Strong_20_Emphasis">Botanic Gardens</text:span></text:p>
          </table:table-cell>
          <table:table-cell table:style-name="Table1.A1" office:value-type="string">
            <text:p text:style-name="Table_20_Contents">Neutral Zone</text:p>
          </table:table-cell>
          <table:table-cell table:style-name="Table1.A1" office:value-type="string">
            <text:p text:style-name="Table_20_Contents">Cross-supernatural</text:p>
          </table:table-cell>
          <table:table-cell table:style-name="Table1.A1" office:value-type="string">
            <text:p text:style-name="Table_20_Contents">Octavia-Hartley meetings</text:p>
          </table:table-cell>
          <table:table-cell table:style-name="Table1.A1" office:value-type="string">
            <text:p text:style-name="Table_20_Contents">Adelaide Botanic Gardens</text:p>
          </table:table-cell>
        </table:table-row>
        <table:table-row>
          <table:table-cell table:style-name="Table1.A1" office:value-type="string">
            <text:p text:style-name="Table_20_Contents"><text:span text:style-name="Strong_20_Emphasis">Piccadilly Valley (wine region)</text:span></text:p>
          </table:table-cell>
          <table:table-cell table:style-name="Table1.A1" office:value-type="string">
            <text:p text:style-name="Table_20_Contents">Contested Zone</text:p>
          </table:table-cell>
          <table:table-cell table:style-name="Table1.A1" office:value-type="string">
            <text:p text:style-name="Table_20_Contents">Joint tolerance</text:p>
          </table:table-cell>
          <table:table-cell table:style-name="Table1.A1" office:value-type="string">
            <text:p text:style-name="Table_20_Contents">Mortal-business cover</text:p>
          </table:table-cell>
          <table:table-cell table:style-name="Table1.A1" office:value-type="string">
            <text:p text:style-name="Table_20_Contents">Adelaide Hills wine region</text:p>
          </table:table-cell>
        </table:table-row>
      </table:table>
      <text:h text:style-name="Heading_20_3" text:outline-level="3"><text:span text:style-name="Strong_20_Emphasis">Adelaide Camarilla Court at a glance:</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osition</text:p>
            </table:table-cell>
            <table:table-cell table:style-name="Table2.A1" office:value-type="string">
              <text:p text:style-name="Table_20_Heading">Holder</text:p>
            </table:table-cell>
            <table:table-cell table:style-name="Table2.A1" office:value-type="string">
              <text:p text:style-name="Table_20_Heading">Clan</text:p>
            </table:table-cell>
            <table:table-cell table:style-name="Table2.A1" office:value-type="string">
              <text:p text:style-name="Table_20_Heading">Tenure</text:p>
            </table:table-cell>
            <table:table-cell table:style-name="Table2.A1" office:value-type="string">
              <text:p text:style-name="Table_20_Heading">Note</text:p>
            </table:table-cell>
          </table:table-row>
        </table:table-header-rows>
        <table:table-row>
          <table:table-cell table:style-name="Table2.A1" office:value-type="string">
            <text:p text:style-name="Table_20_Contents"><text:span text:style-name="Strong_20_Emphasis">Prince</text:span></text:p>
          </table:table-cell>
          <table:table-cell table:style-name="Table2.A1" office:value-type="string">
            <text:p text:style-name="Table_20_Contents">Octavia Marsh</text:p>
          </table:table-cell>
          <table:table-cell table:style-name="Table2.A1" office:value-type="string">
            <text:p text:style-name="Table_20_Contents">Ventrue 9th gen</text:p>
          </table:table-cell>
          <table:table-cell table:style-name="Table2.A1" office:value-type="string">
            <text:p text:style-name="Table_20_Contents">102 years</text:p>
          </table:table-cell>
          <table:table-cell table:style-name="Table2.A1" office:value-type="string">
            <text:p text:style-name="Table_20_Contents">Orthodox Camarilla register</text:p>
          </table:table-cell>
        </table:table-row>
        <table:table-row>
          <table:table-cell table:style-name="Table2.A1" office:value-type="string">
            <text:p text:style-name="Table_20_Contents"><text:span text:style-name="Strong_20_Emphasis">Seneschal</text:span></text:p>
          </table:table-cell>
          <table:table-cell table:style-name="Table2.A1" office:value-type="string">
            <text:p text:style-name="Table_20_Contents">Harriet Whitworth-Scribe</text:p>
          </table:table-cell>
          <table:table-cell table:style-name="Table2.A1" office:value-type="string">
            <text:p text:style-name="Table_20_Contents">Toreador</text:p>
          </table:table-cell>
          <table:table-cell table:style-name="Table2.A1" office:value-type="string">
            <text:p text:style-name="Table_20_Contents">102 years</text:p>
          </table:table-cell>
          <table:table-cell table:style-name="Table2.A1" office:value-type="string">
            <text:p text:style-name="Table_20_Contents">Octavia's primary administrative deputy</text:p>
          </table:table-cell>
        </table:table-row>
        <table:table-row>
          <table:table-cell table:style-name="Table2.A1" office:value-type="string">
            <text:p text:style-name="Table_20_Contents"><text:span text:style-name="Strong_20_Emphasis">Primogen (Toreador)</text:span></text:p>
          </table:table-cell>
          <table:table-cell table:style-name="Table2.A1" office:value-type="string">
            <text:p text:style-name="Table_20_Contents">Harriet Whitworth-Scribe</text:p>
          </table:table-cell>
          <table:table-cell table:style-name="Table2.A1" office:value-type="string">
            <text:p text:style-name="Table_20_Contents">Toreador</text:p>
          </table:table-cell>
          <table:table-cell table:style-name="Table2.A1" office:value-type="string">
            <text:p text:style-name="Table_20_Contents">(doubles as Seneschal)</text:p>
          </table:table-cell>
          <table:table-cell table:style-name="Table2.A1" office:value-type="string">
            <text:p text:style-name="P2"/>
          </table:table-cell>
        </table:table-row>
        <table:table-row>
          <table:table-cell table:style-name="Table2.A1" office:value-type="string">
            <text:p text:style-name="Table_20_Contents"><text:span text:style-name="Strong_20_Emphasis">Primogen (Tremere)</text:span></text:p>
          </table:table-cell>
          <table:table-cell table:style-name="Table2.A1" office:value-type="string">
            <text:p text:style-name="Table_20_Contents">Doctor Ellen Priestly</text:p>
          </table:table-cell>
          <table:table-cell table:style-name="Table2.A1" office:value-type="string">
            <text:p text:style-name="Table_20_Contents">Tremere</text:p>
          </table:table-cell>
          <table:table-cell table:style-name="Table2.A1" office:value-type="string">
            <text:p text:style-name="Table_20_Contents">54 years (chantry)</text:p>
          </table:table-cell>
          <table:table-cell table:style-name="Table2.A1" office:value-type="string">
            <text:p text:style-name="Table_20_Contents">Formal independence since 1971, post-Vienna pressure</text:p>
          </table:table-cell>
        </table:table-row>
        <table:table-row>
          <table:table-cell table:style-name="Table2.A1" office:value-type="string">
            <text:p text:style-name="Table_20_Contents"><text:span text:style-name="Strong_20_Emphasis">Primogen (Brujah)</text:span></text:p>
          </table:table-cell>
          <table:table-cell table:style-name="Table2.A1" office:value-type="string">
            <text:p text:style-name="Table_20_Contents">Master Robert Thomson-Vale</text:p>
          </table:table-cell>
          <table:table-cell table:style-name="Table2.A1" office:value-type="string">
            <text:p text:style-name="Table_20_Contents">Brujah</text:p>
          </table:table-cell>
          <table:table-cell table:style-name="Table2.A1" office:value-type="string">
            <text:p text:style-name="Table_20_Contents">Court establishment</text:p>
          </table:table-cell>
          <table:table-cell table:style-name="Table2.A1" office:value-type="string">
            <text:p text:style-name="Table_20_Contents">Working-class-mortal-network coordinator</text:p>
          </table:table-cell>
        </table:table-row>
        <table:table-row>
          <table:table-cell table:style-name="Table2.A1" office:value-type="string">
            <text:p text:style-name="Table_20_Contents"><text:span text:style-name="Strong_20_Emphasis">Primogen (Malkavian)</text:span></text:p>
          </table:table-cell>
          <table:table-cell table:style-name="Table2.A1" office:value-type="string">
            <text:p text:style-name="Table_20_Contents">Mistress Priscilla Wainwright-Day</text:p>
          </table:table-cell>
          <table:table-cell table:style-name="Table2.A1" office:value-type="string">
            <text:p text:style-name="Table_20_Contents">Malkavian</text:p>
          </table:table-cell>
          <table:table-cell table:style-name="Table2.A1" office:value-type="string">
            <text:p text:style-name="Table_20_Contents">78 years</text:p>
          </table:table-cell>
          <table:table-cell table:style-name="Table2.A1" office:value-type="string">
            <text:p text:style-name="Table_20_Contents">Cultural-festival cover, Madness Network Adelaide</text:p>
          </table:table-cell>
        </table:table-row>
        <table:table-row>
          <table:table-cell table:style-name="Table2.A1" office:value-type="string">
            <text:p text:style-name="Table_20_Contents"><text:span text:style-name="Strong_20_Emphasis">Primogen (Nosferatu)</text:span></text:p>
          </table:table-cell>
          <table:table-cell table:style-name="Table2.A1" office:value-type="string">
            <text:p text:style-name="Table_20_Contents">Sister Eleanor Rankine-Cole</text:p>
          </table:table-cell>
          <table:table-cell table:style-name="Table2.A1" office:value-type="string">
            <text:p text:style-name="Table_20_Contents">Nosferatu</text:p>
          </table:table-cell>
          <table:table-cell table:style-name="Table2.A1" office:value-type="string">
            <text:p text:style-name="Table_20_Contents">46 years</text:p>
          </table:table-cell>
          <table:table-cell table:style-name="Table2.A1" office:value-type="string">
            <text:p text:style-name="Table_20_Contents">SchreckNet Adelaide relay</text:p>
          </table:table-cell>
        </table:table-row>
        <table:table-row>
          <table:table-cell table:style-name="Table2.A1" office:value-type="string">
            <text:p text:style-name="Table_20_Contents"><text:span text:style-name="Strong_20_Emphasis">Harpy</text:span></text:p>
          </table:table-cell>
          <table:table-cell table:style-name="Table2.A1" office:value-type="string">
            <text:p text:style-name="Table_20_Contents">Genevieve Astor-Moss</text:p>
          </table:table-cell>
          <table:table-cell table:style-name="Table2.A1" office:value-type="string">
            <text:p text:style-name="Table_20_Contents">Toreador</text:p>
          </table:table-cell>
          <table:table-cell table:style-name="Table2.A1" office:value-type="string">
            <text:p text:style-name="Table_20_Contents">Late-1960s</text:p>
          </table:table-cell>
          <table:table-cell table:style-name="Table2.A1" office:value-type="string">
            <text:p text:style-name="Table_20_Contents">Adelaide Festival cover, social calendar</text:p>
          </table:table-cell>
        </table:table-row>
        <table:table-row>
          <table:table-cell table:style-name="Table2.A1" office:value-type="string">
            <text:p text:style-name="Table_20_Contents"><text:span text:style-name="Strong_20_Emphasis">Keeper of Elysium</text:span></text:p>
          </table:table-cell>
          <table:table-cell table:style-name="Table2.A1" office:value-type="string">
            <text:p text:style-name="Table_20_Contents">Benjamin Hartwell-Pryce</text:p>
          </table:table-cell>
          <table:table-cell table:style-name="Table2.A1" office:value-type="string">
            <text:p text:style-name="Table_20_Contents">Toreador</text:p>
          </table:table-cell>
          <table:table-cell table:style-name="Table2.A1" office:value-type="string">
            <text:p text:style-name="Table_20_Contents">Mid-1980s</text:p>
          </table:table-cell>
          <table:table-cell table:style-name="Table2.A1" office:value-type="string">
            <text:p text:style-name="Table_20_Contents">Two Elysium sites, Festival operations</text:p>
          </table:table-cell>
        </table:table-row>
        <text:soft-page-break/>
        <table:table-row>
          <table:table-cell table:style-name="Table2.A1" office:value-type="string">
            <text:p text:style-name="Table_20_Contents"><text:span text:style-name="Strong_20_Emphasis">Sheriff</text:span></text:p>
          </table:table-cell>
          <table:table-cell table:style-name="Table2.A1" office:value-type="string">
            <text:p text:style-name="Table_20_Contents">Sister Miriam Cameron-White</text:p>
          </table:table-cell>
          <table:table-cell table:style-name="Table2.A1" office:value-type="string">
            <text:p text:style-name="Table_20_Contents">Brujah</text:p>
          </table:table-cell>
          <table:table-cell table:style-name="Table2.A1" office:value-type="string">
            <text:p text:style-name="Table_20_Contents">17 years</text:p>
          </table:table-cell>
          <table:table-cell table:style-name="Table2.A1" office:value-type="string">
            <text:p text:style-name="Table_20_Contents">Smaller-domain enforcement</text:p>
          </table:table-cell>
        </table:table-row>
        <table:table-row>
          <table:table-cell table:style-name="Table2.A1" office:value-type="string">
            <text:p text:style-name="Table_20_Contents"><text:span text:style-name="Strong_20_Emphasis">Banu Haqim Primogen</text:span></text:p>
          </table:table-cell>
          <table:table-cell table:style-name="Table2.A1" office:value-type="string">
            <text:p text:style-name="Table_20_Contents">UNFILLED</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No Banu Haqim resident</text:p>
          </table:table-cell>
        </table:table-row>
        <table:table-row>
          <table:table-cell table:style-name="Table2.A1" office:value-type="string">
            <text:p text:style-name="Table_20_Contents"><text:span text:style-name="Strong_20_Emphasis">Lasombra Primogen</text:span></text:p>
          </table:table-cell>
          <table:table-cell table:style-name="Table2.A1" office:value-type="string">
            <text:p text:style-name="Table_20_Contents">UNFILLED</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No Lasombra resident</text:p>
          </table:table-cell>
        </table:table-row>
        <table:table-row>
          <table:table-cell table:style-name="Table2.A1" office:value-type="string">
            <text:p text:style-name="Table_20_Contents"><text:span text:style-name="Strong_20_Emphasis">Scourge</text:span></text:p>
          </table:table-cell>
          <table:table-cell table:style-name="Table2.A1" office:value-type="string">
            <text:p text:style-name="Table_20_Contents">UNFILLED</text:p>
          </table:table-cell>
          <table:table-cell table:style-name="Table2.A1" office:value-type="string">
            <text:p text:style-name="Table_20_Contents">—</text:p>
          </table:table-cell>
          <table:table-cell table:style-name="Table2.A1" office:value-type="string">
            <text:p text:style-name="Table_20_Contents">Permanent</text:p>
          </table:table-cell>
          <table:table-cell table:style-name="Table2.A1" office:value-type="string">
            <text:p text:style-name="Table_20_Contents">Octavia declined establishment</text:p>
          </table:table-cell>
        </table:table-row>
      </table:table>
      <text:h text:style-name="Heading_20_3" text:outline-level="3"><text:span text:style-name="Strong_20_Emphasis">Continental snapshot from Adelaide perspectiv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omain</text:p>
            </table:table-cell>
            <table:table-cell table:style-name="Table3.A1" office:value-type="string">
              <text:p text:style-name="Table_20_Heading">Authority</text:p>
            </table:table-cell>
            <table:table-cell table:style-name="Table3.A1" office:value-type="string">
              <text:p text:style-name="Table_20_Heading">Adelaide relationship</text:p>
            </table:table-cell>
          </table:table-row>
        </table:table-header-rows>
        <table:table-row>
          <table:table-cell table:style-name="Table3.A1" office:value-type="string">
            <text:p text:style-name="Table_20_Contents"><text:span text:style-name="Strong_20_Emphasis">Adelaide (this supplement)</text:span></text:p>
          </table:table-cell>
          <table:table-cell table:style-name="Table3.A1" office:value-type="string">
            <text:p text:style-name="Table_20_Contents">Octavia Marsh (Camarilla)</text:p>
          </table:table-cell>
          <table:table-cell table:style-name="Table3.A1" office:value-type="string">
            <text:p text:style-name="Table_20_Contents">Her domain</text:p>
          </table:table-cell>
        </table:table-row>
        <table:table-row>
          <table:table-cell table:style-name="Table3.A1" office:value-type="string">
            <text:p text:style-name="Table_20_Contents"><text:span text:style-name="Strong_20_Emphasis">Melbourne</text:span></text:p>
          </table:table-cell>
          <table:table-cell table:style-name="Table3.A1" office:value-type="string">
            <text:p text:style-name="Table_20_Contents">Lytton (Camarilla)</text:p>
          </table:table-cell>
          <table:table-cell table:style-name="Table3.A1" office:value-type="string">
            <text:p text:style-name="Table_20_Contents">Closest continental ally; weekly correspondence; succession-relationship complexity</text:p>
          </table:table-cell>
        </table:table-row>
        <table:table-row>
          <table:table-cell table:style-name="Table3.A1" office:value-type="string">
            <text:p text:style-name="Table_20_Contents"><text:span text:style-name="Strong_20_Emphasis">Sydney</text:span></text:p>
          </table:table-cell>
          <table:table-cell table:style-name="Table3.A1" office:value-type="string">
            <text:p text:style-name="Table_20_Contents">Sarrasine (Independent)</text:p>
          </table:table-cell>
          <table:table-cell table:style-name="Table3.A1" office:value-type="string">
            <text:p text:style-name="Table_20_Contents">Cordial-distant via formal Camarilla-Independent diplomatic channels</text:p>
          </table:table-cell>
        </table:table-row>
        <table:table-row>
          <table:table-cell table:style-name="Table3.A1" office:value-type="string">
            <text:p text:style-name="Table_20_Contents"><text:span text:style-name="Strong_20_Emphasis">Brisbane</text:span></text:p>
          </table:table-cell>
          <table:table-cell table:style-name="Table3.A1" office:value-type="string">
            <text:p text:style-name="Table_20_Contents">Bishop Callista Vox (Sabbat)</text:p>
          </table:table-cell>
          <table:table-cell table:style-name="Table3.A1" office:value-type="string">
            <text:p text:style-name="Table_20_Contents">Hostile-formal; minimal contact across 50 years</text:p>
          </table:table-cell>
        </table:table-row>
        <table:table-row>
          <table:table-cell table:style-name="Table3.A1" office:value-type="string">
            <text:p text:style-name="Table_20_Contents"><text:span text:style-name="Strong_20_Emphasis">Perth</text:span></text:p>
          </table:table-cell>
          <table:table-cell table:style-name="Table3.A1" office:value-type="string">
            <text:p text:style-name="Table_20_Contents">(Independent, no formal Praxis)</text:p>
          </table:table-cell>
          <table:table-cell table:style-name="Table3.A1" office:value-type="string">
            <text:p text:style-name="Table_20_Contents">Operational isolation; no active diplomatic infrastructur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Adelaide produces chronicle textures other Australian cities do not:</text:p>
      <text:h text:style-name="Heading_20_3" text:outline-level="3"><text:span text:style-name="Strong_20_Emphasis">The smaller-town intimacy</text:span></text:h>
      <text:p text:style-name="Text_20_body">Every Adelaide chronicle scene operates implicitly within the smaller-domain register. Adelaide Kindred know each other personally; the Princely court is not abstract institutional infrastructure but specific Kindred Octavia has known across decades. The texture: when {{user}} attends an Adelaide Camarilla formal court occasion, the attendees are recognisable individuals with whom {{user}}'s character has accumulated personal relationships, and the political dynamics include personal-relationship texture that Melbourne's larger court infrastructure mediates more impersonally. {{user}} characters who try to operate on Melbourne-Camarilla-larger-institutional-register in Adelaide consistently produce social friction; Adelaide expects personal acknowledgment.</text:p>
      <text:h text:style-name="Heading_20_3" text:outline-level="3"><text:span text:style-name="Strong_20_Emphasis">The deliberate orthodoxy as ambient register</text:span></text:h>
      <text:p text:style-name="Text_20_body">Adelaide Camarilla operates under deliberately conservative Tower-formal practice. Court occasions retain Edwardian-influenced ceremonial structure. Octavia signs correspondence "Prince Octavia Marsh" rather than "Octavia" with continental Camarilla counterparts. The texture: Adelaide chronicle scenes carry institutional weight that Melbourne's Australian-informal-accommodation does not match — formal Princely register is genuinely formal, court ceremony is genuinely ceremonial, and the orthodoxy is not adornment but operational infrastructure. {{user}} characters from Melbourne or other Australian domains experience Adelaide as visiting a more institutionally-rigorous Camarilla space than they are accustomed to.</text:p>
      <text:h text:style-name="Heading_20_3" text:outline-level="3"><text:span text:style-name="Strong_20_Emphasis">Strategic-depth identity as cultural confidence</text:span></text:h>
      <text:p text:style-name="Text_20_body">Adelaide is Lytton's Camarilla-loyal western flank, Octavia's smaller-domain operations support Melbourne's larger continental Camarilla position, and Adelaide Kindred operate with awareness that strategic-depth is their continental identity. The texture: Adelaide chronicle scenes carry cultural confidence that does not require comparison to Melbourne — Adelaide is not "smaller Melbourne" but distinct continental Camarilla city with its own institutional character developed across 102 years of geographic-isolation operational autonomy. {{user}} characters who treat Adelaide as Melbourne-with-fewer-people produce social friction that {{user}} characters who engage Adelaide on its own institutional terms avoid.</text:p>
      <text:h text:style-name="Heading_20_3" text:outline-level="3"><text:span text:style-name="Strong_20_Emphasis">The seasonal operational rhythm</text:span></text:h>
      <text:p text:style-name="Text_20_body">Adelaide's Mediterranean climate produces operational rhythm distinct from other Australian Kindred cities. The formal court calendar runs March through November. December-February operations are reduced due to summer-heat-extreme practical complications and Adelaide Festival summer-cultural-mortal-traffic. The texture: Adelaide chronicle scenes accommodate the seasonal calendar — autumn (March-May) has the heaviest court operations, winter (June-August) emphasises Mount Lofty bushland operational reduction with cross-supernatural diplomatic intensification, spring (September-November) sees operational expansion before summer reduction. {{user}} characters develop the Adelaide habit of seasonal operational planning in ways other Australian domains do not require.</text:p>
      <text:h text:style-name="Heading_20_3" text:outline-level="3"><text:soft-page-break/><text:span text:style-name="Strong_20_Emphasis">Continental coordination as operational baseline</text:span></text:h>
      <text:p text:style-name="Text_20_body">Adelaide Camarilla operates with continuing continental coordination through Lytton-Octavia formal correspondence and through periodic Melbourne-Adelaide envoy missions. The texture: Adelaide chronicle scenes occur with awareness that significant operational decisions involve Melbourne-Adelaide coordination — Octavia consults Lytton on continental-significance matters, Lytton consults Octavia on continental-strategic-implication matters, and the coordination is institutional baseline rather than exceptional. {{user}} characters operating in Adelaide encounter this continental-coordination texture as ambient operational infrastructure that smaller-domain Adelaide Camarilla considers normal practice.</text:p>
      <text:h text:style-name="Heading_20_3" text:outline-level="3"><text:span text:style-name="Strong_20_Emphasis">The Beckoning parallel pressure</text:span></text:h>
      <text:p text:style-name="Text_20_body">Octavia's Beckoning trajectory (two episodes since 2020, parallel to Lytton's pattern but at earlier stage) produces ambient chronicle pressure that smaller-domain Adelaide Camarilla absorbs less easily than Melbourne. The texture: Adelaide chronicle scenes carry awareness that Octavia's institutional position is structurally less stable than her 102 years of orthodox Princedom would suggest, and the awareness produces operational caution patterns that Adelaide senior Camarilla operatives have begun developing across the past five years. {{user}} characters at senior Adelaide Camarilla positions encounter this ambient pressure in ways junior characters do not, producing chronicle texture that distinguishes generational-tenure registers within the smaller doma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Adelaide supports chronicles distinct from other Australian domains. The smaller-orthodox Camarilla register produces six chronicle types:</text:p>
      <text:h text:style-name="Heading_20_3" text:outline-level="3"><text:span text:style-name="Strong_20_Emphasis">1. The Strategic Depth Operative</text:span></text:h>
      <text:p text:style-name="Text_20_body">{{user}}, as senior Adelaide Camarilla operative or recent Adelaide Camarilla Kindred immigrant, is positioned within Lytton-Octavia continental coordination operations during the active phase of Sarrasine's continental destabilisation operation (2026-2028). The chronicle tracks {{user}}'s role as Adelaide-side strategic-depth operative supporting Melbourne's continental Camarilla operations: intelligence-development on Adelaide eastern-suburbs Sarrasine agent surge through Doctor Priestly's chantry-research; envoy missions between Adelaide and Melbourne carrying confidential operational intelligence Lytton-Octavia correspondence cannot accommodate; coordination with Adelaide Glass Walker sept under Septleader Hartley for Adelaide Hills operational considerations; cross-domain political-diplomatic operations through Adelaide's smaller-scale institutional infrastructure that Melbourne's larger court cannot conduct without operational visibility.</text:p>
      <text:p text:style-name="Text_20_body"><text:span text:style-name="Strong_20_Emphasis">Stakes:</text:span> Continental Camarilla operational position. {{user}}'s strategic-depth role determines Adelaide Camarilla's contribution to Phase Two response and reshapes continental Camarilla institutional position for the post-Phase-Two period.</text:p>
      <text:h text:style-name="Heading_20_3" text:outline-level="3"><text:span text:style-name="Strong_20_Emphasis">2. The Orthodox Tradition Inheritor</text:span></text:h>
      <text:p text:style-name="Text_20_body">{{user}}, as recently-positioned Adelaide Camarilla operative being prepared for senior court position (potential Primogen Council seat, potential Sheriff or Keeper of Elysium succession), navigates the cultural-institutional process Octavia conducts for senior court positions. The cultivation involves: extended formal-court attendance under deliberate observation; specific operational assignments testing competencies Octavia values; private interviews at Octavia's Strangways Terrace mansion that probe {{user}}'s ideological commitment to conservative-Camarilla orthodoxy; gradual exposure to Adelaide Camarilla institutional history and to the orthodox Edwardian-formal-register Octavia maintains as cultural commitment. The chronicle late-arc question: does {{user}} earn senior court position offer, and does {{user}}'s ideological commitment match Octavia's cultural-institutional-orthodoxy expectations?</text:p>
      <text:p text:style-name="Text_20_body"><text:span text:style-name="Strong_20_Emphasis">Stakes:</text:span> Personal political position within Adelaide domain. Successful inclusion produces senior court position with institutional weight; refusal produces gentle Octavia acceptance with quiet operational consequences {{user}} discovers across years; failed cultivation produces continuing junior position with reduced political prospects.</text:p>
      <text:h text:style-name="Heading_20_3" text:outline-level="3"><text:span text:style-name="Strong_20_Emphasis">3. The Tremere Coordination Crisis</text:span></text:h>
      <text:p text:style-name="Text_20_body">{{user}}, as Adelaide Tremere chantry operative or as Adelaide Camarilla operative with Tremere-cooperation responsibilities, navigates Doctor Priestly's complex clan-political position. The crisis involves: Tremere clan-internal pressure for closer coordination between Adelaide and Melbourne chantries; Doctor Priestly's continuing institutional autonomy preference; the post-Vienna-collapse Tremere clan-political dynamics that make continued formal independence operationally difficult; the chronicle late-arc decisions about whether Adelaide Tremere chantry merges into Lumley's Melbourne chantry, maintains formal independence with continuing operational coordination, or develops alternative continental Tremere institutional position. The chronicle's tension: every option carries significant institutional cost, and the decision Doctor Priestly has deferred for fourteen years <text:soft-page-break/>cannot be deferred indefinitely.</text:p>
      <text:p text:style-name="Text_20_body"><text:span text:style-name="Strong_20_Emphasis">Stakes:</text:span> Tremere clan-internal continental Australian position. {{user}}'s role in Doctor Priestly's decision determines Adelaide Tremere chantry's continued operational character and reshapes continental Tremere institutional infrastructure.</text:p>
      <text:h text:style-name="Heading_20_3" text:outline-level="3"><text:span text:style-name="Strong_20_Emphasis">4. The Adelaide Hills Cross-Supernatural Engagement</text:span></text:h>
      <text:p text:style-name="Text_20_body">{{user}}, as Adelaide Camarilla operative with cross-supernatural diplomatic responsibilities or as Tremere chantry operative engaged in Glass-Walker-research cooperation, navigates the continuing cross-supernatural cooperation patterns Adelaide Camarilla has cultivated with Septleader Hartley's Mount Lofty Ranges sept. The chronicle involves: formal Octavia-Hartley quarterly meetings at Adelaide Botanic Gardens with {{user}} as participant or witness; ongoing operational-cooperation with sept-territory Adelaide Hills bushland-fringe operations; cross-supernatural ritual-research Doctor Priestly conducts with sept-Theurge cooperation; potential chronicle scenarios involving the 2026 continental Glass-Walker northern-septs operation that affects Adelaide-Glass-Walker relationships; cross-supernatural diplomatic register that Adelaide's smaller-domain produces with more informal-personal-character than Melbourne's larger Cress-Truce-formal-infrastructure.</text:p>
      <text:p text:style-name="Text_20_body"><text:span text:style-name="Strong_20_Emphasis">Stakes:</text:span> Adelaide-Glass-Walker continuing diplomatic cooperation. Successful engagement deepens continental cross-supernatural diplomatic infrastructure; failed engagement produces sept-relationship damage with continental implications; {{user}}'s development of cross-supernatural diplomatic competence through Adelaide's smaller-scale produces unique operational identity.</text:p>
      <text:h text:style-name="Heading_20_3" text:outline-level="3"><text:span text:style-name="Strong_20_Emphasis">5. The Octavia Beckoning Crisis</text:span></text:h>
      <text:p text:style-name="Text_20_body">{{user}} reaches the chronicle late-arc moment where Octavia's Beckoning trajectory becomes operationally acute — a third Beckoning episode that Octavia's resistance cannot fully manage, producing Princely succession crisis Adelaide Camarilla has not experienced in 102 years. The chronicle involves: the immediate operational crisis Adelaide Camarilla faces with Princely-authority destabilisation; Lytton's Melbourne-Adelaide envoy operations to support Adelaide institutional continuity; potential Praxis-succession candidates including Harriet Whitworth-Scribe (Seneschal-equivalent), Doctor Ellen Priestly (Tremere chantry-master), or external candidates that continental Camarilla would consider; cross-domain implications including Lytton's own Beckoning trajectory; chronicle-defining decisions about Adelaide Camarilla's institutional future.</text:p>
      <text:p text:style-name="Text_20_body"><text:span text:style-name="Strong_20_Emphasis">Stakes:</text:span> Adelaide Camarilla institutional continuity. {{user}}'s role in the succession crisis determines Adelaide Camarilla's post-Octavia continental position and reshapes Australian Camarilla institutional infrastructure across multiple decades.</text:p>
      <text:h text:style-name="Heading_20_3" text:outline-level="3"><text:span text:style-name="Strong_20_Emphasis">6. The Adelaide-Melbourne Convergence</text:span></text:h>
      <text:p text:style-name="Text_20_body">{{user}} navigates the chronicle late-arc moment where the Lytton-Octavia continental coordination's increasing strain reaches institutional crisis — both Princes' Beckoning trajectories converging, continental Sarrasine pressure escalating, AFP-Twilight-Project operational intensification, and the broader continental Camarilla institutional pressure producing the relationship's transformation. The chronicle involves: chronicle-defining envoy operations between Melbourne and Adelaide carrying succession-protocol negotiations; continental Camarilla institutional reorganisation that may produce formal Adelaide-Melbourne unified Princedom (an <text:soft-page-break/>unprecedented continental Camarilla configuration), separate Princedoms with successor-arrangements that Octavia and Lytton have been developing across 2022-2025, or alternative configurations that continental Camarilla has not previously produced; cross-domain implications affecting Sydney's Sarrasine relationships, Brisbane Sabbat operational pressure, and continental Cress Truce stability.</text:p>
      <text:p text:style-name="Text_20_body"><text:span text:style-name="Strong_20_Emphasis">Stakes:</text:span> Continental Australian Camarilla institutional configuration. {{user}}'s role in the convergence determines continental Camarilla's post-Lytton-Octavia institutional infrastructure and reshapes Australian Kindred politics for the subsequent multi-decade period.</text:p>
      <text:p text:style-name="P1"><text:span text:style-name="Strong_20_Emphasis">The Adelaide supplement is complete.</text:span> A 14-entry lorebook covering Prince Octavia Marsh's smaller-domain Camarilla authority, the Adelaide court structure (Seneschal, six Primogen, Harpy, Keeper of Elysium, Sheriff, with Banu Haqim/Lasombra/Scourge UNFILLED reflecting the smaller scale), the city's distinctive districts (CBD, North Adelaide, Norwood/Burnside/Eastern Suburbs, Port Adelaide/Western Suburbs, Adelaide Hills, Mount Lofty Ranges Garou Zone), the Adelaide Tremere daughter-chantry under Doctor Ellen Priestly with its post-Vienna clan-political pressure, the Lytton-Octavia continental coordination relationship and its current operational intensification, Adelaide's pre-Octavia history under Theodore Marsh, current external pressures (Sarrasine, AFP-TP, Brisbane Sabbat, Sydney domain), and the distinctive Adelaide smaller-town orthodox Camarilla register characteristics. Six chronicle hooks specific to Adelaide. Full cross-domain continuity completing the four major Australian Kindred metropolitan domai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8:51:44.322255825</dc:date>
    <meta:editing-duration>PT4M8S</meta:editing-duration>
    <meta:editing-cycles>1</meta:editing-cycles>
    <meta:document-statistic meta:table-count="3" meta:image-count="0" meta:object-count="0" meta:page-count="8" meta:paragraph-count="177" meta:word-count="2117" meta:character-count="18731" meta:non-whitespace-character-count="16772"/>
    <meta:generator>LibreOffice/24.2.7.2$Linux_X86_64 LibreOffice_project/420$Build-2</meta:generator>
  </office:meta>
</office:document-meta>
</file>