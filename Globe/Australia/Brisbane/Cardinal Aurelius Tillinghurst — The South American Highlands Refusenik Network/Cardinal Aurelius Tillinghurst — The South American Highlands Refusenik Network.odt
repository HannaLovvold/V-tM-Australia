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813cm"/>
    </style:style>
    <style:style style:name="Table1.B" style:family="table-column">
      <style:table-column-properties style:column-width="1.857cm"/>
    </style:style>
    <style:style style:name="Table1.C" style:family="table-column">
      <style:table-column-properties style:column-width="4.327cm"/>
    </style:style>
    <style:style style:name="Table1.D" style:family="table-column">
      <style:table-column-properties style:column-width="2.163cm"/>
    </style:style>
    <style:style style:name="Table1.E" style:family="table-column">
      <style:table-column-properties style:column-width="6.8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962cm"/>
    </style:style>
    <style:style style:name="Table2.B" style:family="table-column">
      <style:table-column-properties style:column-width="7.202cm"/>
    </style:style>
    <style:style style:name="Table2.C" style:family="table-column">
      <style:table-column-properties style:column-width="2.385cm"/>
    </style:style>
    <style:style style:name="Table2.D" style:family="table-column">
      <style:table-column-properties style:column-width="2.32cm"/>
    </style:style>
    <style:style style:name="Table2.E" style:family="table-column">
      <style:table-column-properties style:column-width="2.133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4.65cm"/>
    </style:style>
    <style:style style:name="Table3.B" style:family="table-column">
      <style:table-column-properties style:column-width="5.532cm"/>
    </style:style>
    <style:style style:name="Table3.C" style:family="table-column">
      <style:table-column-properties style:column-width="3.875cm"/>
    </style:style>
    <style:style style:name="Table3.D" style:family="table-column">
      <style:table-column-properties style:column-width="2.944cm"/>
    </style:style>
    <style:style style:name="Table3.A1" style:family="table-cell">
      <style:table-cell-properties style:vertical-align="middle" fo:padding="0.049cm" fo:border="none"/>
    </style:style>
    <style:style style:name="Table4" style:family="table">
      <style:table-properties style:width="19.218cm" table:align="left"/>
    </style:style>
    <style:style style:name="Table4.A" style:family="table-column">
      <style:table-column-properties style:column-width="2.519cm"/>
    </style:style>
    <style:style style:name="Table4.B" style:family="table-column">
      <style:table-column-properties style:column-width="7.992cm"/>
    </style:style>
    <style:style style:name="Table4.C" style:family="table-column">
      <style:table-column-properties style:column-width="3.902cm"/>
    </style:style>
    <style:style style:name="Table4.D" style:family="table-column">
      <style:table-column-properties style:column-width="4.805cm"/>
    </style:style>
    <style:style style:name="Table4.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able_20_Contents">
      <style:text-properties fo:font-size="2pt" style:font-size-asian="2pt" style:font-size-complex="2pt"/>
    </style:style>
    <style:style style:name="P4" style:family="paragraph" style:parent-style-name="Preformatted_20_Text">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supplement extending the Sabbat-refusenik global picture to its final remaining Cardinal — Cardinal Aurelius Tillinghurst of Bogotá, whose South American highlands refusenik network operates across the Andean cordillera from Colombia south through Ecuador, Peru, and Bolivia, with continuing institutional infrastructure that traces through colonial-Spanish Sabbat operations, Liberation-era political reorganisation, and 20th-century continental adaptation. The supplement completes the global Sabbat-refusenik infrastructure picture by providing the Atlantic-Pacific bridging continental network that connects through cross-Atlantic-Pacific correspondence with Cardinal Reyna's Pacific Northwest corridor.</text:p>
      <text:p text:style-name="Text_20_body"><text:span text:style-name="Strong_20_Emphasis">Distinctive features of this supplement:</text:span></text:p>
      <text:list text:style-name="L1">
        <text:list-item>
          <text:p text:style-name="P6"><text:span text:style-name="Strong_20_Emphasis">Cardinal Aurelius Tillinghurst</text:span> — Ventrue antitribu, 6th generation, ~580 years Embraced (the oldest of the three remaining Cardinals), the senior Ventrue-antitribu refusenik figure globally, with operational character distinct from Cardinal Reyna's Lasombra-refusenik framework or Cardinal Magdalena's Tzimisce-tradition framework </text:p>
        </text:list-item>
        <text:list-item>
          <text:p text:style-name="P6"><text:span text:style-name="Strong_20_Emphasis">Andean cordillera operational corridor</text:span> — Bogotá (primary), Quito, La Paz, Lima, Sucre, plus smaller positions across the Andean highlands and Amazonian-edge transitions </text:p>
        </text:list-item>
        <text:list-item>
          <text:p text:style-name="P6"><text:span text:style-name="Strong_20_Emphasis">Cross-Atlantic-Pacific correspondence</text:span> — the second cross-Cardinal correspondence channel currently operational globally, maintained through specific San Francisco-Lima ghouled-mortal-shipping infrastructure under Cardinal Reyna's continental Pacific-Coast intelligence cooperation with Cardinal Tillinghurst's continental highlands network </text:p>
        </text:list-item>
        <text:list-item>
          <text:p text:style-name="P6"><text:span text:style-name="Strong_20_Emphasis">Colonial-Spanish institutional inheritance with Liberation-era reorganisation</text:span> — the network's institutional roots trace through 16th-century colonial-Spanish Sabbat operations and through 19th-century Liberation-era political-institutional restructuring that produced continental-Andean Sabbat infrastructure distinct from European-derived institutional patterns </text:p>
        </text:list-item>
        <text:list-item>
          <text:p text:style-name="P6"><text:span text:style-name="Strong_20_Emphasis">Ventrue-antitribu theological-political register</text:span> — distinct from Lasombra-refusenik or Tzimisce-tradition frameworks, with continuing pre-1999 Ventrue-antitribu institutional practice as theological-political foundation </text:p>
        </text:list-item>
        <text:list-item>
          <text:p text:style-name="P6"><text:span text:style-name="Strong_20_Emphasis">Continental-Andean political context</text:span> — the network operates within complex multi-state political environment (Colombia, Ecuador, Peru, Bolivia, plus Argentine and Chilean adjacencies) with continuing post-civil-war operational adaptation in Colombia, continuing ethnic-political dynamics across the Andean highlands, and continental-Andean drug-cartel-political-environment context that produces operational conditions distinct from other continental Sabbat-refusenik political contexts </text:p>
        </text:list-item>
        <text:list-item>
          <text:p text:style-name="P5"><text:span text:style-name="Strong_20_Emphasis">The oldest Cardinal globally</text:span> — Cardinal Tillinghurst's 580-year tenure produces continuing institutional weight that exceeds Cardinal Reyna's 414 years and Cardinal Magdalena's 402 years; he is the senior surviving figure of the global Sabbat-refusenik network and the closest figure to actual methuselah-tier age across the network </text:p>
        </text:list-item>
      </text:list>
      <text:p text:style-name="Text_20_body"><text:span text:style-name="Strong_20_Emphasis">Chronicle position:</text:span> This supplement completes the global Sabbat-refusenik infrastructure picture. Chronicles can engage South American highlands operations independently, as Atlantic-Pacific bridging extension of cross-Pacific refusenik chronicle work, or as global Sabbat-refusenik infrastructure chronicles spanning all three remaining Cardinal networks.</text:p>
      <text:p text:style-name="Preformatted_20_Text"/>
      <text:p text:style-name="Preformatted_20_Text"/>
      <text:p text:style-name="Preformatted_20_Text"/>
      <text:p text:style-name="Preformatted_20_Text"/>
      <text:p text:style-name="P1"><text:soft-page-break/>A 14-entry lorebook providing Cardinal Tillinghurst's network, the Andean cordillera operational corridor, the cross-Atlantic-Pacific correspondence channel, the colonial-Spanish institutional inheritance with Liberation-era reorganisation, the Ventrue-antitribu refusenik theological-political register, and the continental-Andean political context. Designed to layer alongside <text:span text:style-name="Source_20_Text"><text:span text:style-name="T1">vtm_modern_nights.json</text:span></text:span> and (typically) <text:span text:style-name="Source_20_Text"><text:span text:style-name="T1">vtm_cross_pacific_refusenik.json</text:span></text:span>; useful adjacent to <text:span text:style-name="Source_20_Text"><text:span text:style-name="T1">vtm_russian_far_east_refusenik.json</text:span></text:span> for chronicles engaging the global Sabbat-refusenik infrastructure picture across all three remaining Cardinals.</text:p>
      <text:p text:style-name="P1"/>
      <text:p text:style-name="P1">load alongside <text:span text:style-name="Source_20_Text"><text:span text:style-name="T1">vtm_modern_nights.json</text:span></text:span> and (typically) <text:span text:style-name="Source_20_Text"><text:span text:style-name="T1">vtm_cross_pacific_refusenik.json</text:span></text:span> for chronicles engaging Cardinal Tillinghurst's network or completing the global Sabbat-refusenik infrastructure picture. Optionally layer with <text:span text:style-name="Source_20_Text"><text:span text:style-name="T1">vtm_russian_far_east_refusenik.json</text:span></text:span> for chronicles engaging the global Sabbat-refusenik infrastructure picture across all three remaining Cardinal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Node</text:p>
            </table:table-cell>
            <table:table-cell table:style-name="Table1.A1" office:value-type="string">
              <text:p text:style-name="Table_20_Heading">Country</text:p>
            </table:table-cell>
            <table:table-cell table:style-name="Table1.A1" office:value-type="string">
              <text:p text:style-name="Table_20_Heading">Authority</text:p>
            </table:table-cell>
            <table:table-cell table:style-name="Table1.A1" office:value-type="string">
              <text:p text:style-name="Table_20_Heading">Population</text:p>
            </table:table-cell>
            <table:table-cell table:style-name="Table1.A1" office:value-type="string">
              <text:p text:style-name="Table_20_Heading">Operational specialty</text:p>
            </table:table-cell>
          </table:table-row>
        </table:table-header-rows>
        <table:table-row>
          <table:table-cell table:style-name="Table1.A1" office:value-type="string">
            <text:p text:style-name="Table_20_Contents"><text:span text:style-name="Strong_20_Emphasis">Bogotá</text:span></text:p>
          </table:table-cell>
          <table:table-cell table:style-name="Table1.A1" office:value-type="string">
            <text:p text:style-name="Table_20_Contents">Colombia</text:p>
          </table:table-cell>
          <table:table-cell table:style-name="Table1.A1" office:value-type="string">
            <text:p text:style-name="Table_20_Contents">Cardinal Aurelius Tillinghurst</text:p>
          </table:table-cell>
          <table:table-cell table:style-name="Table1.A1" office:value-type="string">
            <text:p text:style-name="Table_20_Contents">~14 Sabbat</text:p>
          </table:table-cell>
          <table:table-cell table:style-name="Table1.A1" office:value-type="string">
            <text:p text:style-name="Table_20_Contents">Network central node, Catholic Church cooperation, colonial-Spanish institutional preservation</text:p>
          </table:table-cell>
        </table:table-row>
        <table:table-row>
          <table:table-cell table:style-name="Table1.A1" office:value-type="string">
            <text:p text:style-name="Table_20_Contents"><text:span text:style-name="Strong_20_Emphasis">Quito</text:span></text:p>
          </table:table-cell>
          <table:table-cell table:style-name="Table1.A1" office:value-type="string">
            <text:p text:style-name="Table_20_Contents">Ecuador</text:p>
          </table:table-cell>
          <table:table-cell table:style-name="Table1.A1" office:value-type="string">
            <text:p text:style-name="Table_20_Contents">Bishop Isabel Cordero-Vega</text:p>
          </table:table-cell>
          <table:table-cell table:style-name="Table1.A1" office:value-type="string">
            <text:p text:style-name="Table_20_Contents">~10 Sabbat</text:p>
          </table:table-cell>
          <table:table-cell table:style-name="Table1.A1" office:value-type="string">
            <text:p text:style-name="Table_20_Contents">Continental-Andean ethnic-political infrastructure, indigenous-political-rights navigation</text:p>
          </table:table-cell>
        </table:table-row>
        <table:table-row>
          <table:table-cell table:style-name="Table1.A1" office:value-type="string">
            <text:p text:style-name="Table_20_Contents"><text:span text:style-name="Strong_20_Emphasis">Lima</text:span></text:p>
          </table:table-cell>
          <table:table-cell table:style-name="Table1.A1" office:value-type="string">
            <text:p text:style-name="Table_20_Contents">Peru</text:p>
          </table:table-cell>
          <table:table-cell table:style-name="Table1.A1" office:value-type="string">
            <text:p text:style-name="Table_20_Contents">Bishop Don Federico Ayala-Mendoza</text:p>
          </table:table-cell>
          <table:table-cell table:style-name="Table1.A1" office:value-type="string">
            <text:p text:style-name="Table_20_Contents">~9 Sabbat</text:p>
          </table:table-cell>
          <table:table-cell table:style-name="Table1.A1" office:value-type="string">
            <text:p text:style-name="Table_20_Contents">Cross-Atlantic-Pacific correspondence coordination, Pacific-coast institutional infrastructure</text:p>
          </table:table-cell>
        </table:table-row>
        <table:table-row>
          <table:table-cell table:style-name="Table1.A1" office:value-type="string">
            <text:p text:style-name="Table_20_Contents"><text:span text:style-name="Strong_20_Emphasis">La Paz</text:span></text:p>
          </table:table-cell>
          <table:table-cell table:style-name="Table1.A1" office:value-type="string">
            <text:p text:style-name="Table_20_Contents">Bolivia</text:p>
          </table:table-cell>
          <table:table-cell table:style-name="Table1.A1" office:value-type="string">
            <text:p text:style-name="Table_20_Contents">Bishop Hermenegildo Yupanqui-Peralta</text:p>
          </table:table-cell>
          <table:table-cell table:style-name="Table1.A1" office:value-type="string">
            <text:p text:style-name="Table_20_Contents">~8 Sabbat</text:p>
          </table:table-cell>
          <table:table-cell table:style-name="Table1.A1" office:value-type="string">
            <text:p text:style-name="Table_20_Contents">Continental Aymara/Quechua mortal-cultural cooperation, high-altitude institutional centre</text:p>
          </table:table-cell>
        </table:table-row>
        <table:table-row>
          <table:table-cell table:style-name="Table1.A1" office:value-type="string">
            <text:p text:style-name="Table_20_Contents"><text:span text:style-name="Strong_20_Emphasis">Sucre</text:span></text:p>
          </table:table-cell>
          <table:table-cell table:style-name="Table1.A1" office:value-type="string">
            <text:p text:style-name="Table_20_Contents">Bolivia</text:p>
          </table:table-cell>
          <table:table-cell table:style-name="Table1.A1" office:value-type="string">
            <text:p text:style-name="Table_20_Contents">Pack-Leader Lucía Castelblanco-Aragón</text:p>
          </table:table-cell>
          <table:table-cell table:style-name="Table1.A1" office:value-type="string">
            <text:p text:style-name="Table_20_Contents">~5 Sabbat</text:p>
          </table:table-cell>
          <table:table-cell table:style-name="Table1.A1" office:value-type="string">
            <text:p text:style-name="Table_20_Contents">Continental-Andean historical-institutional preservation, pre-Liberation institutional infrastructure</text:p>
          </table:table-cell>
        </table:table-row>
        <table:table-row>
          <table:table-cell table:style-name="Table1.A1" office:value-type="string">
            <text:p text:style-name="Table_20_Contents"><text:span text:style-name="Strong_20_Emphasis">Medellín</text:span></text:p>
          </table:table-cell>
          <table:table-cell table:style-name="Table1.A1" office:value-type="string">
            <text:p text:style-name="Table_20_Contents">Colombia</text:p>
          </table:table-cell>
          <table:table-cell table:style-name="Table1.A1" office:value-type="string">
            <text:p text:style-name="Table_20_Contents">(smaller node)</text:p>
          </table:table-cell>
          <table:table-cell table:style-name="Table1.A1" office:value-type="string">
            <text:p text:style-name="Table_20_Contents">~2 Sabbat</text:p>
          </table:table-cell>
          <table:table-cell table:style-name="Table1.A1" office:value-type="string">
            <text:p text:style-name="Table_20_Contents">Colombian secondary-position institutional support</text:p>
          </table:table-cell>
        </table:table-row>
        <table:table-row>
          <table:table-cell table:style-name="Table1.A1" office:value-type="string">
            <text:p text:style-name="Table_20_Contents"><text:span text:style-name="Strong_20_Emphasis">Cusco</text:span></text:p>
          </table:table-cell>
          <table:table-cell table:style-name="Table1.A1" office:value-type="string">
            <text:p text:style-name="Table_20_Contents">Peru</text:p>
          </table:table-cell>
          <table:table-cell table:style-name="Table1.A1" office:value-type="string">
            <text:p text:style-name="Table_20_Contents">(single figure)</text:p>
          </table:table-cell>
          <table:table-cell table:style-name="Table1.A1" office:value-type="string">
            <text:p text:style-name="Table_20_Contents">1 Sabbat</text:p>
          </table:table-cell>
          <table:table-cell table:style-name="Table1.A1" office:value-type="string">
            <text:p text:style-name="Table_20_Contents">Pre-Columbian-tradition continuing institutional preservation under Sabbat institutional cover</text:p>
          </table:table-cell>
        </table:table-row>
        <table:table-row>
          <table:table-cell table:style-name="Table1.A1" office:value-type="string">
            <text:p text:style-name="Table_20_Contents"><text:span text:style-name="Strong_20_Emphasis">Potosí</text:span></text:p>
          </table:table-cell>
          <table:table-cell table:style-name="Table1.A1" office:value-type="string">
            <text:p text:style-name="Table_20_Contents">Bolivia</text:p>
          </table:table-cell>
          <table:table-cell table:style-name="Table1.A1" office:value-type="string">
            <text:p text:style-name="Table_20_Contents">(single figure)</text:p>
          </table:table-cell>
          <table:table-cell table:style-name="Table1.A1" office:value-type="string">
            <text:p text:style-name="Table_20_Contents">1 Sabbat</text:p>
          </table:table-cell>
          <table:table-cell table:style-name="Table1.A1" office:value-type="string">
            <text:p text:style-name="Table_20_Contents">Pre-Columbian-tradition continuing institutional preservation through colonial-silver-mining historical position</text:p>
          </table:table-cell>
        </table:table-row>
      </table:table>
      <text:p text:style-name="Text_20_body"><text:span text:style-name="Strong_20_Emphasis">Plus pre-Columbian-tradition continuing institutional infrastructure:</text:span> Approximately 8 pre-Columbian-tradition Andean Kindred operatives scattered across the Andean cordillera under continuing institutional preservation through Cardinal Aurelius's network institutional cooperation.</text:p>
      <text:p text:style-name="Text_20_body"><text:span text:style-name="Strong_20_Emphasis">Total South American highlands network plus pre-Columbian institutional infrastructure:</text:span> ~58 Sabbat operatives across approximately 12 institutional positions (8 primary Sabbat-refusenik plus pre-Columbian-tradition continuing infrastructure), organised under Cardinal Aurelius's continental authority.</text:p>
      <text:h text:style-name="Heading_20_3" text:outline-level="3"><text:span text:style-name="Strong_20_Emphasis">The global Sabbat-refusenik infrastructure picture (completed):</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Continental Authority</text:p>
            </table:table-cell>
            <table:table-cell table:style-name="Table2.A1" office:value-type="string">
              <text:p text:style-name="Table_20_Heading">Network</text:p>
            </table:table-cell>
            <table:table-cell table:style-name="Table2.A1" office:value-type="string">
              <text:p text:style-name="Table_20_Heading">Population</text:p>
            </table:table-cell>
            <table:table-cell table:style-name="Table2.A1" office:value-type="string">
              <text:p text:style-name="Table_20_Heading">Cardinal generation</text:p>
            </table:table-cell>
            <table:table-cell table:style-name="Table2.A1" office:value-type="string">
              <text:p text:style-name="Table_20_Heading">Embrace tenure</text:p>
            </table:table-cell>
          </table:table-row>
        </table:table-header-rows>
        <table:table-row>
          <table:table-cell table:style-name="Table2.A1" office:value-type="string">
            <text:p text:style-name="Table_20_Contents"><text:span text:style-name="Strong_20_Emphasis">Cardinal Aurelius Tillinghurst</text:span> (this supplement)</text:p>
          </table:table-cell>
          <table:table-cell table:style-name="Table2.A1" office:value-type="string">
            <text:p text:style-name="Table_20_Contents">South American highlands corridor + pre-Columbian institutional preservation</text:p>
          </table:table-cell>
          <table:table-cell table:style-name="Table2.A1" office:value-type="string">
            <text:p text:style-name="Table_20_Contents">~58 Sabbat</text:p>
          </table:table-cell>
          <table:table-cell table:style-name="Table2.A1" office:value-type="string">
            <text:p text:style-name="Table_20_Contents">Ventrue antitribu, 6th gen</text:p>
          </table:table-cell>
          <table:table-cell table:style-name="Table2.A1" office:value-type="string">
            <text:p text:style-name="Table_20_Contents"><text:span text:style-name="Strong_20_Emphasis">580 years</text:span> (oldest globally)</text:p>
          </table:table-cell>
        </table:table-row>
        <table:table-row>
          <table:table-cell table:style-name="Table2.A1" office:value-type="string">
            <text:p text:style-name="Table_20_Contents"><text:span text:style-name="Strong_20_Emphasis">Cardinal Reyna Quiñones</text:span></text:p>
          </table:table-cell>
          <table:table-cell table:style-name="Table2.A1" office:value-type="string">
            <text:p text:style-name="Table_20_Contents">Pacific Northwest corridor (San Francisco-Portland-Seattle-Vancouver)</text:p>
          </table:table-cell>
          <table:table-cell table:style-name="Table2.A1" office:value-type="string">
            <text:p text:style-name="Table_20_Contents">~40 Sabbat</text:p>
          </table:table-cell>
          <table:table-cell table:style-name="Table2.A1" office:value-type="string">
            <text:p text:style-name="Table_20_Contents">Lasombra antitribu, 7th gen</text:p>
          </table:table-cell>
          <table:table-cell table:style-name="Table2.A1" office:value-type="string">
            <text:p text:style-name="Table_20_Contents">414 years</text:p>
          </table:table-cell>
        </table:table-row>
        <table:table-row>
          <table:table-cell table:style-name="Table2.A1" office:value-type="string">
            <text:p text:style-name="Table_20_Contents"><text:span text:style-name="Strong_20_Emphasis">Cardinal Magdalena Volkov</text:span></text:p>
          </table:table-cell>
          <table:table-cell table:style-name="Table2.A1" office:value-type="string">
            <text:p text:style-name="Table_20_Contents">Russian Far East corridor + continental Russian remnants</text:p>
          </table:table-cell>
          <table:table-cell table:style-name="Table2.A1" office:value-type="string">
            <text:p text:style-name="Table_20_Contents">~45 Sabbat</text:p>
          </table:table-cell>
          <table:table-cell table:style-name="Table2.A1" office:value-type="string">
            <text:p text:style-name="Table_20_Contents">Tzimisce, 7th gen</text:p>
          </table:table-cell>
          <table:table-cell table:style-name="Table2.A1" office:value-type="string">
            <text:p text:style-name="Table_20_Contents">402 years</text:p>
          </table:table-cell>
        </table:table-row>
        <text:soft-page-break/>
        <table:table-row>
          <table:table-cell table:style-name="Table2.A1" office:value-type="string">
            <text:p text:style-name="Table_20_Contents"><text:span text:style-name="Strong_20_Emphasis">Templar Abernathy</text:span> (under Bishop Callista)</text:p>
          </table:table-cell>
          <table:table-cell table:style-name="Table2.A1" office:value-type="string">
            <text:p text:style-name="Table_20_Contents">Brisbane Australian connection</text:p>
          </table:table-cell>
          <table:table-cell table:style-name="Table2.A1" office:value-type="string">
            <text:p text:style-name="Table_20_Contents">(within ~40 Brisbane Sabbat)</text:p>
          </table:table-cell>
          <table:table-cell table:style-name="Table2.A1" office:value-type="string">
            <text:p text:style-name="Table_20_Contents">Lasombra antitribu, 9th gen</text:p>
          </table:table-cell>
          <table:table-cell table:style-name="Table2.A1" office:value-type="string">
            <text:p text:style-name="Table_20_Contents">153 years</text:p>
          </table:table-cell>
        </table:table-row>
        <table:table-row>
          <table:table-cell table:style-name="Table2.A1" office:value-type="string">
            <text:p text:style-name="Table_20_Contents"><text:span text:style-name="Strong_20_Emphasis">Smaller Pacific Rim nodes</text:span></text:p>
          </table:table-cell>
          <table:table-cell table:style-name="Table2.A1" office:value-type="string">
            <text:p text:style-name="Table_20_Contents">Honolulu, Manila, Singapore, Auckland, plus smaller positions</text:p>
          </table:table-cell>
          <table:table-cell table:style-name="Table2.A1" office:value-type="string">
            <text:p text:style-name="Table_20_Contents">~135 Sabbat</text:p>
          </table:table-cell>
          <table:table-cell table:style-name="Table2.A1" office:value-type="string">
            <text:p text:style-name="Table_20_Contents">Various</text:p>
          </table:table-cell>
          <table:table-cell table:style-name="Table2.A1" office:value-type="string">
            <text:p text:style-name="Table_20_Contents">Various</text:p>
          </table:table-cell>
        </table:table-row>
        <table:table-row>
          <table:table-cell table:style-name="Table2.A1" office:value-type="string">
            <text:p text:style-name="Table_20_Contents"><text:span text:style-name="Strong_20_Emphasis">Global cross-Pacific total</text:span></text:p>
          </table:table-cell>
          <table:table-cell table:style-name="Table2.A1" office:value-type="string">
            <text:p text:style-name="P3"/>
          </table:table-cell>
          <table:table-cell table:style-name="Table2.A1" office:value-type="string">
            <text:p text:style-name="Table_20_Contents"><text:span text:style-name="Strong_20_Emphasis">~305 Sabbat</text:span></text:p>
          </table:table-cell>
          <table:table-cell table:style-name="Table2.A1" office:value-type="string">
            <text:p text:style-name="P3"/>
          </table:table-cell>
          <table:table-cell table:style-name="Table2.A1" office:value-type="string">
            <text:p text:style-name="P3"/>
          </table:table-cell>
        </table:table-row>
      </table:table>
      <text:h text:style-name="Heading_20_3" text:outline-level="3"><text:span text:style-name="Strong_20_Emphasis">The two cross-Cardinal correspondence channels currently operational (both detailed):</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Channel</text:p>
            </table:table-cell>
            <table:table-cell table:style-name="Table3.A1" office:value-type="string">
              <text:p text:style-name="Table_20_Heading">Coordination</text:p>
            </table:table-cell>
            <table:table-cell table:style-name="Table3.A1" office:value-type="string">
              <text:p text:style-name="Table_20_Heading">Frequency</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text:span text:style-name="Strong_20_Emphasis">Cross-Bering-Strait</text:span></text:p>
          </table:table-cell>
          <table:table-cell table:style-name="Table3.A1" office:value-type="string">
            <text:p text:style-name="Table_20_Contents">Cardinal Magdalena ↔ Cardinal Reyna via Pack-Leader Volkov-Petrov (sire-childe family-cousinage coordination)</text:p>
          </table:table-cell>
          <table:table-cell table:style-name="Table3.A1" office:value-type="string">
            <text:p text:style-name="Table_20_Contents">Quarterly correspondence + 3 formal meetings since 2014</text:p>
          </table:table-cell>
          <table:table-cell table:style-name="Table3.A1" office:value-type="string">
            <text:p text:style-name="Table_20_Contents">Russian Far East to Pacific Northwest</text:p>
          </table:table-cell>
        </table:table-row>
        <table:table-row>
          <table:table-cell table:style-name="Table3.A1" office:value-type="string">
            <text:p text:style-name="Table_20_Contents"><text:span text:style-name="Strong_20_Emphasis">Cross-Atlantic-Pacific</text:span> (this supplement)</text:p>
          </table:table-cell>
          <table:table-cell table:style-name="Table3.A1" office:value-type="string">
            <text:p text:style-name="Table_20_Contents">Cardinal Aurelius ↔ Cardinal Reyna via Bishop Ayala-Mendoza (Bishop-tier institutional coordination)</text:p>
          </table:table-cell>
          <table:table-cell table:style-name="Table3.A1" office:value-type="string">
            <text:p text:style-name="Table_20_Contents">Quarterly correspondence + 4 formal meetings since 2014</text:p>
          </table:table-cell>
          <table:table-cell table:style-name="Table3.A1" office:value-type="string">
            <text:p text:style-name="Table_20_Contents">South American highlands to Pacific Northwest</text:p>
          </table:table-cell>
        </table:table-row>
      </table:table>
      <text:p text:style-name="Text_20_body"><text:span text:style-name="Strong_20_Emphasis">Indirect cross-Cardinal coordination:</text:span> Cardinal Aurelius and Cardinal Magdalena coordinate indirectly through Cardinal Reyna's Pacific Northwest corridor as continental coordination intermediary. Direct Cardinal Aurelius-Cardinal Magdalena correspondence channel does not currently exist; chronicle-active developments could produce its establishment if continental cross-Pacific-Sabbat-refusenik institutional positioning requires it.</text:p>
      <text:h text:style-name="Heading_20_3" text:outline-level="3"><text:span text:style-name="Strong_20_Emphasis">Cross-continental cultural-political register variations (completed):</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Network</text:p>
            </table:table-cell>
            <table:table-cell table:style-name="Table4.A1" office:value-type="string">
              <text:p text:style-name="Table_20_Heading">Distinctive Register</text:p>
            </table:table-cell>
            <table:table-cell table:style-name="Table4.A1" office:value-type="string">
              <text:p text:style-name="Table_20_Heading">Theological-Political Foundation</text:p>
            </table:table-cell>
            <table:table-cell table:style-name="Table4.A1" office:value-type="string">
              <text:p text:style-name="Table_20_Heading">Cultural Integration</text:p>
            </table:table-cell>
          </table:table-row>
        </table:table-header-rows>
        <table:table-row>
          <table:table-cell table:style-name="Table4.A1" office:value-type="string">
            <text:p text:style-name="Table_20_Contents"><text:span text:style-name="Strong_20_Emphasis">Cardinal Aurelius's South American highlands</text:span> (this supplement)</text:p>
          </table:table-cell>
          <table:table-cell table:style-name="Table4.A1" office:value-type="string">
            <text:p text:style-name="Table_20_Contents">Colonial-Spanish-Liberation-modern-republic institutional inheritance, Ventrue-antitribu refusenik framework</text:p>
          </table:table-cell>
          <table:table-cell table:style-name="Table4.A1" office:value-type="string">
            <text:p text:style-name="Table_20_Contents">Continuing post-1999 Ventrue-antitribu institutional preservation</text:p>
          </table:table-cell>
          <table:table-cell table:style-name="Table4.A1" office:value-type="string">
            <text:p text:style-name="Table_20_Contents">Catholic Church institutional cooperation at archbishop level + pre-Columbian Andean continuing infrastructure</text:p>
          </table:table-cell>
        </table:table-row>
        <table:table-row>
          <table:table-cell table:style-name="Table4.A1" office:value-type="string">
            <text:p text:style-name="Table_20_Contents"><text:span text:style-name="Strong_20_Emphasis">Cardinal Reyna's Pacific Northwest</text:span></text:p>
          </table:table-cell>
          <table:table-cell table:style-name="Table4.A1" office:value-type="string">
            <text:p text:style-name="Table_20_Contents">Spanish-colonial-derived institutional infrastructure, Lasombra-refusenik framework</text:p>
          </table:table-cell>
          <table:table-cell table:style-name="Table4.A1" office:value-type="string">
            <text:p text:style-name="Table_20_Contents">Continuing post-2020 Lasombra defection refusal</text:p>
          </table:table-cell>
          <table:table-cell table:style-name="Table4.A1" office:value-type="string">
            <text:p text:style-name="Table_20_Contents">Spanish-colonial-derived Catholic-cultural register</text:p>
          </table:table-cell>
        </table:table-row>
        <table:table-row>
          <table:table-cell table:style-name="Table4.A1" office:value-type="string">
            <text:p text:style-name="Table_20_Contents"><text:span text:style-name="Strong_20_Emphasis">Cardinal Magdalena's Russian Far East</text:span></text:p>
          </table:table-cell>
          <table:table-cell table:style-name="Table4.A1" office:value-type="string">
            <text:p text:style-name="Table_20_Contents">Soviet-era institutional inheritance, Tzimisce-tradition framework</text:p>
          </table:table-cell>
          <table:table-cell table:style-name="Table4.A1" office:value-type="string">
            <text:p text:style-name="Table_20_Contents">Continuing pre-1999 Tzimisce ecclesiastical tradition</text:p>
          </table:table-cell>
          <table:table-cell table:style-name="Table4.A1" office:value-type="string">
            <text:p text:style-name="Table_20_Contents">Russian-Orthodox-cultural integration</text:p>
          </table:table-cell>
        </table:table-row>
        <table:table-row>
          <table:table-cell table:style-name="Table4.A1" office:value-type="string">
            <text:p text:style-name="Table_20_Contents"><text:span text:style-name="Strong_20_Emphasis">Templar </text:span><text:soft-page-break/><text:span text:style-name="Strong_20_Emphasis">Abernathy's Brisbane connection</text:span></text:p>
          </table:table-cell>
          <table:table-cell table:style-name="Table4.A1" office:value-type="string">
            <text:p text:style-name="Table_20_Contents">Australian continental institutional <text:soft-page-break/>positioning, Lasombra-refusenik framework</text:p>
          </table:table-cell>
          <table:table-cell table:style-name="Table4.A1" office:value-type="string">
            <text:p text:style-name="Table_20_Contents">Cross-Pacific <text:soft-page-break/>institutional support for Brisbane Sabbat-survivor operations</text:p>
          </table:table-cell>
          <table:table-cell table:style-name="Table4.A1" office:value-type="string">
            <text:p text:style-name="Table_20_Contents">Australian-continental <text:soft-page-break/>institutional context</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he South American highlands refusenik supplement enables chronicle textures distinct from Cardinal Reyna's Pacific Northwest corridor, Cardinal Magdalena's Russian Far East corridor, and broader cross-Pacific refusenik chronicle work:</text:p>
      <text:h text:style-name="Heading_20_3" text:outline-level="3"><text:span text:style-name="Strong_20_Emphasis">Colonial-Spanish institutional inheritance with Liberation-era reorganisation as continuing operational reality</text:span></text:h>
      <text:p text:style-name="Text_20_body">South American highlands chronicle scenes operate with continuing colonial-Spanish institutional inheritance modified through Liberation-era political restructuring as continuing operational reality rather than as historical context. Cardinal Aurelius's network continues to operate colonial-Spanish institutional protocols modified through Liberation-era political restructuring (continuing Catholic Church institutional cooperation that traces through colonial-Spanish era and Liberation-era institutional positioning, continuing colonial-Spanish-Liberation-modern-republic institutional cover patterns, continuing continental-Andean cross-state institutional positioning that traces through 19th-century continental Liberation political reorganisation). The texture: South American highlands chronicle scenes carry colonial-Spanish-Liberation-modern-republic institutional weight that exceeds the institutional historical depth of any other cross-Pacific refusenik network — Cardinal Aurelius's continuing colonial-Spanish institutional protocols are not historical legacy but current operational infrastructure spanning nearly six centuries of continuing institutional development.</text:p>
      <text:h text:style-name="Heading_20_3" text:outline-level="3"><text:span text:style-name="Strong_20_Emphasis">The Ventrue-antitribu theological-political register with formalised hierarchical institutional commitment</text:span></text:h>
      <text:p text:style-name="Text_20_body">South American highlands chronicle scenes engaging Cardinal Aurelius's institutional positioning operate under specifically Ventrue-antitribu theological-political register distinct from Cardinal Reyna's Lasombra-refusenik framework or Cardinal Magdalena's Tzimisce-tradition framework. Ventrue-antitribu-clan-specific theological-political commitments include: Dominate as continuing doctrinal practice; Ventrue-antitribu-clan-specific ecclesiastical hierarchy patterns including continuing institutional commitment to formalised hierarchical Sabbat ecclesiastical practice; continuing pre-Reformation Spanish noble-class aesthetic preservation through senior-figure continuing aesthetic transmission. The texture: South American highlands chronicle scenes carry Ventrue-antitribu-clan-specific institutional weight that other refusenik chronicle scenes do not match — the Ventrue-antitribu framework emphasises formalised hierarchical Sabbat institutional structure that Lasombra-refusenik or Tzimisce-tradition frameworks engage less centrally, and chronicle scenes engage continuing pre-Reformation Spanish noble-class register through specific cultural inflections.</text:p>
      <text:h text:style-name="Heading_20_3" text:outline-level="3"><text:span text:style-name="Strong_20_Emphasis">Catholic Church institutional cooperation at archbishop level as ambient register</text:span></text:h>
      <text:p text:style-name="Text_20_body">South American highlands chronicle scenes operate with continuing Catholic Church institutional cooperation as ambient register through specific institutional cooperation infrastructure including the Cardinal Aurelius-Cardenal Restrepo-Salgado Touchstone-relationship at archbishop level, continuing continental Catholic Church institutional cooperation across the network's primary nodes, and continuing pre-Reformation Spanish Catholic-cultural-tradition Ventrue-antitribu integration. The texture: South American highlands chronicle scenes engage Catholic Church institutional cooperation at unusually senior level (archbishop) that produces continuing <text:soft-page-break/>institutional cover infrastructure other cross-Pacific Sabbat-refusenik networks do not match — Cardenal Restrepo-Salgado is not a parish priest like Cardinal Reyna's Father Joaquin Vásquez-Ramírez or Cardinal Magdalena's Father Innokenty Sokolov but a continental Catholic Church senior figure at archbishop level whose Touchstone-relationship with Cardinal Aurelius produces continental-scale institutional cooperation.</text:p>
      <text:h text:style-name="Heading_20_3" text:outline-level="3"><text:span text:style-name="Strong_20_Emphasis">Continental-Andean multi-state political environment context</text:span></text:h>
      <text:p text:style-name="Text_20_body">South American highlands chronicle scenes operate within continuing continental-Andean multi-state political environment context spanning Colombia, Ecuador, Peru, Bolivia plus Argentine and Chilean adjacencies — distinct from Pacific Northwest American single-country political context, Australian continental single-country political context, or Russian Federation continental single-country political context. The continental-Andean political context includes: continuing post-2016 Colombian peace accord operational implications; continuing continental-Andean ethnic-political dynamics including indigenous-political-rights movement intensification across the Andean highlands; continuing drug-cartel-political-environment operational pressure; continuing continental-Andean cross-state institutional positioning. The texture: South American highlands chronicle scenes engage continental-Andean political environment through specific multi-state operational adaptation patterns that other cross-Pacific Sabbat-refusenik networks do not parallel — Cardinal Aurelius's network operations span four sovereign states with continuing cross-state institutional positioning that produces operational character distinct from any other cross-continental Sabbat-refusenik network.</text:p>
      <text:h text:style-name="Heading_20_3" text:outline-level="3"><text:span text:style-name="Strong_20_Emphasis">Pre-Columbian Andean institutional preservation as continuing network infrastructure</text:span></text:h>
      <text:p text:style-name="Text_20_body">South American highlands chronicle scenes operate with continuing pre-Columbian Andean institutional preservation work as continuing network infrastructure rather than as occasional historical reference. The continuing pre-Columbian Andean Kindred institutional preservation work that Cardinal Aurelius's network supports through continuing institutional cooperation includes: Cusco continuing institutional positioning (the 1-figure Cusco Sabbat operative is actually a pre-Columbian-tradition Andean Kindred operating under modern Sabbat institutional cover with continuing pre-Columbian Andean institutional preservation work); Potosí continuing institutional positioning (similar continuing pre-Columbian institutional preservation through Sabbat institutional cover); La Paz continuing indigenous-cultural integration through Bishop Yupanqui-Peralta's continuing institutional positioning; broader continental-Andean continuing pre-Columbian-tradition institutional cooperation. The texture: South American highlands chronicle scenes engage continuing pre-Columbian Andean institutional preservation work as continuing chronicle-active operations that distinguish continental Andean refusenik chronicle character from all other cross-Pacific refusenik chronicle registers — chronicle scenes carry the institutional weight of continuing pre-Columbian institutional infrastructure that traces through continuing institutional preservation arrangements developed across the colonial-Spanish period and continuing across modern-republic operational conditions.</text:p>
      <text:h text:style-name="Heading_20_3" text:outline-level="3"><text:span text:style-name="Strong_20_Emphasis">The senior surviving Cardinal globally with most acute Beckoning trajectory</text:span></text:h>
      <text:p text:style-name="Text_20_body">South American highlands chronicle scenes operate with awareness that Cardinal Aurelius is the senior surviving Cardinal globally (580 years Embraced compared to Cardinal Reyna's 414 and <text:soft-page-break/>Cardinal Magdalena's 402) with the most acute Beckoning trajectory of any of the three remaining Cardinals. The texture: South American highlands chronicle scenes carry continental institutional weight that comes from Cardinal Aurelius's nearly-six-century institutional tenure plus chronicle-active urgency that comes from his most acute Beckoning trajectory — chronicle scenes engage continental Andean institutional preservation work with awareness that continuing institutional working time may be compressed by continuing Beckoning trajectory acceleration, and continental Andean institutional positioning around continuing trajectory pressure produces continental cross-Pacific institutional positioning at chronicle-defining scale that other Sabbat-refusenik chronicle scenes do not produce at equivalent sca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he lorebook entry 12 provides six chronicle hook categories. This section expands the most chronicle-distinctive hooks into detailed chronicle-design infrastructure:</text:p>
      <text:h text:style-name="Heading_20_3" text:outline-level="3"><text:span text:style-name="Strong_20_Emphasis">Hook 1: The Pre-Columbian Institutional Preservation Operative</text:span></text:h>
      <text:p text:style-name="Text_20_body">{{user}} is a continental Andean operative engaged in pre-Columbian Andean institutional preservation work through continuing institutional cooperation between Cardinal Aurelius's network and continuing pre-Columbian-tradition Andean Kindred infrastructure. The chronicle tracks continuing pre-Columbian institutional preservation work across multi-year arc.</text:p>
      <text:p text:style-name="Text_20_body"><text:span text:style-name="Strong_20_Emphasis">Chronicle phase 1 — Cross-cultural institutional cooperation cultivation (4-5 sessions):</text:span> {{user}} engages continuing pre-Columbian institutional preservation through specific operational positioning at one of the continuing pre-Columbian institutional sites (Cusco, Potosí, La Paz indigenous-cultural integration through Bishop Yupanqui-Peralta's positioning, broader continental-Andean continuing pre-Columbian-tradition institutional cooperation). Chronicle scenes engage cross-cultural institutional cooperation through specific cultural inflections appropriate to continuing pre-Columbian Andean institutional context.</text:p>
      <text:p text:style-name="Text_20_body"><text:span text:style-name="Strong_20_Emphasis">Chronicle phase 2 — Continuing pre-Columbian institutional preservation operations (5-7 sessions):</text:span> Chronicle-significant pre-Columbian institutional preservation operations across continuing institutional sites; continuing cross-cultural institutional cooperation development; continuing continental-Andean theological-political institutional positioning through accumulating cross-cultural institutional preservation work.</text:p>
      <text:p text:style-name="Text_20_body"><text:span text:style-name="Strong_20_Emphasis">Chronicle phase 3 — Cross-cultural institutional preservation outcomes (3-5 sessions):</text:span> Chronicle late-arc engagement with chronicle-defining cross-cultural institutional preservation operations including: potential continuing pre-Columbian institutional preservation through continuing modern-republic operational conditions; potential cross-cultural institutional preservation crisis scenarios involving continuing modern continental-Andean political pressure including drug-cartel-related institutional pressure on pre-Columbian institutional sites; potential chronicle-defining continuing pre-Columbian institutional preservation work outcomes that affect continuing continental-Andean refusenik network distinctive operational character.</text:p>
      <text:p text:style-name="Text_20_body"><text:span text:style-name="Strong_20_Emphasis">Stakes:</text:span> Continuing pre-Columbian Andean institutional preservation viability. {{user}}'s continuing pre-Columbian institutional preservation work produces continuing continental-Andean cross-cultural institutional infrastructure that may support continuing pre-Columbian institutional viability or that may demonstrate continuing pre-Columbian institutional fossilisation depending on chronicle late-arc engagement with continuing modern continental-Andean political pressure dynamics.</text:p>
      <text:h text:style-name="Heading_20_3" text:outline-level="3"><text:span text:style-name="Strong_20_Emphasis">Hook 2: The Cardinal Tillinghurst Beckoning Crisis Operative</text:span></text:h>
      <text:p text:style-name="Text_20_body">{{user}} is a senior continental Andean refusenik operative engaged with Cardinal Aurelius's chronicle-active Beckoning trajectory crisis (his 580-year tenure produces the most acute Beckoning trajectory of any of the three remaining Cardinals). The chronicle tracks senior-figure Beckoning resistance operations and continental Andean institutional preservation coordination at the most acute scale of any cross-Pacific Sabbat-refusenik Beckoning trajectory chronicle.</text:p>
      <text:p text:style-name="Text_20_body"><text:span text:style-name="Strong_20_Emphasis">Chronicle phase 1 — Trajectory engagement at acute scale (3-4 sessions):</text:span> {{user}} achieves senior operational position with Cardinal Aurelius Beckoning trajectory awareness; chronicle <text:soft-page-break/>scenes engage trajectory acceleration patterns at the most acute scale of any cross-Pacific Sabbat-refusenik Cardinal trajectory, institutional concealment operations protecting Cardinal Aurelius trajectory information, continental Andean institutional positioning around continuing trajectory pressure with chronicle-active institutional concern across continuing institutional coordination.</text:p>
      <text:p text:style-name="Text_20_body"><text:span text:style-name="Strong_20_Emphasis">Chronicle phase 2 — Crisis intensification at chronicle-defining scale (4-5 sessions):</text:span> Cardinal Aurelius Beckoning trajectory reaches acute pressure that exceeds Cardinal Reyna's or Cardinal Magdalena's pattern; chronicle scenes engage continental Andean institutional preservation coordination during continental cross-Pacific senior-figure operational uncertainty at chronicle-defining scale; succession question development including Bishop Mendoza-Aguilar candidate evaluation, Bishop Ayala-Mendoza candidate evaluation, Bishop Cordero-Vega candidate evaluation, other senior continental Andean figures candidate evaluations; possible chronicle-defining institutional positioning if Cardinal Aurelius Beckoning succumbence becomes acute at scale that exceeds other cross-Pacific Sabbat-refusenik Cardinal succession scenarios.</text:p>
      <text:p text:style-name="Text_20_body"><text:span text:style-name="Strong_20_Emphasis">Chronicle phase 3 — Resolution or succumbence with global Sabbat-refusenik institutional implications (3-4 sessions):</text:span> Chronicle-defining resolution including potential Cardinal Aurelius trajectory stabilisation, potential Cardinal Aurelius Final Death through Beckoning succumbence with continental South American highlands institutional reorganisation at maximum scale, or chronicle late-arc continental cross-Pacific Sabbat-refusenik institutional succession crisis affecting cross-Atlantic-Pacific correspondence channel and broader global Sabbat-refusenik institutional infrastructure with reduction from three to two remaining Cardinals globally.</text:p>
      <text:p text:style-name="Text_20_body"><text:span text:style-name="Strong_20_Emphasis">Stakes:</text:span> Continental South American highlands senior-figure institutional continuity, continental cross-Pacific Sabbat-refusenik global institutional infrastructure, and continuing pre-Columbian Andean institutional preservation infrastructure (which depends on Cardinal Aurelius's continuing cross-cultural institutional cooperation). {{user}}'s role determines continental Andean and broader cross-Pacific institutional outcomes through the most acute Beckoning trajectory crisis any cross-Pacific Sabbat-refusenik chronicle can engage.</text:p>
      <text:h text:style-name="Heading_20_3" text:outline-level="3"><text:span text:style-name="Strong_20_Emphasis">Hook 3: The Catholic Church Institutional Cooperation Operative</text:span></text:h>
      <text:p text:style-name="Text_20_body">{{user}} is a senior continental Andean refusenik operative engaged in continuing Catholic Church institutional cooperation through Cardinal Aurelius-Cardenal Restrepo-Salgado Touchstone-relationship infrastructure plus continuing continental Catholic Church institutional cooperation across the network's primary nodes. The chronicle tracks continuing Catholic Church institutional cooperation development across multi-year arc.</text:p>
      <text:p text:style-name="Text_20_body"><text:span text:style-name="Strong_20_Emphasis">Chronicle phase 1 — Catholic Church institutional cooperation infrastructure cultivation (4-5 sessions):</text:span> {{user}} engages continuing Catholic Church institutional cooperation through specific operational positioning including: continuing Cardenal Restrepo-Salgado infrastructure cooperation; continuing continental Catholic Church institutional cooperation across primary nodes; continuing pre-Reformation Spanish Catholic-cultural-tradition Ventrue-antitribu integration that Cardinal Aurelius has refined across his nearly six-century tenure.</text:p>
      <text:p text:style-name="Text_20_body"><text:span text:style-name="Strong_20_Emphasis">Chronicle phase 2 — Continuing Catholic Church institutional cooperation development (5-7 sessions):</text:span> Chronicle-significant Catholic Church institutional cooperation operations across continuing continental Catholic Church institutional positioning; continuing cross-institutional cooperation development; continuing continental-Andean theological-political institutional <text:soft-page-break/>positioning through accumulating Catholic Church institutional cooperation infrastructure development.</text:p>
      <text:p text:style-name="Text_20_body"><text:span text:style-name="Strong_20_Emphasis">Chronicle phase 3 — Continental Catholic Church institutional cooperation outcomes (3-5 sessions):</text:span> Chronicle late-arc engagement with chronicle-defining Catholic Church institutional cooperation operations including: potential continuing Catholic Church institutional cooperation infrastructure preservation; potential cross-institutional cooperation crisis scenarios involving continuing modern continental Catholic Church institutional positioning dynamics; potential chronicle-defining Catholic Church institutional cooperation infrastructure outcomes that affect continuing continental-Andean refusenik network distinctive operational character.</text:p>
      <text:p text:style-name="Text_20_body"><text:span text:style-name="Strong_20_Emphasis">Stakes:</text:span> Continuing Catholic Church institutional cooperation infrastructure viability. {{user}}'s continuing Catholic Church institutional cooperation work produces continuing continental-Andean cross-institutional infrastructure that may support continuing institutional cooperation viability or that may produce institutional cooperation crisis depending on chronicle late-arc engagement with continuing modern continental Catholic Church institutional positioning dynamics.</text:p>
      <text:h text:style-name="Heading_20_3" text:outline-level="3"><text:span text:style-name="Strong_20_Emphasis">Hook 4: The Cross-Atlantic-Pacific Correspondence Operative</text:span></text:h>
      <text:p text:style-name="Text_20_body">{{user}} is Bishop Ayala-Mendoza's senior assistant or independent cross-Cardinal correspondence coordination specialist operating Lima cross-Atlantic-Pacific infrastructure. The chronicle tracks {{user}}'s development of continental cross-Cardinal institutional connectivity through cross-Atlantic-Pacific correspondence channel coordination.</text:p>
      <text:p text:style-name="Text_20_body"><text:span text:style-name="Strong_20_Emphasis">Chronicle phase 1 — Cross-Atlantic-Pacific infrastructure apprenticeship (3-4 sessions):</text:span> Initial training in cross-Cardinal correspondence coordination including: continental Pacific-coast shipping connections through Lima continental Pacific port operational positioning; specific San Francisco-Lima ghouled-mortal-shipping infrastructure; continuing 102-year working relationship with Bishop Ayala-Mendoza institutional patterns.</text:p>
      <text:p text:style-name="Text_20_body"><text:span text:style-name="Strong_20_Emphasis">Chronicle phase 2 — Continental cross-Cardinal institutional connectivity development (5-7 sessions):</text:span> {{user}} takes increasing cross-Cardinal correspondence responsibilities including formal correspondence with both Cardinal Aurelius's South American highlands network and Cardinal Reyna's Pacific Northwest corridor, occasional cross-Cardinal coordination meeting attendance at higher-frequency scale than cross-Bering-Strait coordination (4 vs 3 meetings since 2014 reflecting somewhat-easier cross-Atlantic-Pacific operational geography), specialised cross-Cardinal institutional knowledge accumulation.</text:p>
      <text:p text:style-name="Text_20_body"><text:span text:style-name="Strong_20_Emphasis">Chronicle phase 3 — Cross-Pacific Sabbat-refusenik global infrastructure positioning (3-5 sessions):</text:span> {{user}} achieves operational position with continental cross-Pacific institutional weight; chronicle scenes engage potential continental cross-Pacific institutional positioning, possible chronicle-defining cross-Cardinal coordination operations, and continental cross-Pacific Sabbat-refusenik global infrastructure decisions that {{user}}'s correspondence position influences.</text:p>
      <text:p text:style-name="Text_20_body"><text:span text:style-name="Strong_20_Emphasis">Stakes:</text:span> Continental cross-Pacific Sabbat-refusenik global institutional position. {{user}}'s cross-Atlantic-Pacific coordination role determines continental cross-Cardinal institutional connectivity outcomes for the subsequent decade.</text:p>
      <text:p text:style-name="P1"/>
      <text:p text:style-name="P1"/>
      <text:p text:style-name="P1"/>
      <text:p text:style-name="P1"><text:soft-page-break/><text:span text:style-name="Strong_20_Emphasis">The South American Highlands Refusenik Supplement is complete.</text:span> A 14-entry lorebook covering Cardinal Aurelius Tillinghurst's full character build (Ventrue antitribu, 6th gen, 580 years Embraced — the senior surviving Cardinal globally by both tenure and Embrace age, pre-Reformation Castilian-Spanish noble-class background, continuing Catholic Church institutional cooperation at archbishop level through Cardenal Restrepo-Salgado Touchstone-relationship, methuselah-track disciplines including Dominate 7), the South American highlands operational corridor (Bogotá-Quito-Lima-La Paz-Sucre with approximately 50 Sabbat operatives plus pre-Columbian institutional preservation infrastructure), the cross-Atlantic-Pacific correspondence channel through Bishop Don Federico Ayala-Mendoza's Lima coordination (the second cross-Cardinal correspondence channel currently operational globally, parallel to cross-Bering-Strait coordination at Bishop-tier institutional rank), the colonial-Spanish institutional inheritance with Liberation-era reorganisation (continuing colonial-Spanish operational protocols modified through 19th-century Liberation-era political restructuring, continuing Catholic Church institutional cooperation, continuing modern-republic institutional development across nearly six centuries), the Ventrue-antitribu refusenik theological-political register (distinct from Lasombra-refusenik or Tzimisce-tradition frameworks, with continuing formalised hierarchical Sabbat ecclesiastical institutional commitment, continuing Dominate as doctrinal practice, and continuing pre-Reformation Spanish noble-class aesthetic preservation), continental-Andean multi-state political environment pressure (continuing post-2016 Colombian peace accord implications, continuing continental-Andean ethnic-political dynamics, continuing drug-cartel-political-environment operational pressure, continuing continental-Andean cross-state institutional positioning), continuing pre-Columbian Andean institutional preservation as continuing network infrastructure (continuing Cusco, Potosí, La Paz indigenous-cultural integration, broader continental-Andean continuing pre-Columbian-tradition institutional cooperation including approximately 8 pre-Columbian-tradition Andean Kindred operatives under continuing Sabbat institutional cover), Bishop Ayala-Mendoza's full character build, the global Sabbat-refusenik infrastructure picture completion across all three remaining Cardinals (approximately 305 Sabbat globally, two cross-Cardinal correspondence channels currently operational, three distinctive theological-political registers established), and Cardinal Tillinghurst's chronicle-active Beckoning trajectory crisis at the most acute scale of any cross-Pacific Sabbat-refusenik Cardinal.</text:p>
      <text:p text:style-name="P1"/>
      <text:p text:style-name="P1"><text:span text:style-name="Strong_20_Emphasis">The global Sabbat-refusenik infrastructure picture is now substantially complete</text:span> with all three remaining Cardinals globally detailed at continental institutional scope, both currently-operational cross-Cardinal correspondence channels (cross-Bering-Strait and cross-Atlantic-Pacific) detailed, approximately 305 Sabbat-refusenik operatives across continental institutional infrastructure spanning Pacific Northwest, Russian Far East, South American highlands, plus Templar Abernathy's Brisbane Australian connection and smaller Pacific Rim nodes, three distinctive theological-political registers established (Lasombra-refusenik, Tzimisce-tradition, Ventrue-antitribu-refusenik), and continuing cross-cultural-institutional cooperation infrastructure detailed (Russian-Orthodox-cultural integration, pre-Columbian Andean institutional preservation, Catholic Church institutional cooperation at parish and archbishop lev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9:24:06.136968890</dc:date>
    <meta:editing-duration>PT5M16S</meta:editing-duration>
    <meta:editing-cycles>2</meta:editing-cycles>
    <meta:generator>LibreOffice/24.2.7.2$Linux_X86_64 LibreOffice_project/420$Build-2</meta:generator>
    <meta:document-statistic meta:table-count="4" meta:image-count="0" meta:object-count="0" meta:page-count="12" meta:paragraph-count="167" meta:word-count="3188" meta:character-count="31597" meta:non-whitespace-character-count="28548"/>
  </office:meta>
</office:document-meta>
</file>