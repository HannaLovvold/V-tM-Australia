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217cm"/>
    </style:style>
    <style:style style:name="Table1.B" style:family="table-column">
      <style:table-column-properties style:column-width="2.454cm"/>
    </style:style>
    <style:style style:name="Table1.C" style:family="table-column">
      <style:table-column-properties style:column-width="3.394cm"/>
    </style:style>
    <style:style style:name="Table1.D" style:family="table-column">
      <style:table-column-properties style:column-width="2.163cm"/>
    </style:style>
    <style:style style:name="Table1.E" style:family="table-column">
      <style:table-column-properties style:column-width="6.773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702cm"/>
    </style:style>
    <style:style style:name="Table2.B" style:family="table-column">
      <style:table-column-properties style:column-width="3.052cm"/>
    </style:style>
    <style:style style:name="Table2.C" style:family="table-column">
      <style:table-column-properties style:column-width="2.432cm"/>
    </style:style>
    <style:style style:name="Table2.D" style:family="table-column">
      <style:table-column-properties style:column-width="3.136cm"/>
    </style:style>
    <style:style style:name="Table2.E" style:family="table-column">
      <style:table-column-properties style:column-width="5.67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023cm"/>
    </style:style>
    <style:style style:name="Table3.B" style:family="table-column">
      <style:table-column-properties style:column-width="6.299cm"/>
    </style:style>
    <style:style style:name="Table3.C" style:family="table-column">
      <style:table-column-properties style:column-width="8.678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5.493cm"/>
    </style:style>
    <style:style style:name="Table4.B" style:family="table-column">
      <style:table-column-properties style:column-width="3.81cm"/>
    </style:style>
    <style:style style:name="Table4.C" style:family="table-column">
      <style:table-column-properties style:column-width="7.698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835cm"/>
    </style:style>
    <style:style style:name="Table5.B" style:family="table-column">
      <style:table-column-properties style:column-width="5.669cm"/>
    </style:style>
    <style:style style:name="Table5.C" style:family="table-column">
      <style:table-column-properties style:column-width="6.496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141cm"/>
    </style:style>
    <style:style style:name="Table6.B" style:family="table-column">
      <style:table-column-properties style:column-width="3.709cm"/>
    </style:style>
    <style:style style:name="Table6.C" style:family="table-column">
      <style:table-column-properties style:column-width="2.163cm"/>
    </style:style>
    <style:style style:name="Table6.D" style:family="table-column">
      <style:table-column-properties style:column-width="7.987cm"/>
    </style:style>
    <style:style style:name="Table6.A1" style:family="table-cell">
      <style:table-cell-properties style:vertical-align="middle" fo:padding="0.049cm" fo:border="none"/>
    </style:style>
    <style:style style:name="P1" style:family="paragraph" style:parent-style-name="Preformatted_20_Text">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able_20_Contents">
      <style:text-properties fo:font-size="2pt" style:font-size-asian="2pt" style:font-size-complex="2pt"/>
    </style:style>
    <style:style style:name="P4" style:family="paragraph" style:parent-style-name="Preformatted_20_Text">
      <style:paragraph-properties fo:margin-left="0cm" fo:margin-right="0cm" fo:text-indent="0cm" style:auto-text-indent="false"/>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T1" style:family="text">
      <style:text-properties fo:color="#f97583"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Pacific Northwest supplement treating Cardinal Reyna Quiñones's continental Pacific-Coast corridor as a playable Sabbat-refusenik domain — distinct in register from Brisbane's doctrinal Sabbat-survivor mode, Cardinal Magdalena's Soviet-era Russian Far East corridor, or Cardinal Aurelius's colonial-Spanish-Liberation-era South American highlands. The Pacific Northwest is <text:span text:style-name="Strong_20_Emphasis">continental Lasombra-refusenik institutional preservation across four cities</text:span> — operating across San Francisco (primary), Portland, Seattle, and Vancouver under continuing post-2020 Lasombra defection refusal as theological-political foundation, with material wealth and cultural cultivation that distinguishes the network from other continental Sabbat-refusenik operations.</text:p>
      <text:p text:style-name="Text_20_body"><text:span text:style-name="Strong_20_Emphasis">Distinctive features of the Pacific Northwest:</text:span></text:p>
      <text:list text:style-name="L1">
        <text:list-item>
          <text:p text:style-name="P6"><text:span text:style-name="Strong_20_Emphasis">Four-city continental corridor</text:span> rather than single metropolitan domain — chronicle scenes operate across the Pacific Coast from Vancouver south to San Francisco with approximately 40 Sabbat-refusenik operatives distributed across the corridor </text:p>
        </text:list-item>
        <text:list-item>
          <text:p text:style-name="P6"><text:span text:style-name="Strong_20_Emphasis">Lasombra-refusenik theological-political register</text:span> as ambient foundation — continuing post-2020 defection refusal produces distinctive theological-political register that broader Sabbat-refusenik chronicle work does not match </text:p>
        </text:list-item>
        <text:list-item>
          <text:p text:style-name="P6"><text:span text:style-name="Strong_20_Emphasis">Material wealth and cultural cultivation</text:span> — the network's San Francisco position produces material wealth that other cross-Pacific Sabbat-refusenik networks do not match (though substantially less than Sarrasine's Sydney material wealth); the wealth produces cultural cultivation register that distinguishes the network from Brisbane's deliberate austerity </text:p>
        </text:list-item>
        <text:list-item>
          <text:p text:style-name="P6"><text:span text:style-name="Strong_20_Emphasis">Cross-state continental political environment</text:span> — the network operates across two sovereign states (USA and Canada) with distinct Five-Eyes-equivalent intelligence cooperation patterns affecting different nodes; Vancouver operates under Canadian CSIS partnership infrastructure while San Francisco-Portland-Seattle operate under continental American Twilight-Project-equivalent infrastructure </text:p>
        </text:list-item>
        <text:list-item>
          <text:p text:style-name="P6"><text:span text:style-name="Strong_20_Emphasis">The corridor as Cardinal Reyna's primary chronicle space</text:span> — Cardinal Reyna's continental authority operates across the four cities as continuing institutional infrastructure rather than as single metropolitan domain; chronicle scenes engage continental corridor operations including formal monthly ecclesiastical coordination, quarterly cross-corridor meetings, continuing inter-city operational coordination </text:p>
        </text:list-item>
        <text:list-item>
          <text:p text:style-name="P5"><text:span text:style-name="Strong_20_Emphasis">Pre-1849 California-period institutional inheritance</text:span> — the network's institutional roots trace through Cardinal Reyna's 1849 Pacific Northwest arrival during California Gold Rush colonial period plus pre-Cardinal-Reyna continental Pacific-Coast Sabbat-loyalist remnant infrastructure; the institutional inheritance produces operational character distinct from purely-modern continental Sabbat-loyalist institutional positions </text:p>
        </text:list-item>
      </text:list>
      <text:p text:style-name="Text_20_body"><text:span text:style-name="Strong_20_Emphasis">Chronicle position:</text:span> This supplement provides full single-domain chronicle infrastructure for Cardinal Reyna's continental Pacific-Coast corridor, enabling chronicles focused on Pacific Northwest operations that the cross-Pacific refusenik supplement establishes as institutional context but does not develop at full city-supplement detail. Chronicles can engage single-city focus (San Francisco-only chronicles), corridor-internal multi-city focus (San Francisco-Portland-Seattle-Vancouver), or cross-Pacific scope (Pacific Northwest chronicles connecting through cross-Atlantic-Pacific channel to Cardinal Aurelius or through cross-Bering-Strait channel to Cardinal Magdalena, or through Cardinal Reyna-Templar Abernathy correspondence to Brisbane).</text:p>
      <text:p text:style-name="Preformatted_20_Text"/>
      <text:p text:style-name="Preformatted_20_Text"/>
      <text:p text:style-name="Preformatted_20_Text"/>
      <text:p text:style-name="P1"><text:soft-page-break/>A 16-entry lorebook providing the four-city continental corridor, Cardinal Reyna's expanded character infrastructure, the four primary Bishop figures, the corridor's distinctive cultural-political register, the cross-state continental political context, and the chronicle infrastructure for full Pacific Northwest single-domain chronicle work. Designed to layer alongside <text:span text:style-name="Source_20_Text"><text:span text:style-name="T1">vtm_modern_nights.json</text:span></text:span> and (typically) <text:span text:style-name="Source_20_Text"><text:span text:style-name="T1">vtm_cross_pacific_refusenik.json</text:span></text:span>.</text:p>
      <text:p text:style-name="P1"/>
      <text:p text:style-name="P1">load alongside <text:span text:style-name="Source_20_Text"><text:span text:style-name="T1">vtm_modern_nights.json</text:span></text:span> and (typically) <text:span text:style-name="Source_20_Text"><text:span text:style-name="T1">vtm_cross_pacific_refusenik.json</text:span></text:span> for full Pacific Northwest single-domain chronicle work. Optionally layer with <text:span text:style-name="Source_20_Text"><text:span text:style-name="T1">vtm_russian_far_east_refusenik.json</text:span></text:span> and <text:span text:style-name="Source_20_Text"><text:span text:style-name="T1">vtm_south_american_highlands_refusenik.json</text:span></text:span> for chronicles engaging the global Sabbat-refusenik infrastructure picture across all three remaining Cardinals from the Pacific Northwest perspectiv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Node</text:p>
            </table:table-cell>
            <table:table-cell table:style-name="Table1.A1" office:value-type="string">
              <text:p text:style-name="Table_20_Heading">Region</text:p>
            </table:table-cell>
            <table:table-cell table:style-name="Table1.A1" office:value-type="string">
              <text:p text:style-name="Table_20_Heading">Authority</text:p>
            </table:table-cell>
            <table:table-cell table:style-name="Table1.A1" office:value-type="string">
              <text:p text:style-name="Table_20_Heading">Population</text:p>
            </table:table-cell>
            <table:table-cell table:style-name="Table1.A1" office:value-type="string">
              <text:p text:style-name="Table_20_Heading">Operational specialty</text:p>
            </table:table-cell>
          </table:table-row>
        </table:table-header-rows>
        <table:table-row>
          <table:table-cell table:style-name="Table1.A1" office:value-type="string">
            <text:p text:style-name="Table_20_Contents"><text:span text:style-name="Strong_20_Emphasis">San Francisco</text:span></text:p>
          </table:table-cell>
          <table:table-cell table:style-name="Table1.A1" office:value-type="string">
            <text:p text:style-name="Table_20_Contents">California, USA</text:p>
          </table:table-cell>
          <table:table-cell table:style-name="Table1.A1" office:value-type="string">
            <text:p text:style-name="Table_20_Contents">Cardinal Reyna Quiñones (residence) / Bishop Antonio Mendoza-Cruz (day-to-day)</text:p>
          </table:table-cell>
          <table:table-cell table:style-name="Table1.A1" office:value-type="string">
            <text:p text:style-name="Table_20_Contents">~15 Sabbat</text:p>
          </table:table-cell>
          <table:table-cell table:style-name="Table1.A1" office:value-type="string">
            <text:p text:style-name="Table_20_Contents">Network central node, Lasombra-refusenik institutional foundation, continuing Telegraph Hill residence</text:p>
          </table:table-cell>
        </table:table-row>
        <table:table-row>
          <table:table-cell table:style-name="Table1.A1" office:value-type="string">
            <text:p text:style-name="Table_20_Contents"><text:span text:style-name="Strong_20_Emphasis">Portland</text:span></text:p>
          </table:table-cell>
          <table:table-cell table:style-name="Table1.A1" office:value-type="string">
            <text:p text:style-name="Table_20_Contents">Oregon, USA</text:p>
          </table:table-cell>
          <table:table-cell table:style-name="Table1.A1" office:value-type="string">
            <text:p text:style-name="Table_20_Contents">Bishop Imogen Fairchild-Ward</text:p>
          </table:table-cell>
          <table:table-cell table:style-name="Table1.A1" office:value-type="string">
            <text:p text:style-name="Table_20_Contents">~10 Sabbat</text:p>
          </table:table-cell>
          <table:table-cell table:style-name="Table1.A1" office:value-type="string">
            <text:p text:style-name="Table_20_Contents">Pacific Northwest cultural-cover ecclesiastical infrastructure, Tzimisce-tradition cooperation, 2014-Beckoning-resistance support</text:p>
          </table:table-cell>
        </table:table-row>
        <table:table-row>
          <table:table-cell table:style-name="Table1.A1" office:value-type="string">
            <text:p text:style-name="Table_20_Contents"><text:span text:style-name="Strong_20_Emphasis">Seattle</text:span></text:p>
          </table:table-cell>
          <table:table-cell table:style-name="Table1.A1" office:value-type="string">
            <text:p text:style-name="Table_20_Contents">Washington, USA</text:p>
          </table:table-cell>
          <table:table-cell table:style-name="Table1.A1" office:value-type="string">
            <text:p text:style-name="Table_20_Contents">Bishop Henrik Olafsson-Cole</text:p>
          </table:table-cell>
          <table:table-cell table:style-name="Table1.A1" office:value-type="string">
            <text:p text:style-name="Table_20_Contents">~8 Sabbat</text:p>
          </table:table-cell>
          <table:table-cell table:style-name="Table1.A1" office:value-type="string">
            <text:p text:style-name="Table_20_Contents">Working-class-mortal-network, AFP-Five-Eyes-equivalent counter-intelligence, tactical-defensive operations</text:p>
          </table:table-cell>
        </table:table-row>
        <table:table-row>
          <table:table-cell table:style-name="Table1.A1" office:value-type="string">
            <text:p text:style-name="Table_20_Contents"><text:span text:style-name="Strong_20_Emphasis">Vancouver</text:span></text:p>
          </table:table-cell>
          <table:table-cell table:style-name="Table1.A1" office:value-type="string">
            <text:p text:style-name="Table_20_Contents">British Columbia, Canada</text:p>
          </table:table-cell>
          <table:table-cell table:style-name="Table1.A1" office:value-type="string">
            <text:p text:style-name="Table_20_Contents">Bishop Aria Zhao-Petrov</text:p>
          </table:table-cell>
          <table:table-cell table:style-name="Table1.A1" office:value-type="string">
            <text:p text:style-name="Table_20_Contents">~7 Sabbat</text:p>
          </table:table-cell>
          <table:table-cell table:style-name="Table1.A1" office:value-type="string">
            <text:p text:style-name="Table_20_Contents">Cross-Pacific intelligence-gathering, Asian Pacific Rim correspondence, Canadian-CSIS-partnership counter-intelligence, cross-cultural artistic-aesthetic operations</text:p>
          </table:table-cell>
        </table:table-row>
      </table:table>
      <text:h text:style-name="Heading_20_3" text:outline-level="3"><text:span text:style-name="Strong_20_Emphasis">Pacific Northwest Court at a glance:</text:span></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Position</text:p>
            </table:table-cell>
            <table:table-cell table:style-name="Table2.A1" office:value-type="string">
              <text:p text:style-name="Table_20_Heading">Holder</text:p>
            </table:table-cell>
            <table:table-cell table:style-name="Table2.A1" office:value-type="string">
              <text:p text:style-name="Table_20_Heading">Clan</text:p>
            </table:table-cell>
            <table:table-cell table:style-name="Table2.A1" office:value-type="string">
              <text:p text:style-name="Table_20_Heading">Tenure</text:p>
            </table:table-cell>
            <table:table-cell table:style-name="Table2.A1" office:value-type="string">
              <text:p text:style-name="Table_20_Heading">Note</text:p>
            </table:table-cell>
          </table:table-row>
        </table:table-header-rows>
        <table:table-row>
          <table:table-cell table:style-name="Table2.A1" office:value-type="string">
            <text:p text:style-name="Table_20_Contents"><text:span text:style-name="Strong_20_Emphasis">Cardinal</text:span></text:p>
          </table:table-cell>
          <table:table-cell table:style-name="Table2.A1" office:value-type="string">
            <text:p text:style-name="Table_20_Contents">Reyna Quiñones</text:p>
          </table:table-cell>
          <table:table-cell table:style-name="Table2.A1" office:value-type="string">
            <text:p text:style-name="Table_20_Contents">Lasombra antitribu, 7th gen</text:p>
          </table:table-cell>
          <table:table-cell table:style-name="Table2.A1" office:value-type="string">
            <text:p text:style-name="Table_20_Contents">132 years continental Pacific-Coast</text:p>
          </table:table-cell>
          <table:table-cell table:style-name="Table2.A1" office:value-type="string">
            <text:p text:style-name="Table_20_Contents">Bishop 1893-1956, Cardinal since 1956</text:p>
          </table:table-cell>
        </table:table-row>
        <table:table-row>
          <table:table-cell table:style-name="Table2.A1" office:value-type="string">
            <text:p text:style-name="Table_20_Contents"><text:span text:style-name="Strong_20_Emphasis">Bishop (San Francisco)</text:span></text:p>
          </table:table-cell>
          <table:table-cell table:style-name="Table2.A1" office:value-type="string">
            <text:p text:style-name="Table_20_Contents">Antonio Mendoza-Cruz</text:p>
          </table:table-cell>
          <table:table-cell table:style-name="Table2.A1" office:value-type="string">
            <text:p text:style-name="Table_20_Contents">Lasombra antitribu, 8th gen</text:p>
          </table:table-cell>
          <table:table-cell table:style-name="Table2.A1" office:value-type="string">
            <text:p text:style-name="Table_20_Contents">69 years parallel</text:p>
          </table:table-cell>
          <table:table-cell table:style-name="Table2.A1" office:value-type="string">
            <text:p text:style-name="Table_20_Contents">Cardinal Reyna's senior deputy, primary succession candidate</text:p>
          </table:table-cell>
        </table:table-row>
        <table:table-row>
          <table:table-cell table:style-name="Table2.A1" office:value-type="string">
            <text:p text:style-name="Table_20_Contents"><text:span text:style-name="Strong_20_Emphasis">Bishop (Portland)</text:span></text:p>
          </table:table-cell>
          <table:table-cell table:style-name="Table2.A1" office:value-type="string">
            <text:p text:style-name="Table_20_Contents">Imogen Fairchild-Ward</text:p>
          </table:table-cell>
          <table:table-cell table:style-name="Table2.A1" office:value-type="string">
            <text:p text:style-name="Table_20_Contents">Tzimisce, 9th gen</text:p>
          </table:table-cell>
          <table:table-cell table:style-name="Table2.A1" office:value-type="string">
            <text:p text:style-name="Table_20_Contents">54 years</text:p>
          </table:table-cell>
          <table:table-cell table:style-name="Table2.A1" office:value-type="string">
            <text:p text:style-name="Table_20_Contents">Pacific Northwest cultural-cover specialist, Tzimisce-tradition cooperation</text:p>
          </table:table-cell>
        </table:table-row>
        <table:table-row>
          <table:table-cell table:style-name="Table2.A1" office:value-type="string">
            <text:p text:style-name="Table_20_Contents"><text:span text:style-name="Strong_20_Emphasis">Bishop (Seattle)</text:span></text:p>
          </table:table-cell>
          <table:table-cell table:style-name="Table2.A1" office:value-type="string">
            <text:p text:style-name="Table_20_Contents">Henrik Olafsson-Cole</text:p>
          </table:table-cell>
          <table:table-cell table:style-name="Table2.A1" office:value-type="string">
            <text:p text:style-name="Table_20_Contents">Brujah antitribu, 10th gen</text:p>
          </table:table-cell>
          <table:table-cell table:style-name="Table2.A1" office:value-type="string">
            <text:p text:style-name="Table_20_Contents">47 years</text:p>
          </table:table-cell>
          <table:table-cell table:style-name="Table2.A1" office:value-type="string">
            <text:p text:style-name="Table_20_Contents">Working-class infrastructure, tactical-defensive operations</text:p>
          </table:table-cell>
        </table:table-row>
        <table:table-row>
          <table:table-cell table:style-name="Table2.A1" office:value-type="string">
            <text:p text:style-name="Table_20_Contents"><text:span text:style-name="Strong_20_Emphasis">Bishop (Vancouver)</text:span></text:p>
          </table:table-cell>
          <table:table-cell table:style-name="Table2.A1" office:value-type="string">
            <text:p text:style-name="Table_20_Contents">Aria Zhao-Petrov</text:p>
          </table:table-cell>
          <table:table-cell table:style-name="Table2.A1" office:value-type="string">
            <text:p text:style-name="Table_20_Contents">Toreador antitribu, 10th gen</text:p>
          </table:table-cell>
          <table:table-cell table:style-name="Table2.A1" office:value-type="string">
            <text:p text:style-name="Table_20_Contents">31 years</text:p>
          </table:table-cell>
          <table:table-cell table:style-name="Table2.A1" office:value-type="string">
            <text:p text:style-name="Table_20_Contents">Cross-Pacific intelligence-gathering, Asian Pacific correspondence</text:p>
          </table:table-cell>
        </table:table-row>
      </table:table>
      <text:h text:style-name="Heading_20_3" text:outline-level="3"><text:span text:style-name="Strong_20_Emphasis">Cross-corridor coordination patterns:</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empo</text:p>
            </table:table-cell>
            <table:table-cell table:style-name="Table3.A1" office:value-type="string">
              <text:p text:style-name="Table_20_Heading">Coordination</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text:span text:style-name="Strong_20_Emphasis">Weekly</text:span></text:p>
          </table:table-cell>
          <table:table-cell table:style-name="Table3.A1" office:value-type="string">
            <text:p text:style-name="Table_20_Contents">Bishop-to-Bishop adjacent-corridor correspondence</text:p>
          </table:table-cell>
          <table:table-cell table:style-name="Table3.A1" office:value-type="string">
            <text:p text:style-name="Table_20_Contents">SF↔PDX↔SEA↔YVR continuing rotation plus YVR↔SF cross-Pacific connectivity</text:p>
          </table:table-cell>
        </table:table-row>
        <table:table-row>
          <table:table-cell table:style-name="Table3.A1" office:value-type="string">
            <text:p text:style-name="Table_20_Contents"><text:span text:style-name="Strong_20_Emphasis">Monthly</text:span></text:p>
          </table:table-cell>
          <table:table-cell table:style-name="Table3.A1" office:value-type="string">
            <text:p text:style-name="Table_20_Contents">Cardinal Reyna ↔ each Bishop formal ecclesiastical correspondence</text:p>
          </table:table-cell>
          <table:table-cell table:style-name="Table3.A1" office:value-type="string">
            <text:p text:style-name="Table_20_Contents">Continuing continental institutional integration at intermediate operational tempo</text:p>
          </table:table-cell>
        </table:table-row>
        <table:table-row>
          <table:table-cell table:style-name="Table3.A1" office:value-type="string">
            <text:p text:style-name="Table_20_Contents"><text:span text:style-name="Strong_20_Emphasis">Quarterly</text:span></text:p>
          </table:table-cell>
          <table:table-cell table:style-name="Table3.A1" office:value-type="string">
            <text:p text:style-name="Table_20_Contents">Cardinal Reyna hosts cross-corridor meetings at Telegraph Hill</text:p>
          </table:table-cell>
          <table:table-cell table:style-name="Table3.A1" office:value-type="string">
            <text:p text:style-name="Table_20_Contents">All four Bishops attending, continental institutional rhythm at chronicle-significant <text:soft-page-break/>operational tempo</text:p>
          </table:table-cell>
        </table:table-row>
        <table:table-row>
          <table:table-cell table:style-name="Table3.A1" office:value-type="string">
            <text:p text:style-name="Table_20_Contents"><text:span text:style-name="Strong_20_Emphasis">Annually</text:span></text:p>
          </table:table-cell>
          <table:table-cell table:style-name="Table3.A1" office:value-type="string">
            <text:p text:style-name="Table_20_Contents">Continental Pacific-Coast institutional conference at Telegraph Hill</text:p>
          </table:table-cell>
          <table:table-cell table:style-name="Table3.A1" office:value-type="string">
            <text:p text:style-name="Table_20_Contents">August traditional timing, all four Bishops plus selected senior operatives, three days</text:p>
          </table:table-cell>
        </table:table-row>
      </table:table>
      <text:h text:style-name="Heading_20_3" text:outline-level="3"><text:span text:style-name="Strong_20_Emphasis">The continuing post-2020 Lasombra defection refusal infrastructure:</text:spa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Pre-2020</text:p>
            </table:table-cell>
            <table:table-cell table:style-name="Table4.A1" office:value-type="string">
              <text:p text:style-name="Table_20_Heading">Post-2020 Defection</text:p>
            </table:table-cell>
            <table:table-cell table:style-name="Table4.A1" office:value-type="string">
              <text:p text:style-name="Table_20_Heading">Pacific Northwest Continuing Refusal</text:p>
            </table:table-cell>
          </table:table-row>
        </table:table-header-rows>
        <table:table-row>
          <table:table-cell table:style-name="Table4.A1" office:value-type="string">
            <text:p text:style-name="Table_20_Contents">~40 Lasombra Sabbat-affiliated continental Pacific-Coast</text:p>
          </table:table-cell>
          <table:table-cell table:style-name="Table4.A1" office:value-type="string">
            <text:p text:style-name="Table_20_Contents">~24 (60%) transitioned to Camarilla</text:p>
          </table:table-cell>
          <table:table-cell table:style-name="Table4.A1" office:value-type="string">
            <text:p text:style-name="Table_20_Contents">~16 (40%) refused defection</text:p>
          </table:table-cell>
        </table:table-row>
        <table:table-row>
          <table:table-cell table:style-name="Table4.A1" office:value-type="string">
            <text:p text:style-name="P3"/>
          </table:table-cell>
          <table:table-cell table:style-name="Table4.A1" office:value-type="string">
            <text:p text:style-name="P3"/>
          </table:table-cell>
          <table:table-cell table:style-name="Table4.A1" office:value-type="string">
            <text:p text:style-name="Table_20_Contents">+ ~9 additional Lasombra antitribu refuseniks recruited/transferred post-2020</text:p>
          </table:table-cell>
        </table:table-row>
        <table:table-row>
          <table:table-cell table:style-name="Table4.A1" office:value-type="string">
            <text:p text:style-name="P3"/>
          </table:table-cell>
          <table:table-cell table:style-name="Table4.A1" office:value-type="string">
            <text:p text:style-name="P3"/>
          </table:table-cell>
          <table:table-cell table:style-name="Table4.A1" office:value-type="string">
            <text:p text:style-name="Table_20_Contents">= ~25 continuing Lasombra antitribu refusenik operatives across continental Pacific-Coast corridor</text:p>
          </table:table-cell>
        </table:table-row>
      </table:table>
      <text:h text:style-name="Heading_20_3" text:outline-level="3"><text:span text:style-name="Strong_20_Emphasis">Cross-Pacific connectivity from Pacific Northwest perspective:</text:span></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Coordination</text:p>
            </table:table-cell>
            <table:table-cell table:style-name="Table5.A1" office:value-type="string">
              <text:p text:style-name="Table_20_Heading">Position</text:p>
            </table:table-cell>
          </table:table-row>
        </table:table-header-rows>
        <table:table-row>
          <table:table-cell table:style-name="Table5.A1" office:value-type="string">
            <text:p text:style-name="Table_20_Contents"><text:span text:style-name="Strong_20_Emphasis">Cross-Bering-Strait</text:span></text:p>
          </table:table-cell>
          <table:table-cell table:style-name="Table5.A1" office:value-type="string">
            <text:p text:style-name="Table_20_Contents">Cardinal Reyna ↔ Cardinal Magdalena via Pack-Leader Volkov-Petrov (Anchorage)</text:p>
          </table:table-cell>
          <table:table-cell table:style-name="Table5.A1" office:value-type="string">
            <text:p text:style-name="Table_20_Contents">Russia connection through continuing cross-Bering-Strait correspondence</text:p>
          </table:table-cell>
        </table:table-row>
        <table:table-row>
          <table:table-cell table:style-name="Table5.A1" office:value-type="string">
            <text:p text:style-name="Table_20_Contents"><text:span text:style-name="Strong_20_Emphasis">Cross-Atlantic-Pacific</text:span></text:p>
          </table:table-cell>
          <table:table-cell table:style-name="Table5.A1" office:value-type="string">
            <text:p text:style-name="Table_20_Contents">Cardinal Reyna ↔ Cardinal Aurelius via Bishop Ayala-Mendoza (Lima)</text:p>
          </table:table-cell>
          <table:table-cell table:style-name="Table5.A1" office:value-type="string">
            <text:p text:style-name="Table_20_Contents">South America connection through continuing cross-Atlantic-Pacific correspondence</text:p>
          </table:table-cell>
        </table:table-row>
        <table:table-row>
          <table:table-cell table:style-name="Table5.A1" office:value-type="string">
            <text:p text:style-name="Table_20_Contents"><text:span text:style-name="Strong_20_Emphasis">Cardinal Reyna-Templar Abernathy</text:span></text:p>
          </table:table-cell>
          <table:table-cell table:style-name="Table5.A1" office:value-type="string">
            <text:p text:style-name="Table_20_Contents">Cardinal Reyna ↔ Templar Abernathy direct correspondence</text:p>
          </table:table-cell>
          <table:table-cell table:style-name="Table5.A1" office:value-type="string">
            <text:p text:style-name="Table_20_Contents">Australia connection through continuing 50-year monthly correspondence</text:p>
          </table:table-cell>
        </table:table-row>
        <table:table-row>
          <table:table-cell table:style-name="Table5.A1" office:value-type="string">
            <text:p text:style-name="Table_20_Contents"><text:span text:style-name="Strong_20_Emphasis">Asian Pacific Rim</text:span></text:p>
          </table:table-cell>
          <table:table-cell table:style-name="Table5.A1" office:value-type="string">
            <text:p text:style-name="Table_20_Contents">Bishop Zhao-Petrov (Vancouver) ↔ Manila, Singapore, smaller Asian nodes</text:p>
          </table:table-cell>
          <table:table-cell table:style-name="Table5.A1" office:value-type="string">
            <text:p text:style-name="Table_20_Contents">Asian connection through continuing cross-Pacific intelligence-gathering operations</text:p>
          </table:table-cell>
        </table:table-row>
      </table:table>
      <text:h text:style-name="Heading_20_3" text:outline-level="3"><text:span text:style-name="Strong_20_Emphasis">Secondary Pacific Northwest operational positions:</text:span></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osition</text:p>
            </table:table-cell>
            <table:table-cell table:style-name="Table6.A1" office:value-type="string">
              <text:p text:style-name="Table_20_Heading">Region</text:p>
            </table:table-cell>
            <table:table-cell table:style-name="Table6.A1" office:value-type="string">
              <text:p text:style-name="Table_20_Heading">Population</text:p>
            </table:table-cell>
            <table:table-cell table:style-name="Table6.A1" office:value-type="string">
              <text:p text:style-name="Table_20_Heading">Specialty</text:p>
            </table:table-cell>
          </table:table-row>
        </table:table-header-rows>
        <table:table-row>
          <table:table-cell table:style-name="Table6.A1" office:value-type="string">
            <text:p text:style-name="Table_20_Contents"><text:span text:style-name="Strong_20_Emphasis">Sacramento</text:span></text:p>
          </table:table-cell>
          <table:table-cell table:style-name="Table6.A1" office:value-type="string">
            <text:p text:style-name="Table_20_Contents">California state capital</text:p>
          </table:table-cell>
          <table:table-cell table:style-name="Table6.A1" office:value-type="string">
            <text:p text:style-name="Table_20_Contents">1 Sabbat</text:p>
          </table:table-cell>
          <table:table-cell table:style-name="Table6.A1" office:value-type="string">
            <text:p text:style-name="Table_20_Contents">California state-political cooperation</text:p>
          </table:table-cell>
        </table:table-row>
        <table:table-row>
          <table:table-cell table:style-name="Table6.A1" office:value-type="string">
            <text:p text:style-name="Table_20_Contents"><text:span text:style-name="Strong_20_Emphasis">San Jose / Silicon Valley</text:span></text:p>
          </table:table-cell>
          <table:table-cell table:style-name="Table6.A1" office:value-type="string">
            <text:p text:style-name="Table_20_Contents">California Bay Area</text:p>
          </table:table-cell>
          <table:table-cell table:style-name="Table6.A1" office:value-type="string">
            <text:p text:style-name="Table_20_Contents">1 Sabbat</text:p>
          </table:table-cell>
          <table:table-cell table:style-name="Table6.A1" office:value-type="string">
            <text:p text:style-name="Table_20_Contents">Tech-economic-mortal-network specialisation</text:p>
          </table:table-cell>
        </table:table-row>
        <table:table-row>
          <table:table-cell table:style-name="Table6.A1" office:value-type="string">
            <text:p text:style-name="Table_20_Contents"><text:span text:style-name="Strong_20_Emphasis">Los Angeles</text:span></text:p>
          </table:table-cell>
          <table:table-cell table:style-name="Table6.A1" office:value-type="string">
            <text:p text:style-name="Table_20_Contents">Southern California</text:p>
          </table:table-cell>
          <table:table-cell table:style-name="Table6.A1" office:value-type="string">
            <text:p text:style-name="Table_20_Contents">1 Sabbat</text:p>
          </table:table-cell>
          <table:table-cell table:style-name="Table6.A1" office:value-type="string">
            <text:p text:style-name="Table_20_Contents">Continental cross-Pacific Latin-American cultural cooperation</text:p>
          </table:table-cell>
        </table:table-row>
        <table:table-row>
          <table:table-cell table:style-name="Table6.A1" office:value-type="string">
            <text:p text:style-name="Table_20_Contents"><text:span text:style-name="Strong_20_Emphasis">Eugene</text:span></text:p>
          </table:table-cell>
          <table:table-cell table:style-name="Table6.A1" office:value-type="string">
            <text:p text:style-name="Table_20_Contents">Oregon</text:p>
          </table:table-cell>
          <table:table-cell table:style-name="Table6.A1" office:value-type="string">
            <text:p text:style-name="Table_20_Contents">1 Sabbat</text:p>
          </table:table-cell>
          <table:table-cell table:style-name="Table6.A1" office:value-type="string">
            <text:p text:style-name="Table_20_Contents">University academic-cultural cooperation</text:p>
          </table:table-cell>
        </table:table-row>
        <table:table-row>
          <table:table-cell table:style-name="Table6.A1" office:value-type="string">
            <text:p text:style-name="Table_20_Contents"><text:span text:style-name="Strong_20_Emphasis">Spokane</text:span></text:p>
          </table:table-cell>
          <table:table-cell table:style-name="Table6.A1" office:value-type="string">
            <text:p text:style-name="Table_20_Contents">Eastern Washington</text:p>
          </table:table-cell>
          <table:table-cell table:style-name="Table6.A1" office:value-type="string">
            <text:p text:style-name="Table_20_Contents">1 Sabbat</text:p>
          </table:table-cell>
          <table:table-cell table:style-name="Table6.A1" office:value-type="string">
            <text:p text:style-name="Table_20_Contents">Continental Pacific-Coast inland positioning</text:p>
          </table:table-cell>
        </table:table-row>
        <table:table-row>
          <table:table-cell table:style-name="Table6.A1" office:value-type="string">
            <text:p text:style-name="Table_20_Contents"><text:span text:style-name="Strong_20_Emphasis">Victoria</text:span></text:p>
          </table:table-cell>
          <table:table-cell table:style-name="Table6.A1" office:value-type="string">
            <text:p text:style-name="Table_20_Contents">British Columbia (Vancouver Island)</text:p>
          </table:table-cell>
          <table:table-cell table:style-name="Table6.A1" office:value-type="string">
            <text:p text:style-name="Table_20_Contents">1 Sabbat</text:p>
          </table:table-cell>
          <table:table-cell table:style-name="Table6.A1" office:value-type="string">
            <text:p text:style-name="Table_20_Contents">Continental Canadian Pacific-coast cross-Strait positioning</text:p>
          </table:table-cell>
        </table:table-row>
        <table:table-row>
          <table:table-cell table:style-name="Table6.A1" office:value-type="string">
            <text:p text:style-name="Table_20_Contents"><text:span text:style-name="Strong_20_Emphasis">Calgary</text:span></text:p>
          </table:table-cell>
          <table:table-cell table:style-name="Table6.A1" office:value-type="string">
            <text:p text:style-name="Table_20_Contents">Alberta</text:p>
          </table:table-cell>
          <table:table-cell table:style-name="Table6.A1" office:value-type="string">
            <text:p text:style-name="Table_20_Contents">1 Sabbat</text:p>
          </table:table-cell>
          <table:table-cell table:style-name="Table6.A1" office:value-type="string">
            <text:p text:style-name="Table_20_Contents">Continental Canadian cross-Rocky-Mountains institutional cooperation</text:p>
          </table:table-cell>
        </table:table-row>
        <table:table-row>
          <table:table-cell table:style-name="Table6.A1" office:value-type="string">
            <text:p text:style-name="Table_20_Contents"><text:span text:style-name="Strong_20_Emphasis">Phoenix</text:span></text:p>
          </table:table-cell>
          <table:table-cell table:style-name="Table6.A1" office:value-type="string">
            <text:p text:style-name="Table_20_Contents">Arizona</text:p>
          </table:table-cell>
          <table:table-cell table:style-name="Table6.A1" office:value-type="string">
            <text:p text:style-name="Table_20_Contents">1 Sabbat</text:p>
          </table:table-cell>
          <table:table-cell table:style-name="Table6.A1" office:value-type="string">
            <text:p text:style-name="Table_20_Contents">Continental cross-Pacific-Southwest cooperation</text:p>
          </table:table-cell>
        </table:table-row>
      </table:table>
      <text:h text:style-name="Heading_20_3" text:outline-level="3"><text:soft-page-break/><text:span text:style-name="Strong_20_Emphasis">Total Pacific Northwest continental corridor population:</text:span> ~48 Sabbat operatives across approximately 12 institutional positions (4 primary nodes with ~40 Sabbat plus 8 secondary positions with 8 Sabbat).</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he Pacific Northwest supplement enables chronicle textures distinct from single-metropolitan-domain Sabbat-refusenik operations and from broader cross-Pacific refusenik chronicle work:</text:p>
      <text:h text:style-name="Heading_20_3" text:outline-level="3"><text:span text:style-name="Strong_20_Emphasis">The continental four-city corridor operational character</text:span></text:h>
      <text:p text:style-name="Text_20_body">Pacific Northwest chronicle scenes operate at continental four-city corridor scale rather than at single-metropolitan-domain scale. Chronicle scenes engage continuing institutional integration across San Francisco-Portland-Seattle-Vancouver through formal monthly ecclesiastical coordination, quarterly cross-corridor meetings, weekly inter-city correspondence, and continuing inter-city operational coordination. The texture: Pacific Northwest chronicle scenes carry continental institutional weight that comes from continuing four-city operational integration — Cardinal Reyna's continental authority operates across the corridor as continuing institutional infrastructure rather than as single metropolitan domain, and the operational character produces continental cross-city institutional positioning patterns that single-metropolitan-domain Sabbat-refusenik chronicles do not generate. {{user}} characters operating in Pacific Northwest chronicles develop continental cross-city operational competence that other chronicle modes do not require.</text:p>
      <text:h text:style-name="Heading_20_3" text:outline-level="3"><text:span text:style-name="Strong_20_Emphasis">The Lasombra-refusenik theological-political register as ambient foundation</text:span></text:h>
      <text:p text:style-name="Text_20_body">Pacific Northwest chronicle scenes operate under specifically Lasombra-refusenik theological-political register as ambient foundation distinct from Cardinal Magdalena's Tzimisce-tradition framework or Cardinal Aurelius's Ventrue-antitribu-refusenik framework. Lasombra-refusenik specific theological-political commitments include continuing post-2020 defection refusal (the continuing 25 Lasombra antitribu refusenik operatives across the corridor preserve continuing Lasombra-clan institutional positioning through continuing institutional commitment), continuing Lasombra Obtenebration as continuing doctrinal practice (Cardinal Reyna's network has restored Obtenebration as continuing doctrinal-religious practice through specific institutional infrastructure), and continuing Lasombra-clan-specific ecclesiastical hierarchy patterns. The texture: Pacific Northwest chronicle scenes carry Lasombra-clan-specific theological-political weight that other Sabbat-refusenik chronicle scenes do not match — the Lasombra-refusenik framework produces continuing post-2020 defection institutional refusal as ambient register, and chronicle scenes engage continuing Obtenebration doctrinal practice with theological-political weight comparable to Tzimisce-tradition flesh-shaping in Cardinal Magdalena's network or Ventrue-antitribu Dominate in Cardinal Aurelius's network.</text:p>
      <text:h text:style-name="Heading_20_3" text:outline-level="3"><text:span text:style-name="Strong_20_Emphasis">Material wealth and cultural cultivation as distinguishing operational character</text:span></text:h>
      <text:p text:style-name="Text_20_body">Pacific Northwest chronicle scenes operate with material wealth and cultural cultivation as distinguishing operational character. The continental Pacific-Coast network's San Francisco position produces material wealth that other cross-Pacific Sabbat-refusenik networks do not match (substantially less than Sarrasine's Sydney material wealth, but significantly greater than Brisbane's deliberate austerity, Cardinal Magdalena's continuing Russian Federation operational pressure conditions, or Cardinal Aurelius's continental-Andean political-environment material conditions). The texture: Pacific Northwest chronicle scenes carry sensory specificity that produces register distinct from other Sabbat-refusenik chronicle modes — Cardinal Reyna's Telegraph Hill residence with continuing 132-year institutional treasury preservation, Bishop Mendoza-Cruz's continuing North Beach cultural-cultivation infrastructure, Bishop Fairchild-Ward's continuing Pearl District cultural-cover operations, Bishop Olafsson-Cole's continuing Ballard Norwegian-American cultural <text:soft-page-break/>cooperation, Bishop Zhao-Petrov's continuing Granville Island continental cross-cultural artistic-aesthetic operations all carry continuing material specificity that produces continental Pacific-Coast cultural-cultivation register.</text:p>
      <text:h text:style-name="Heading_20_3" text:outline-level="3"><text:span text:style-name="Strong_20_Emphasis">Cross-state continental political environment</text:span></text:h>
      <text:p text:style-name="Text_20_body">Pacific Northwest chronicle scenes operate within continuing cross-state continental political environment spanning USA and Canada with distinct operational conditions across the four primary nodes. The cross-state political environment includes continuing Five-Eyes-equivalent intelligence cooperation operating through different operational infrastructure (Vancouver Canadian-CSIS-partnership infrastructure operating under different protocols than San Francisco-Portland-Seattle American-continental Twilight-Project-equivalent infrastructure), continuing tech-economic Pacific-Coast operational environment, and continuing cross-state institutional positioning. The texture: Pacific Northwest chronicle scenes engage cross-state continental political environment through specific cross-state operational adaptation patterns — chronicle scenes operating at Bishop Zhao-Petrov's Vancouver node carry continuing Canadian continental institutional context that chronicle scenes operating at Bishop Olafsson-Cole's Seattle node do not match (and vice versa), and the cross-state operational character distinguishes Pacific Northwest chronicle work from single-country political contexts.</text:p>
      <text:h text:style-name="Heading_20_3" text:outline-level="3"><text:span text:style-name="Strong_20_Emphasis">Pre-1849 California-period institutional inheritance with 132-year Cardinal Reyna continental authority</text:span></text:h>
      <text:p text:style-name="Text_20_body">Pacific Northwest chronicle scenes operate with continuing pre-1849 California-period institutional inheritance plus continuing 132-year Cardinal Reyna continental authority as continuing institutional foundation. The texture: Pacific Northwest chronicle scenes carry continuing institutional weight that comes from Cardinal Reyna's continuing 132-year continental Pacific-Coast institutional tenure (the longest continuous continental Pacific-Coast Sabbat institutional authority in continental Pacific-Coast Kindred history) plus continuing pre-1849 California-period institutional inheritance preserved across her continuing tenure. {{user}} characters operating in Pacific Northwest chronicles encounter continuing institutional weight at maximum continental-Pacific-Coast scale.</text:p>
      <text:h text:style-name="Heading_20_3" text:outline-level="3"><text:span text:style-name="Strong_20_Emphasis">The continuing intermediate Beckoning trajectory with primary succession candidate identified</text:span></text:h>
      <text:p text:style-name="Text_20_body">Pacific Northwest chronicle scenes operate with awareness that Cardinal Reyna's Beckoning trajectory operates at continuing intermediate pattern with Bishop Mendoza-Cruz emerging as primary succession candidate (in contrast to Cardinal Aurelius's most acute trajectory or Cardinal Magdalena's parallel intermediate trajectory without identified primary succession candidate). The texture: Pacific Northwest chronicle scenes carry continuing succession awareness that operates at chronicle-active scale — chronicle scenes engage continuing succession question dynamics with specific continuing primary candidate (Bishop Mendoza-Cruz) emerging as continuing institutional foundation if Cardinal Reyna Beckoning succumbence becomes acute, and the continuing identified succession positioning produces continuing continental Pacific-Coast institutional preservation opportunity that other senior-figure Beckoning trajectory chronicles do not match at equivalent identified-succession-positioning scale.</text:p>
      <text:p text:style-name="P2"><text:soft-page-break/>The lorebook entry 11 provides six chronicle hook categories. This section expands selected hooks into detailed chronicle-design infrastructure:</text:p>
      <text:h text:style-name="Heading_20_3" text:outline-level="3"><text:span text:style-name="Strong_20_Emphasis">Hook 1: The Cross-Corridor Apprentice</text:span></text:h>
      <text:p text:style-name="Text_20_body">{{user}} is a junior continental Pacific-Coast operative being prepared for cross-corridor operational positioning across the four primary nodes through specific cross-corridor apprenticeship. The chronicle tracks {{user}}'s development of cross-corridor operational competence across multi-year arc.</text:p>
      <text:p text:style-name="Text_20_body"><text:span text:style-name="Strong_20_Emphasis">Chronicle phase 1 — Single-node apprenticeship (4-5 sessions):</text:span> {{user}} begins continuing institutional positioning at one of the four primary nodes under direct Bishop oversight; chronicle scenes engage continuing single-node operational learning, continuing Lasombra-refusenik theological-political register integration (or continuing Tzimisce-tradition register at Portland or continuing Brujah-antitribu register at Seattle or continuing Toreador-antitribu register at Vancouver), continuing material wealth and cultural cultivation register integration appropriate to the assigned node.</text:p>
      <text:p text:style-name="Text_20_body"><text:span text:style-name="Strong_20_Emphasis">Chronicle phase 2 — Cross-corridor expansion (5-7 sessions):</text:span> {{user}} expands continuing institutional positioning through formal cross-corridor visits to other primary nodes; chronicle scenes engage continuing cross-corridor operational learning, continuing inter-city operational rhythm experience, continuing cross-clan-political institutional cooperation across the four primary nodes' distinct clan-political compositions.</text:p>
      <text:p text:style-name="Text_20_body"><text:span text:style-name="Strong_20_Emphasis">Chronicle phase 3 — Cross-corridor specialised positioning (3-5 sessions):</text:span> {{user}} achieves continuing operational position with continuing cross-corridor institutional weight; chronicle scenes engage continuing specialised cross-corridor operational positioning including potential continuing cross-corridor coordination role, continuing inter-city operational responsibility, continuing continental Pacific-Coast cross-state operational competence development.</text:p>
      <text:p text:style-name="Text_20_body"><text:span text:style-name="Strong_20_Emphasis">Stakes:</text:span> Personal continental Pacific-Coast cross-corridor institutional position. Successful arc produces continuing cross-corridor specialised operative role with continuing continental Pacific-Coast institutional weight; failed arc produces continuing single-node operative position without continuing cross-corridor institutional positioning.</text:p>
      <text:h text:style-name="Heading_20_3" text:outline-level="3"><text:span text:style-name="Strong_20_Emphasis">Hook 2: The Cardinal Reyna Succession Crisis Operative</text:span></text:h>
      <text:p text:style-name="Text_20_body">{{user}} is a senior continental Pacific-Coast operative engaged with Cardinal Reyna's chronicle-active Beckoning trajectory crisis and continuing continental Pacific-Coast Cardinal succession question dynamics. The chronicle tracks senior-figure Beckoning resistance operations and continental Pacific-Coast institutional preservation coordination.</text:p>
      <text:p text:style-name="Text_20_body"><text:span text:style-name="Strong_20_Emphasis">Chronicle phase 1 — Trajectory engagement at intermediate scale (3-4 sessions):</text:span> {{user}} achieves continuing senior operational position with Cardinal Reyna Beckoning trajectory awareness; chronicle scenes engage continuing trajectory acceleration patterns at intermediate scale (between Cardinal Aurelius's most acute trajectory and Cardinal Magdalena's parallel intermediate trajectory), continuing institutional concealment operations protecting Cardinal Reyna trajectory information, continuing continental Pacific-Coast institutional positioning around continuing trajectory pressure with chronicle-active institutional concern.</text:p>
      <text:p text:style-name="Text_20_body"><text:soft-page-break/><text:span text:style-name="Strong_20_Emphasis">Chronicle phase 2 — Crisis intensification with primary succession candidate (4-5 sessions):</text:span> Cardinal Reyna Beckoning trajectory reaches continuing acute pressure; chronicle scenes engage continuing continental Pacific-Coast institutional preservation coordination with continuing primary succession candidate (Bishop Mendoza-Cruz) emerging as continuing institutional foundation; succession question development including continuing Bishop Mendoza-Cruz primary candidate evaluation, continuing alternative candidate evaluation across Bishop Fairchild-Ward, Bishop Zhao-Petrov, Bishop Olafsson-Cole; possible chronicle-defining institutional positioning if Cardinal Reyna Beckoning succumbence becomes acute.</text:p>
      <text:p text:style-name="Text_20_body"><text:span text:style-name="Strong_20_Emphasis">Chronicle phase 3 — Resolution or succumbence with continuing primary succession opportunity (3-4 sessions):</text:span> Chronicle-defining resolution including potential Cardinal Reyna trajectory stabilisation, potential Cardinal Reyna Final Death through Beckoning succumbence with continental Pacific-Coast institutional reorganisation through continuing primary succession candidate elevation (Bishop Mendoza-Cruz to Cardinal authority producing continuing continental Pacific-Coast Lasombra-refusenik institutional preservation if succession succeeds), or chronicle late-arc continuing continental Pacific-Coast institutional fragmentation if continuing primary succession fails.</text:p>
      <text:p text:style-name="Text_20_body"><text:span text:style-name="Strong_20_Emphasis">Stakes:</text:span> Continental Pacific-Coast Lasombra-refusenik institutional continuity, continental cross-Pacific Sabbat-refusenik global institutional infrastructure (continuing cross-Bering-Strait and cross-Atlantic-Pacific correspondence channel adaptation requirements if Cardinal Reyna reaches Final Death), and continuing post-2020 Lasombra defection refusal continental institutional preservation. {{user}}'s role determines continental Pacific-Coast and broader cross-Pacific institutional outcomes through the trajectory crisis with continuing identified primary succession positioning that other senior-figure Beckoning trajectory chronicles do not match at equivalent continuing succession opportunity scale.</text:p>
      <text:h text:style-name="Heading_20_3" text:outline-level="3"><text:span text:style-name="Strong_20_Emphasis">Hook 3: The Cultural Cultivation Operative</text:span></text:h>
      <text:p text:style-name="Text_20_body">{{user}} is a continental Pacific-Coast operative engaged in continuing material wealth and cultural cultivation operations across the four primary nodes. The chronicle tracks continuing continental Pacific-Coast cultural-cultivation infrastructure development.</text:p>
      <text:p text:style-name="Text_20_body"><text:span text:style-name="Strong_20_Emphasis">Chronicle phase 1 — Single-node cultural cultivation specialisation (4-5 sessions):</text:span> {{user}} begins continuing cultural cultivation specialisation at one of the four primary nodes' continuing cultural-cultivation infrastructure; chronicle scenes engage continuing single-node cultural-cultivation operations including continuing San Francisco North Beach/Mission District/Financial District cultural-cultivation infrastructure (or continuing Portland Pearl District/Reed College cultural-cover infrastructure or continuing Seattle Ballard/working-class-cultural infrastructure or continuing Vancouver Granville Island/Chinese-Canadian cultural-cultivation infrastructure).</text:p>
      <text:p text:style-name="Text_20_body"><text:span text:style-name="Strong_20_Emphasis">Chronicle phase 2 — Cross-corridor cultural-cultivation development (5-7 sessions):</text:span> {{user}} expands continuing cultural-cultivation positioning through cross-corridor cultural-cultivation operations; chronicle scenes engage continuing inter-city cultural-cultivation operational coordination, continuing continental Pacific-Coast cultural-cultivation infrastructure development across the four primary nodes' distinct cultural-cultivation registers, continuing continental Pacific-Coast cross-cultural cooperation including specific continental cross-Pacific cultural cooperation through Bishop Zhao-Petrov's continuing Asian Pacific Rim cultural cooperation infrastructure.</text:p>
      <text:p text:style-name="Text_20_body"><text:soft-page-break/><text:span text:style-name="Strong_20_Emphasis">Chronicle phase 3 — Continental cultural-cultivation positioning (3-5 sessions):</text:span> {{user}} achieves continuing operational position with continuing continental cultural-cultivation institutional weight; chronicle scenes engage continuing continental Pacific-Coast cultural-cultivation infrastructure development at maximum continental scale, possible continuing chronicle-defining cultural-cultivation operations including continuing continental Pacific-Coast cultural-cultivation infrastructure preservation through continuing diminishment period, continuing continental Pacific-Coast cross-cultural cooperation development.</text:p>
      <text:p text:style-name="Text_20_body"><text:span text:style-name="Strong_20_Emphasis">Stakes:</text:span> Continental Pacific-Coast cultural-cultivation institutional infrastructure viability. {{user}}'s continuing cultural-cultivation operations produce continuing continental Pacific-Coast cultural-cultivation institutional infrastructure that may support continuing continental cultural-cultivation viability or that may produce continuing cultural-cultivation institutional fossilisation depending on chronicle late-arc engagement with continuing diminishment period continental cultural-cultivation infrastructure dynamics.</text:p>
      <text:h text:style-name="Heading_20_3" text:outline-level="3"><text:span text:style-name="Strong_20_Emphasis">Hook 4: The Continental Cross-Pacific Coordination Operative</text:span></text:h>
      <text:p text:style-name="Text_20_body">{{user}} is a continental Pacific-Coast operative engaged in continuing cross-Pacific cross-Cardinal correspondence coordination through both cross-Bering-Strait Cardinal Magdalena correspondence channel (via Pack-Leader Volkov-Petrov's Anchorage coordination) and cross-Atlantic-Pacific Cardinal Aurelius correspondence channel (via Bishop Ayala-Mendoza's Lima coordination). The chronicle tracks continental cross-Cardinal institutional positioning at maximum global Sabbat-refusenik scope.</text:p>
      <text:p text:style-name="Text_20_body"><text:span text:style-name="Strong_20_Emphasis">Chronicle phase 1 — Cross-Cardinal correspondence apprenticeship (4-5 sessions):</text:span> {{user}} achieves senior continental cross-Pacific institutional position requiring continuing institutional cultivation by Cardinal Reyna directly with deep engagement of continuing cross-Cardinal institutional dynamics across both cross-Bering-Strait and cross-Atlantic-Pacific correspondence channels.</text:p>
      <text:p text:style-name="Text_20_body"><text:span text:style-name="Strong_20_Emphasis">Chronicle phase 2 — Cross-Cardinal coordination intensification (5-7 sessions):</text:span> Chronicle scenes engage continental cross-Cardinal correspondence intensification across 2025-2026 around 2026 Brisbane operation cross-Pacific coordination through both cross-Cardinal channels; cross-Cardinal coordination meeting attendance at both cross-Bering-Strait and cross-Atlantic-Pacific institutional positions; continuing global Sabbat-refusenik institutional positioning across all three remaining Cardinals.</text:p>
      <text:p text:style-name="Text_20_body"><text:span text:style-name="Strong_20_Emphasis">Chronicle phase 3 — Global Sabbat-refusenik institutional positioning (3-5 sessions):</text:span> Chronicle late-arc engagement with chronicle-defining global Sabbat-refusenik institutional decisions about continuing preservation strategy at global scale; potential chronicle outcomes including: continued global Sabbat-refusenik institutional preservation strategy across all three remaining Cardinals; global institutional infrastructure restructuring at continuing diminishment scale; chronicle-defining cross-Cardinal institutional positioning if any of the three Cardinals reaches Final Death and continuing global Sabbat-refusenik institutional reorganisation becomes acute.</text:p>
      <text:p text:style-name="Text_20_body"><text:span text:style-name="Strong_20_Emphasis">Stakes:</text:span> Global Sabbat-refusenik institutional infrastructure across all three remaining Cardinals. {{user}}'s continental cross-Pacific coordination determines global Sabbat-refusenik institutional infrastructure outcomes that reshape continental cross-Pacific Sabbat-loyalist institutional <text:soft-page-break/>positioning for subsequent decades at maximum global scope.</text:p>
      <text:p text:style-name="P1"><text:span text:style-name="Strong_20_Emphasis">The Pacific Northwest Supplement is complete.</text:span> A 16-entry lorebook providing full single-domain chronicle infrastructure for Cardinal Reyna Quiñones's continental Pacific-Coast corridor: the four primary nodes (San Francisco-Portland-Seattle-Vancouver) with approximately 40 Sabbat operatives, the four primary Bishops with full character builds (Bishop Antonio Mendoza-Cruz of San Francisco as continuing senior deputy and primary succession candidate, Bishop Imogen Fairchild-Ward of Portland with continuing Tzimisce-tradition cooperation specialty, Bishop Henrik Olafsson-Cole of Seattle with continuing tactical-defensive specialty, Bishop Aria Zhao-Petrov of Vancouver with continuing cross-Pacific intelligence-gathering specialty), the cross-corridor coordination patterns (weekly inter-city correspondence, monthly Cardinal-Bishop ecclesiastical coordination, quarterly cross-corridor meetings, annual continental Pacific-Coast institutional conference), the Pacific Northwest continental corridor chronicle character register (continental four-city corridor operational character, Lasombra-refusenik theological-political register as ambient foundation, material wealth and cultural cultivation, cross-state continental political environment, pre-1849 California-period institutional inheritance), continental Camarilla pressure on Pacific Northwest corridor, Pacific Northwest cross-supernatural infrastructure with continuing Glass Walker sept positioning across the four primary nodes, the pre-1849 California-period institutional inheritance with continuing 132-year Cardinal Reyna continental authority, six chronicle hook categories with extended chronicle-design infrastructure, the continuing post-2020 Lasombra defection refusal infrastructure (~25 continuing Lasombra antitribu refusenik operatives), the chronicle-active Cardinal Reyna Beckoning trajectory and Pacific Northwest succession dynamics with continuing primary succession candidate (Bishop Mendoza-Cruz), the continuing inter-city operational rhythm at four operational tempos, and secondary Pacific Northwest operational positions across approximately 8 additional continuing institutional positions extending continuing continental geographic coverage.</text:p>
      <text:p text:style-name="P1"/>
      <text:p text:style-name="P1"><text:span text:style-name="Strong_20_Emphasis">The cross-Pacific Sabbat-refusenik global infrastructure is now substantially production-complete</text:span> with all three remaining Cardinals globally detailed at full city-supplement scale (Pacific Northwest now joining South American highlands and Russian Far East at continental institutional scope), the cross-Pacific refusenik supplement establishing continental institutional context, both currently-operational cross-Cardinal correspondence channels detailed (cross-Bering-Strait and cross-Atlantic-Pacific), and approximately 305 Sabbat-refusenik operatives globally accounted for across the global continental institutional preservation infrastruc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5-13T19:44:41.060684388</dc:date>
    <meta:editing-duration>PT4M7S</meta:editing-duration>
    <meta:editing-cycles>2</meta:editing-cycles>
    <meta:generator>LibreOffice/24.2.7.2$Linux_X86_64 LibreOffice_project/420$Build-2</meta:generator>
    <meta:document-statistic meta:table-count="6" meta:image-count="0" meta:object-count="0" meta:page-count="11" meta:paragraph-count="186" meta:word-count="3083" meta:character-count="29738" meta:non-whitespace-character-count="26816"/>
  </office:meta>
</office:document-meta>
</file>