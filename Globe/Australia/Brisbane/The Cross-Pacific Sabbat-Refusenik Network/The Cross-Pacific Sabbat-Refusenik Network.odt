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251cm"/>
    </style:style>
    <style:style style:name="Table1.B" style:family="table-column">
      <style:table-column-properties style:column-width="2.215cm"/>
    </style:style>
    <style:style style:name="Table1.C" style:family="table-column">
      <style:table-column-properties style:column-width="3.672cm"/>
    </style:style>
    <style:style style:name="Table1.D" style:family="table-column">
      <style:table-column-properties style:column-width="2.492cm"/>
    </style:style>
    <style:style style:name="Table1.E" style:family="table-column">
      <style:table-column-properties style:column-width="6.369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4.512cm"/>
    </style:style>
    <style:style style:name="Table2.B" style:family="table-column">
      <style:table-column-properties style:column-width="12.488cm"/>
    </style:style>
    <style:style style:name="Table2.A1" style:family="table-cell">
      <style:table-cell-properties style:vertical-align="middle" fo:padding="0.049cm" fo:border="none"/>
    </style:style>
    <style:style style:name="P1" style:family="paragraph" style:parent-style-name="Preformatted_20_Text">
      <style:paragraph-properties fo:margin-left="0cm" fo:margin-right="0cm" fo:text-indent="0cm" style:auto-text-indent="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paragraph-properties fo:margin-left="0cm" fo:margin-right="0cm" fo:text-indent="0cm" style:auto-text-indent="false"/>
    </style:style>
    <style:style style:name="T1" style:family="text">
      <style:text-properties fo:color="#f97583" loext:opacity="1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 supplement extending the Brisbane domain into its broader Pacific institutional context — Cardinal Reyna Quiñones's Pacific Northwest network of Sabbat-loyalist remnants, the formal correspondence channel maintained between Templar Constance Abernathy in Brisbane and Cardinal Reyna's Vancouver-Seattle-Portland-San-Francisco operational corridor, and the smaller remnant nodes scattered across the Pacific Rim that constitute what little remains of organised Sabbat-loyalist political infrastructure globally.</text:p>
      <text:p text:style-name="Text_20_body"><text:span text:style-name="Strong_20_Emphasis">Distinctive features of this supplement:</text:span></text:p>
      <text:list text:style-name="L1">
        <text:list-item>
          <text:p text:style-name="P3"><text:span text:style-name="Strong_20_Emphasis">Sabbat-refusenik</text:span> as specific political-theological identity — Sabbat operatives who refused the 1999 reformation, refused the 2014 Beckoning withdrawal, refused the 2020 Lasombra defection, and continue Sabbat doctrinal practice as institutional remnant </text:p>
        </text:list-item>
        <text:list-item>
          <text:p text:style-name="P3"><text:span text:style-name="Strong_20_Emphasis">Cardinal Reyna Quiñones</text:span> introduced previously in the Chicago kit's antagonist material as the Pacific Northwest Sabbat-splinter cardinal; this supplement provides her full continental-political infrastructure </text:p>
        </text:list-item>
        <text:list-item>
          <text:p text:style-name="P3"><text:span text:style-name="Strong_20_Emphasis">The Pacific Rim Refusenik Corridor</text:span> — a loose network of approximately fifteen Sabbat-loyalist nodes from Anchorage to Singapore, connected through formal correspondence, ecclesiastical practice, and shared political-theological commitment </text:p>
        </text:list-item>
        <text:list-item>
          <text:p text:style-name="P3"><text:span text:style-name="Strong_20_Emphasis">Cross-Pacific operations as chronicle infrastructure</text:span> — Brisbane chronicles engaging this material develop continental significance beyond Australia; Pacific Northwest chronicles engaging this material develop Australian-Pacific continental significance </text:p>
        </text:list-item>
        <text:list-item>
          <text:p text:style-name="P2"><text:span text:style-name="Strong_20_Emphasis">Institutional preservation as central political-theological project</text:span> — the network's purpose is custodianship of authentic Sabbat tradition through the global diminishment period, with chronicle late-arc opportunities engaging the long question of whether preservation produces eventual resurgence or institutional fossilisation </text:p>
        </text:list-item>
      </text:list>
      <text:p text:style-name="Text_20_body"><text:span text:style-name="Strong_20_Emphasis">Chronicle position:</text:span> This supplement enables chronicles spanning Brisbane and Pacific Northwest configurations, supports cross-domain operations between Cardinal Reyna's network and Templar Abernathy's Brisbane operations, and provides institutional context for Brisbane chronicles' continental-Sabbat-political register without requiring full Pacific Northwest chronicle setup.</text:p>
      <text:p text:style-name="P1">A 14-entry lorebook providing the cross-Pacific Sabbat-refusenik network, Cardinal Reyna's operational infrastructure, the Templar Abernathy correspondence channel, and the broader Pacific Rim refusenik node distribution. Designed to layer alongside <text:span text:style-name="Source_20_Text"><text:span text:style-name="T1">vtm_modern_nights.json</text:span></text:span> and (essentially) <text:span text:style-name="Source_20_Text"><text:span text:style-name="T1">vtm_brisbane_by_night.json</text:span></text:span>; useful adjacent to <text:span text:style-name="Source_20_Text"><text:span text:style-name="T1">vtm_chicago_by_night.json</text:span></text:span> for Chicago chronicles engaging Cardinal Reyna directly.</text:p>
      <text:p text:style-name="P1"/>
      <text:p text:style-name="P1">load alongside <text:span text:style-name="Source_20_Text"><text:span text:style-name="T1">vtm_modern_nights.json</text:span></text:span> and (typically) <text:span text:style-name="Source_20_Text"><text:span text:style-name="T1">vtm_brisbane_by_night.json</text:span></text:span> for chronicles engaging cross-Pacific Sabbat-refusenik institutional infrastructure. Optionally layer with <text:span text:style-name="Source_20_Text"><text:span text:style-name="T1">vtm_chicago_by_night.json</text:span></text:span> for Chicago chronicles engaging Cardinal Reyna directly through her continental Pacific-Coast institutional posi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Node</text:p>
            </table:table-cell>
            <table:table-cell table:style-name="Table1.A1" office:value-type="string">
              <text:p text:style-name="Table_20_Heading">Region</text:p>
            </table:table-cell>
            <table:table-cell table:style-name="Table1.A1" office:value-type="string">
              <text:p text:style-name="Table_20_Heading">Authority</text:p>
            </table:table-cell>
            <table:table-cell table:style-name="Table1.A1" office:value-type="string">
              <text:p text:style-name="Table_20_Heading">Population</text:p>
            </table:table-cell>
            <table:table-cell table:style-name="Table1.A1" office:value-type="string">
              <text:p text:style-name="Table_20_Heading">Operational specialty</text:p>
            </table:table-cell>
          </table:table-row>
        </table:table-header-rows>
        <table:table-row>
          <table:table-cell table:style-name="Table1.A1" office:value-type="string">
            <text:p text:style-name="Table_20_Contents"><text:span text:style-name="Strong_20_Emphasis">San Francisco</text:span></text:p>
          </table:table-cell>
          <table:table-cell table:style-name="Table1.A1" office:value-type="string">
            <text:p text:style-name="Table_20_Contents">Pacific Northwest</text:p>
          </table:table-cell>
          <table:table-cell table:style-name="Table1.A1" office:value-type="string">
            <text:p text:style-name="Table_20_Contents">Cardinal Reyna Quiñones</text:p>
          </table:table-cell>
          <table:table-cell table:style-name="Table1.A1" office:value-type="string">
            <text:p text:style-name="Table_20_Contents">~15 Sabbat</text:p>
          </table:table-cell>
          <table:table-cell table:style-name="Table1.A1" office:value-type="string">
            <text:p text:style-name="Table_20_Contents">Network central node, Lasombra-refusenik institutional foundation</text:p>
          </table:table-cell>
        </table:table-row>
        <table:table-row>
          <table:table-cell table:style-name="Table1.A1" office:value-type="string">
            <text:p text:style-name="Table_20_Contents"><text:span text:style-name="Strong_20_Emphasis">Portland</text:span></text:p>
          </table:table-cell>
          <table:table-cell table:style-name="Table1.A1" office:value-type="string">
            <text:p text:style-name="Table_20_Contents">Pacific Northwest</text:p>
          </table:table-cell>
          <table:table-cell table:style-name="Table1.A1" office:value-type="string">
            <text:p text:style-name="Table_20_Contents">Bishop Imogen Fairchild-Ward</text:p>
          </table:table-cell>
          <table:table-cell table:style-name="Table1.A1" office:value-type="string">
            <text:p text:style-name="Table_20_Contents">~10 Sabbat</text:p>
          </table:table-cell>
          <table:table-cell table:style-name="Table1.A1" office:value-type="string">
            <text:p text:style-name="Table_20_Contents">Mortal-cover ecclesiastical infrastructure</text:p>
          </table:table-cell>
        </table:table-row>
        <table:table-row>
          <table:table-cell table:style-name="Table1.A1" office:value-type="string">
            <text:p text:style-name="Table_20_Contents"><text:span text:style-name="Strong_20_Emphasis">Seattle</text:span></text:p>
          </table:table-cell>
          <table:table-cell table:style-name="Table1.A1" office:value-type="string">
            <text:p text:style-name="Table_20_Contents">Pacific Northwest</text:p>
          </table:table-cell>
          <table:table-cell table:style-name="Table1.A1" office:value-type="string">
            <text:p text:style-name="Table_20_Contents">Bishop Henrik Olafsson-Cole</text:p>
          </table:table-cell>
          <table:table-cell table:style-name="Table1.A1" office:value-type="string">
            <text:p text:style-name="Table_20_Contents">~8 Sabbat</text:p>
          </table:table-cell>
          <table:table-cell table:style-name="Table1.A1" office:value-type="string">
            <text:p text:style-name="Table_20_Contents">Working-class-mortal-network, AFP-Five-Eyes counter-intel</text:p>
          </table:table-cell>
        </table:table-row>
        <table:table-row>
          <table:table-cell table:style-name="Table1.A1" office:value-type="string">
            <text:p text:style-name="Table_20_Contents"><text:span text:style-name="Strong_20_Emphasis">Vancouver</text:span></text:p>
          </table:table-cell>
          <table:table-cell table:style-name="Table1.A1" office:value-type="string">
            <text:p text:style-name="Table_20_Contents">Pacific Northwest</text:p>
          </table:table-cell>
          <table:table-cell table:style-name="Table1.A1" office:value-type="string">
            <text:p text:style-name="Table_20_Contents">Bishop Aria Zhao-Petrov</text:p>
          </table:table-cell>
          <table:table-cell table:style-name="Table1.A1" office:value-type="string">
            <text:p text:style-name="Table_20_Contents">~7 Sabbat</text:p>
          </table:table-cell>
          <table:table-cell table:style-name="Table1.A1" office:value-type="string">
            <text:p text:style-name="Table_20_Contents">Cross-Pacific intelligence-gathering, Asian Pacific Rim correspondence</text:p>
          </table:table-cell>
        </table:table-row>
        <table:table-row>
          <table:table-cell table:style-name="Table1.A1" office:value-type="string">
            <text:p text:style-name="Table_20_Contents"><text:span text:style-name="Strong_20_Emphasis">Brisbane</text:span></text:p>
          </table:table-cell>
          <table:table-cell table:style-name="Table1.A1" office:value-type="string">
            <text:p text:style-name="Table_20_Contents">Australia</text:p>
          </table:table-cell>
          <table:table-cell table:style-name="Table1.A1" office:value-type="string">
            <text:p text:style-name="Table_20_Contents">Templar Constance Abernathy (under Bishop Callista)</text:p>
          </table:table-cell>
          <table:table-cell table:style-name="Table1.A1" office:value-type="string">
            <text:p text:style-name="Table_20_Contents">(within ~40 Brisbane Sabbat)</text:p>
          </table:table-cell>
          <table:table-cell table:style-name="Table1.A1" office:value-type="string">
            <text:p text:style-name="Table_20_Contents">Australian continental Lasombra-refusenik representation</text:p>
          </table:table-cell>
        </table:table-row>
        <table:table-row>
          <table:table-cell table:style-name="Table1.A1" office:value-type="string">
            <text:p text:style-name="Table_20_Contents"><text:span text:style-name="Strong_20_Emphasis">Anchorage</text:span></text:p>
          </table:table-cell>
          <table:table-cell table:style-name="Table1.A1" office:value-type="string">
            <text:p text:style-name="Table_20_Contents">Alaska</text:p>
          </table:table-cell>
          <table:table-cell table:style-name="Table1.A1" office:value-type="string">
            <text:p text:style-name="Table_20_Contents">Pack-Leader Maria Volkov-Petrov</text:p>
          </table:table-cell>
          <table:table-cell table:style-name="Table1.A1" office:value-type="string">
            <text:p text:style-name="Table_20_Contents">~4 Sabbat</text:p>
          </table:table-cell>
          <table:table-cell table:style-name="Table1.A1" office:value-type="string">
            <text:p text:style-name="Table_20_Contents">Cross-Bering-Strait correspondence with Russian Far East network</text:p>
          </table:table-cell>
        </table:table-row>
        <table:table-row>
          <table:table-cell table:style-name="Table1.A1" office:value-type="string">
            <text:p text:style-name="Table_20_Contents"><text:span text:style-name="Strong_20_Emphasis">Honolulu</text:span></text:p>
          </table:table-cell>
          <table:table-cell table:style-name="Table1.A1" office:value-type="string">
            <text:p text:style-name="Table_20_Contents">Hawaii</text:p>
          </table:table-cell>
          <table:table-cell table:style-name="Table1.A1" office:value-type="string">
            <text:p text:style-name="Table_20_Contents">Bishop Kalani Kahale-Mitchell</text:p>
          </table:table-cell>
          <table:table-cell table:style-name="Table1.A1" office:value-type="string">
            <text:p text:style-name="Table_20_Contents">~8 Sabbat</text:p>
          </table:table-cell>
          <table:table-cell table:style-name="Table1.A1" office:value-type="string">
            <text:p text:style-name="Table_20_Contents">Cross-Pacific midpoint meeting infrastructure</text:p>
          </table:table-cell>
        </table:table-row>
        <table:table-row>
          <table:table-cell table:style-name="Table1.A1" office:value-type="string">
            <text:p text:style-name="Table_20_Contents"><text:span text:style-name="Strong_20_Emphasis">Manila</text:span></text:p>
          </table:table-cell>
          <table:table-cell table:style-name="Table1.A1" office:value-type="string">
            <text:p text:style-name="Table_20_Contents">Philippines</text:p>
          </table:table-cell>
          <table:table-cell table:style-name="Table1.A1" office:value-type="string">
            <text:p text:style-name="Table_20_Contents">Bishop Mateo Reyes-Cruz</text:p>
          </table:table-cell>
          <table:table-cell table:style-name="Table1.A1" office:value-type="string">
            <text:p text:style-name="Table_20_Contents">~12 Sabbat</text:p>
          </table:table-cell>
          <table:table-cell table:style-name="Table1.A1" office:value-type="string">
            <text:p text:style-name="Table_20_Contents">Largest Asian Pacific Rim node, Catholic-religious-network</text:p>
          </table:table-cell>
        </table:table-row>
        <table:table-row>
          <table:table-cell table:style-name="Table1.A1" office:value-type="string">
            <text:p text:style-name="Table_20_Contents"><text:span text:style-name="Strong_20_Emphasis">Singapore</text:span></text:p>
          </table:table-cell>
          <table:table-cell table:style-name="Table1.A1" office:value-type="string">
            <text:p text:style-name="Table_20_Contents">Singapore</text:p>
          </table:table-cell>
          <table:table-cell table:style-name="Table1.A1" office:value-type="string">
            <text:p text:style-name="Table_20_Contents">Pack-Leader Indira Subramaniam</text:p>
          </table:table-cell>
          <table:table-cell table:style-name="Table1.A1" office:value-type="string">
            <text:p text:style-name="Table_20_Contents">~5 Sabbat</text:p>
          </table:table-cell>
          <table:table-cell table:style-name="Table1.A1" office:value-type="string">
            <text:p text:style-name="Table_20_Contents">Asian-Pacific cross-cultural infrastructure</text:p>
          </table:table-cell>
        </table:table-row>
        <table:table-row>
          <table:table-cell table:style-name="Table1.A1" office:value-type="string">
            <text:p text:style-name="Table_20_Contents"><text:span text:style-name="Strong_20_Emphasis">Auckland</text:span></text:p>
          </table:table-cell>
          <table:table-cell table:style-name="Table1.A1" office:value-type="string">
            <text:p text:style-name="Table_20_Contents">New Zealand</text:p>
          </table:table-cell>
          <table:table-cell table:style-name="Table1.A1" office:value-type="string">
            <text:p text:style-name="Table_20_Contents">Pack-Leader Padraig MacBride</text:p>
          </table:table-cell>
          <table:table-cell table:style-name="Table1.A1" office:value-type="string">
            <text:p text:style-name="Table_20_Contents">~3 Sabbat</text:p>
          </table:table-cell>
          <table:table-cell table:style-name="Table1.A1" office:value-type="string">
            <text:p text:style-name="Table_20_Contents">Cross-Tasman alternative pathway</text:p>
          </table:table-cell>
        </table:table-row>
        <table:table-row>
          <table:table-cell table:style-name="Table1.A1" office:value-type="string">
            <text:p text:style-name="Table_20_Contents"><text:span text:style-name="Strong_20_Emphasis">Darwin</text:span></text:p>
          </table:table-cell>
          <table:table-cell table:style-name="Table1.A1" office:value-type="string">
            <text:p text:style-name="Table_20_Contents">Australia</text:p>
          </table:table-cell>
          <table:table-cell table:style-name="Table1.A1" office:value-type="string">
            <text:p text:style-name="Table_20_Contents">(under Bishop Callista oversight)</text:p>
          </table:table-cell>
          <table:table-cell table:style-name="Table1.A1" office:value-type="string">
            <text:p text:style-name="Table_20_Contents">~2 Sabbat</text:p>
          </table:table-cell>
          <table:table-cell table:style-name="Table1.A1" office:value-type="string">
            <text:p text:style-name="Table_20_Contents">Australian secondary refusenik node</text:p>
          </table:table-cell>
        </table:table-row>
        <table:table-row>
          <table:table-cell table:style-name="Table1.A1" office:value-type="string">
            <text:p text:style-name="Table_20_Contents"><text:span text:style-name="Strong_20_Emphasis">Port Moresby</text:span></text:p>
          </table:table-cell>
          <table:table-cell table:style-name="Table1.A1" office:value-type="string">
            <text:p text:style-name="Table_20_Contents">PNG</text:p>
          </table:table-cell>
          <table:table-cell table:style-name="Table1.A1" office:value-type="string">
            <text:p text:style-name="Table_20_Contents">(small node)</text:p>
          </table:table-cell>
          <table:table-cell table:style-name="Table1.A1" office:value-type="string">
            <text:p text:style-name="Table_20_Contents">~2 Sabbat</text:p>
          </table:table-cell>
          <table:table-cell table:style-name="Table1.A1" office:value-type="string">
            <text:p text:style-name="Table_20_Contents">Melanesian-Pacific institutional presence</text:p>
          </table:table-cell>
        </table:table-row>
        <table:table-row>
          <table:table-cell table:style-name="Table1.A1" office:value-type="string">
            <text:p text:style-name="Table_20_Contents"><text:span text:style-name="Strong_20_Emphasis">Suva</text:span></text:p>
          </table:table-cell>
          <table:table-cell table:style-name="Table1.A1" office:value-type="string">
            <text:p text:style-name="Table_20_Contents">Fiji</text:p>
          </table:table-cell>
          <table:table-cell table:style-name="Table1.A1" office:value-type="string">
            <text:p text:style-name="Table_20_Contents">(small node)</text:p>
          </table:table-cell>
          <table:table-cell table:style-name="Table1.A1" office:value-type="string">
            <text:p text:style-name="Table_20_Contents">~2 Sabbat</text:p>
          </table:table-cell>
          <table:table-cell table:style-name="Table1.A1" office:value-type="string">
            <text:p text:style-name="Table_20_Contents">South Pacific institutional presence</text:p>
          </table:table-cell>
        </table:table-row>
        <table:table-row>
          <table:table-cell table:style-name="Table1.A1" office:value-type="string">
            <text:p text:style-name="Table_20_Contents"><text:span text:style-name="Strong_20_Emphasis">Tahiti</text:span></text:p>
          </table:table-cell>
          <table:table-cell table:style-name="Table1.A1" office:value-type="string">
            <text:p text:style-name="Table_20_Contents">French Polynesia</text:p>
          </table:table-cell>
          <table:table-cell table:style-name="Table1.A1" office:value-type="string">
            <text:p text:style-name="Table_20_Contents">(solitary figure)</text:p>
          </table:table-cell>
          <table:table-cell table:style-name="Table1.A1" office:value-type="string">
            <text:p text:style-name="Table_20_Contents">1 Sabbat</text:p>
          </table:table-cell>
          <table:table-cell table:style-name="Table1.A1" office:value-type="string">
            <text:p text:style-name="Table_20_Contents">Long-term institutional preservation</text:p>
          </table:table-cell>
        </table:table-row>
        <table:table-row>
          <table:table-cell table:style-name="Table1.A1" office:value-type="string">
            <text:p text:style-name="Table_20_Contents"><text:span text:style-name="Strong_20_Emphasis">Apia</text:span></text:p>
          </table:table-cell>
          <table:table-cell table:style-name="Table1.A1" office:value-type="string">
            <text:p text:style-name="Table_20_Contents">Samoa</text:p>
          </table:table-cell>
          <table:table-cell table:style-name="Table1.A1" office:value-type="string">
            <text:p text:style-name="Table_20_Contents">(solitary figure)</text:p>
          </table:table-cell>
          <table:table-cell table:style-name="Table1.A1" office:value-type="string">
            <text:p text:style-name="Table_20_Contents">1 Sabbat</text:p>
          </table:table-cell>
          <table:table-cell table:style-name="Table1.A1" office:value-type="string">
            <text:p text:style-name="Table_20_Contents">Long-term institutional preservation</text:p>
          </table:table-cell>
        </table:table-row>
      </table:table>
      <text:p text:style-name="Text_20_body"><text:span text:style-name="Strong_20_Emphasis">Total cross-Pacific Sabbat-refusenik network:</text:span> ~220 Sabbat across approximately 15 institutional positions, distributed across the Pacific Rim from Anchorage to Singapore.</text:p>
      <text:h text:style-name="Heading_20_3" text:outline-level="3"><text:span text:style-name="Strong_20_Emphasis">Network political-theological infrastructure:</text:span></text:h>
      <table:table table:name="Table2" table:style-name="Table2">
        <table:table-column table:style-name="Table2.A"/>
        <table:table-column table:style-name="Table2.B"/>
        <table:table-header-rows>
          <table:table-row>
            <table:table-cell table:style-name="Table2.A1" office:value-type="string">
              <text:p text:style-name="Table_20_Heading">Component</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text:span text:style-name="Strong_20_Emphasis">Refusenik framework</text:span></text:p>
          </table:table-cell>
          <table:table-cell table:style-name="Table2.A1" office:value-type="string">
            <text:p text:style-name="Table_20_Contents">Five central theological-political commitments: authentic Sabbat tradition preservation, institutional custodianship through diminishment, committed theological-political doctrine, Beckoning resistance as doctrinal obligation, cross-continental institutional solidarity</text:p>
          </table:table-cell>
        </table:table-row>
        <table:table-row>
          <table:table-cell table:style-name="Table2.A1" office:value-type="string">
            <text:p text:style-name="Table_20_Contents"><text:span text:style-name="Strong_20_Emphasis">Three diminishment events</text:span></text:p>
          </table:table-cell>
          <table:table-cell table:style-name="Table2.A1" office:value-type="string">
            <text:p text:style-name="Table_20_Contents">1999 Sabbat reformation (~30% Sabbat global population reduction), 2014 Beckoning withdrawal (~35% remaining global Sabbat population reduction), 2020 Lasombra defection (~60% Lasombra Sabbat-affiliated population transitioning to Camarilla)</text:p>
          </table:table-cell>
        </table:table-row>
        <table:table-row>
          <table:table-cell table:style-name="Table2.A1" office:value-type="string">
            <text:p text:style-name="Table_20_Contents"><text:span text:style-name="Strong_20_Emphasis">Cardinal Reyna-Templar Abernathy correspondence</text:span></text:p>
          </table:table-cell>
          <table:table-cell table:style-name="Table2.A1" office:value-type="string">
            <text:p text:style-name="Table_20_Contents">Monthly formal correspondence across 50 years, three formal meetings (1981 Hawaii, 2003 Vancouver, 2019 Brisbane), continental cross-Pacific Lasombra-refusenik institutional foundation</text:p>
          </table:table-cell>
        </table:table-row>
        <text:soft-page-break/>
        <table:table-row>
          <table:table-cell table:style-name="Table2.A1" office:value-type="string">
            <text:p text:style-name="Table_20_Contents"><text:span text:style-name="Strong_20_Emphasis">2026 cross-Pacific coordination</text:span></text:p>
          </table:table-cell>
          <table:table-cell table:style-name="Table2.A1" office:value-type="string">
            <text:p text:style-name="Table_20_Contents">Continental Pacific-Coast institutional support for Brisbane operation, cross-Pacific institutional preservation positioning, theological-political institutional coordination</text:p>
          </table:table-cell>
        </table:table-row>
        <table:table-row>
          <table:table-cell table:style-name="Table2.A1" office:value-type="string">
            <text:p text:style-name="Table_20_Contents"><text:span text:style-name="Strong_20_Emphasis">Beckoning trajectories</text:span></text:p>
          </table:table-cell>
          <table:table-cell table:style-name="Table2.A1" office:value-type="string">
            <text:p text:style-name="Table_20_Contents">Cardinal Reyna (2014, 2018, 2023), Templar Abernathy (2014, 2019), Bishop Callista (parallel pattern) — all senior figures approaching acute pressure threshold</text:p>
          </table:table-cell>
        </table:table-row>
      </table:table>
      <text:h text:style-name="Heading_20_3" text:outline-level="3"><text:span text:style-name="Strong_20_Emphasis">Cross-Pacific cultural-political register characteristics:</text:span></text:h>
      <text:list text:style-name="L2">
        <text:list-item>
          <text:p text:style-name="P5"><text:span text:style-name="Strong_20_Emphasis">Institutional preservation as political-theological vocation</text:span> — not defensive tactic but ongoing religious-political work </text:p>
        </text:list-item>
        <text:list-item>
          <text:p text:style-name="P5"><text:span text:style-name="Strong_20_Emphasis">Cross-continental correspondence as operational infrastructure</text:span> — slow accumulating institutional development over rapid tempo </text:p>
        </text:list-item>
        <text:list-item>
          <text:p text:style-name="P5"><text:span text:style-name="Strong_20_Emphasis">Continental Pacific geographic rhythm</text:span> — operational coordination calibrated to continental geographic distances </text:p>
        </text:list-item>
        <text:list-item>
          <text:p text:style-name="P5"><text:span text:style-name="Strong_20_Emphasis">Post-defection Lasombra-refusenik specificity</text:span> — distinct theological-political register from broader Sabbat-refusenik framework </text:p>
        </text:list-item>
        <text:list-item>
          <text:p text:style-name="P4"><text:span text:style-name="Strong_20_Emphasis">Institutional fatigue at continental scale</text:span> — Beckoning trajectories on multiple senior figures simultaneously, continental institutional viability questions </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The cross-Pacific Sabbat-refusenik supplement enables chronicle textures that single-domain Sabbat chronicles do not produce:</text:p>
      <text:h text:style-name="Heading_20_3" text:outline-level="3"><text:span text:style-name="Strong_20_Emphasis">The continental institutional preservation register</text:span></text:h>
      <text:p text:style-name="Text_20_body">Cross-Pacific chronicle scenes engage institutional preservation as continental theological-political vocation. Unlike Brisbane single-domain chronicles where institutional preservation operates as Bishop Callista's custodian-framing for one metropolitan domain, cross-Pacific chronicles engage continental institutional preservation across approximately 15 nodes spanning the Pacific Rim. The texture: cross-Pacific chronicle scenes carry weight that comes from awareness of continental scope — Cardinal Reyna's San Francisco operations preserve authentic Sabbat tradition for the broader Pacific Rim, Templar Abernathy's Brisbane correspondence connects Australian continental position to continental Pacific-Coast institutional infrastructure, and the network's continental scope produces institutional significance that single-domain operations cannot generate.</text:p>
      <text:h text:style-name="Heading_20_3" text:outline-level="3"><text:span text:style-name="Strong_20_Emphasis">Cross-Pacific correspondence as operational rhythm</text:span></text:h>
      <text:p text:style-name="Text_20_body">Cross-Pacific chronicle scenes operate at the slower temporal rhythm continental Pacific geographic distances produce. The Templar Abernathy-Cardinal Reyna correspondence is monthly. Cross-continental institutional coordination meetings occur every 5-15 years. The network's operational tempo accommodates continental geographic distances through deliberate slow-accumulation pacing patterns. The texture: cross-Pacific chronicle scenes pace differently from Brisbane single-domain chronicles — what takes a session in Brisbane operations takes 3-4 sessions in cross-Pacific operations, and the slower temporal rhythm is structural rather than incidental. {{user}} characters operating at cross-Pacific institutional scale develop the patience continental geographic distance requires; characters who try to operate on Brisbane-single-domain temporal rhythm at cross-Pacific scale produce continual operational friction.</text:p>
      <text:h text:style-name="Heading_20_3" text:outline-level="3"><text:span text:style-name="Strong_20_Emphasis">The Lasombra-refusenik specific theological-political register</text:span></text:h>
      <text:p text:style-name="Text_20_body">Cross-Pacific chronicle scenes engaging Lasombra-refusenik institutional positions (Cardinal Reyna, Templar Abernathy, the broader Lasombra antitribu refusenik network) produce specific theological-political register distinct from broader Sabbat-refusenik chronicle work. Lasombra-refusenik figures emphasise continuing post-2020 defection theological-political commitments — the 2020 defection produced clan-political-theological crisis that Lasombra-refusenik figures consider continental institutional foundation rather than historical event, and the Lasombra-refusenik specific framework operates as ongoing theological-political infrastructure. The texture: Lasombra-refusenik chronicle scenes carry post-defection institutional weight that Brujah-antitribu, Tzimisce, Toreador-antitribu, or other Sabbat-refusenik chronicle scenes do not match. Cardinal Reyna's continental Pacific-Coast Lasombra-refusenik institutional authority is specifically Lasombra-refusenik authority — not generalised Sabbat-loyalist authority — and the specificity shapes chronicle-political dynamics.</text:p>
      <text:h text:style-name="Heading_20_3" text:outline-level="3"><text:span text:style-name="Strong_20_Emphasis">The Beckoning convergence as continental crisis</text:span></text:h>
      <text:p text:style-name="Text_20_body">Cross-Pacific chronicle scenes engage Beckoning trajectories on multiple senior figures simultaneously. Cardinal Reyna has been Beckoned three times since 2014; Templar Abernathy twice; Bishop Callista at parallel pattern; multiple smaller-node senior figures across the network at <text:soft-page-break/>varying trajectory stages. The convergent Beckoning pressure produces continental cross-Pacific institutional crisis register that single-domain chronicles do not match. The texture: cross-Pacific chronicle scenes occur with awareness that the network's continental viability depends on continuing Beckoning resistance from multiple senior figures whose individual trajectories may compress institutional working time, and the continental cross-Pacific institutional positioning around the convergent Beckoning pressure is itself chronicle-active. {{user}} characters at cross-Pacific institutional positions encounter continental crisis register that operates beyond single-domain Beckoning-trajectory engagement.</text:p>
      <text:h text:style-name="Heading_20_3" text:outline-level="3"><text:span text:style-name="Strong_20_Emphasis">Continental institutional fossilisation-vs-resurgence as chronicle question</text:span></text:h>
      <text:p text:style-name="Text_20_body">Cross-Pacific chronicle scenes engage the network's central political-theological question (does continued institutional preservation produce eventual Sabbat continental resurgence or institutional fossilisation) at continental scale. The question is unresolved across network-internal political-theological discourse. The texture: cross-Pacific chronicle scenes carry continental theological-political question that operates beyond institutional preservation tactics — the deeper question of whether the network's continuing operations serve genuine continental Sabbat-political vocation or institutional momentum maintained by personal commitment in the absence of meaningful continental Sabbat-political possibility. {{user}} characters at senior cross-Pacific institutional positions encounter this question in chronicle late-arc work; chronicle scenarios engaging the question produce chronicle-defining outcomes that reshape continental Pacific Sabbat-refusenik institutional infrastructure for subsequent decades.</text:p>
      <text:h text:style-name="Heading_20_3" text:outline-level="3"><text:span text:style-name="Strong_20_Emphasis">Post-Beckoning institutional succession as continental chronicle-active question</text:span></text:h>
      <text:p text:style-name="Text_20_body">Cross-Pacific chronicle scenes engage senior-figure succession as continental cross-Pacific chronicle-active question. The chronicle-significant question of who succeeds Cardinal Reyna in continental Pacific-Coast Lasombra-refusenik authority, who succeeds Templar Abernathy in Brisbane Lasombra-refusenik institutional position, and how continental cross-Pacific institutional infrastructure continues if multiple senior figures reach Final Death through Beckoning succumbence simultaneously produces continental chronicle-active dynamics that single-domain succession chronicles do not match. The texture: cross-Pacific chronicle scenes occur with continental-succession positioning produced by accumulating senior-figure Beckoning trajectories, and the continental positioning produces chronicle-development infrastructure for {{user}} characters at sub-senior institutional positions whose chronicle-arc trajectories may include eventual continental Pacific institutional success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The lorebook entry 13 provides six chronicle hook categories. This section expands each into chronicle-design infrastructure:</text:p>
      <text:h text:style-name="Heading_20_3" text:outline-level="3"><text:span text:style-name="Strong_20_Emphasis">Hook 1: The Cross-Pacific Correspondence Operative</text:span></text:h>
      <text:p text:style-name="Text_20_body">{{user}} is a senior refusenik operative at sub-Bishop institutional level being delegated cross-Pacific institutional correspondence coordination responsibilities. The chronicle tracks {{user}}'s development of continental cross-Pacific institutional connectivity across years.</text:p>
      <text:p text:style-name="Text_20_body"><text:span text:style-name="Strong_20_Emphasis">Chronicle phase 1 — Correspondence apprenticeship (3-4 sessions):</text:span> Initial training in formal Sabbat ecclesiastical correspondence protocols, traditional cipher systems, ghouled-mortal-courier infrastructure, cross-continental institutional coordination patterns. Cultivation by senior figure (typically Cardinal Reyna's senior correspondence operative or Templar Abernathy's Brisbane correspondence deputy).</text:p>
      <text:p text:style-name="Text_20_body"><text:span text:style-name="Strong_20_Emphasis">Chronicle phase 2 — Institutional connectivity development (4-6 sessions):</text:span> {{user}} takes increasing correspondence responsibilities including formal correspondence with secondary nodes, occasional cross-continental institutional coordination meeting attendance, specialised refusenik institutional knowledge accumulation. Chronicle scenes engage continental cross-Pacific operational rhythm and institutional connectivity texture.</text:p>
      <text:p text:style-name="Text_20_body"><text:span text:style-name="Strong_20_Emphasis">Chronicle phase 3 — Continental institutional positioning (3-5 sessions):</text:span> {{user}} achieves operational position with continental cross-Pacific institutional weight; chronicle scenes engage continental institutional positioning, possible chronicle-significant institutional preservation operations, and continental cross-Pacific institutional decisions that {{user}}'s correspondence position influences.</text:p>
      <text:p text:style-name="Text_20_body"><text:span text:style-name="Strong_20_Emphasis">Stakes:</text:span> Personal continental cross-Pacific institutional position. Successful arc produces operative role with continental institutional weight; failed arc produces continuing sub-senior position with reduced continental cross-Pacific institutional influence.</text:p>
      <text:h text:style-name="Heading_20_3" text:outline-level="3"><text:span text:style-name="Strong_20_Emphasis">Hook 2: The Lasombra-Refusenik Succession Operative</text:span></text:h>
      <text:p text:style-name="Text_20_body">{{user}} is a Lasombra antitribu refusenik operative being prepared for continental Pacific-Coast Lasombra-refusenik institutional succession. The chronicle tracks the cultivation-and-evaluation process across multi-year chronicle arc.</text:p>
      <text:p text:style-name="Text_20_body"><text:span text:style-name="Strong_20_Emphasis">Chronicle phase 1 — Lasombra-refusenik theological-political formation (4-5 sessions):</text:span> Cultivation by Cardinal Reyna directly, with deep engagement of continuing post-2020 defection theological-political commitments, Lasombra clan-political institutional history, and continental Pacific-Coast Lasombra-refusenik institutional infrastructure.</text:p>
      <text:p text:style-name="Text_20_body"><text:span text:style-name="Strong_20_Emphasis">Chronicle phase 2 — Continental institutional position cultivation (5-7 sessions):</text:span> {{user}} takes increasing Lasombra-refusenik institutional responsibilities including specific operational assignments testing competencies Cardinal Reyna values, formal Lasombra-refusenik institutional correspondence coordination, occasional cross-continental Lasombra-refusenik institutional meetings.</text:p>
      <text:p text:style-name="Text_20_body"><text:span text:style-name="Strong_20_Emphasis">Chronicle phase 3 — Succession evaluation (3-4 sessions):</text:span> Chronicle late-arc engagement with formal continental Pacific-Coast Lasombra-refusenik institutional succession evaluation including: Cardinal Reyna's potential successor question if her Beckoning trajectory accelerates; possible <text:soft-page-break/>Bishop succession at one of the four primary Pacific Northwest corridor nodes; possible Templar Abernathy successor for Brisbane Lasombra-refusenik institutional position. Chronicle-defining decisions about whether {{user}} accepts succession positioning.</text:p>
      <text:p text:style-name="Text_20_body"><text:span text:style-name="Strong_20_Emphasis">Stakes:</text:span> Continental Pacific-Coast Lasombra-refusenik institutional continuity. Successful succession produces senior continental institutional position with significant continental authority; failed succession produces continuing senior-track institutional position with reduced continental Lasombra-refusenik political prospects.</text:p>
      <text:h text:style-name="Heading_20_3" text:outline-level="3"><text:span text:style-name="Strong_20_Emphasis">Hook 3: The 2026 Operation Cross-Pacific Operative</text:span></text:h>
      <text:p text:style-name="Text_20_body">{{user}} is a cross-Pacific refusenik operative directly engaged in 2026 Brisbane operation continental cross-Pacific institutional coordination. The chronicle tracks 2025-2026 operation arc with continental cross-Pacific institutional positioning.</text:p>
      <text:p text:style-name="Text_20_body"><text:span text:style-name="Strong_20_Emphasis">Chronicle phase 1 — Pre-operation institutional coordination (4-5 sessions):</text:span> {{user}} engages Cardinal Reyna-Templar Abernathy correspondence intensification, cross-Pacific intelligence-gathering operations on Glass Walker continental Pacific-Coast Garou operational infrastructure, continental Pacific-Coast institutional positioning analysis, and chronicle-significant institutional coordination meetings.</text:p>
      <text:p text:style-name="Text_20_body"><text:span text:style-name="Strong_20_Emphasis">Chronicle phase 2 — Immediate pre-operation phase (3-4 sessions):</text:span> Chronicle intensity peaks across August-October 2026 with operational-readiness preparation, continental cross-Pacific institutional positioning at peak visibility, chronicle-active senior-figure coordination intensification.</text:p>
      <text:p text:style-name="Text_20_body"><text:span text:style-name="Strong_20_Emphasis">Chronicle phase 3 — Operation engagement and aftermath (3-5 sessions):</text:span> October 2026 operation chronicle-defining engagement at continental cross-Pacific institutional level. Chronicle scenes engage operation outcomes' continental cross-Pacific institutional implications, post-operation continental institutional positioning, and longer-term continental cross-Pacific institutional development across post-2026 period.</text:p>
      <text:p text:style-name="Text_20_body"><text:span text:style-name="Strong_20_Emphasis">Stakes:</text:span> Continental cross-Pacific Sabbat-refusenik institutional positioning. {{user}}'s role in cross-Pacific operation coordination determines continental cross-Pacific institutional position outcomes for the subsequent decade.</text:p>
      <text:h text:style-name="Heading_20_3" text:outline-level="3"><text:span text:style-name="Strong_20_Emphasis">Hook 4: The Beckoning-Trajectory-Crisis Operative</text:span></text:h>
      <text:p text:style-name="Text_20_body">{{user}} is a cross-Pacific operative engaged with chronicle-active Beckoning trajectory crisis affecting Cardinal Reyna or Templar Abernathy. The chronicle tracks senior-figure Beckoning resistance operations and continental cross-Pacific institutional preservation coordination.</text:p>
      <text:p text:style-name="Text_20_body"><text:span text:style-name="Strong_20_Emphasis">Chronicle phase 1 — Senior-figure trajectory engagement (3-4 sessions):</text:span> {{user}} achieves operational position with senior-figure Beckoning trajectory awareness; chronicle scenes engage trajectory acceleration patterns, institutional concealment operations protecting senior-figure trajectory information, continental cross-Pacific institutional positioning around continuing trajectory pressure.</text:p>
      <text:p text:style-name="Text_20_body"><text:span text:style-name="Strong_20_Emphasis">Chronicle phase 2 — Crisis intensification (4-5 sessions):</text:span> Senior-figure Beckoning trajectory reaches acute pressure; chronicle scenes engage continental cross-Pacific institutional preservation coordination during continental cross-Pacific senior-figure operational uncertainty; possible <text:soft-page-break/>chronicle-defining institutional positioning if senior-figure Beckoning succumbence becomes acute.</text:p>
      <text:p text:style-name="Text_20_body"><text:span text:style-name="Strong_20_Emphasis">Chronicle phase 3 — Resolution or succumbence (3-4 sessions):</text:span> Chronicle-defining resolution including potential successful senior-figure trajectory stabilisation, potential senior-figure Final Death through Beckoning succumbence with continental cross-Pacific institutional reorganisation, or chronicle late-arc continental cross-Pacific institutional succession crisis.</text:p>
      <text:p text:style-name="Text_20_body"><text:span text:style-name="Strong_20_Emphasis">Stakes:</text:span> Continental cross-Pacific senior-figure institutional continuity. {{user}}'s role determines continental cross-Pacific institutional position outcomes through the trajectory crisis.</text:p>
      <text:h text:style-name="Heading_20_3" text:outline-level="3"><text:span text:style-name="Strong_20_Emphasis">Hook 5: The Continental Preservation Operative</text:span></text:h>
      <text:p text:style-name="Text_20_body">{{user}} is a cross-Pacific operative engaged in continental Pacific Rim Sabbat-refusenik institutional preservation through continuing diminishment period. The chronicle tracks continental institutional preservation work across extended chronicle arc.</text:p>
      <text:p text:style-name="Text_20_body"><text:span text:style-name="Strong_20_Emphasis">Chronicle phase 1 — Institutional preservation infrastructure development (4-6 sessions):</text:span> {{user}} takes responsibilities for doctrinal-archive-redundancy work, ecclesiastical-practice-tradition-preservation through cross-node visiting protocols, continental cross-Pacific institutional infrastructure development.</text:p>
      <text:p text:style-name="Text_20_body"><text:span text:style-name="Strong_20_Emphasis">Chronicle phase 2 — Continental cross-Pacific institutional preservation operations (5-7 sessions):</text:span> Chronicle-significant institutional preservation operations across multiple Pacific Rim nodes; continental cross-Pacific institutional connectivity development; continental theological-political institutional positioning through accumulating preservation work.</text:p>
      <text:p text:style-name="Text_20_body"><text:span text:style-name="Strong_20_Emphasis">Chronicle phase 3 — Continental institutional positioning (3-5 sessions):</text:span> Chronicle late-arc continental cross-Pacific institutional preservation outcomes; possible chronicle-defining continental institutional preservation decisions; continental cross-Pacific institutional infrastructure preservation through continuing diminishment period.</text:p>
      <text:p text:style-name="Text_20_body"><text:span text:style-name="Strong_20_Emphasis">Stakes:</text:span> Continental cross-Pacific Sabbat-refusenik institutional preservation viability. {{user}}'s continental institutional preservation work produces continental cross-Pacific institutional infrastructure that may support continuing institutional viability or that may demonstrate institutional fossilisation depending on chronicle late-arc engagement with the central political-theological question.</text:p>
      <text:h text:style-name="Heading_20_3" text:outline-level="3"><text:span text:style-name="Strong_20_Emphasis">Hook 6: The Fossilisation-vs-Resurgence Operative</text:span></text:h>
      <text:p text:style-name="Text_20_body">{{user}} is a cross-Pacific operative engaged with the network's central political-theological question. The chronicle tracks {{user}}'s development of position on the question through extended chronicle work.</text:p>
      <text:p text:style-name="Text_20_body"><text:span text:style-name="Strong_20_Emphasis">Chronicle phase 1 — Question engagement and exploration (5-7 sessions):</text:span> {{user}} engages cross-Pacific institutional infrastructure with continuing political-theological reflection on whether continued institutional preservation produces eventual resurgence or institutional fossilisation. Chronicle scenes engage continental cross-Pacific institutional patterns, network-internal political-theological discourse, accumulating personal-position development.</text:p>
      <text:p text:style-name="Text_20_body"><text:span text:style-name="Strong_20_Emphasis">Chronicle phase 2 — Position development (4-6 sessions):</text:span> Chronicle scenes engage {{user}}'s developing position through continuing institutional engagement; possible coalition-building with similarly-oriented refusenik colleagues; chronicle-significant theological-political conversations <text:soft-page-break/>with senior figures.</text:p>
      <text:p text:style-name="Text_20_body"><text:span text:style-name="Strong_20_Emphasis">Chronicle phase 3 — Continental cross-Pacific institutional decision (3-5 sessions):</text:span> Chronicle late-arc engagement with potential institutional reform-or-collapse positioning; alternative-institutional-development operations; chronicle-defining cross-Pacific institutional decisions about continuing preservation strategy. Possible chronicle outcomes including: continued preservation commitment, institutional reform advocacy that may pressure senior figures toward institutional restructuring, alternative institutional development that produces post-network institutional positioning, or chronicle late-arc Sabbat-refusenik institutional exit considerations.</text:p>
      <text:p text:style-name="Text_20_body"><text:span text:style-name="Strong_20_Emphasis">Stakes:</text:span> Continental cross-Pacific Sabbat-refusenik institutional future. {{user}}'s position on the central political-theological question and chronicle late-arc engagement with continental institutional decision produces continental cross-Pacific institutional infrastructure outcomes that reshape continental Pacific Sabbat-loyalist institutional positioning for subsequent decades.</text:p>
      <text:p text:style-name="P1"><text:span text:style-name="Strong_20_Emphasis">The Cross-Pacific Sabbat-Refusenik Supplement is complete.</text:span> A 14-entry lorebook covering the cross-Pacific Sabbat-refusenik network's continental institutional infrastructure, Cardinal Reyna Quiñones's full character build and Pacific Northwest operational corridor (San Francisco-Portland-Seattle-Vancouver with approximately 40 Sabbat operatives), the Templar Abernathy-Cardinal Reyna correspondence channel and its 50-year institutional development, the broader Pacific Rim refusenik node distribution (Anchorage, Honolulu, Manila, Singapore, Auckland, plus smaller nodes — approximately 220 Sabbat across 15 institutional positions total), the three diminishment events (1999 reformation, 2014 Beckoning withdrawal, 2020 Lasombra defection) and refusenik responses, the refusenik political-theological framework (five central commitments), the 2026 Brisbane operation cross-Pacific coordination, external pressures (AFP-Five-Eyes coordination, Camarilla institutional pressure, Anarch Movement Pacific-wing political pressure, Asian Pacific established-Kindred political infrastructures, methuselah-level continental threats), the cross-Pacific refusenik chronicle character register, and six chronicle hook categories with extended chronicle-design infrastruc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3T19:04:17.084683034</dc:date>
    <meta:editing-duration>PT3M50S</meta:editing-duration>
    <meta:editing-cycles>1</meta:editing-cycles>
    <meta:document-statistic meta:table-count="2" meta:image-count="0" meta:object-count="0" meta:page-count="9" meta:paragraph-count="161" meta:word-count="2597" meta:character-count="25235" meta:non-whitespace-character-count="22763"/>
    <meta:generator>LibreOffice/24.2.7.2$Linux_X86_64 LibreOffice_project/420$Build-2</meta:generator>
  </office:meta>
</office:document-meta>
</file>