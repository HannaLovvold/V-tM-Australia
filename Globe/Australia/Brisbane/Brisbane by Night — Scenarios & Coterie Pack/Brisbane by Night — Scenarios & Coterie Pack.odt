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0.425cm"/>
    </style:style>
    <style:style style:name="Table1.B" style:family="table-column">
      <style:table-column-properties style:column-width="4.911cm"/>
    </style:style>
    <style:style style:name="Table1.C" style:family="table-column">
      <style:table-column-properties style:column-width="6.946cm"/>
    </style:style>
    <style:style style:name="Table1.D" style:family="table-column">
      <style:table-column-properties style:column-width="4.71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5.241cm"/>
    </style:style>
    <style:style style:name="Table2.B" style:family="table-column">
      <style:table-column-properties style:column-width="11.76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676cm"/>
    </style:style>
    <style:style style:name="Table3.B" style:family="table-column">
      <style:table-column-properties style:column-width="4.443cm"/>
    </style:style>
    <style:style style:name="Table3.C" style:family="table-column">
      <style:table-column-properties style:column-width="3.406cm"/>
    </style:style>
    <style:style style:name="Table3.D" style:family="table-column">
      <style:table-column-properties style:column-width="1.542cm"/>
    </style:style>
    <style:style style:name="Table3.E" style:family="table-column">
      <style:table-column-properties style:column-width="4.934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5.413cm"/>
    </style:style>
    <style:style style:name="Table4.B" style:family="table-column">
      <style:table-column-properties style:column-width="11.58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2.469cm"/>
    </style:style>
    <style:style style:name="Table5.B" style:family="table-column">
      <style:table-column-properties style:column-width="3.958cm"/>
    </style:style>
    <style:style style:name="Table5.C" style:family="table-column">
      <style:table-column-properties style:column-width="2.729cm"/>
    </style:style>
    <style:style style:name="Table5.D" style:family="table-column">
      <style:table-column-properties style:column-width="3.803cm"/>
    </style:style>
    <style:style style:name="Table5.E" style:family="table-column">
      <style:table-column-properties style:column-width="4.041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5.48cm"/>
    </style:style>
    <style:style style:name="Table6.B" style:family="table-column">
      <style:table-column-properties style:column-width="11.52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2.501cm"/>
    </style:style>
    <style:style style:name="Table7.B" style:family="table-column">
      <style:table-column-properties style:column-width="3.219cm"/>
    </style:style>
    <style:style style:name="Table7.C" style:family="table-column">
      <style:table-column-properties style:column-width="2.82cm"/>
    </style:style>
    <style:style style:name="Table7.D" style:family="table-column">
      <style:table-column-properties style:column-width="1.519cm"/>
    </style:style>
    <style:style style:name="Table7.E" style:family="table-column">
      <style:table-column-properties style:column-width="6.941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5.233cm"/>
    </style:style>
    <style:style style:name="Table8.B" style:family="table-column">
      <style:table-column-properties style:column-width="11.767cm"/>
    </style:style>
    <style:style style:name="Table8.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rsid="0014e4e5" officeooo:paragraph-rsid="0014e4e5"/>
    </style:style>
    <style:style style:name="P3" style:family="paragraph" style:parent-style-name="Text_20_body">
      <style:text-properties officeooo:rsid="0014e4e5" officeooo:paragraph-rsid="0014e4e5"/>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T1" style:family="text">
      <style:text-properties officeooo:rsid="0016a85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ve Brisbane chronicle scenarios paralleling the Sydney and Melbourne scenario sets, plus a four-coterie pack covering Bishop Callista's institutional infrastructure: the Templar Council as senior coterie-equivalent, plus three Brisbane Sabbat packs (Blood Crossing, Burning Shepherds, Bracken Covenant). The Last Days of Brisbane pack remains as detailed in the Australian Antagonist Pack.</text:p>
      <text:p text:style-name="Text_20_body"><text:span text:style-name="Strong_20_Emphasis">Editorial note up front:</text:span> Continuing the deliberate restraint of the verbal tic from recent documents. Brisbane's Sabbat-survivor register produces its own characteristic prose patterns (doctrinal religious formality, custodian-framing institutional weight, deliberate austerity register) that don't require the "continuing/continual" markers to carry institutional texture.</text:p>
      <text:p text:style-name="Horizontal_20_Line"/>
      <text:h text:style-name="Heading_20_1" text:outline-level="1"><text:span text:style-name="Strong_20_Emphasis">Part 1: Five Brisbane Chronicle Scenarios</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Table_20_Heading">Scenario</text:p>
            </table:table-cell>
            <table:table-cell table:style-name="Table1.A1" office:value-type="string">
              <text:p text:style-name="Table_20_Heading">Engagement</text:p>
            </table:table-cell>
            <table:table-cell table:style-name="Table1.A1" office:value-type="string">
              <text:p text:style-name="Table_20_Heading">Position in Brisbane Sabbat</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ext:span text:style-name="Strong_20_Emphasis">The Shovelhead Initiate</text:span></text:p>
          </table:table-cell>
          <table:table-cell table:style-name="Table1.A1" office:value-type="string">
            <text:p text:style-name="Table_20_Contents">Newly mass-Embraced operative undergoing doctrinal indoctrination</text:p>
          </table:table-cell>
          <table:table-cell table:style-name="Table1.A1" office:value-type="string">
            <text:p text:style-name="Table_20_Contents">Junior pack member</text:p>
          </table:table-cell>
        </table:table-row>
        <table:table-row>
          <table:table-cell table:style-name="Table1.A1" office:value-type="string">
            <text:p text:style-name="Table_20_Contents">2</text:p>
          </table:table-cell>
          <table:table-cell table:style-name="Table1.A1" office:value-type="string">
            <text:p text:style-name="Table_20_Contents"><text:span text:style-name="Strong_20_Emphasis">The Cross-Pacific Correspondence Apprentice</text:span></text:p>
          </table:table-cell>
          <table:table-cell table:style-name="Table1.A1" office:value-type="string">
            <text:p text:style-name="Table_20_Contents">Junior Lasombra antitribu under Templar Abernathy</text:p>
          </table:table-cell>
          <table:table-cell table:style-name="Table1.A1" office:value-type="string">
            <text:p text:style-name="Table_20_Contents">Cross-Pacific institutional axis</text:p>
          </table:table-cell>
        </table:table-row>
        <table:table-row>
          <table:table-cell table:style-name="Table1.A1" office:value-type="string">
            <text:p text:style-name="Table_20_Contents">3</text:p>
          </table:table-cell>
          <table:table-cell table:style-name="Table1.A1" office:value-type="string">
            <text:p text:style-name="Table_20_Contents"><text:span text:style-name="Strong_20_Emphasis">The Cross-Domain Cover Infiltrator</text:span></text:p>
          </table:table-cell>
          <table:table-cell table:style-name="Table1.A1" office:value-type="string">
            <text:p text:style-name="Table_20_Contents">Sabbat operative posing as Camarilla in Melbourne for intelligence-gathering</text:p>
          </table:table-cell>
          <table:table-cell table:style-name="Table1.A1" office:value-type="string">
            <text:p text:style-name="Table_20_Contents">Brisbane-Melbourne cross-domain</text:p>
          </table:table-cell>
        </table:table-row>
        <table:table-row>
          <table:table-cell table:style-name="Table1.A1" office:value-type="string">
            <text:p text:style-name="Table_20_Contents">4</text:p>
          </table:table-cell>
          <table:table-cell table:style-name="Table1.A1" office:value-type="string">
            <text:p text:style-name="Table_20_Contents"><text:span text:style-name="Strong_20_Emphasis">The Dissent Crisis Operative</text:span></text:p>
          </table:table-cell>
          <table:table-cell table:style-name="Table1.A1" office:value-type="string">
            <text:p text:style-name="Table_20_Contents">Operative caught between Bishop Callista and a dissenting Templar</text:p>
          </table:table-cell>
          <table:table-cell table:style-name="Table1.A1" office:value-type="string">
            <text:p text:style-name="Table_20_Contents">Brisbane internal institutional crisis</text:p>
          </table:table-cell>
        </table:table-row>
        <table:table-row>
          <table:table-cell table:style-name="Table1.A1" office:value-type="string">
            <text:p text:style-name="Table_20_Contents">5</text:p>
          </table:table-cell>
          <table:table-cell table:style-name="Table1.A1" office:value-type="string">
            <text:p text:style-name="Table_20_Contents"><text:span text:style-name="Strong_20_Emphasis">The 2026 Operation Pre-Positioning Specialist</text:span></text:p>
          </table:table-cell>
          <table:table-cell table:style-name="Table1.A1" office:value-type="string">
            <text:p text:style-name="Table_20_Contents">Senior operative coordinating October 2026 Glass Walker operation</text:p>
          </table:table-cell>
          <table:table-cell table:style-name="Table1.A1" office:value-type="string">
            <text:p text:style-name="Table_20_Contents">Chronicle-defining cross-supernatural</text:p>
          </table:table-cell>
        </table:table-row>
      </table:table>
      <text:p text:style-name="Preformatted_20_Text"/>
      <text:p text:style-name="Preformatted_20_Text">TYRELL "TY" BIRRAWANNA-COLE</text:p>
      <text:p text:style-name="Preformatted_20_Text"/>
      <text:p text:style-name="P1"><text:span text:style-name="Source_20_Text">BROTHER OWAIN MERRICK-LIN</text:span></text:p>
      <text:p text:style-name="P1"><text:span text:style-name="Source_20_Text">SISTER ANEKA HOLT-SOLOMON</text:span></text:p>
      <text:p text:style-name="P1"><text:span text:style-name="Source_20_Text">BROTHER PETROS DEVRIM-ASKEW</text:span></text:p>
      <text:p text:style-name="P1"><text:span text:style-name="Source_20_Text">TEMPLAR ANNIKA KAZAKOVA-WRIGHT</text:span></text:p>
      <text:h text:style-name="Heading_20_1" text:outline-level="1"><text:span text:style-name="Strong_20_Emphasis">The Brisbane Coterie Pack</text:span></text:h>
      <text:p text:style-name="Text_20_body">Four coteries covering Bishop Callista's institutional infrastructure. Each coterie is built using the kit's standard format, with attention to Brisbane Sabbat-survivor mode register distinct from Sydney's continental methuselah-tempo or Melbourne's Camarilla orthodox register.</text:p>
      <text:p text:style-name="P2">The Templar Council</text:p>
      <text:p text:style-name="P2"/>
      <text:p text:style-name="P3"><text:span text:style-name="Strong_20_Emphasis">Coterie type:</text:span> Senior Sabbat institutional executive council (Bishop Callista's continental Brisbane institutional executive infrastructure)<text:line-break/><text:span text:style-name="Strong_20_Emphasis">Established:</text:span> 1976 alongside Bishop Callista's Brisbane Sabbat establishment<text:line-break/><text:span text:style-name="Strong_20_Emphasis">Continuing tenure:</text:span> 49 years<text:line-break/><text:soft-page-break/><text:span text:style-name="Strong_20_Emphasis">Composition:</text:span> Bishop Callista plus three Templars operating as Brisbane Sabbat senior institutional executive infrastructure</text:p>
      <text:p text:style-name="Text_20_body">The Templar Council operates as Bishop Callista's senior institutional executive structure — four senior Kindred who manage continental Brisbane Sabbat operations at scales above pack-leader operational scope. The structure has remained four-figure since 1976 establishment with one Templar replacement (Templar Halsey-Cross reached Final Death during 2003 Brisbane United Arms Article 8 operational complications; Templar Cruz-Molina succeeded to the position during 1987 institutional restructuring that consolidated post-Halsey-Cross continental Brisbane institutional infrastructure).</text:p>
      <text:h text:style-name="Heading_20_3" text:outline-level="3"><text:span text:style-name="Strong_20_Emphasis">Bishop Callista Vox</text:span> (full character build in Australian Antagonist Pack)</text:h>
      <text:list text:style-name="L1">
        <text:list-item>
          <text:p text:style-name="P5"><text:span text:style-name="Strong_20_Emphasis">Clan / generation / tenure:</text:span> Tzimisce, 7th gen, 213 years Embraced </text:p>
        </text:list-item>
        <text:list-item>
          <text:p text:style-name="P5"><text:span text:style-name="Strong_20_Emphasis">Brisbane bishopric tenure:</text:span> 50 years (since 1976 establishment) </text:p>
        </text:list-item>
        <text:list-item>
          <text:p text:style-name="P5"><text:span text:style-name="Strong_20_Emphasis">Operational specialty:</text:span> Continental Brisbane Sabbat institutional executive authority; chronicle-defining 2026 Glass Walker operation operational coordination; continental Sabbat-survivor mode institutional foundation </text:p>
        </text:list-item>
        <text:list-item>
          <text:p text:style-name="P5"><text:span text:style-name="Strong_20_Emphasis">Disciplines:</text:span> Animalism 4, Auspex 6, Dominate 6, Fortitude 5, Protean 6, Vicissitude 7 (methuselah-track loadout) </text:p>
        </text:list-item>
        <text:list-item>
          <text:p text:style-name="P4"><text:span text:style-name="Strong_20_Emphasis">Apparent age:</text:span> 39, she/her pronouns; pre-Wallachian-period flesh-shaping aesthetic preservation; deliberate institutional austerity register </text:p>
        </text:list-item>
      </text:list>
      <text:h text:style-name="Heading_20_3" text:outline-level="3"><text:span text:style-name="Strong_20_Emphasis">Templar Annika Kazakova-Wright</text:span> (full character build in Scenario 5 above)</text:h>
      <text:list text:style-name="L2">
        <text:list-item>
          <text:p text:style-name="P7"><text:span text:style-name="Strong_20_Emphasis">Clan / generation / tenure:</text:span> Tzimisce, 8th gen, 162 years Embraced </text:p>
        </text:list-item>
        <text:list-item>
          <text:p text:style-name="P7"><text:span text:style-name="Strong_20_Emphasis">Brisbane Templar tenure:</text:span> 49 years (since 1976 establishment) </text:p>
        </text:list-item>
        <text:list-item>
          <text:p text:style-name="P7"><text:span text:style-name="Strong_20_Emphasis">Operational specialty:</text:span> Continental cross-supernatural threat-assessment plus parallel cooperation with Cardinal Magdalena's Russian Far East refusenik network through continental Russian-Orthodox-cultural cooperation infrastructure </text:p>
        </text:list-item>
        <text:list-item>
          <text:p text:style-name="P7"><text:span text:style-name="Strong_20_Emphasis">Disciplines:</text:span> Animalism 4, Auspex 5, Dominate 5, Fortitude 5, Protean 5, Vicissitude 6 (near-methuselah-track loadout) </text:p>
        </text:list-item>
        <text:list-item>
          <text:p text:style-name="P7"><text:span text:style-name="Strong_20_Emphasis">Apparent age:</text:span> 22, she/her pronouns; advanced flesh-shaping cultivation maintained at apparent-young-adult register </text:p>
        </text:list-item>
        <text:list-item>
          <text:p text:style-name="P6"><text:span text:style-name="Strong_20_Emphasis">Internal positioning:</text:span> Provides continuing institutional support for Bishop Callista positioning during Templar Cruz-Molina dissent crisis; longest-tenured Templar by clan-cousin relationship </text:p>
        </text:list-item>
      </text:list>
      <text:h text:style-name="Heading_20_3" text:outline-level="3"><text:span text:style-name="Strong_20_Emphasis">Templar Constance Abernathy</text:span></text:h>
      <text:list text:style-name="L3">
        <text:list-item>
          <text:p text:style-name="P9"><text:span text:style-name="Strong_20_Emphasis">Clan / generation / tenure:</text:span> Lasombra antitribu, 9th gen, 153 years Embraced </text:p>
        </text:list-item>
        <text:list-item>
          <text:p text:style-name="P9"><text:span text:style-name="Strong_20_Emphasis">Brisbane Templar tenure:</text:span> 50 years (Templar Abernathy joined during 1975 pre-establishment continental positioning, formalising Templar position at 1976 establishment) </text:p>
        </text:list-item>
        <text:list-item>
          <text:p text:style-name="P9"><text:span text:style-name="Strong_20_Emphasis">Operational specialty:</text:span> Continental cross-Pacific Sabbat-refusenik correspondence operations through continuing 50-year Cardinal Reyna correspondence channel; continental institutional positioning at chronicle-active scale </text:p>
        </text:list-item>
        <text:list-item>
          <text:p text:style-name="P9"><text:span text:style-name="Strong_20_Emphasis">Apparent age:</text:span> 27, she/her pronouns. Medium-height (170cm), greying dark brown hair worn in deliberate continental religious-order-influenced styling, sharp dark brown eyes <text:soft-page-break/>with significant Auspex precision developed at near-methuselah-track scale across 153-year tenure approaching methuselah-track scale. Dresses in modified Anglican-religious-order influenced formal attire with continuing small Anglican-cross personal jewelry from pre-Embrace mortal Anglican-religious-order vocation </text:p>
        </text:list-item>
        <text:list-item>
          <text:p text:style-name="P9"><text:span text:style-name="Strong_20_Emphasis">Disciplines:</text:span> Auspex 5, Dominate 5, Fortitude 4, Obtenebration 6 (Lasombra clan specialty at near-methuselah-track scale developed across 153-year tenure), Potence 3 </text:p>
        </text:list-item>
        <text:list-item>
          <text:p text:style-name="P9"><text:span text:style-name="Strong_20_Emphasis">Internal positioning:</text:span> Maintains formal neutrality during Templar Cruz-Molina dissent crisis while indicating continuing concern through private institutional consultation; her continental cross-Pacific operational role produces continuing institutional positioning at chronicle-active scale that supports her formal neutrality positioning </text:p>
        </text:list-item>
        <text:list-item>
          <text:p text:style-name="P8"><text:span text:style-name="Strong_20_Emphasis">Background:</text:span> Embraced in 1872 in colonial-period Adelaide by a Lasombra-refusenik-tradition Sabbat operative who subsequently reached Final Death during 1923 continental Australian Sabbat institutional restructuring. Continental Australian institutional history across approximately 153 years; relocated Brisbane during 1975 pre-establishment continental positioning under Bishop Callista institutional cooperation. Distantly related (great-grandniece) to Sister Gemma Abernathy-White (Cross-Pacific Scenario 4 character) through continuing Abernathy family genealogical infrastructure </text:p>
        </text:list-item>
      </text:list>
      <text:h text:style-name="Heading_20_3" text:outline-level="3"><text:span text:style-name="Strong_20_Emphasis">Templar Lucia Cruz-Molina</text:span></text:h>
      <text:list xml:id="list1956027942" text:style-name="L4">
        <text:list-item>
          <text:p text:style-name="P11"><text:span text:style-name="Strong_20_Emphasis">Clan / generation / tenure:</text:span> Brujah antitribu, 8th gen, 198 years Embraced </text:p>
        </text:list-item>
        <text:list-item text:style-override="L12">
          <text:p text:style-name="P26"><text:span text:style-name="Strong_20_Emphasis">Brisbane Templar tenure:</text:span> 38 years (since the 1987 institutional restructuring succession) </text:p>
        </text:list-item>
        <text:list-item text:style-override="L12">
          <text:p text:style-name="P26"><text:span text:style-name="Strong_20_Emphasis">Operational specialty:</text:span> Brisbane combat-operational coordination and cross-domain cover operations cultivation; holds a chronicle-active dissent position regarding the 2026 Brisbane operation's operational parameters </text:p>
        </text:list-item>
        <text:list-item text:style-override="L12">
          <text:p text:style-name="P26"><text:span text:style-name="Strong_20_Emphasis">Apparent age:</text:span> 33, she/her pronouns. Tall (177cm), dark hair worn in deliberate Latin-American-Catholic-aristocratic styling, sharp dark brown eyes with significant Auspex precision developed at near-methuselah-track scale across her 198-year tenure. Dresses in restrained dark formal attire with a small silver Catholic pectoral cross retained from pre-Embrace mortal Mexican-Catholic-aristocratic formation </text:p>
        </text:list-item>
        <text:list-item text:style-override="L12">
          <text:p text:style-name="P26"><text:span text:style-name="Strong_20_Emphasis">Disciplines:</text:span> Auspex 5, Celerity 5, Fortitude 5, Potence 6, Presence 4 (near-methuselah-track Brujah-antitribu loadout) </text:p>
        </text:list-item>
        <text:list-item text:style-override="L12">
          <text:p text:style-name="P25"><text:span text:style-name="Strong_20_Emphasis">Internal positioning:</text:span> Holds a chronicle-active dissent position regarding the 2026 Brisbane operation's operational parameters; her dissent produces an institutional crisis at chronicle-defining scale that the Templar Council resolution must address during the 2025-2026 period </text:p>
        </text:list-item>
      </text:list>
      <text:h text:style-name="Heading_20_2" text:outline-level="2">Background</text:h>
      <text:p text:style-name="Text_20_body">Born 1819 into a Mexican aristocratic-Catholic family; Embraced in 1827 at age 8 by a Mexican Brujah-antitribu Sabbat operative during the post-independence Mexican Sabbat institutional development. The early-Embrace operational positioning produces a chronicle-significant character profile similar to the Templar Kazakov pattern — Templar Cruz-Molina operates with an apparent-young-adult physical character that has stabilised across her 198-year post-Embrace tenure.</text:p>
      <text:p text:style-name="Text_20_body">Latin-American-Australian institutional positioning developed across post-1980 Australian Sabbat infrastructure; she relocated to Brisbane in 1985 to provide Latin-American operational experience <text:soft-page-break/>to the Brisbane Sabbat infrastructure under Bishop Callista's institutional cooperation. She is the daughter (mortal-life genealogical relationship preserved across her 198-year post-Embrace tenure through Mexican-aristocratic-Catholic family documentation) of Brother Tomás Cortez-Walsh's mortal-Mexican-Catholic-aristocratic family — the family-cousinage relationship operates at sustained institutional cooperation scale that Brisbane Sabbat infrastructure has accommodated across decades.</text:p>
      <text:h text:style-name="Heading_20_2" text:outline-level="2">Templar Council operational character</text:h>
      <text:list text:style-name="L13">
        <text:list-item>
          <text:p text:style-name="P28">Quarterly formal Templar Council meetings at the West End chantry with all four members attending. Templar Cruz-Molina's dissent crisis has produced an operational separation that reduces her formal attendance during the 2025-2026 period to approximately 50% of formal meetings. </text:p>
        </text:list-item>
        <text:list-item>
          <text:p text:style-name="P28">Bishop Callista cultivates each Templar directly at sustained institutional scale through one-on-one operational consultation. </text:p>
        </text:list-item>
        <text:list-item>
          <text:p text:style-name="P28">Pack-leader institutional cooperation — each Templar coordinates 2-3 Brisbane Sabbat packs, covering approximately 8-10 total Brisbane Sabbat packs: </text:p>
          <text:list>
            <text:list-item>
              <text:p text:style-name="P28"><text:span text:style-name="Strong_20_Emphasis">Templar Kazakov:</text:span> Burning Shepherds and Bracken Covenant </text:p>
            </text:list-item>
            <text:list-item>
              <text:p text:style-name="P28"><text:span text:style-name="Strong_20_Emphasis">Templar Abernathy:</text:span> Last Days of Brisbane and the senior-operative cross-Pacific correspondence operations </text:p>
            </text:list-item>
            <text:list-item>
              <text:p text:style-name="P28"><text:span text:style-name="Strong_20_Emphasis">Templar Cruz-Molina:</text:span> Blood Crossing and the combat-operational Brisbane Sabbat infrastructure </text:p>
            </text:list-item>
          </text:list>
        </text:list-item>
        <text:list-item>
          <text:p text:style-name="P27">Operational scope at maximum Brisbane Sabbat institutional scale, with executive authority over approximately 40 Brisbane Sabbat operatives plus the supporting ghouled-mortal-network infrastructure. </text:p>
        </text:list-item>
      </text:list>
      <text:h text:style-name="Heading_20_3" text:outline-level="3"><text:span text:style-name="Strong_20_Emphasis">Chronicle hook integration:</text:span></text:h>
      <table:table table:name="Table2" table:style-name="Table2">
        <table:table-column table:style-name="Table2.A"/>
        <table:table-column table:style-name="Table2.B"/>
        <table:table-header-rows>
          <table:table-row>
            <table:table-cell table:style-name="Table2.A1" office:value-type="string">
              <text:p text:style-name="Table_20_Heading">Chronicle scope</text:p>
            </table:table-cell>
            <table:table-cell table:style-name="Table2.A1" office:value-type="string">
              <text:p text:style-name="Table_20_Heading">Templar Council engagement</text:p>
            </table:table-cell>
          </table:table-row>
        </table:table-header-rows>
        <table:table-row>
          <table:table-cell table:style-name="Table2.A1" office:value-type="string">
            <text:p text:style-name="Table_20_Contents"><text:span text:style-name="Strong_20_Emphasis">Single-Templar cultivation chronicle</text:span></text:p>
          </table:table-cell>
          <table:table-cell table:style-name="Table2.A1" office:value-type="string">
            <text:p text:style-name="Table_20_Contents">{{user}} cultivation under one specific Templar at apprentice scale (Owain Merrick-Lin under Templar Abernathy as Scenario 2 example)</text:p>
          </table:table-cell>
        </table:table-row>
        <table:table-row>
          <table:table-cell table:style-name="Table2.A1" office:value-type="string">
            <text:p text:style-name="Table_20_Contents"><text:span text:style-name="Strong_20_Emphasis">Templar Council institutional crisis chronicle</text:span></text:p>
          </table:table-cell>
          <table:table-cell table:style-name="Table2.A1" office:value-type="string">
            <text:p text:style-name="Table_20_Contents">Templar Cruz-Molina dissent crisis at chronicle-defining institutional scale (parallel to Scenario 4)</text:p>
          </table:table-cell>
        </table:table-row>
        <table:table-row>
          <table:table-cell table:style-name="Table2.A1" office:value-type="string">
            <text:p text:style-name="Table_20_Contents"><text:span text:style-name="Strong_20_Emphasis">Continental cross-Pacific chronicle</text:span></text:p>
          </table:table-cell>
          <table:table-cell table:style-name="Table2.A1" office:value-type="string">
            <text:p text:style-name="Table_20_Contents">Templar Abernathy continental cross-Pacific operations engagement at chronicle-defining continental scale</text:p>
          </table:table-cell>
        </table:table-row>
        <table:table-row>
          <table:table-cell table:style-name="Table2.A1" office:value-type="string">
            <text:p text:style-name="Table_20_Contents"><text:span text:style-name="Strong_20_Emphasis">2026 Brisbane operation chronicle</text:span></text:p>
          </table:table-cell>
          <table:table-cell table:style-name="Table2.A1" office:value-type="string">
            <text:p text:style-name="Table_20_Contents">Templar Council operational coordination during chronicle-defining October 2026 operation (parallel to Scenario 5)</text:p>
          </table:table-cell>
        </table:table-row>
        <table:table-row>
          <table:table-cell table:style-name="Table2.A1" office:value-type="string">
            <text:p text:style-name="Table_20_Contents"><text:span text:style-name="Strong_20_Emphasis">Bishop Callista succession chronicle</text:span></text:p>
          </table:table-cell>
          <table:table-cell table:style-name="Table2.A1" office:value-type="string">
            <text:p text:style-name="Table_20_Contents">Continental Brisbane succession question dynamics at chronicle-late-arc scale</text:p>
          </table:table-cell>
        </table:table-row>
      </table:table>
      <text:p text:style-name="P2"/>
      <text:p text:style-name="P2"/>
      <text:p text:style-name="P2">Blood Crossing</text:p>
      <text:p text:style-name="P2"/>
      <text:p text:style-name="P3"><text:span text:style-name="Strong_20_Emphasis">Coterie type:</text:span> Brisbane Sabbat combat-operational pack under Templar Cruz-Molina coordination<text:line-break/><text:span text:style-name="Strong_20_Emphasis">Established:</text:span> 1991<text:line-break/><text:span text:style-name="Strong_20_Emphasis">Continuing tenure:</text:span> 34 years<text:line-break/><text:span text:style-name="Strong_20_Emphasis">Composition:</text:span> Five Brisbane Sabbat operatives operating as continuing combat-operational pack <text:soft-page-break/>under continental Templar Cruz-Molina institutional cultivation</text:p>
      <text:p text:style-name="Text_20_body">Blood Crossing operates as one of Brisbane Sabbat's three primary combat-operational packs with operational specialty in continuing Brisbane combat infrastructure including continuing pack-combat training cultivation, continuing Brisbane territorial-defense operations, and continuing combat-operational support for Templar-Council institutional operations. The pack operates from a converted weatherboard worker's-cottage on Boundary Street West End that the pack acquired in 1995 through continuing Sabbat institutional cooperation with continental Brisbane working-class community infrastructure.</text:p>
      <text:h text:style-name="Heading_20_3" text:outline-level="3"><text:span text:style-name="Strong_20_Emphasis">Pack membership at-a-glance:</text:span></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Position</text:p>
            </table:table-cell>
            <table:table-cell table:style-name="Table3.A1" office:value-type="string">
              <text:p text:style-name="Table_20_Heading">Holder</text:p>
            </table:table-cell>
            <table:table-cell table:style-name="Table3.A1" office:value-type="string">
              <text:p text:style-name="Table_20_Heading">Clan / Generation</text:p>
            </table:table-cell>
            <table:table-cell table:style-name="Table3.A1" office:value-type="string">
              <text:p text:style-name="Table_20_Heading">Tenure</text:p>
            </table:table-cell>
            <table:table-cell table:style-name="Table3.A1" office:value-type="string">
              <text:p text:style-name="Table_20_Heading">Operational specialty</text:p>
            </table:table-cell>
          </table:table-row>
        </table:table-header-rows>
        <table:table-row>
          <table:table-cell table:style-name="Table3.A1" office:value-type="string">
            <text:p text:style-name="Table_20_Contents"><text:span text:style-name="Strong_20_Emphasis">Pack-leader</text:span></text:p>
          </table:table-cell>
          <table:table-cell table:style-name="Table3.A1" office:value-type="string">
            <text:p text:style-name="Table_20_Contents">Brother Cassiel Vargas-Knight</text:p>
          </table:table-cell>
          <table:table-cell table:style-name="Table3.A1" office:value-type="string">
            <text:p text:style-name="Table_20_Contents">Brujah antitribu, 9th gen</text:p>
          </table:table-cell>
          <table:table-cell table:style-name="Table3.A1" office:value-type="string">
            <text:p text:style-name="Table_20_Contents">34 years</text:p>
          </table:table-cell>
          <table:table-cell table:style-name="Table3.A1" office:value-type="string">
            <text:p text:style-name="Table_20_Contents">Pack-combat training cultivation</text:p>
          </table:table-cell>
        </table:table-row>
        <table:table-row>
          <table:table-cell table:style-name="Table3.A1" office:value-type="string">
            <text:p text:style-name="Table_20_Contents"><text:span text:style-name="Strong_20_Emphasis">Senior operative</text:span></text:p>
          </table:table-cell>
          <table:table-cell table:style-name="Table3.A1" office:value-type="string">
            <text:p text:style-name="Table_20_Contents">Sister Joanna Brennan-Park</text:p>
          </table:table-cell>
          <table:table-cell table:style-name="Table3.A1" office:value-type="string">
            <text:p text:style-name="Table_20_Contents">Lasombra antitribu, 10th gen</text:p>
          </table:table-cell>
          <table:table-cell table:style-name="Table3.A1" office:value-type="string">
            <text:p text:style-name="Table_20_Contents">27 years</text:p>
          </table:table-cell>
          <table:table-cell table:style-name="Table3.A1" office:value-type="string">
            <text:p text:style-name="Table_20_Contents">Brisbane territorial-defense operations</text:p>
          </table:table-cell>
        </table:table-row>
        <table:table-row>
          <table:table-cell table:style-name="Table3.A1" office:value-type="string">
            <text:p text:style-name="Table_20_Contents"><text:span text:style-name="Strong_20_Emphasis">Operative</text:span></text:p>
          </table:table-cell>
          <table:table-cell table:style-name="Table3.A1" office:value-type="string">
            <text:p text:style-name="Table_20_Contents">Brother Marcus "Hawkwind" Ngata-Crowe</text:p>
          </table:table-cell>
          <table:table-cell table:style-name="Table3.A1" office:value-type="string">
            <text:p text:style-name="Table_20_Contents">Brujah antitribu, 10th gen</text:p>
          </table:table-cell>
          <table:table-cell table:style-name="Table3.A1" office:value-type="string">
            <text:p text:style-name="Table_20_Contents">19 years</text:p>
          </table:table-cell>
          <table:table-cell table:style-name="Table3.A1" office:value-type="string">
            <text:p text:style-name="Table_20_Contents">Combat-operational tactical support</text:p>
          </table:table-cell>
        </table:table-row>
        <table:table-row>
          <table:table-cell table:style-name="Table3.A1" office:value-type="string">
            <text:p text:style-name="Table_20_Contents"><text:span text:style-name="Strong_20_Emphasis">Operative</text:span></text:p>
          </table:table-cell>
          <table:table-cell table:style-name="Table3.A1" office:value-type="string">
            <text:p text:style-name="Table_20_Contents">Sister Imogen Ferrera-Walsh</text:p>
          </table:table-cell>
          <table:table-cell table:style-name="Table3.A1" office:value-type="string">
            <text:p text:style-name="Table_20_Contents">Tzimisce, 11th gen</text:p>
          </table:table-cell>
          <table:table-cell table:style-name="Table3.A1" office:value-type="string">
            <text:p text:style-name="Table_20_Contents">14 years</text:p>
          </table:table-cell>
          <table:table-cell table:style-name="Table3.A1" office:value-type="string">
            <text:p text:style-name="Table_20_Contents">Flesh-shaping combat-cultivation</text:p>
          </table:table-cell>
        </table:table-row>
        <table:table-row>
          <table:table-cell table:style-name="Table3.A1" office:value-type="string">
            <text:p text:style-name="Table_20_Contents"><text:span text:style-name="Strong_20_Emphasis">Junior operative</text:span></text:p>
          </table:table-cell>
          <table:table-cell table:style-name="Table3.A1" office:value-type="string">
            <text:p text:style-name="Table_20_Contents">Brother Daniel "Pulse" O'Halloran-Tay</text:p>
          </table:table-cell>
          <table:table-cell table:style-name="Table3.A1" office:value-type="string">
            <text:p text:style-name="Table_20_Contents">Brujah antitribu, 11th gen</text:p>
          </table:table-cell>
          <table:table-cell table:style-name="Table3.A1" office:value-type="string">
            <text:p text:style-name="Table_20_Contents">6 years</text:p>
          </table:table-cell>
          <table:table-cell table:style-name="Table3.A1" office:value-type="string">
            <text:p text:style-name="Table_20_Contents">Junior pack-combat operative cultivation</text:p>
          </table:table-cell>
        </table:table-row>
      </table:table>
      <text:h text:style-name="Heading_20_3" text:outline-level="3"><text:span text:style-name="Strong_20_Emphasis">Pack-leader Brother Cassiel Vargas-Knight:</text:span></text:h>
      <text:list text:style-name="L6">
        <text:list-item>
          <text:p text:style-name="P14"><text:span text:style-name="Strong_20_Emphasis">Background:</text:span> Mexican-British-Australian mixed-heritage; Embraced 1991 in Brisbane by Templar Cruz-Molina personally — one of perhaps four Kindred Templar Cruz-Molina has Embraced personally across her 38-year Templar tenure. The direct Embrace relationship produces chronicle-significant institutional weight that distinguishes Cassiel from other Brisbane pack-leaders </text:p>
        </text:list-item>
        <text:list-item>
          <text:p text:style-name="P14"><text:span text:style-name="Strong_20_Emphasis">Apparent age:</text:span> 31, he/him pronouns. Tall (185cm), dark hair, sharp grey-blue eyes </text:p>
        </text:list-item>
        <text:list-item>
          <text:p text:style-name="P13"><text:span text:style-name="Strong_20_Emphasis">Disciplines:</text:span> Auspex 3, Celerity 3, Fortitude 3, Potence 4, Presence 2 </text:p>
        </text:list-item>
      </text:list>
      <text:h text:style-name="Heading_20_3" text:outline-level="3"><text:span text:style-name="Strong_20_Emphasis">Pack operational character:</text:span></text:h>
      <text:list text:style-name="L7">
        <text:list-item>
          <text:p text:style-name="P16"><text:span text:style-name="Strong_20_Emphasis">Combat-operational specialty</text:span> at chronicle-active Brisbane combat infrastructure scale through continuing 34-year operational tenure </text:p>
        </text:list-item>
        <text:list-item>
          <text:p text:style-name="P16"><text:span text:style-name="Strong_20_Emphasis">Templar Cruz-Molina direct cultivation</text:span> producing institutional positioning that the chronicle-active dissent crisis has implicated at chronicle-active scale (Blood Crossing pack operates under continuing Templar Cruz-Molina institutional positioning that the dissent crisis institutional resolution will affect at chronicle-defining scale) </text:p>
        </text:list-item>
        <text:list-item>
          <text:p text:style-name="P16"><text:span text:style-name="Strong_20_Emphasis">2026 Brisbane operation pre-positioning</text:span> at chronicle-active scale through combat-operational pack institutional positioning </text:p>
        </text:list-item>
        <text:list-item>
          <text:p text:style-name="P15"><text:span text:style-name="Strong_20_Emphasis">Internal pack dynamics</text:span> — pack institutional cohesion at chronicle-active scale despite dissent crisis pressure; pack members operate institutional support for Templar Cruz-Molina positioning across chronicle-active period </text:p>
        </text:list-item>
      </text:list>
      <text:h text:style-name="Heading_20_3" text:outline-level="3"><text:soft-page-break/><text:span text:style-name="Strong_20_Emphasis">Chronicle hook integration:</text:span></text:h>
      <table:table table:name="Table4" table:style-name="Table4">
        <table:table-column table:style-name="Table4.A"/>
        <table:table-column table:style-name="Table4.B"/>
        <table:table-header-rows>
          <table:table-row>
            <table:table-cell table:style-name="Table4.A1" office:value-type="string">
              <text:p text:style-name="Table_20_Heading">Chronicle scope</text:p>
            </table:table-cell>
            <table:table-cell table:style-name="Table4.A1" office:value-type="string">
              <text:p text:style-name="Table_20_Heading">Blood Crossing engagement</text:p>
            </table:table-cell>
          </table:table-row>
        </table:table-header-rows>
        <table:table-row>
          <table:table-cell table:style-name="Table4.A1" office:value-type="string">
            <text:p text:style-name="Table_20_Contents"><text:span text:style-name="Strong_20_Emphasis">Pack-combat chronicle</text:span></text:p>
          </table:table-cell>
          <table:table-cell table:style-name="Table4.A1" office:value-type="string">
            <text:p text:style-name="Table_20_Contents">{{user}} as junior pack operative under combat-operational cultivation</text:p>
          </table:table-cell>
        </table:table-row>
        <table:table-row>
          <table:table-cell table:style-name="Table4.A1" office:value-type="string">
            <text:p text:style-name="Table_20_Contents"><text:span text:style-name="Strong_20_Emphasis">Dissent crisis chronicle</text:span></text:p>
          </table:table-cell>
          <table:table-cell table:style-name="Table4.A1" office:value-type="string">
            <text:p text:style-name="Table_20_Contents">Blood Crossing pack institutional positioning during Templar Cruz-Molina dissent crisis</text:p>
          </table:table-cell>
        </table:table-row>
        <table:table-row>
          <table:table-cell table:style-name="Table4.A1" office:value-type="string">
            <text:p text:style-name="Table_20_Contents"><text:span text:style-name="Strong_20_Emphasis">2026 Brisbane operation chronicle</text:span></text:p>
          </table:table-cell>
          <table:table-cell table:style-name="Table4.A1" office:value-type="string">
            <text:p text:style-name="Table_20_Contents">Pack combat-operational coordination during chronicle-defining 2026 operation</text:p>
          </table:table-cell>
        </table:table-row>
        <table:table-row>
          <table:table-cell table:style-name="Table4.A1" office:value-type="string">
            <text:p text:style-name="Table_20_Contents"><text:span text:style-name="Strong_20_Emphasis">Brisbane internal political chronicle</text:span></text:p>
          </table:table-cell>
          <table:table-cell table:style-name="Table4.A1" office:value-type="string">
            <text:p text:style-name="Table_20_Contents">Pack positioning across continental Brisbane Sabbat institutional dynamics</text:p>
          </table:table-cell>
        </table:table-row>
      </table:table>
      <text:p text:style-name="P2"/>
      <text:p text:style-name="P2"/>
      <text:p text:style-name="P2">Burning Shepherds</text:p>
      <text:p text:style-name="P2"/>
      <text:p text:style-name="P3"><text:span text:style-name="Strong_20_Emphasis">Coterie type:</text:span> Brisbane Sabbat doctrinal-religious pack with pre-1976 institutional inheritance<text:line-break/><text:span text:style-name="Strong_20_Emphasis">Established:</text:span> 1958 (the longest pre-1976-Bishop-Callista Brisbane Sabbat institutional tenure of any current Brisbane Sabbat pack)<text:line-break/><text:span text:style-name="Strong_20_Emphasis">Continuing tenure:</text:span> 67 years<text:line-break/><text:span text:style-name="Strong_20_Emphasis">Composition:</text:span> Six Brisbane Sabbat operatives operating as doctrinal-religious pack under continental Templar Kazakov institutional cultivation</text:p>
      <text:p text:style-name="Text_20_body">Burning Shepherds operates as one of Brisbane Sabbat's most senior packs by institutional tenure, with operational specialty in Sabbat doctrinal religious infrastructure including doctrinal religious instruction, Sabbat liturgical calendar coordination across the West End chantry, pre-1976-Bishop-Callista Brisbane Sabbat institutional inheritance preservation, and mass-Embrace recruitment cultivation. The pack operates from a weatherboard worker's-cottage on Vulture Street West End that the pack has occupied since 1962 acquisition.</text:p>
      <text:h text:style-name="Heading_20_3" text:outline-level="3"><text:span text:style-name="Strong_20_Emphasis">Pack membership at-a-glance:</text:span></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Position</text:p>
            </table:table-cell>
            <table:table-cell table:style-name="Table5.A1" office:value-type="string">
              <text:p text:style-name="Table_20_Heading">Holder</text:p>
            </table:table-cell>
            <table:table-cell table:style-name="Table5.A1" office:value-type="string">
              <text:p text:style-name="Table_20_Heading">Clan / Generation</text:p>
            </table:table-cell>
            <table:table-cell table:style-name="Table5.A1" office:value-type="string">
              <text:p text:style-name="Table_20_Heading">Tenure</text:p>
            </table:table-cell>
            <table:table-cell table:style-name="Table5.A1" office:value-type="string">
              <text:p text:style-name="Table_20_Heading">Operational specialty</text:p>
            </table:table-cell>
          </table:table-row>
        </table:table-header-rows>
        <table:table-row>
          <table:table-cell table:style-name="Table5.A1" office:value-type="string">
            <text:p text:style-name="Table_20_Contents"><text:span text:style-name="Strong_20_Emphasis">Pack-leader</text:span></text:p>
          </table:table-cell>
          <table:table-cell table:style-name="Table5.A1" office:value-type="string">
            <text:p text:style-name="Table_20_Contents">Brother Hesh Reynaldo-Korovin</text:p>
          </table:table-cell>
          <table:table-cell table:style-name="Table5.A1" office:value-type="string">
            <text:p text:style-name="Table_20_Contents">Tzimisce, 9th gen</text:p>
          </table:table-cell>
          <table:table-cell table:style-name="Table5.A1" office:value-type="string">
            <text:p text:style-name="Table_20_Contents">47 years</text:p>
          </table:table-cell>
          <table:table-cell table:style-name="Table5.A1" office:value-type="string">
            <text:p text:style-name="Table_20_Contents">doctrinal religious cultivation; mass-Embrace recruitment</text:p>
          </table:table-cell>
        </table:table-row>
        <table:table-row>
          <table:table-cell table:style-name="Table5.A1" office:value-type="string">
            <text:p text:style-name="Table_20_Contents"><text:span text:style-name="Strong_20_Emphasis">Senior operative</text:span></text:p>
          </table:table-cell>
          <table:table-cell table:style-name="Table5.A1" office:value-type="string">
            <text:p text:style-name="Table_20_Contents">Sister Mira Aronowitz-Kalu</text:p>
          </table:table-cell>
          <table:table-cell table:style-name="Table5.A1" office:value-type="string">
            <text:p text:style-name="Table_20_Contents">Lasombra antitribu, 9th gen</text:p>
          </table:table-cell>
          <table:table-cell table:style-name="Table5.A1" office:value-type="string">
            <text:p text:style-name="Table_20_Contents">41 years</text:p>
          </table:table-cell>
          <table:table-cell table:style-name="Table5.A1" office:value-type="string">
            <text:p text:style-name="Table_20_Contents">Sabbat liturgical calendar coordination</text:p>
          </table:table-cell>
        </table:table-row>
        <table:table-row>
          <table:table-cell table:style-name="Table5.A1" office:value-type="string">
            <text:p text:style-name="Table_20_Contents"><text:span text:style-name="Strong_20_Emphasis">Operative</text:span></text:p>
          </table:table-cell>
          <table:table-cell table:style-name="Table5.A1" office:value-type="string">
            <text:p text:style-name="Table_20_Contents">Brother Gideon Pemberton-Mwangi</text:p>
          </table:table-cell>
          <table:table-cell table:style-name="Table5.A1" office:value-type="string">
            <text:p text:style-name="Table_20_Contents">Brujah antitribu, 10th gen</text:p>
          </table:table-cell>
          <table:table-cell table:style-name="Table5.A1" office:value-type="string">
            <text:p text:style-name="Table_20_Contents">23 years</text:p>
          </table:table-cell>
          <table:table-cell table:style-name="Table5.A1" office:value-type="string">
            <text:p text:style-name="Table_20_Contents">Pre-1976 institutional inheritance preservation</text:p>
          </table:table-cell>
        </table:table-row>
        <table:table-row>
          <table:table-cell table:style-name="Table5.A1" office:value-type="string">
            <text:p text:style-name="Table_20_Contents"><text:span text:style-name="Strong_20_Emphasis">Operative</text:span></text:p>
          </table:table-cell>
          <table:table-cell table:style-name="Table5.A1" office:value-type="string">
            <text:p text:style-name="Table_20_Contents">Sister Tabitha Wallace-Ng</text:p>
          </table:table-cell>
          <table:table-cell table:style-name="Table5.A1" office:value-type="string">
            <text:p text:style-name="Table_20_Contents">Tzimisce, 10th gen</text:p>
          </table:table-cell>
          <table:table-cell table:style-name="Table5.A1" office:value-type="string">
            <text:p text:style-name="Table_20_Contents">18 years</text:p>
          </table:table-cell>
          <table:table-cell table:style-name="Table5.A1" office:value-type="string">
            <text:p text:style-name="Table_20_Contents">Flesh-shaping doctrinal practice cultivation</text:p>
          </table:table-cell>
        </table:table-row>
        <table:table-row>
          <table:table-cell table:style-name="Table5.A1" office:value-type="string">
            <text:p text:style-name="Table_20_Contents"><text:span text:style-name="Strong_20_Emphasis">Junior operative</text:span></text:p>
          </table:table-cell>
          <table:table-cell table:style-name="Table5.A1" office:value-type="string">
            <text:p text:style-name="Table_20_Contents">Brother Tyrell "Ty" Birrawanna-Cole</text:p>
          </table:table-cell>
          <table:table-cell table:style-name="Table5.A1" office:value-type="string">
            <text:p text:style-name="Table_20_Contents">Brujah antitribu, 11th gen</text:p>
          </table:table-cell>
          <table:table-cell table:style-name="Table5.A1" office:value-type="string">
            <text:p text:style-name="Table_20_Contents">4 months (post-formalisation pending)</text:p>
          </table:table-cell>
          <table:table-cell table:style-name="Table5.A1" office:value-type="string">
            <text:p text:style-name="Table_20_Contents">Junior pack-cultivation (Scenario 1 character)</text:p>
          </table:table-cell>
        </table:table-row>
        <table:table-row>
          <table:table-cell table:style-name="Table5.A1" office:value-type="string">
            <text:p text:style-name="Table_20_Contents"><text:span text:style-name="Strong_20_Emphasis">Junior operative</text:span></text:p>
          </table:table-cell>
          <table:table-cell table:style-name="Table5.A1" office:value-type="string">
            <text:p text:style-name="Table_20_Contents">Brother Marcus "Nail" Pharaway-White</text:p>
          </table:table-cell>
          <table:table-cell table:style-name="Table5.A1" office:value-type="string">
            <text:p text:style-name="Table_20_Contents">Caitiff</text:p>
          </table:table-cell>
          <table:table-cell table:style-name="Table5.A1" office:value-type="string">
            <text:p text:style-name="Table_20_Contents">4 months (post-formalisation <text:soft-page-break/>pending)</text:p>
          </table:table-cell>
          <table:table-cell table:style-name="Table5.A1" office:value-type="string">
            <text:p text:style-name="Table_20_Contents">Junior pack-cultivation</text:p>
          </table:table-cell>
        </table:table-row>
      </table:table>
      <text:h text:style-name="Heading_20_3" text:outline-level="3"><text:span text:style-name="Strong_20_Emphasis">Pack-leader Brother Hesh Reynaldo-Korovin:</text:span></text:h>
      <text:list text:style-name="L8">
        <text:list-item>
          <text:p text:style-name="P18"><text:span text:style-name="Strong_20_Emphasis">Background:</text:span> Russian-Mexican-Australian mixed-heritage; Embraced 1978 in Brisbane by a Burning Shepherds pre-1976 Tzimisce operative who subsequently reached Final Death during 1989 Adelaide Pentex Tellus Article 8 operation operational complications. <text:span text:style-name="T1">P</text:span>ack-leader institutional positioning since 1995 succession following previous pack-leader operational departure </text:p>
        </text:list-item>
        <text:list-item>
          <text:p text:style-name="P18"><text:span text:style-name="Strong_20_Emphasis">Apparent age:</text:span> 31, he/him pronouns. Medium-tall (172cm), dark hair, sharp grey-blue eyes; subtle flesh-shaping cultivation including elongated fingers and pronounced spinal ridge maintained through Tzimisce-doctrinal aesthetic practice </text:p>
        </text:list-item>
        <text:list-item>
          <text:p text:style-name="P17"><text:span text:style-name="Strong_20_Emphasis">Disciplines:</text:span> Animalism 2, Auspex 4, Dominate 3, Fortitude 3, Protean 2, Vicissitude 4 </text:p>
        </text:list-item>
      </text:list>
      <text:h text:style-name="Heading_20_3" text:outline-level="3"><text:span text:style-name="Strong_20_Emphasis">Pack operational character:</text:span></text:h>
      <text:list text:style-name="L9">
        <text:list-item>
          <text:p text:style-name="P20"><text:span text:style-name="Strong_20_Emphasis">Doctrinal religious specialty</text:span> at chronicle-active Brisbane doctrinal infrastructure scale through 67-year operational tenure </text:p>
        </text:list-item>
        <text:list-item>
          <text:p text:style-name="P20"><text:span text:style-name="Strong_20_Emphasis">Templar Kazakov direct cultivation</text:span> producing institutional positioning at chronicle-active scale; pack institutional cooperation with Bracken Covenant pack at parallel Templar Kazakov coordination scale </text:p>
        </text:list-item>
        <text:list-item>
          <text:p text:style-name="P20"><text:span text:style-name="Strong_20_Emphasis">Pre-1976 institutional inheritance preservation</text:span> — Burning Shepherds is the only current Brisbane Sabbat pack with pre-1976 institutional inheritance, producing chronicle-significant institutional history at scale that other Brisbane packs do not match </text:p>
        </text:list-item>
        <text:list-item>
          <text:p text:style-name="P19"><text:span text:style-name="Strong_20_Emphasis">Mass-Embrace recruitment cultivation</text:span> — Burning Shepherds conducts mass-Embrace recruitment operations at intervals of approximately 5-7 years producing junior pack-member cultivation pipeline </text:p>
        </text:list-item>
      </text:list>
      <text:h text:style-name="Heading_20_3" text:outline-level="3"><text:span text:style-name="Strong_20_Emphasis">Chronicle hook integration:</text:span></text:h>
      <table:table table:name="Table6" table:style-name="Table6">
        <table:table-column table:style-name="Table6.A"/>
        <table:table-column table:style-name="Table6.B"/>
        <table:table-header-rows>
          <table:table-row>
            <table:table-cell table:style-name="Table6.A1" office:value-type="string">
              <text:p text:style-name="Table_20_Heading">Chronicle scope</text:p>
            </table:table-cell>
            <table:table-cell table:style-name="Table6.A1" office:value-type="string">
              <text:p text:style-name="Table_20_Heading">Burning Shepherds engagement</text:p>
            </table:table-cell>
          </table:table-row>
        </table:table-header-rows>
        <table:table-row>
          <table:table-cell table:style-name="Table6.A1" office:value-type="string">
            <text:p text:style-name="Table_20_Contents"><text:span text:style-name="Strong_20_Emphasis">Junior pack-cultivation chronicle</text:span></text:p>
          </table:table-cell>
          <table:table-cell table:style-name="Table6.A1" office:value-type="string">
            <text:p text:style-name="Table_20_Contents">{{user}} as Shovelhead Initiate (Ty Birrawanna-Cole template, Scenario 1)</text:p>
          </table:table-cell>
        </table:table-row>
        <table:table-row>
          <table:table-cell table:style-name="Table6.A1" office:value-type="string">
            <text:p text:style-name="Table_20_Contents"><text:span text:style-name="Strong_20_Emphasis">Doctrinal religious chronicle</text:span></text:p>
          </table:table-cell>
          <table:table-cell table:style-name="Table6.A1" office:value-type="string">
            <text:p text:style-name="Table_20_Contents">Pack Sabbat liturgical calendar coordination at chronicle-active scale</text:p>
          </table:table-cell>
        </table:table-row>
        <table:table-row>
          <table:table-cell table:style-name="Table6.A1" office:value-type="string">
            <text:p text:style-name="Table_20_Contents"><text:span text:style-name="Strong_20_Emphasis">Pre-1976 institutional inheritance chronicle</text:span></text:p>
          </table:table-cell>
          <table:table-cell table:style-name="Table6.A1" office:value-type="string">
            <text:p text:style-name="Table_20_Contents"><text:span text:style-name="T1">C</text:span>hronicle-significant institutional history operational positioning</text:p>
          </table:table-cell>
        </table:table-row>
        <table:table-row>
          <table:table-cell table:style-name="Table6.A1" office:value-type="string">
            <text:p text:style-name="Table_20_Contents"><text:span text:style-name="Strong_20_Emphasis">Continental cross-Hive Cleansing chronicle</text:span></text:p>
          </table:table-cell>
          <table:table-cell table:style-name="Table6.A1" office:value-type="string">
            <text:p text:style-name="Table_20_Contents">Pack cooperation with continental Article 8 operations at continental cross-supernatural cooperation scale</text:p>
          </table:table-cell>
        </table:table-row>
      </table:table>
      <text:p text:style-name="P2"/>
      <text:p text:style-name="P2"/>
      <text:p text:style-name="P2"/>
      <text:p text:style-name="P2"/>
      <text:p text:style-name="P2"/>
      <text:p text:style-name="P2">Bracken Covenant</text:p>
      <text:p text:style-name="P2"/>
      <text:p text:style-name="P3"><text:span text:style-name="Strong_20_Emphasis">Coterie type:</text:span> Rural Queensland Brisbane Sabbat pack with continental cross-Wyrm-infrastructure threat-assessment specialty<text:line-break/><text:span text:style-name="Strong_20_Emphasis">Established:</text:span> 1983<text:line-break/><text:soft-page-break/><text:span text:style-name="Strong_20_Emphasis">Continuing tenure:</text:span> 42 years<text:line-break/><text:span text:style-name="Strong_20_Emphasis">Composition:</text:span> Four Brisbane Sabbat operatives operating as rural-Queensland-coordination pack under continental Templar Kazakov institutional cultivation</text:p>
      <text:p text:style-name="Text_20_body">Bracken Covenant operates as Brisbane Sabbat's continental rural-Queensland-coordination pack with operational specialty in continental cross-Wyrm-infrastructure threat-assessment including Barrier Hive operational pressure analysis, Pentex Australian operations intelligence-monitoring across Queensland subsidiary infrastructure, and rural-Queensland operational coordination across continental Queensland geography. The pack operates from a weatherboard farmhouse on rural property approximately 80km west of Brisbane (Lockyer Valley region) that the pack acquired in 1989 through Sabbat institutional cooperation with continental Queensland rural community infrastructure.</text:p>
      <text:h text:style-name="Heading_20_3" text:outline-level="3"><text:span text:style-name="Strong_20_Emphasis">Pack membership at-a-glance:</text:span></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Position</text:p>
            </table:table-cell>
            <table:table-cell table:style-name="Table7.A1" office:value-type="string">
              <text:p text:style-name="Table_20_Heading">Holder</text:p>
            </table:table-cell>
            <table:table-cell table:style-name="Table7.A1" office:value-type="string">
              <text:p text:style-name="Table_20_Heading">Clan / Generation</text:p>
            </table:table-cell>
            <table:table-cell table:style-name="Table7.A1" office:value-type="string">
              <text:p text:style-name="Table_20_Heading">Tenure</text:p>
            </table:table-cell>
            <table:table-cell table:style-name="Table7.A1" office:value-type="string">
              <text:p text:style-name="Table_20_Heading">Operational specialty</text:p>
            </table:table-cell>
          </table:table-row>
        </table:table-header-rows>
        <table:table-row>
          <table:table-cell table:style-name="Table7.A1" office:value-type="string">
            <text:p text:style-name="Table_20_Contents"><text:span text:style-name="Strong_20_Emphasis">Pack-leader</text:span></text:p>
          </table:table-cell>
          <table:table-cell table:style-name="Table7.A1" office:value-type="string">
            <text:p text:style-name="Table_20_Contents">Sister Magdalena Brennan-Cole</text:p>
          </table:table-cell>
          <table:table-cell table:style-name="Table7.A1" office:value-type="string">
            <text:p text:style-name="Table_20_Contents">Lasombra antitribu, 9th gen</text:p>
          </table:table-cell>
          <table:table-cell table:style-name="Table7.A1" office:value-type="string">
            <text:p text:style-name="Table_20_Contents">42 years</text:p>
          </table:table-cell>
          <table:table-cell table:style-name="Table7.A1" office:value-type="string">
            <text:p text:style-name="Table_20_Contents">Continental cross-Wyrm-infrastructure threat-assessment</text:p>
          </table:table-cell>
        </table:table-row>
        <table:table-row>
          <table:table-cell table:style-name="Table7.A1" office:value-type="string">
            <text:p text:style-name="Table_20_Contents"><text:span text:style-name="Strong_20_Emphasis">Senior operative</text:span></text:p>
          </table:table-cell>
          <table:table-cell table:style-name="Table7.A1" office:value-type="string">
            <text:p text:style-name="Table_20_Contents">Brother Petros Devrim-Askew</text:p>
          </table:table-cell>
          <table:table-cell table:style-name="Table7.A1" office:value-type="string">
            <text:p text:style-name="Table_20_Contents">Tzimisce, 10th gen</text:p>
          </table:table-cell>
          <table:table-cell table:style-name="Table7.A1" office:value-type="string">
            <text:p text:style-name="Table_20_Contents">31 years</text:p>
          </table:table-cell>
          <table:table-cell table:style-name="Table7.A1" office:value-type="string">
            <text:p text:style-name="Table_20_Contents">Eastern-Orthodox-cultural cooperation; <text:s/>dissent-crisis institutional positioning (Scenario 4 character)</text:p>
          </table:table-cell>
        </table:table-row>
        <table:table-row>
          <table:table-cell table:style-name="Table7.A1" office:value-type="string">
            <text:p text:style-name="Table_20_Contents"><text:span text:style-name="Strong_20_Emphasis">Operative</text:span></text:p>
          </table:table-cell>
          <table:table-cell table:style-name="Table7.A1" office:value-type="string">
            <text:p text:style-name="Table_20_Contents">Sister Vanessa Wirrung-Ng</text:p>
          </table:table-cell>
          <table:table-cell table:style-name="Table7.A1" office:value-type="string">
            <text:p text:style-name="Table_20_Contents">Brujah antitribu, 10th gen</text:p>
          </table:table-cell>
          <table:table-cell table:style-name="Table7.A1" office:value-type="string">
            <text:p text:style-name="Table_20_Contents">22 years</text:p>
          </table:table-cell>
          <table:table-cell table:style-name="Table7.A1" office:value-type="string">
            <text:p text:style-name="Table_20_Contents">Aboriginal-Australian cross-cultural cooperation</text:p>
          </table:table-cell>
        </table:table-row>
        <table:table-row>
          <table:table-cell table:style-name="Table7.A1" office:value-type="string">
            <text:p text:style-name="Table_20_Contents"><text:span text:style-name="Strong_20_Emphasis">Junior operative</text:span></text:p>
          </table:table-cell>
          <table:table-cell table:style-name="Table7.A1" office:value-type="string">
            <text:p text:style-name="Table_20_Contents">Brother Andreas Kowalski-Ng</text:p>
          </table:table-cell>
          <table:table-cell table:style-name="Table7.A1" office:value-type="string">
            <text:p text:style-name="Table_20_Contents">Tzimisce, 11th gen</text:p>
          </table:table-cell>
          <table:table-cell table:style-name="Table7.A1" office:value-type="string">
            <text:p text:style-name="Table_20_Contents">9 years</text:p>
          </table:table-cell>
          <table:table-cell table:style-name="Table7.A1" office:value-type="string">
            <text:p text:style-name="Table_20_Contents">Junior cross-Wyrm-infrastructure intelligence</text:p>
          </table:table-cell>
        </table:table-row>
      </table:table>
      <text:h text:style-name="Heading_20_3" text:outline-level="3"><text:span text:style-name="Strong_20_Emphasis">Pack-leader Sister Magdalena Brennan-Cole:</text:span></text:h>
      <text:list text:style-name="L10">
        <text:list-item>
          <text:p text:style-name="P22"><text:span text:style-name="Strong_20_Emphasis">Background:</text:span> Anglo-Australian academic-professional pre-Embrace formation; Embraced 1983 in Brisbane by a pre-1976-period Lasombra-refusenik-tradition operative who subsequently reached Final Death during 1995 Nullarbor Hive Article 8 operation. Pack-leader institutional positioning since 1991 succession following previous pack-leader operational departure during 1991 continental incursion attempt against Sydney </text:p>
        </text:list-item>
        <text:list-item>
          <text:p text:style-name="P22"><text:span text:style-name="Strong_20_Emphasis">Apparent age:</text:span> 36, she/her pronouns. Medium-tall (172cm), greying dark brown hair, sharp grey-green eyes with significant Auspex precision developed across 42-year tenure </text:p>
        </text:list-item>
        <text:list-item>
          <text:p text:style-name="P21"><text:span text:style-name="Strong_20_Emphasis">Disciplines:</text:span> Auspex 4, Dominate 3, Fortitude 3, Obtenebration 4, Potence 2 </text:p>
        </text:list-item>
      </text:list>
      <text:h text:style-name="Heading_20_3" text:outline-level="3"><text:span text:style-name="Strong_20_Emphasis">Pack operational character:</text:span></text:h>
      <text:list text:style-name="L11">
        <text:list-item>
          <text:p text:style-name="P24"><text:span text:style-name="Strong_20_Emphasis">Cross-Wyrm-infrastructure threat-assessment specialty</text:span> at chronicle-active continental scale producing continuing pack institutional positioning at scale that connects Pentex supplement and Black Spiral Dancer supplement antagonist infrastructure </text:p>
        </text:list-item>
        <text:list-item>
          <text:p text:style-name="P24"><text:span text:style-name="Strong_20_Emphasis">Templar Kazakov direct cultivation</text:span> producing institutional positioning at chronicle-active scale; pack institutional cooperation with Burning Shepherds pack at parallel Templar Kazakov coordination scale </text:p>
        </text:list-item>
        <text:list-item>
          <text:p text:style-name="P24"><text:span text:style-name="Strong_20_Emphasis">Rural-Queensland operational territory</text:span> at pack institutional infrastructure scale that distinguishes Bracken Covenant from urban-Brisbane pack operational character (rural-<text:soft-page-break/>Queensland operational positioning produces pack operational scope at continental Queensland scale exceeding standard urban-pack operational scope) </text:p>
        </text:list-item>
        <text:list-item>
          <text:p text:style-name="P24"><text:span text:style-name="Strong_20_Emphasis">Continuing 2026 Brisbane operation cross-supernatural threat-assessment</text:span> at chronicle-active scale through pack continental cross-Wyrm-infrastructure operational specialty </text:p>
        </text:list-item>
        <text:list-item>
          <text:p text:style-name="P23"><text:span text:style-name="Strong_20_Emphasis">Aboriginal-Australian cross-cultural cooperation</text:span> through Sister Vanessa Wirrung-Ng providing parallel infrastructure to Brother Tomás Cortez-Walsh's Wendigo-and-Uktena cooperation arrangements (Cross-Wyrm Scenario 4) — the two parallel cross-cultural cooperation arrangements operate at complementary continental Brisbane Sabbat institutional infrastructure scale </text:p>
        </text:list-item>
      </text:list>
      <text:h text:style-name="Heading_20_3" text:outline-level="3"><text:span text:style-name="Strong_20_Emphasis">Chronicle hook integration:</text:span></text:h>
      <table:table table:name="Table8" table:style-name="Table8">
        <table:table-column table:style-name="Table8.A"/>
        <table:table-column table:style-name="Table8.B"/>
        <table:table-header-rows>
          <table:table-row>
            <table:table-cell table:style-name="Table8.A1" office:value-type="string">
              <text:p text:style-name="Table_20_Heading">Chronicle scope</text:p>
            </table:table-cell>
            <table:table-cell table:style-name="Table8.A1" office:value-type="string">
              <text:p text:style-name="Table_20_Heading">Bracken Covenant engagement</text:p>
            </table:table-cell>
          </table:table-row>
        </table:table-header-rows>
        <table:table-row>
          <table:table-cell table:style-name="Table8.A1" office:value-type="string">
            <text:p text:style-name="Table_20_Contents"><text:span text:style-name="Strong_20_Emphasis">Cross-Wyrm threat-assessment chronicle</text:span></text:p>
          </table:table-cell>
          <table:table-cell table:style-name="Table8.A1" office:value-type="string">
            <text:p text:style-name="Table_20_Contents">{{user}} as junior pack operative engaged in continental cross-Wyrm-infrastructure intelligence-gathering</text:p>
          </table:table-cell>
        </table:table-row>
        <table:table-row>
          <table:table-cell table:style-name="Table8.A1" office:value-type="string">
            <text:p text:style-name="Table_20_Contents"><text:span text:style-name="Strong_20_Emphasis">Dissent crisis chronicle</text:span></text:p>
          </table:table-cell>
          <table:table-cell table:style-name="Table8.A1" office:value-type="string">
            <text:p text:style-name="Table_20_Contents">Brother Petros Devrim-Askew positioning during Templar Cruz-Molina dissent crisis (parallel to Scenario 4)</text:p>
          </table:table-cell>
        </table:table-row>
        <table:table-row>
          <table:table-cell table:style-name="Table8.A1" office:value-type="string">
            <text:p text:style-name="Table_20_Contents"><text:span text:style-name="Strong_20_Emphasis">Cross-tribal cooperation chronicle</text:span></text:p>
          </table:table-cell>
          <table:table-cell table:style-name="Table8.A1" office:value-type="string">
            <text:p text:style-name="Table_20_Contents">Sister Vanessa Wirrung-Ng Aboriginal-Australian cross-cultural cooperation operations</text:p>
          </table:table-cell>
        </table:table-row>
        <table:table-row>
          <table:table-cell table:style-name="Table8.A1" office:value-type="string">
            <text:p text:style-name="Table_20_Contents"><text:span text:style-name="Strong_20_Emphasis">Continental Article 8 chronicle</text:span></text:p>
          </table:table-cell>
          <table:table-cell table:style-name="Table8.A1" office:value-type="string">
            <text:p text:style-name="Table_20_Contents">Pack continental cross-supernatural threat-assessment during chronicle-defining 2026 Article 8 activation possibility period</text:p>
          </table:table-cell>
        </table:table-row>
        <table:table-row>
          <table:table-cell table:style-name="Table8.A1" office:value-type="string">
            <text:p text:style-name="Table_20_Contents"><text:span text:style-name="Strong_20_Emphasis">Rural Queensland operational chronicle</text:span></text:p>
          </table:table-cell>
          <table:table-cell table:style-name="Table8.A1" office:value-type="string">
            <text:p text:style-name="Table_20_Contents">Pack rural-Queensland operational territory at continental Queensland scale</text:p>
          </table:table-cell>
        </table:table-row>
      </table:table>
      <text:p text:style-name="P2"/>
      <text:p text:style-name="P2"><text:span text:style-name="Strong_20_Emphasis">The Brisbane scenarios and coterie pack are complete.</text:span> Five {{user}} character cards covering distinct Brisbane chronicle starting positions (Shovelhead Initiate, Cross-Pacific Correspondence Apprentice, Cross-Domain Cover Infiltrator, Dissent Crisis Operative, 2026 Operation Pre-Positioning Specialist with full Templar Kazakov build), plus four coteries covering the full Brisbane Sabbat institutional structure (Templar Council with all four senior figures including full builds for Templars Abernathy and Cruz-Molina, Blood Crossing pack under Templar Cruz-Molina, Burning Shepherds pack under Templar Kazakov with continuing pre-1976 institutional inheritance, Bracken Covenant pack under Templar Kazakov with cross-Wyrm-infrastructure threat-assessment special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22:47:08.354207369</dc:date>
    <meta:editing-duration>PT21M7S</meta:editing-duration>
    <meta:editing-cycles>2</meta:editing-cycles>
    <meta:generator>LibreOffice/24.2.7.2$Linux_X86_64 LibreOffice_project/420$Build-2</meta:generator>
    <meta:document-statistic meta:table-count="8" meta:image-count="0" meta:object-count="0" meta:page-count="9" meta:paragraph-count="255" meta:word-count="2673" meta:character-count="23220" meta:non-whitespace-character-count="20792"/>
  </office:meta>
</office:document-meta>
</file>