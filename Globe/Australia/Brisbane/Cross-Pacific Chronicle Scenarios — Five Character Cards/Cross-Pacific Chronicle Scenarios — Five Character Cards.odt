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4.203cm"/>
    </style:style>
    <style:style style:name="Table1.C" style:family="table-column">
      <style:table-column-properties style:column-width="7.795cm"/>
    </style:style>
    <style:style style:name="Table1.D" style:family="table-column">
      <style:table-column-properties style:column-width="4.577cm"/>
    </style:style>
    <style:style style:name="Table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ve chronicle scenarios providing playable {{user}} character starting positions for cross-Pacific Sabbat-refusenik chronicle work. Each scenario engages distinct chronicle hook infrastructure — Cardinal Reyna direct engagement, Templar Abernathy correspondence operations, the chronicle-active 2026 cross-Pacific coordination, the Pacific Northwest succession crisis dynamics, and the global Sabbat-refusenik institutional positioning at maximum cross-Cardinal scope.</text:p>
      <text:p text:style-name="Text_20_body"><text:span text:style-name="Strong_20_Emphasis">Format:</text:span> Each scenario follows the standard character card structure (V5 mechanical build, character description, starting position, opening scene, chronicle stakes, AI handling notes), calibrated to engage the cross-Pacific Sabbat-refusenik supplement infrastructure plus the relevant Cardinal supplement (Pacific Northwest, Russian Far East, South American highlands) plus the broader kit infrastructure (Brisbane supplement, Australian Antagonist Pack, Sabbat-Survivor Chronicle Prep Guide).</text:p>
      <text:p text:style-name="Text_20_body"><text:span text:style-name="Strong_20_Emphasis">Audience:</text:span> Players preparing to enter cross-Pacific Sabbat-refusenik chronicle work, Storytellers preparing to run cross-Pacific chronicles, AI prompt designers configuring chronicle starting positions for cross-Pacific scop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Scenario</text:p>
            </table:table-cell>
            <table:table-cell table:style-name="Table1.A1" office:value-type="string">
              <text:p text:style-name="Table_20_Heading">Primary Engagement</text:p>
            </table:table-cell>
            <table:table-cell table:style-name="Table1.A1" office:value-type="string">
              <text:p text:style-name="Table_20_Heading">Chronicle Scop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The Lima Coordinator's Apprentice</text:span></text:p>
          </table:table-cell>
          <table:table-cell table:style-name="Table1.A1" office:value-type="string">
            <text:p text:style-name="Table_20_Contents">Bishop Ayala-Mendoza correspondence operations + Cardinal Tillinghurst direct engagement + cross-Atlantic-Pacific channel</text:p>
          </table:table-cell>
          <table:table-cell table:style-name="Table1.A1" office:value-type="string">
            <text:p text:style-name="Table_20_Contents">Continental cross-Atlantic-Pacific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The Anchorage Cross-Bering Operative</text:span></text:p>
          </table:table-cell>
          <table:table-cell table:style-name="Table1.A1" office:value-type="string">
            <text:p text:style-name="Table_20_Contents">Pack-Leader Volkov-Petrov + cross-Bering-Strait correspondence + Cardinal Magdalena indirect engagement</text:p>
          </table:table-cell>
          <table:table-cell table:style-name="Table1.A1" office:value-type="string">
            <text:p text:style-name="Table_20_Contents">Continental cross-Bering-Strait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The Telegraph Hill Apprentice</text:span></text:p>
          </table:table-cell>
          <table:table-cell table:style-name="Table1.A1" office:value-type="string">
            <text:p text:style-name="Table_20_Contents">Cardinal Reyna direct engagement + Pacific Northwest corridor + continuing primary succession dynamics</text:p>
          </table:table-cell>
          <table:table-cell table:style-name="Table1.A1" office:value-type="string">
            <text:p text:style-name="Table_20_Contents">Continental Pacific-Coas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The Brisbane Templar's Continental Operative</text:span></text:p>
          </table:table-cell>
          <table:table-cell table:style-name="Table1.A1" office:value-type="string">
            <text:p text:style-name="Table_20_Contents">Templar Abernathy correspondence operations + 2026 cross-Pacific coordination + Brisbane Sabbat-survivor connection</text:p>
          </table:table-cell>
          <table:table-cell table:style-name="Table1.A1" office:value-type="string">
            <text:p text:style-name="Table_20_Contents">Continental Australian-Pacific bridging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trong_20_Emphasis">The Three-Cardinal Coordination Operative</text:span></text:p>
          </table:table-cell>
          <table:table-cell table:style-name="Table1.A1" office:value-type="string">
            <text:p text:style-name="Table_20_Contents">All three Cardinals + both correspondence channels + global Sabbat-refusenik institutional scope</text:p>
          </table:table-cell>
          <table:table-cell table:style-name="Table1.A1" office:value-type="string">
            <text:p text:style-name="Table_20_Contents">Global Sabbat-refusenik infrastructure</text:p>
          </table:table-cell>
        </table:table-row>
      </table:table>
      <text:p text:style-name="Preformatted_20_Text"/>
      <text:p text:style-name="Preformatted_20_Text"/>
      <text:p text:style-name="Preformatted_20_Text"><text:span text:style-name="Strong_20_Emphasis">The five Cross-Pacific Chronicle Scenarios are complete.</text:span> Five {{user}} character cards covering continuing chronicle scope variations: Scenario 1 (Lima Coordinator's Apprentice — Elena Rojas-Figueroa, continuing 23-year apprentice under Bishop Ayala-Mendoza with continuing direct Cardinal Tillinghurst engagement at continuing acute trajectory pressure), Scenario 2 (Anchorage Cross-Bering Operative — Tatiana Sokolov-Chen, continuing 12-year apprentice under Pack-Leader Volkov-Petrov with continuing chronicle-defining Cardinal Magdalena trajectory crisis), Scenario 3 (Telegraph Hill Apprentice — Miguel Antonio Mendoza-Cruz-Romero, continuing 17-year apprentice with continuing potential succession to continuing Bishop-of-San-Francisco position if continuing Cardinal Reyna intermediate trajectory produces continuing succession requirement), Scenario 4 (Brisbane Templar's Continental Operative — Sister Gemma Abernathy-White, continuing 41-year senior deputy under Templar Abernathy with continuing chronicle-defining 2026 operation cross-Pacific coordination), Scenario 5 (Three-Cardinal Coordination Operative — Brother Robert Thornton-Vega, continuing 89-year senior continental cross-Cardinal coordination operative under continuing direct Cardinal Reyna authority with continuing simultaneous continuing all three remaining Cardinals continuing chronicle-active acute trajectory pressure at continuing global Sabbat-refusenik <text:soft-page-break/>institutional crisis scal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20:08:09.618301490</dc:date>
    <meta:editing-duration>PT6M28S</meta:editing-duration>
    <meta:editing-cycles>1</meta:editing-cycles>
    <meta:document-statistic meta:table-count="1" meta:image-count="0" meta:object-count="0" meta:page-count="2" meta:paragraph-count="28" meta:word-count="389" meta:character-count="3588" meta:non-whitespace-character-count="3221"/>
    <meta:generator>LibreOffice/24.2.7.2$Linux_X86_64 LibreOffice_project/420$Build-2</meta:generator>
  </office:meta>
</office:document-meta>
</file>