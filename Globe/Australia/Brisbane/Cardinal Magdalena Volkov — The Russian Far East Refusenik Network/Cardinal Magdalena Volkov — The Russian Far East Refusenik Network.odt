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856cm" table:align="left"/>
    </style:style>
    <style:style style:name="Table1.A" style:family="table-column">
      <style:table-column-properties style:column-width="5.223cm"/>
    </style:style>
    <style:style style:name="Table1.B" style:family="table-column">
      <style:table-column-properties style:column-width="3.032cm"/>
    </style:style>
    <style:style style:name="Table1.C" style:family="table-column">
      <style:table-column-properties style:column-width="2.704cm"/>
    </style:style>
    <style:style style:name="Table1.D" style:family="table-column">
      <style:table-column-properties style:column-width="2.163cm"/>
    </style:style>
    <style:style style:name="Table1.E" style:family="table-column">
      <style:table-column-properties style:column-width="4.73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3.06cm"/>
    </style:style>
    <style:style style:name="Table2.B" style:family="table-column">
      <style:table-column-properties style:column-width="2.475cm"/>
    </style:style>
    <style:style style:name="Table2.C" style:family="table-column">
      <style:table-column-properties style:column-width="3.914cm"/>
    </style:style>
    <style:style style:name="Table2.D" style:family="table-column">
      <style:table-column-properties style:column-width="2.163cm"/>
    </style:style>
    <style:style style:name="Table2.E" style:family="table-column">
      <style:table-column-properties style:column-width="5.389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3.505cm"/>
    </style:style>
    <style:style style:name="Table3.B" style:family="table-column">
      <style:table-column-properties style:column-width="7.661cm"/>
    </style:style>
    <style:style style:name="Table3.C" style:family="table-column">
      <style:table-column-properties style:column-width="2.676cm"/>
    </style:style>
    <style:style style:name="Table3.D" style:family="table-column">
      <style:table-column-properties style:column-width="3.159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4.21cm"/>
    </style:style>
    <style:style style:name="Table4.B" style:family="table-column">
      <style:table-column-properties style:column-width="4.616cm"/>
    </style:style>
    <style:style style:name="Table4.C" style:family="table-column">
      <style:table-column-properties style:column-width="4.117cm"/>
    </style:style>
    <style:style style:name="Table4.D" style:family="table-column">
      <style:table-column-properties style:column-width="4.057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3.545cm"/>
    </style:style>
    <style:style style:name="Table5.B" style:family="table-column">
      <style:table-column-properties style:column-width="6.366cm"/>
    </style:style>
    <style:style style:name="Table5.C" style:family="table-column">
      <style:table-column-properties style:column-width="7.089cm"/>
    </style:style>
    <style:style style:name="Table5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left="0cm" fo:margin-right="0cm" fo:text-indent="0cm" style:auto-text-indent="fals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fo:color="#f97583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 supplement extending the cross-Pacific Sabbat-refusenik infrastructure to the second of three remaining global Cardinals — Cardinal Magdalena Volkov of Vladivostok, whose Russian Far East refusenik network operates across the Russian Pacific Coast, the broader Russian Federation Far East, and through cross-Bering-Strait correspondence with Pack-Leader Maria Volkov-Petrov's Anchorage node. The supplement completes the continental Pacific Sabbat-refusenik global picture by providing the eastern-Pacific institutional infrastructure that connects continentally to Cardinal Reyna's western-Pacific corridor.</text:p>
      <text:p text:style-name="Text_20_body"><text:span text:style-name="Strong_20_Emphasis">Distinctive features of this supplement:</text:span></text:p>
      <text:list text:style-name="L1">
        <text:list-item>
          <text:p text:style-name="P4"><text:span text:style-name="Strong_20_Emphasis">Cardinal Magdalena Volkov</text:span> — Tzimisce, 7th generation, 1623-Embraced, the senior Tzimisce-tradition refusenik figure globally, with operational character distinct from Cardinal Reyna's Lasombra-refusenik institutional position </text:p>
        </text:list-item>
        <text:list-item>
          <text:p text:style-name="P4"><text:span text:style-name="Strong_20_Emphasis">Russian Far East operational corridor</text:span> — Vladivostok (primary), Khabarovsk, Magadan, Petropavlovsk-Kamchatsky, plus smaller positions across the Russian Pacific Coast and the broader Russian Federation Far East </text:p>
        </text:list-item>
        <text:list-item>
          <text:p text:style-name="P4"><text:span text:style-name="Strong_20_Emphasis">Cross-Bering-Strait correspondence</text:span> — the only direct cross-Cardinal correspondence channel currently operational globally, maintained through Pack-Leader Maria Volkov-Petrov's Anchorage node connecting Cardinal Magdalena's network to Cardinal Reyna's continental Pacific-Coast infrastructure </text:p>
        </text:list-item>
        <text:list-item>
          <text:p text:style-name="P4"><text:span text:style-name="Strong_20_Emphasis">Soviet-era institutional inheritance</text:span> — Cardinal Magdalena's network operates with continuing Soviet-era institutional infrastructure that produces operational character distinct from Cardinal Reyna's Spanish-colonial-derived Pacific Northwest corridor </text:p>
        </text:list-item>
        <text:list-item>
          <text:p text:style-name="P4"><text:span text:style-name="Strong_20_Emphasis">Tzimisce-tradition theological-political register</text:span> — distinct from Lasombra-refusenik framework, with continuing pre-1999 Tzimisce-Sabbat institutional practice as theological-political foundation </text:p>
        </text:list-item>
        <text:list-item>
          <text:p text:style-name="P3"><text:span text:style-name="Strong_20_Emphasis">Russian Federation political context</text:span> — the network operates within Russian Federation political environment with continuing FSB-equivalent intelligence pressure that operates through different operational infrastructure than AFP-Five-Eyes-equivalent Pacific cooperation </text:p>
        </text:list-item>
      </text:list>
      <text:p text:style-name="Text_20_body"><text:span text:style-name="Strong_20_Emphasis">Chronicle position:</text:span> This supplement enables chronicles spanning the full Pacific Rim refusenik network from Cardinal Magdalena's Russian Far East corridor through Pack-Leader Volkov-Petrov's Anchorage cross-Bering-Strait connection to Cardinal Reyna's Pacific Northwest corridor and through Templar Abernathy's Brisbane Australian connection. Chronicles can engage Russian Far East operations independently, as eastern-Pacific extension of cross-Pacific refusenik chronicle work, or as continental Pacific Sabbat-refusenik global-scope chronicles.</text:p>
      <text:p text:style-name="P1">A 14-entry lorebook providing Cardinal Magdalena's network, the Russian Far East operational corridor, the cross-Bering-Strait correspondence channel, the Soviet-era institutional inheritance, the Tzimisce-tradition refusenik theological-political register, and the Russian Federation political context. Designed to layer alongside <text:span text:style-name="Source_20_Text"><text:span text:style-name="T1">vtm_modern_nights.json</text:span></text:span> and (typically) <text:span text:style-name="Source_20_Text"><text:span text:style-name="T1">vtm_cross_pacific_refusenik.json</text:span></text:span>; useful adjacent to <text:span text:style-name="Source_20_Text"><text:span text:style-name="T1">vtm_brisbane_by_night.json</text:span></text:span> for chronicles connecting Brisbane operations to continental Pacific eastern-coast infrastructure.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load alongside <text:span text:style-name="Source_20_Text"><text:span text:style-name="T1">vtm_modern_nights.json</text:span></text:span> and (typically) <text:span text:style-name="Source_20_Text"><text:span text:style-name="T1">vtm_cross_pacific_refusenik.json</text:span></text:span> for chronicles engaging Cardinal Magdalena's network or continental Pacific Sabbat-refusenik global picture. Optionally layer with <text:span text:style-name="Source_20_Text"><text:span text:style-name="T1">vtm_brisbane_by_night.json</text:span></text:span> for chronicles connecting Brisbane operations to continental Pacific eastern-coast infrastructure through the cross-Pacific Sabbat-refusenik global network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Node</text:p>
            </table:table-cell>
            <table:table-cell table:style-name="Table1.A1" office:value-type="string">
              <text:p text:style-name="Table_20_Heading">Region</text:p>
            </table:table-cell>
            <table:table-cell table:style-name="Table1.A1" office:value-type="string">
              <text:p text:style-name="Table_20_Heading">Authority</text:p>
            </table:table-cell>
            <table:table-cell table:style-name="Table1.A1" office:value-type="string">
              <text:p text:style-name="Table_20_Heading">Population</text:p>
            </table:table-cell>
            <table:table-cell table:style-name="Table1.A1" office:value-type="string">
              <text:p text:style-name="Table_20_Heading">Operational specialty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Vladivostok</text:span></text:p>
          </table:table-cell>
          <table:table-cell table:style-name="Table1.A1" office:value-type="string">
            <text:p text:style-name="Table_20_Contents">Russian Pacific Coast</text:p>
          </table:table-cell>
          <table:table-cell table:style-name="Table1.A1" office:value-type="string">
            <text:p text:style-name="Table_20_Contents">Cardinal Magdalena Volkov</text:p>
          </table:table-cell>
          <table:table-cell table:style-name="Table1.A1" office:value-type="string">
            <text:p text:style-name="Table_20_Contents">~12 Sabbat</text:p>
          </table:table-cell>
          <table:table-cell table:style-name="Table1.A1" office:value-type="string">
            <text:p text:style-name="Table_20_Contents">Network central node, Tzimisce-tradition institutional foundatio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Khabarovsk</text:span></text:p>
          </table:table-cell>
          <table:table-cell table:style-name="Table1.A1" office:value-type="string">
            <text:p text:style-name="Table_20_Contents">Russian Far East</text:p>
          </table:table-cell>
          <table:table-cell table:style-name="Table1.A1" office:value-type="string">
            <text:p text:style-name="Table_20_Contents">Bishop Sergei Vorontsov</text:p>
          </table:table-cell>
          <table:table-cell table:style-name="Table1.A1" office:value-type="string">
            <text:p text:style-name="Table_20_Contents">~8 Sabbat</text:p>
          </table:table-cell>
          <table:table-cell table:style-name="Table1.A1" office:value-type="string">
            <text:p text:style-name="Table_20_Contents">Cross-Russian-continental institutional connectivity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agadan</text:span></text:p>
          </table:table-cell>
          <table:table-cell table:style-name="Table1.A1" office:value-type="string">
            <text:p text:style-name="Table_20_Contents">Northern Russian Pacific Coast</text:p>
          </table:table-cell>
          <table:table-cell table:style-name="Table1.A1" office:value-type="string">
            <text:p text:style-name="Table_20_Contents">Pack-Leader Anna Belinskaya</text:p>
          </table:table-cell>
          <table:table-cell table:style-name="Table1.A1" office:value-type="string">
            <text:p text:style-name="Table_20_Contents">~5 Sabbat</text:p>
          </table:table-cell>
          <table:table-cell table:style-name="Table1.A1" office:value-type="string">
            <text:p text:style-name="Table_20_Contents">Northern-Pacific maritime operations, Sea of Okhotsk infrastructur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etropavlovsk-Kamchatsky</text:span></text:p>
          </table:table-cell>
          <table:table-cell table:style-name="Table1.A1" office:value-type="string">
            <text:p text:style-name="Table_20_Contents">Kamchatka Peninsula</text:p>
          </table:table-cell>
          <table:table-cell table:style-name="Table1.A1" office:value-type="string">
            <text:p text:style-name="Table_20_Contents">Pack-Leader Dmitri Yazov</text:p>
          </table:table-cell>
          <table:table-cell table:style-name="Table1.A1" office:value-type="string">
            <text:p text:style-name="Table_20_Contents">~4 Sabbat</text:p>
          </table:table-cell>
          <table:table-cell table:style-name="Table1.A1" office:value-type="string">
            <text:p text:style-name="Table_20_Contents">Volcanic-bushland territorial, pre-Bering-Strait positioning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Yuzhno-Sakhalinsk</text:span></text:p>
          </table:table-cell>
          <table:table-cell table:style-name="Table1.A1" office:value-type="string">
            <text:p text:style-name="Table_20_Contents">Sakhalin Island</text:p>
          </table:table-cell>
          <table:table-cell table:style-name="Table1.A1" office:value-type="string">
            <text:p text:style-name="Table_20_Contents">(smaller node)</text:p>
          </table:table-cell>
          <table:table-cell table:style-name="Table1.A1" office:value-type="string">
            <text:p text:style-name="Table_20_Contents">~3 Sabbat</text:p>
          </table:table-cell>
          <table:table-cell table:style-name="Table1.A1" office:value-type="string">
            <text:p text:style-name="Table_20_Contents">Sakhalin coast institutional positio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lagoveshchensk</text:span></text:p>
          </table:table-cell>
          <table:table-cell table:style-name="Table1.A1" office:value-type="string">
            <text:p text:style-name="Table_20_Contents">Russian-Chinese border</text:p>
          </table:table-cell>
          <table:table-cell table:style-name="Table1.A1" office:value-type="string">
            <text:p text:style-name="Table_20_Contents">(smaller node)</text:p>
          </table:table-cell>
          <table:table-cell table:style-name="Table1.A1" office:value-type="string">
            <text:p text:style-name="Table_20_Contents">~2 Sabbat</text:p>
          </table:table-cell>
          <table:table-cell table:style-name="Table1.A1" office:value-type="string">
            <text:p text:style-name="Table_20_Contents">Russian-Chinese border positio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nadyr</text:span></text:p>
          </table:table-cell>
          <table:table-cell table:style-name="Table1.A1" office:value-type="string">
            <text:p text:style-name="Table_20_Contents">Chukotka northeast</text:p>
          </table:table-cell>
          <table:table-cell table:style-name="Table1.A1" office:value-type="string">
            <text:p text:style-name="Table_20_Contents">(single figure)</text:p>
          </table:table-cell>
          <table:table-cell table:style-name="Table1.A1" office:value-type="string">
            <text:p text:style-name="Table_20_Contents">1 Sabbat</text:p>
          </table:table-cell>
          <table:table-cell table:style-name="Table1.A1" office:value-type="string">
            <text:p text:style-name="Table_20_Contents">Pre-Bering-Strait connectio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nchorage</text:span></text:p>
          </table:table-cell>
          <table:table-cell table:style-name="Table1.A1" office:value-type="string">
            <text:p text:style-name="Table_20_Contents">Alaska, USA</text:p>
          </table:table-cell>
          <table:table-cell table:style-name="Table1.A1" office:value-type="string">
            <text:p text:style-name="Table_20_Contents">Pack-Leader Maria Volkov-Petrov</text:p>
          </table:table-cell>
          <table:table-cell table:style-name="Table1.A1" office:value-type="string">
            <text:p text:style-name="Table_20_Contents">~4 Sabbat</text:p>
          </table:table-cell>
          <table:table-cell table:style-name="Table1.A1" office:value-type="string">
            <text:p text:style-name="Table_20_Contents">Cross-Bering-Strait correspondence coordination</text:p>
          </table:table-cell>
        </table:table-row>
      </table:table>
      <text:p text:style-name="Text_20_body"><text:span text:style-name="Strong_20_Emphasis">Continental Russian remnants beyond the Far East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Table_20_Heading">Node</text:p>
            </table:table-cell>
            <table:table-cell table:style-name="Table2.A1" office:value-type="string">
              <text:p text:style-name="Table_20_Heading">Region</text:p>
            </table:table-cell>
            <table:table-cell table:style-name="Table2.A1" office:value-type="string">
              <text:p text:style-name="Table_20_Heading">Authority</text:p>
            </table:table-cell>
            <table:table-cell table:style-name="Table2.A1" office:value-type="string">
              <text:p text:style-name="Table_20_Heading">Population</text:p>
            </table:table-cell>
            <table:table-cell table:style-name="Table2.A1" office:value-type="string">
              <text:p text:style-name="Table_20_Heading">Notes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Moscow</text:span></text:p>
          </table:table-cell>
          <table:table-cell table:style-name="Table2.A1" office:value-type="string">
            <text:p text:style-name="Table_20_Contents">European Russia</text:p>
          </table:table-cell>
          <table:table-cell table:style-name="Table2.A1" office:value-type="string">
            <text:p text:style-name="Table_20_Contents">Pack-Leader Vasily Strelnikov</text:p>
          </table:table-cell>
          <table:table-cell table:style-name="Table2.A1" office:value-type="string">
            <text:p text:style-name="Table_20_Contents">~3 Sabbat</text:p>
          </table:table-cell>
          <table:table-cell table:style-name="Table2.A1" office:value-type="string">
            <text:p text:style-name="Table_20_Contents">Capital-region under elevated FSB pressur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Saint Petersburg</text:span></text:p>
          </table:table-cell>
          <table:table-cell table:style-name="Table2.A1" office:value-type="string">
            <text:p text:style-name="Table_20_Contents">European Russia</text:p>
          </table:table-cell>
          <table:table-cell table:style-name="Table2.A1" office:value-type="string">
            <text:p text:style-name="Table_20_Contents">Pack-Leader Ekaterina Lebedeva</text:p>
          </table:table-cell>
          <table:table-cell table:style-name="Table2.A1" office:value-type="string">
            <text:p text:style-name="Table_20_Contents">~2 Sabbat</text:p>
          </table:table-cell>
          <table:table-cell table:style-name="Table2.A1" office:value-type="string">
            <text:p text:style-name="Table_20_Contents">Imperial-period institutional inheritanc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Yekaterinburg</text:span></text:p>
          </table:table-cell>
          <table:table-cell table:style-name="Table2.A1" office:value-type="string">
            <text:p text:style-name="Table_20_Contents">Ural Mountains</text:p>
          </table:table-cell>
          <table:table-cell table:style-name="Table2.A1" office:value-type="string">
            <text:p text:style-name="Table_20_Contents">Pack-Leader Boris Pavlov</text:p>
          </table:table-cell>
          <table:table-cell table:style-name="Table2.A1" office:value-type="string">
            <text:p text:style-name="Table_20_Contents">~2 Sabbat</text:p>
          </table:table-cell>
          <table:table-cell table:style-name="Table2.A1" office:value-type="string">
            <text:p text:style-name="Table_20_Contents">Geographic European-Far-East connector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Novosibirsk</text:span></text:p>
          </table:table-cell>
          <table:table-cell table:style-name="Table2.A1" office:value-type="string">
            <text:p text:style-name="Table_20_Contents">Siberian central</text:p>
          </table:table-cell>
          <table:table-cell table:style-name="Table2.A1" office:value-type="string">
            <text:p text:style-name="Table_20_Contents">Pack-Leader Tatyana Voloshina</text:p>
          </table:table-cell>
          <table:table-cell table:style-name="Table2.A1" office:value-type="string">
            <text:p text:style-name="Table_20_Contents">~2 Sabbat</text:p>
          </table:table-cell>
          <table:table-cell table:style-name="Table2.A1" office:value-type="string">
            <text:p text:style-name="Table_20_Contents">Siberian central remnant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Irkutsk</text:span></text:p>
          </table:table-cell>
          <table:table-cell table:style-name="Table2.A1" office:value-type="string">
            <text:p text:style-name="Table_20_Contents">Eastern Siberia</text:p>
          </table:table-cell>
          <table:table-cell table:style-name="Table2.A1" office:value-type="string">
            <text:p text:style-name="Table_20_Contents">Pack-Leader Konstantin Tarasov</text:p>
          </table:table-cell>
          <table:table-cell table:style-name="Table2.A1" office:value-type="string">
            <text:p text:style-name="Table_20_Contents">1 Sabbat</text:p>
          </table:table-cell>
          <table:table-cell table:style-name="Table2.A1" office:value-type="string">
            <text:p text:style-name="Table_20_Contents">Easternmost continental remnant</text:p>
          </table:table-cell>
        </table:table-row>
      </table:table>
      <text:p text:style-name="Text_20_body"><text:span text:style-name="Strong_20_Emphasis">Total Russian Far East network plus continental Russian remnants:</text:span> ~45 Sabbat operatives across 13 institutional positions, organised under Cardinal Magdalena's continental authority.</text:p>
      <text:h text:style-name="Heading_20_3" text:outline-level="3"><text:span text:style-name="Strong_20_Emphasis">The cross-Pacific Sabbat-refusenik global picture (completed):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Continental Authority</text:p>
            </table:table-cell>
            <table:table-cell table:style-name="Table3.A1" office:value-type="string">
              <text:p text:style-name="Table_20_Heading">Network</text:p>
            </table:table-cell>
            <table:table-cell table:style-name="Table3.A1" office:value-type="string">
              <text:p text:style-name="Table_20_Heading">Population</text:p>
            </table:table-cell>
            <table:table-cell table:style-name="Table3.A1" office:value-type="string">
              <text:p text:style-name="Table_20_Heading">Cardinal generation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Cardinal Reyna Quiñones</text:span></text:p>
          </table:table-cell>
          <table:table-cell table:style-name="Table3.A1" office:value-type="string">
            <text:p text:style-name="Table_20_Contents">Pacific Northwest corridor (San Francisco-Portland-Seattle-Vancouver)</text:p>
          </table:table-cell>
          <table:table-cell table:style-name="Table3.A1" office:value-type="string">
            <text:p text:style-name="Table_20_Contents">~40 Sabbat</text:p>
          </table:table-cell>
          <table:table-cell table:style-name="Table3.A1" office:value-type="string">
            <text:p text:style-name="Table_20_Contents">Lasombra antitribu, 7th gen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Cardinal Magdalena Volkov</text:span> (this supplement)</text:p>
          </table:table-cell>
          <table:table-cell table:style-name="Table3.A1" office:value-type="string">
            <text:p text:style-name="Table_20_Contents">Russian Far East corridor + continental Russian remnants</text:p>
          </table:table-cell>
          <table:table-cell table:style-name="Table3.A1" office:value-type="string">
            <text:p text:style-name="Table_20_Contents">~45 Sabbat</text:p>
          </table:table-cell>
          <table:table-cell table:style-name="Table3.A1" office:value-type="string">
            <text:p text:style-name="Table_20_Contents">Tzimisce, 7th gen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Templar </text:span><text:soft-page-break/><text:span text:style-name="Strong_20_Emphasis">Abernathy</text:span> (under Bishop Callista)</text:p>
          </table:table-cell>
          <table:table-cell table:style-name="Table3.A1" office:value-type="string">
            <text:p text:style-name="Table_20_Contents">Brisbane Australian connection</text:p>
          </table:table-cell>
          <table:table-cell table:style-name="Table3.A1" office:value-type="string">
            <text:p text:style-name="Table_20_Contents">(within ~40 <text:soft-page-break/>Brisbane Sabbat)</text:p>
          </table:table-cell>
          <table:table-cell table:style-name="Table3.A1" office:value-type="string">
            <text:p text:style-name="Table_20_Contents">Lasombra <text:soft-page-break/>antitribu, 9th gen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Smaller Pacific Rim nodes</text:span></text:p>
          </table:table-cell>
          <table:table-cell table:style-name="Table3.A1" office:value-type="string">
            <text:p text:style-name="Table_20_Contents">Honolulu, Manila, Singapore, Auckland, plus smaller positions</text:p>
          </table:table-cell>
          <table:table-cell table:style-name="Table3.A1" office:value-type="string">
            <text:p text:style-name="Table_20_Contents">~135 Sabbat</text:p>
          </table:table-cell>
          <table:table-cell table:style-name="Table3.A1" office:value-type="string">
            <text:p text:style-name="Table_20_Contents">Various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Global cross-Pacific total</text:span>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Table_20_Contents"><text:span text:style-name="Strong_20_Emphasis">~260 Sabbat</text:span></text:p>
          </table:table-cell>
          <table:table-cell table:style-name="Table3.A1" office:value-type="string">
            <text:p text:style-name="Table_20_Contents">Including ~25 Lasombra antitribu refuseniks</text:p>
          </table:table-cell>
        </table:table-row>
      </table:table>
      <text:h text:style-name="Heading_20_3" text:outline-level="3"><text:span text:style-name="Strong_20_Emphasis">The two cross-Cardinal correspondence channels currently operational: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Table_20_Heading">Channel</text:p>
            </table:table-cell>
            <table:table-cell table:style-name="Table4.A1" office:value-type="string">
              <text:p text:style-name="Table_20_Heading">Coordination</text:p>
            </table:table-cell>
            <table:table-cell table:style-name="Table4.A1" office:value-type="string">
              <text:p text:style-name="Table_20_Heading">Frequency</text:p>
            </table:table-cell>
            <table:table-cell table:style-name="Table4.A1" office:value-type="string">
              <text:p text:style-name="Table_20_Heading">Notes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trong_20_Emphasis">Cross-Bering-Strait</text:span></text:p>
          </table:table-cell>
          <table:table-cell table:style-name="Table4.A1" office:value-type="string">
            <text:p text:style-name="Table_20_Contents">Cardinal Magdalena ↔ Cardinal Reyna via Pack-Leader Volkov-Petrov</text:p>
          </table:table-cell>
          <table:table-cell table:style-name="Table4.A1" office:value-type="string">
            <text:p text:style-name="Table_20_Contents">Quarterly correspondence + 3 formal meetings since 2014</text:p>
          </table:table-cell>
          <table:table-cell table:style-name="Table4.A1" office:value-type="string">
            <text:p text:style-name="Table_20_Contents">Only direct cross-Cardinal channel currently operational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Cross-Atlantic-Pacific</text:span></text:p>
          </table:table-cell>
          <table:table-cell table:style-name="Table4.A1" office:value-type="string">
            <text:p text:style-name="Table_20_Contents">Cardinal Reyna ↔ Cardinal Tillinghurst via San Francisco-Lima shipping</text:p>
          </table:table-cell>
          <table:table-cell table:style-name="Table4.A1" office:value-type="string">
            <text:p text:style-name="Table_20_Contents">Less frequent coordination</text:p>
          </table:table-cell>
          <table:table-cell table:style-name="Table4.A1" office:value-type="string">
            <text:p text:style-name="Table_20_Contents">Cardinal Tillinghurst's South American highlands network</text:p>
          </table:table-cell>
        </table:table-row>
      </table:table>
      <text:h text:style-name="Heading_20_3" text:outline-level="3"><text:span text:style-name="Strong_20_Emphasis">Cross-Pacific cultural-political register variations: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Network</text:p>
            </table:table-cell>
            <table:table-cell table:style-name="Table5.A1" office:value-type="string">
              <text:p text:style-name="Table_20_Heading">Distinctive Register</text:p>
            </table:table-cell>
            <table:table-cell table:style-name="Table5.A1" office:value-type="string">
              <text:p text:style-name="Table_20_Heading">Theological-Political Foundation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trong_20_Emphasis">Cardinal Reyna's Pacific Northwest</text:span></text:p>
          </table:table-cell>
          <table:table-cell table:style-name="Table5.A1" office:value-type="string">
            <text:p text:style-name="Table_20_Contents">Spanish-colonial-derived institutional infrastructure, Lasombra-refusenik framework</text:p>
          </table:table-cell>
          <table:table-cell table:style-name="Table5.A1" office:value-type="string">
            <text:p text:style-name="Table_20_Contents">Continuing post-2020 Lasombra defection refusal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Cardinal Magdalena's Russian Far East</text:span></text:p>
          </table:table-cell>
          <table:table-cell table:style-name="Table5.A1" office:value-type="string">
            <text:p text:style-name="Table_20_Contents">Soviet-era institutional inheritance, Tzimisce-tradition framework</text:p>
          </table:table-cell>
          <table:table-cell table:style-name="Table5.A1" office:value-type="string">
            <text:p text:style-name="Table_20_Contents">Continuing pre-1999 Tzimisce ecclesiastical tradition with Russian-Orthodox-cultural integration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Templar Abernathy's Brisbane connection</text:span></text:p>
          </table:table-cell>
          <table:table-cell table:style-name="Table5.A1" office:value-type="string">
            <text:p text:style-name="Table_20_Contents">Australian continental institutional positioning, Lasombra-refusenik framework</text:p>
          </table:table-cell>
          <table:table-cell table:style-name="Table5.A1" office:value-type="string">
            <text:p text:style-name="Table_20_Contents">Cross-Pacific institutional support for Bishop Callista's Brisbane Sabbat-survivor operations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The Russian Far East refusenik supplement enables chronicle textures distinct from Cardinal Reyna's Pacific Northwest corridor and from broader cross-Pacific refusenik chronicle work:</text:p>
      <text:h text:style-name="Heading_20_3" text:outline-level="3"><text:span text:style-name="Strong_20_Emphasis">Soviet-era institutional inheritance as continuing operational infrastructure</text:span></text:h>
      <text:p text:style-name="Text_20_body">Russian Far East chronicle scenes operate with continuing Soviet-era institutional inheritance as continuing operational reality rather than as historical context. Cardinal Magdalena's network continues to operate Soviet-era ghouled-mortal-network protocols (NKVD/KGB-derived institutional cooperation that the Russian Federation has continued to recognise through continuing ghouled-mortal-network institutional positioning), Soviet-era operational adaptation patterns, and Soviet-era cross-continental Sabbat institutional connectivity. The texture: Russian Far East chronicle scenes carry Soviet-era institutional weight that other cross-Pacific refusenik network operations do not match — Cardinal Magdalena's continuing Soviet-era institutional protocols are not historical legacy but current operational infrastructure, and the operational character produces register that distinguishes Russian Far East chronicle work from other Pacific Sabbat-refusenik chronicle registers.</text:p>
      <text:h text:style-name="Heading_20_3" text:outline-level="3"><text:span text:style-name="Strong_20_Emphasis">The Tzimisce-tradition theological-political register</text:span></text:h>
      <text:p text:style-name="Text_20_body">Russian Far East chronicle scenes engaging Cardinal Magdalena's institutional positioning operate under specifically Tzimisce-tradition theological-political register distinct from Cardinal Reyna's Lasombra-refusenik framework. Tzimisce-clan-specific theological-political commitments include: flesh-shaping as continuing doctrinal practice (rather than as ornamental clan-specialty status that the 1999 reformation produced); Tzimisce-clan-specific ecclesiastical hierarchy patterns; Tzimisce-tradition aesthetic preservation through senior-figure flesh-shaping aesthetic transmission. The texture: Russian Far East chronicle scenes carry Tzimisce-clan-specific institutional weight that Lasombra-refusenik chronicle scenes do not match — the Tzimisce-tradition framework is theological-political infrastructure rather than clan-aesthetic preference, and continuing flesh-shaping doctrinal practice operates as central chronicle texture rather than as occasional Tzimisce-disciplinary deployment.</text:p>
      <text:h text:style-name="Heading_20_3" text:outline-level="3"><text:span text:style-name="Strong_20_Emphasis">Russian-Orthodox-cultural integration as ambient register</text:span></text:h>
      <text:p text:style-name="Text_20_body">Russian Far East chronicle scenes operate with continuing Russian-Orthodox-cultural integration as ambient register through specific cultural infrastructure: Russian Orthodox iconographic preservation in Sabbat institutional spaces (Cardinal Magdalena's Pushkinskaya Street residence includes preserved pre-Soviet Russian Orthodox iconographic art that has been continuously maintained through Soviet political environment by Cardinal Magdalena's specific institutional protection), Russian-Orthodox-influenced ecclesiastical aesthetic practice, and Russian-Orthodox-Tzimisce theological-political synthesis that Cardinal Magdalena has refined across her four-century tenure. The texture: Russian Far East chronicle scenes carry Russian-Orthodox-cultural register through specific cultural inflections — pre-Soviet boyar-period dress styling, Russian-Orthodox iconographic personal jewelry on senior figures, specific Russian Orthodox liturgical references in Sabbat ecclesiastical practice, and continuing Russian-Orthodox-cultural integration that produces register distinct from non-Russian Sabbat institutional positions.</text:p>
      <text:h text:style-name="Heading_20_3" text:outline-level="3"><text:soft-page-break/><text:span text:style-name="Strong_20_Emphasis">Russian Federation political environment as operational context</text:span></text:h>
      <text:p text:style-name="Text_20_body">Russian Far East chronicle scenes operate within continuing Russian Federation political environment context distinct from Pacific Northwest American or Australian political contexts. The Russian Federation political environment includes: continuing FSB-equivalent intelligence pressure operating through different operational infrastructure than AFP-Five-Eyes-equivalent democratic-political-cooperation infrastructure; post-2022 continuing operational environment that produces specific operational pressure patterns; continental Russian Federation continuing post-Soviet institutional context. The texture: Russian Far East chronicle scenes operate under continuing Russian Federation political environment register that produces specific operational adaptation patterns — chronicle scenes engage continuing FSB-equivalent intelligence pressure through ghouled-mortal-network FSB institutional positioning, continuing post-2022 continental institutional adaptation, and continuing Russian Federation continental political-environment context that distinguishes Russian Far East chronicle work from other Pacific Rim chronicle registers.</text:p>
      <text:h text:style-name="Heading_20_3" text:outline-level="3"><text:span text:style-name="Strong_20_Emphasis">Cross-Bering-Strait institutional connectivity as chronicle infrastructure</text:span></text:h>
      <text:p text:style-name="Text_20_body">Russian Far East chronicle scenes operate with continuing cross-Bering-Strait institutional connectivity as chronicle infrastructure rather than as occasional plot element. The cross-Cardinal correspondence channel through Pack-Leader Volkov-Petrov's Anchorage coordination produces continuing institutional rhythm that other Russian-continental Sabbat-loyalist institutional positions do not match. The texture: Russian Far East chronicle scenes engage continuing cross-Bering-Strait institutional connectivity through specific operational infrastructure — quarterly cross-Cardinal correspondence delivery through Pack-Leader Volkov-Petrov's Anchorage coordination, occasional formal cross-Cardinal coordination meetings, and chronicle-significant cross-Bering-Strait institutional preservation work that connects Russian Far East operations to continental Pacific Sabbat-refusenik global network.</text:p>
      <text:h text:style-name="Heading_20_3" text:outline-level="3"><text:span text:style-name="Strong_20_Emphasis">The Tzimisce-tradition flesh-shaping continuing doctrinal practice</text:span></text:h>
      <text:p text:style-name="Text_20_body">Russian Far East chronicle scenes engage Tzimisce-tradition flesh-shaping as continuing doctrinal practice with specific theological-political weight. Cardinal Magdalena's network continues flesh-shaping ritual conduct, continuing doctrinal-aesthetic preservation through senior Tzimisce flesh-shaping aesthetic transmission, and chronicle-significant flesh-shaping operations under Cardinal Magdalena's direct supervision. The texture: Russian Far East chronicle scenes engage flesh-shaping with theological-political weight that other chronicle modes do not produce — flesh-shaping is doctrinal-religious practice rather than exotic-clan-specific ability, senior Tzimisce flesh-shaping aesthetic transmission produces continuing institutional infrastructure, and chronicle-significant flesh-shaping operations carry Tzimisce-tradition institutional weight comparable to Lasombra Obtenebration practice in Cardinal Reyna's network or Vaulderie practice in Brisbane Sabbat operation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The lorebook entry 12 provides six chronicle hook categories. This section expands the most chronicle-distinctive hooks into detailed chronicle-design infrastructure:</text:p>
      <text:h text:style-name="Heading_20_3" text:outline-level="3"><text:span text:style-name="Strong_20_Emphasis">Hook 1: The Tzimisce-Tradition Apprentice</text:span></text:h>
      <text:p text:style-name="Text_20_body">{{user}} is a junior Tzimisce-clan operative being prepared for continental Russian Far East institutional position through Cardinal Magdalena's Tzimisce-tradition apprenticeship program. The chronicle tracks {{user}}'s development of Tzimisce-tradition ecclesiastical practice across multi-year arc.</text:p>
      <text:p text:style-name="Text_20_body"><text:span text:style-name="Strong_20_Emphasis">Chronicle phase 1 — Tzimisce-tradition theological-political formation (4-5 sessions):</text:span> Cultivation by Cardinal Magdalena directly or through Bishop Krasnova's Vladivostok institutional management with deep engagement of: Tzimisce-clan-specific ecclesiastical hierarchy patterns; pre-1999 Tzimisce ecclesiastical tradition; Russian-Orthodox-cultural integration; continuing Soviet-era institutional inheritance.</text:p>
      <text:p text:style-name="Text_20_body"><text:span text:style-name="Strong_20_Emphasis">Chronicle phase 2 — Flesh-shaping doctrinal practice development (5-7 sessions):</text:span> {{user}} develops continuing flesh-shaping doctrinal practice through Cardinal Magdalena's senior aesthetic transmission with specific operational positioning including: continuing Tzimisce-clan-specific institutional service; specific flesh-shaping ritual conduct; continuing doctrinal-aesthetic preservation operations.</text:p>
      <text:p text:style-name="Text_20_body"><text:span text:style-name="Strong_20_Emphasis">Chronicle phase 3 — Continental Russian Far East institutional positioning (3-5 sessions):</text:span> Chronicle late-arc engagement with formal Russian Far East institutional positioning including potential Pack-Leader succession at one of the smaller nodes (Yuzhno-Sakhalinsk, Blagoveshchensk, Anadyr) or potential continuing senior operative positioning at one of the primary nodes.</text:p>
      <text:p text:style-name="Text_20_body"><text:span text:style-name="Strong_20_Emphasis">Stakes:</text:span> Personal continental Russian Far East institutional position. Successful arc produces continental Tzimisce-clan-specific institutional position with continuing Russian Far East refusenik network weight; failed arc produces continuing junior Tzimisce-clan operative position with reduced continental Russian Far East institutional prospects.</text:p>
      <text:h text:style-name="Heading_20_3" text:outline-level="3"><text:span text:style-name="Strong_20_Emphasis">Hook 2: The Cross-Bering-Strait Correspondence Operative</text:span></text:h>
      <text:p text:style-name="Text_20_body">{{user}} is Pack-Leader Volkov-Petrov's senior assistant or independent cross-Cardinal correspondence coordination specialist operating Anchorage cross-Bering-Strait infrastructure. The chronicle tracks {{user}}'s development of continental cross-Cardinal institutional connectivity.</text:p>
      <text:p text:style-name="Text_20_body"><text:span text:style-name="Strong_20_Emphasis">Chronicle phase 1 — Cross-Bering-Strait infrastructure apprenticeship (3-4 sessions):</text:span> Initial training in cross-Cardinal correspondence coordination including: Russian-continental shipping connections through Anchorage Pacific connectivity; cross-Pacific intelligence-coordination support patterns; specific Pack-Leader Volkov-Petrov family-cousinage register operations.</text:p>
      <text:p text:style-name="Text_20_body"><text:span text:style-name="Strong_20_Emphasis">Chronicle phase 2 — Continental cross-Cardinal institutional connectivity development (5-7 sessions):</text:span> {{user}} takes increasing cross-Cardinal correspondence responsibilities including formal correspondence with both Cardinal Magdalena's Russian Far East network and Cardinal Reyna's Pacific Northwest corridor, occasional cross-Cardinal coordination meeting attendance, specialised cross-Cardinal institutional knowledge accumulation.</text:p>
      <text:p text:style-name="Text_20_body"><text:span text:style-name="Strong_20_Emphasis">Chronicle phase 3 — Cross-Pacific Sabbat-refusenik global infrastructure positioning (3-5 </text:span><text:soft-page-break/><text:span text:style-name="Strong_20_Emphasis">sessions):</text:span> {{user}} achieves operational position with continental cross-Pacific institutional weight; chronicle scenes engage potential continental cross-Pacific institutional positioning, possible chronicle-defining cross-Cardinal coordination operations, and continental cross-Pacific Sabbat-refusenik global infrastructure decisions that {{user}}'s correspondence position influences.</text:p>
      <text:p text:style-name="Text_20_body"><text:span text:style-name="Strong_20_Emphasis">Stakes:</text:span> Continental cross-Pacific Sabbat-refusenik global institutional position. {{user}}'s cross-Bering-Strait coordination role determines continental cross-Cardinal institutional connectivity outcomes for the subsequent decade.</text:p>
      <text:h text:style-name="Heading_20_3" text:outline-level="3"><text:span text:style-name="Strong_20_Emphasis">Hook 3: The Cardinal-Cardinal Correspondence Operative</text:span></text:h>
      <text:p text:style-name="Text_20_body">{{user}} is a continental cross-Cardinal correspondence coordination specialist engaged with both cross-Bering-Strait Cardinal Magdalena-Cardinal Reyna channel and (potentially) cross-Atlantic-Pacific Cardinal Reyna-Cardinal Tillinghurst channel. The chronicle tracks continental cross-Cardinal institutional positioning at global Sabbat-refusenik scale.</text:p>
      <text:p text:style-name="Text_20_body"><text:span text:style-name="Strong_20_Emphasis">Chronicle phase 1 — Continental cross-Cardinal institutional cultivation (4-5 sessions):</text:span> {{user}} achieves senior cross-Cardinal correspondence coordination position requiring continuing institutional cultivation by senior figures across the cross-Pacific Sabbat-refusenik network with deep engagement of continental cross-Cardinal institutional dynamics.</text:p>
      <text:p text:style-name="Text_20_body"><text:span text:style-name="Strong_20_Emphasis">Chronicle phase 2 — Cross-Cardinal coordination intensification (5-7 sessions):</text:span> Chronicle scenes engage continental cross-Cardinal correspondence intensification across 2025-2026 around 2026 Brisbane operation cross-Pacific coordination; cross-Cardinal coordination meeting attendance; potential coordination with cross-Atlantic-Pacific Cardinal Tillinghurst correspondence channel.</text:p>
      <text:p text:style-name="Text_20_body"><text:span text:style-name="Strong_20_Emphasis">Chronicle phase 3 — Global Sabbat-refusenik institutional positioning (3-5 sessions):</text:span> Chronicle late-arc engagement with chronicle-defining global Sabbat-refusenik institutional decisions about continuing preservation strategy at global scale; potential chronicle outcomes including: continued global Sabbat-refusenik institutional preservation strategy; global institutional infrastructure restructuring; chronicle-defining cross-Cardinal institutional positioning if Cardinal Magdalena or Cardinal Reyna reaches Final Death and global Sabbat-refusenik institutional reorganisation becomes acute.</text:p>
      <text:p text:style-name="Text_20_body"><text:span text:style-name="Strong_20_Emphasis">Stakes:</text:span> Global Sabbat-refusenik institutional infrastructure. {{user}}'s continental cross-Cardinal correspondence coordination determines global Sabbat-refusenik institutional infrastructure outcomes that reshape continental cross-Pacific Sabbat-loyalist institutional positioning for subsequent decades.</text:p>
      <text:h text:style-name="Heading_20_3" text:outline-level="3"><text:span text:style-name="Strong_20_Emphasis">Hook 4: The Cardinal Magdalena Beckoning Crisis</text:span></text:h>
      <text:p text:style-name="Text_20_body">{{user}} is a senior Russian Far East refusenik operative engaged with Cardinal Magdalena's chronicle-active Beckoning trajectory crisis. The chronicle tracks senior-figure Beckoning resistance operations and continental Russian Far East institutional preservation coordination.</text:p>
      <text:p text:style-name="Text_20_body"><text:span text:style-name="Strong_20_Emphasis">Chronicle phase 1 — Trajectory engagement (3-4 sessions):</text:span> {{user}} achieves senior operational position with Cardinal Magdalena Beckoning trajectory awareness; chronicle scenes engage trajectory acceleration patterns, institutional concealment operations protecting Cardinal Magdalena trajectory information, continental Russian Far East institutional positioning around <text:soft-page-break/>continuing trajectory pressure.</text:p>
      <text:p text:style-name="Text_20_body"><text:span text:style-name="Strong_20_Emphasis">Chronicle phase 2 — Crisis intensification (4-5 sessions):</text:span> Cardinal Magdalena Beckoning trajectory reaches acute pressure; chronicle scenes engage continental Russian Far East institutional preservation coordination during continental cross-Pacific senior-figure operational uncertainty; succession question development including Bishop Vorontsov candidate evaluation, Pack-Leader Volkov-Petrov candidate evaluation, other senior Russian Far East figures candidate evaluations; possible chronicle-defining institutional positioning if Cardinal Magdalena Beckoning succumbence becomes acute.</text:p>
      <text:p text:style-name="Text_20_body"><text:span text:style-name="Strong_20_Emphasis">Chronicle phase 3 — Resolution or succumbence (3-4 sessions):</text:span> Chronicle-defining resolution including potential Cardinal Magdalena trajectory stabilisation, potential Cardinal Magdalena Final Death through Beckoning succumbence with continental Russian Far East institutional reorganisation, or chronicle late-arc continental cross-Pacific Sabbat-refusenik institutional succession crisis affecting cross-Bering-Strait correspondence channel and broader global Sabbat-refusenik institutional infrastructure.</text:p>
      <text:p text:style-name="Text_20_body"><text:span text:style-name="Strong_20_Emphasis">Stakes:</text:span> Continental Russian Far East senior-figure institutional continuity and continental cross-Pacific Sabbat-refusenik global institutional infrastructure. {{user}}'s role determines continental Russian Far East and broader cross-Pacific institutional outcomes through the trajectory crisis.</text:p>
      <text:p text:style-name="P1"><text:span text:style-name="Strong_20_Emphasis">The Russian Far East Refusenik Supplement is complete.</text:span> A 14-entry lorebook covering Cardinal Magdalena Volkov's full character build (Tzimisce, 7th gen, 402 years Embraced, pre-Romanov Muscovite-Russian boyar-class background, continuing Russian-Orthodox-cultural integration, methuselah-tier disciplines including Vicissitude 7), the Russian Far East operational corridor (Vladivostok-Khabarovsk-Magadan-Petropavlovsk-Kamchatsky with approximately 35 Sabbat operatives), the cross-Bering-Strait correspondence channel through Pack-Leader Maria Volkov-Petrov's Anchorage coordination (the only direct cross-Cardinal correspondence channel currently operational globally), the Soviet-era institutional inheritance (continuing NKVD/KGB-derived ghouled-mortal-network protocols, Soviet-era operational adaptation, post-Soviet adaptation since 1991), the Tzimisce-tradition refusenik theological-political register (distinct from Cardinal Reyna's Lasombra-refusenik framework, with flesh-shaping as continuing doctrinal practice and Russian-Orthodox-cultural integration), Russian Federation continental intelligence pressure (FSB-equivalent operations through different operational infrastructure than AFP-Five-Eyes-equivalent Pacific cooperation), the continental Russian Sabbat-loyalist remnants beyond the Far East (Moscow, Saint Petersburg, Yekaterinburg, Novosibirsk, Irkutsk — approximately 10 additional Sabbat through Bishop Vorontsov's Khabarovsk channel), Pack-Leader Volkov-Petrov's full character build, the cross-Pacific Sabbat-refusenik global picture completion (three Cardinals globally, two cross-Cardinal correspondence channels, approximately 305 Sabbat globally), and Cardinal Magdalena's Beckoning trajectory chronicle-active dynamic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13T19:16:30.337933043</dc:date>
    <meta:editing-duration>PT3M45S</meta:editing-duration>
    <meta:editing-cycles>1</meta:editing-cycles>
    <meta:document-statistic meta:table-count="5" meta:image-count="0" meta:object-count="0" meta:page-count="9" meta:paragraph-count="177" meta:word-count="2438" meta:character-count="23637" meta:non-whitespace-character-count="21350"/>
    <meta:generator>LibreOffice/24.2.7.2$Linux_X86_64 LibreOffice_project/420$Build-2</meta:generator>
  </office:meta>
</office:document-meta>
</file>