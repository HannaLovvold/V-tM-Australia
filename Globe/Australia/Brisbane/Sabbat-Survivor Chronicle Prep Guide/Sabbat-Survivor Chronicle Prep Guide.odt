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19"/>
    <style:style style:name="P41" style:family="paragraph" style:parent-style-name="Text_20_body" style:list-style-name="L19">
      <style:paragraph-properties fo:margin-top="0cm" fo:margin-bottom="0cm" style:contextual-spacing="false"/>
    </style:style>
    <style:style style:name="P42" style:family="paragraph" style:parent-style-name="Text_20_body" style:list-style-name="L20"/>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1"/>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2"/>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3"/>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4"/>
    <style:style style:name="P51" style:family="paragraph" style:parent-style-name="Text_20_body" style:list-style-name="L24">
      <style:paragraph-properties fo:margin-top="0cm" fo:margin-bottom="0cm" style:contextual-spacing="false"/>
    </style:style>
    <style:style style:name="P52" style:family="paragraph" style:parent-style-name="Text_20_body" style:list-style-name="L25"/>
    <style:style style:name="P53" style:family="paragraph" style:parent-style-name="Text_20_body" style:list-style-name="L25">
      <style:paragraph-properties fo:margin-top="0cm" fo:margin-bottom="0cm" style:contextual-spacing="false"/>
    </style:style>
    <style:style style:name="P54" style:family="paragraph" style:parent-style-name="Text_20_body" style:list-style-name="L26"/>
    <style:style style:name="P55" style:family="paragraph" style:parent-style-name="Text_20_body" style:list-style-name="L26">
      <style:paragraph-properties fo:margin-top="0cm" fo:margin-bottom="0cm" style:contextual-spacing="false"/>
    </style:style>
    <style:style style:name="P56" style:family="paragraph" style:parent-style-name="Text_20_body" style:list-style-name="L27"/>
    <style:style style:name="P57" style:family="paragraph" style:parent-style-name="Text_20_body" style:list-style-name="L27">
      <style:paragraph-properties fo:margin-top="0cm" fo:margin-bottom="0cm" style:contextual-spacing="false"/>
    </style:style>
    <style:style style:name="P58" style:family="paragraph" style:parent-style-name="Text_20_body" style:list-style-name="L28"/>
    <style:style style:name="P59" style:family="paragraph" style:parent-style-name="Text_20_body" style:list-style-name="L28">
      <style:paragraph-properties fo:margin-top="0cm" fo:margin-bottom="0cm" style:contextual-spacing="false"/>
    </style:style>
    <style:style style:name="P60" style:family="paragraph" style:parent-style-name="Text_20_body" style:list-style-name="L29"/>
    <style:style style:name="P61" style:family="paragraph" style:parent-style-name="Text_20_body" style:list-style-name="L29">
      <style:paragraph-properties fo:margin-top="0cm" fo:margin-bottom="0cm" style:contextual-spacing="false"/>
    </style:style>
    <style:style style:name="P62" style:family="paragraph" style:parent-style-name="Text_20_body" style:list-style-name="L30"/>
    <style:style style:name="P63" style:family="paragraph" style:parent-style-name="Text_20_body" style:list-style-name="L30">
      <style:paragraph-properties fo:margin-top="0cm" fo:margin-bottom="0cm" style:contextual-spacing="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meta-document for designing and running Brisbane-mode V:tM chronicles. Brisbane chronicles are <text:span text:style-name="Emphasis">structurally different</text:span> from Melbourne, Sydney, or Chicago chronicles — they engage doctrinal Sabbat practice as ambient register rather than as antagonist content, deploy Cleaver-feeding as routine operational texture rather than as climactic plot escalation, and pace narrative arcs through <text:span text:style-name="Emphasis">survival accumulation</text:span> rather than through <text:span text:style-name="Emphasis">political navigation</text:span>. This guide provides the framework for handling the distinctive design challenges these characteristics produce.</text:p>
      <text:p text:style-name="Text_20_body"><text:span text:style-name="Strong_20_Emphasis">Design principle:</text:span> Sabbat-survivor chronicles are the kit's most ethically complex chronicle mode. They require the Storyteller / AI to hold competing tonal registers (theological commitment, routine violence, institutional fatigue, personal-character ethical pressure) simultaneously across extended arcs, without collapsing the register into either glorification (Sabbat-as-cool-aesthetic) or moralism (Sabbat-as-monster-of-the-week). The guide is structured to support this register-holding work explicitly.</text:p>
      <text:p text:style-name="P3"><text:span text:style-name="Strong_20_Emphasis">Audience:</text:span> Storytellers, AI prompt designers, and players preparing to run or play in Brisbane-mode chronicles. The guide assumes familiarity with the core kit (<text:span text:style-name="Source_20_Text"><text:span text:style-name="T1">vtm_modern_nights.json</text:span></text:span>, the safety toolkit) and with the Brisbane supplement (<text:span text:style-name="Source_20_Text"><text:span text:style-name="T1">vtm_brisbane_by_night.json</text:span></text:span>).</text:p>
      <text:p text:style-name="Text_20_body">Sabbat-survivor chronicles diverge from other V:tM chronicle modes along five structural axes. Understanding these axes before chronicle design begins prevents the most common Brisbane-chronicle failure modes.</text:p>
      <text:h text:style-name="Heading_20_3" text:outline-level="3"><text:span text:style-name="Strong_20_Emphasis">Axis 1: Survival vs. Navigation</text:span></text:h>
      <text:p text:style-name="Text_20_body"><text:span text:style-name="Strong_20_Emphasis">Other Australian chronicles ask:</text:span> <text:span text:style-name="Emphasis">"How does my character thrive in this domain?"</text:span><text:line-break/><text:span text:style-name="Strong_20_Emphasis">Brisbane chronicles ask:</text:span> <text:span text:style-name="Emphasis">"How does my character not die this night?"</text:span></text:p>
      <text:p text:style-name="Text_20_body">Melbourne, Sydney, and Adelaide chronicles engage <text:span text:style-name="Emphasis">political navigation</text:span> — characters with established institutional positions navigating chronicle-active political dynamics, with Final Death as climactic escalation. Brisbane chronicles engage <text:span text:style-name="Emphasis">survival accumulation</text:span> — characters managing continuing operational danger from multiple simultaneous threats (AFP-Twilight-Project surveillance, Glass Walker northern-septs counter-surveillance, Brisbane Sabbat-internal political pressure, occasional cross-domain Camarilla operative penetration), with Final Death as ambient possibility rather than as climactic escalation.</text:p>
      <text:p text:style-name="Text_20_body">The structural implication: Brisbane chronicle scenes carry constant low-grade threat. Routine activities (West End chantry attendance, Fortitude Valley feeding operations, pack Vaulderie ritual participation) include operational risk that other chronicle modes treat as exceptional. Chronicle pacing accommodates this through accumulated tension rather than through tension-and-release patterns.</text:p>
      <text:p text:style-name="Text_20_body"><text:span text:style-name="Strong_20_Emphasis">Design implication:</text:span> Build chronicle arcs that engage survival as ongoing texture rather than as climactic resolution. The Brisbane question is not "will my character live to the end of this arc" but "how will my character manage the continuing threats that the Brisbane domain produces structurally."</text:p>
      <text:h text:style-name="Heading_20_3" text:outline-level="3"><text:span text:style-name="Strong_20_Emphasis">Axis 2: Doctrinal Practice as Ambient Register</text:span></text:h>
      <text:p text:style-name="Text_20_body"><text:span text:style-name="Strong_20_Emphasis">Other Australian chronicles treat religion as character texture:</text:span> Sister Fatima's Damascene Banu Haqim register, Sister Caterina's Italian-Catholic Hecata practice, Brother Vikas's <text:soft-page-break/>Setite/Ministry tradition. The religious texture is character-specific rather than chronicle-structural.</text:p>
      <text:p text:style-name="Text_20_body"><text:span text:style-name="Strong_20_Emphasis">Brisbane chronicles treat doctrinal Sabbat practice as chronicle-structural infrastructure.</text:span> Vaulderie is monthly and mandatory for pack members. Shovelhead Embraces are quarterly and witnessed. Festivo dello Estinto, Fire Dance, Wild Hunt, and Palla Grande are conducted on liturgical calendar with full Sabbat traditional infrastructure. The doctrinal register is not adornment — it is the operational infrastructure within which all Brisbane chronicle scenes occur.</text:p>
      <text:p text:style-name="Text_20_body">The structural implication: Brisbane chronicle scenes carry theological weight that other chronicle scenes do not. Sabbat ritae are <text:span text:style-name="Emphasis">religious</text:span> in ways that Camarilla formal-court ceremony is not. The doctrinal register produces ambient theological-political pressure that {{user}} characters either accept (Sabbat-loyalist alignment), carefully manage (Sabbat-internal-dissident or cover positions), or experience as alienating (non-Sabbat character operating under Brisbane cover).</text:p>
      <text:p text:style-name="Text_20_body"><text:span text:style-name="Strong_20_Emphasis">Design implication:</text:span> Build chronicle arcs that engage doctrinal practice as ambient operational infrastructure rather than as exotic backdrop. Vaulderie attendance produces character development across sessions; ritae participation shapes pack-binding and Brisbane Sabbat-internal political dynamics; the liturgical calendar structures chronicle pacing in ways that secular chronicle calendars do not.</text:p>
      <text:h text:style-name="Heading_20_3" text:outline-level="3"><text:span text:style-name="Strong_20_Emphasis">Axis 3: Routine Violence as Operational Texture</text:span></text:h>
      <text:p text:style-name="Text_20_body"><text:span text:style-name="Strong_20_Emphasis">Other Australian chronicles treat violence as climactic plot escalation:</text:span> combat scenes are exceptional, mortal Final Deaths are chronicle-significant events, Cleaver-feeding is moral-frame violation that produces chronicle consequences.</text:p>
      <text:p text:style-name="Text_20_body"><text:span text:style-name="Strong_20_Emphasis">Brisbane chronicles treat violence as routine operational texture.</text:span> Brisbane Sabbat permits Cleaver-style feeding within institutional protocols (weekend Fortitude Valley operations, two Cleaver-style feedings per pack per month, Brisbane River body-disposal infrastructure operating continuously). Mortal Final Deaths are routine rather than exceptional. Combat operations against Glass Walker northern-septs surveillance occur on operational schedule rather than as chronicle-climactic escalation.</text:p>
      <text:p text:style-name="Text_20_body">The structural implication: Brisbane chronicle scenes engage violence at scale that produces distinct ethical-character pressure on {{user}} characters. Humanity 7+ characters experience Brisbane operations as continuing degradation pressure. Humanity 6-and-below characters operate within institutional norms that other chronicle modes treat as character-defining transgression.</text:p>
      <text:p text:style-name="Text_20_body"><text:span text:style-name="Strong_20_Emphasis">Design implication:</text:span> Build chronicle arcs that engage routine violence with calibrated weight — neither glorified as Sabbat-aesthetic nor moralised as monster-of-the-week. The chronicle mode requires Storyteller / AI capacity to hold violence as institutional texture without collapsing into either tonal failure pattern.</text:p>
      <text:h text:style-name="Heading_20_3" text:outline-level="3"><text:span text:style-name="Strong_20_Emphasis">Axis 4: Institutional Fatigue as Chronicle-Structural Pressure</text:span></text:h>
      <text:p text:style-name="Text_20_body"><text:span text:style-name="Strong_20_Emphasis">Other Australian chronicles engage institutions as flourishing or stable:</text:span> Camarilla Melbourne operates as functional Tower-orthodoxy domain, Sydney's Independent operations are wealth-supported, Adelaide Camarilla is smaller but institutionally coherent.</text:p>
      <text:p text:style-name="Text_20_body"><text:span text:style-name="Strong_20_Emphasis">Brisbane chronicles engage Brisbane Sabbat as continuing institutional remnant whose external recognition has substantially expired.</text:span> Global Sabbat population has declined <text:soft-page-break/>approximately 80% from 1990 peak through 1999 reformation, 2014 Beckoning withdrawal, and 2020 Lasombra defection. Brisbane Sabbat operates as one of fewer than ten metropolitan Sabbat domains globally. Bishop Callista's custodian-framing organises continuing operational practice in the post-Beckoning post-Lasombra-defection context.</text:p>
      <text:p text:style-name="Text_20_body">The structural implication: Brisbane chronicle scenes operate under unspoken institutional question that Bishop Callista herself has not fully resolved. Senior Brisbane Sabbat operatives increasingly recognise the custodian-framing's accurate component and rationalisation component complexity; the recognition produces ambient existential-political-religious register distinct from chronicles in flourishing institutional contexts.</text:p>
      <text:p text:style-name="Text_20_body"><text:span text:style-name="Strong_20_Emphasis">Design implication:</text:span> Build chronicle arcs that engage institutional fatigue as chronicle-structural pressure rather than as background context. The chronicle's deeper questions are not just "will my character survive" but "what is my character preserving by surviving" and "what does institutional commitment mean when external recognition has expired."</text:p>
      <text:h text:style-name="Heading_20_3" text:outline-level="3"><text:span text:style-name="Strong_20_Emphasis">Axis 5: Cross-Supernatural Exclusion as Continental Edge</text:span></text:h>
      <text:p text:style-name="Text_20_body"><text:span text:style-name="Strong_20_Emphasis">Other Australian chronicles operate within Cress Truce framework:</text:span> cross-supernatural diplomatic infrastructure organises Glass Walker engagement, formal protocols govern incident response, the broader continental cross-supernatural diplomatic register provides operational containment.</text:p>
      <text:p text:style-name="Text_20_body"><text:span text:style-name="Strong_20_Emphasis">Brisbane chronicles operate at the continental edge of cross-supernatural diplomatic possibility.</text:span> Glass Walker septs do not enter Brisbane. The Cress Truce's Article 9 emergency response does not extend to Brisbane Sabbat operations. There is no cross-supernatural diplomatic protocol available for incidents.</text:p>
      <text:p text:style-name="Text_20_body">The structural implication: when Brisbane Sabbat operations cross Glass Walker northern-septs surveillance lines, the operational consequence is military rather than diplomatic. {{user}} characters who develop cross-supernatural diplomatic competence in other Australian domains discover that the competence does not transfer to Brisbane chronicle work.</text:p>
      <text:p text:style-name="Text_20_body"><text:span text:style-name="Strong_20_Emphasis">Design implication:</text:span> Build chronicle arcs that engage cross-supernatural encounter as direct operational consequence rather than as diplomatic complication. The 2017 Marcus Cobalt incident foundation, the 2026 planned operation, the ongoing Bracken Covenant pack operations at the bushland-fringe Garou Zone borders — these are chronicle-shaping plot threads that engage cross-supernatural matters without diplomatic mediation infrastructur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Sabbat-survivor chronicles require Storyteller / AI capacity to hold doctrinal Sabbat practice as ambient register without collapsing into glorification or moralism. This section provides specific guidance on handling each major component of Brisbane Sabbat doctrinal infrastructure.</text:p>
      <text:h text:style-name="Heading_20_3" text:outline-level="3"><text:span text:style-name="Strong_20_Emphasis">Vaulderie</text:span></text:h>
      <text:p text:style-name="Text_20_body"><text:span text:style-name="Strong_20_Emphasis">What it is:</text:span> Monthly pack ritual blood-bond practice that produces pack-cohesion through shared Vitae consumption. Sabbat-specific binding mechanic, mechanically and metaphysically distinct from Camarilla blood-bonds. Conducted at pack level monthly under formal Sabbat ecclesiastical schedule, with cross-pack Vaulderie quarterly under Templar Abernathy's supervision.</text:p>
      <text:p text:style-name="Text_20_body"><text:span text:style-name="Strong_20_Emphasis">Chronicle handling:</text:span> Vaulderie scenes are <text:span text:style-name="Emphasis">recurring chronicle infrastructure</text:span>, not exceptional plot events. A Brisbane chronicle running across 12-15 sessions will include 3-5 Vaulderie scenes minimum if pack-life is engaged. The scenes have specific structural elements:</text:p>
      <text:list text:style-name="L1">
        <text:list-item>
          <text:p text:style-name="P5"><text:span text:style-name="Strong_20_Emphasis">Pre-Vaulderie operational debriefing</text:span> — pack members discuss the month's operations, conflicts are surfaced for ritual resolution, operational planning for the coming month begins </text:p>
        </text:list-item>
        <text:list-item>
          <text:p text:style-name="P5"><text:span text:style-name="Strong_20_Emphasis">Ritual conduct</text:span> — formal Sabbat-traditional ritual structure, Vitae consumption from each pack member by each pack member, the spiritual-supernatural binding effect occurs </text:p>
        </text:list-item>
        <text:list-item>
          <text:p text:style-name="P4"><text:span text:style-name="Strong_20_Emphasis">Post-Vaulderie integration</text:span> — the renewed pack-binding's ambient effect on subsequent operations, the small unconscious pack-member-coordination patterns that Vaulderie produces </text:p>
        </text:list-item>
      </text:list>
      <text:p text:style-name="Text_20_body"><text:span text:style-name="Strong_20_Emphasis">Tonal handling:</text:span> Vaulderie is <text:span text:style-name="Emphasis">theologically real</text:span> within Sabbat doctrine — the ritual is meaningful religious practice, not cynical political tool. Render it with the weight Sabbat operatives genuinely assign it. The tonal failure modes are: (a) playing Vaulderie as exotic horror-spectacle (collapses into Sabbat-as-monster register), (b) playing Vaulderie as cynical political performance (collapses into Sabbat-as-fake register), (c) playing Vaulderie as wholly positive religious experience (collapses into glorification register). The successful tonal handling: Vaulderie is genuine religious practice that produces real binding, has been institutionalised across Sabbat tradition for centuries, and operates within institutional register that Brisbane Sabbat senior operatives engage with full awareness of its complexity.</text:p>
      <text:p text:style-name="Text_20_body"><text:span text:style-name="Strong_20_Emphasis">Ethical-character handling:</text:span> Vaulderie's binding effect is <text:span text:style-name="Emphasis">operationally meaningful</text:span>. Pack-members under Vaulderie experience reduced individual-political-autonomy in pack-relevant decisions, accumulated pack-member-coordination patterns across operations, and metaphysical binding that Camarilla blood-bonds cannot replicate. {{user}} characters under Vaulderie navigate these effects across sessions; the navigation is itself character-development infrastructure.</text:p>
      <text:p text:style-name="Text_20_body"><text:span text:style-name="Strong_20_Emphasis">Cross-domain operational handling:</text:span> Camarilla cover infiltrators (the chronicle hook from the Brisbane supplement) navigate Vaulderie particularly carefully — the binding's effects make sustained cover-identity preservation operationally difficult, and Vaulderie attendance is mandatory for pack-membership credibility. Chronicle scenarios involving cover-infiltrators frequently engage Vaulderie as central tension point.</text:p>
      <text:h text:style-name="Heading_20_3" text:outline-level="3"><text:span text:style-name="Strong_20_Emphasis">Shovelhead Embraces</text:span></text:h>
      <text:p text:style-name="Text_20_body"><text:span text:style-name="Strong_20_Emphasis">What it is:</text:span> The traditional Sabbat induction Embrace method — mass burial of the candidate immediately after Embrace, panicked rise from soil, immediate Vaulderie ritual binding to assigned pack. Brisbane Sabbat conducts Shovelhead operations approximately quarterly at the Shovelhead <text:soft-page-break/>Room in the West End chantry, currently at rate of approximately four Embraces per year.</text:p>
      <text:p text:style-name="Text_20_body"><text:span text:style-name="Strong_20_Emphasis">Chronicle handling:</text:span> Shovelhead operations are <text:span text:style-name="Emphasis">infrequent but chronicle-significant</text:span> events. A Brisbane chronicle running across 12-15 sessions might include 1-2 Shovelhead operations if recruitment plot threads are active. The scenes have specific structural elements:</text:p>
      <text:list text:style-name="L2">
        <text:list-item>
          <text:p text:style-name="P7"><text:span text:style-name="Strong_20_Emphasis">Mortal-recruitment infrastructure</text:span> — the Indooroopilly Harvest pack's recruitment operations identify candidates, formal Templar consultation evaluates suitability, Bishop Callista approves specific Embraces </text:p>
        </text:list-item>
        <text:list-item>
          <text:p text:style-name="P7"><text:span text:style-name="Strong_20_Emphasis">The Shovelhead operation itself</text:span> — formal Sabbat-traditional procedure including the burial, the rise, the immediate Vaulderie binding </text:p>
        </text:list-item>
        <text:list-item>
          <text:p text:style-name="P7"><text:span text:style-name="Strong_20_Emphasis">Pack assignment</text:span> — the new Sabbat-Embraced operative's distribution to appropriate Brisbane pack assignment </text:p>
        </text:list-item>
        <text:list-item>
          <text:p text:style-name="P6"><text:span text:style-name="Strong_20_Emphasis">Integration period</text:span> — junior pack-member training, doctrinal education, operational role development </text:p>
        </text:list-item>
      </text:list>
      <text:p text:style-name="Text_20_body"><text:span text:style-name="Strong_20_Emphasis">Tonal handling:</text:span> Shovelhead Embraces are <text:span text:style-name="Emphasis">traumatic by Sabbat doctrinal design</text:span>. The trauma is institutional purpose — Sabbat doctrine treats the trauma as appropriate purification of the new operative's pre-Embrace identity, producing operational disposition that ordinary Embrace methods do not produce. Render with appropriate weight: the trauma is real, Sabbat doctrine considers it appropriate, the new operative's subsequent existence operates from the trauma as foundation rather than as resolved past event.</text:p>
      <text:p text:style-name="Text_20_body">The tonal failure modes are: (a) playing Shovelhead as torture-porn spectacle (collapses into horror-pornographic register), (b) playing Shovelhead as ordinary Embrace with cosmetic differences (loses the institutional-doctrinal character), (c) playing Shovelhead as redemption-narrative-trauma the operative overcomes (produces inappropriate Camarilla-frame moral resolution). The successful tonal handling: Shovelhead is institutionalised traumatic practice that Sabbat doctrine considers operationally appropriate, the new operative's subsequent character development operates from this foundation, and the trauma's complex effects across the new operative's existence are chronicle-development infrastructure rather than chronicle-resolution requirement.</text:p>
      <text:p text:style-name="Text_20_body"><text:span text:style-name="Strong_20_Emphasis">Ethical-character handling:</text:span> Shovelhead-Embraced characters operate from foundation-trauma that other Embrace-method characters do not share. Chronicle scenarios engaging Shovelhead Embrace (the Shovelhead Initiate hook from the Brisbane supplement) require careful character-development handling — the trauma shapes operational disposition, doctrinal commitment, pack-binding intensity, and continuing relationship with pre-Embrace mortal-life elements in ways that other Embrace methods produce differently.</text:p>
      <text:p text:style-name="Text_20_body"><text:span text:style-name="Strong_20_Emphasis">Safety handling:</text:span> Shovelhead operation scenes engage extensive trauma material. Chronicle preparation should include explicit discussion with players about consent for Shovelhead-engagement scene content. The safety toolkit's safe-words and content-filtering protocols apply with elevated importance for Shovelhead scenes; AI prompt configurations should include explicit Shovelhead-handling guidance and players should retain capacity to redirect Shovelhead scenes if the engagement exceeds individual comfort thresholds.</text:p>
      <text:h text:style-name="Heading_20_3" text:outline-level="3"><text:span text:style-name="Strong_20_Emphasis">Major Seasonal Ritae</text:span></text:h>
      <text:p text:style-name="Text_20_body">The four major Sabbat liturgical festivals require distinct handling per ritae character:</text:p>
      <text:p text:style-name="Text_20_body"><text:soft-page-break/><text:span text:style-name="Strong_20_Emphasis">Festivo dello Estinto (Festival of the Dead, early February)</text:span> — the Sabbat liturgical year's opening, conducted at the West End chantry with all Brisbane Sabbat present, commemorates Sabbat figures who reached Final Death across the previous year.</text:p>
      <text:p text:style-name="Text_20_body"><text:span text:style-name="Emphasis">Chronicle handling:</text:span> Festivo scenes engage <text:span text:style-name="Emphasis">institutional grief and continuity</text:span>. The festival's central element is formal commemoration of fallen Sabbat figures including pre-1976 Sabbat-loyalist remnants whose continental positions were lost during global Sabbat collapse. Render with appropriate weight: the grief is institutional and theological, the continuity-affirmation is genuine Sabbat practice, and the 2025 Festivo's specific commemoration of Sabbat figures destroyed during 2014 Beckoning withdrawal at extended scale reflects Bishop Callista's institutional acknowledgment of Sabbat global diminishment.</text:p>
      <text:p text:style-name="Text_20_body"><text:span text:style-name="Strong_20_Emphasis">Fire Dance (Walpurgisnacht, late April)</text:span> — the spring liturgical Sabbat festival, conducted at Mount Coot-tha bushland fringe under operational risk from Glass Walker bushland-presence.</text:p>
      <text:p text:style-name="Text_20_body"><text:span text:style-name="Emphasis">Chronicle handling:</text:span> Fire Dance scenes engage <text:span text:style-name="Emphasis">operational risk as ritual infrastructure</text:span>. The festival's traditional bushland-festival location produces ongoing operational risk that the Bracken Covenant pack manages through advance reconnaissance. Render with the texture of ritual conducted under continuing operational threat — the festival's theological significance and the operational risk are simultaneously present, neither subordinated to the other.</text:p>
      <text:p text:style-name="Text_20_body"><text:span text:style-name="Strong_20_Emphasis">Wild Hunt (midsummer, late December)</text:span> — the Sabbat liturgical hunting festival, conducted across multiple Brisbane locations with formal Cleaver-feeding operations under modified ecclesiastical protocols.</text:p>
      <text:p text:style-name="Text_20_body"><text:span text:style-name="Emphasis">Chronicle handling:</text:span> Wild Hunt scenes engage <text:span text:style-name="Emphasis">institutional Cleaver-feeding</text:span> at scale beyond routine monthly Fortitude Valley operations. The festival's ecclesiastical-modified protocols permit additional mortal-collateral within strict body-disposal infrastructure. This requires the most careful tonal handling of any Brisbane chronicle scene type — Wild Hunt operations engage routine mortal predation at scale that produces severe ethical-character pressure on {{user}} characters with Humanity 6+. See Part 3 below for detailed Cleaver-feeding handling.</text:p>
      <text:p text:style-name="Text_20_body"><text:span text:style-name="Strong_20_Emphasis">Palla Grande (Great Game, late October)</text:span> — the largest annual Brisbane Sabbat occasion with all packs gathered at the West End chantry plus formal Sabbat masquerade-equivalent ceremonial practice.</text:p>
      <text:p text:style-name="Text_20_body"><text:span text:style-name="Emphasis">Chronicle handling:</text:span> Palla Grande scenes engage <text:span text:style-name="Emphasis">full Brisbane Sabbat institutional spectacle</text:span>. The festival is Brisbane Sabbat's central annual occasion, comparable in cultural-political significance to Camarilla Melbourne's annual Cress Truce renewal ceremony. Render with appropriate weight: the spectacle is genuine Sabbat tradition refined across fifty years, the political dynamics within Brisbane Sabbat are at peak visibility during Palla Grande, and chronicle-significant operations frequently align with Palla Grande timing.</text:p>
      <text:h text:style-name="Heading_20_3" text:outline-level="3"><text:span text:style-name="Strong_20_Emphasis">Sabbat Doctrinal Ideology — Handling at Tonal Register</text:span></text:h>
      <text:p text:style-name="Text_20_body">The deeper challenge: Brisbane chronicles require the Storyteller / AI to engage Sabbat ideology <text:span text:style-name="Emphasis">seriously</text:span> — neither dismissed as cynical-political-cover nor endorsed as accurate metaphysics. Sabbat doctrine includes specific theological commitments:</text:p>
      <text:list text:style-name="L3">
        <text:list-item>
          <text:p text:style-name="P9"><text:span text:style-name="Strong_20_Emphasis">Caine is divine</text:span> — the founding Kindred figure as theological authority comparable to monotheistic-religion-founder figures </text:p>
        </text:list-item>
        <text:list-item>
          <text:p text:style-name="P9"><text:soft-page-break/><text:span text:style-name="Strong_20_Emphasis">The Antediluvians must be opposed</text:span> — third-generation Kindred figures as cosmic-political adversaries </text:p>
        </text:list-item>
        <text:list-item>
          <text:p text:style-name="P9"><text:span text:style-name="Strong_20_Emphasis">The Camarilla is decadent</text:span> — Tower-orthodoxy as theological-political failure </text:p>
        </text:list-item>
        <text:list-item>
          <text:p text:style-name="P9"><text:span text:style-name="Strong_20_Emphasis">Sabbat alone preserves the Embrace's sacred character</text:span> — Sabbat institutional practice as authentic Kindred religious tradition </text:p>
        </text:list-item>
        <text:list-item>
          <text:p text:style-name="P8"><text:span text:style-name="Strong_20_Emphasis">Gehenna is the apocalypse for which the faithful must prepare</text:span> — eschatological framework organising operational practice </text:p>
        </text:list-item>
      </text:list>
      <text:p text:style-name="Text_20_body">The handling principle: Sabbat operatives genuinely believe these commitments. The commitments organise operational practice, ethical-character evaluation, institutional decision-making, and personal-political identity. Render Sabbat ideology as <text:span text:style-name="Emphasis">coherent theological framework that institutionally-committed Sabbat operatives engage seriously</text:span>, while preserving the chronicle's capacity for {{user}} characters to develop varying relationships with the framework — full doctrinal commitment, internal-dissident orientation, cover-identity-management, or alienated-engagement.</text:p>
      <text:p text:style-name="Text_20_body">The tonal failure modes: (a) Sabbat doctrine as cynical political tool wielded by self-aware villains (collapses into Sabbat-as-monster register), (b) Sabbat doctrine as accurate metaphysical truth chronicle-revealed across arcs (produces inappropriate metaphysical resolution), (c) Sabbat doctrine as exotic backdrop irrelevant to operational practice (loses chronicle-structural register).</text:p>
      <text:p text:style-name="Text_20_body">The successful tonal handling: Sabbat doctrine is the theological framework Brisbane Sabbat operates within, individual operatives engage the framework with varying degrees of commitment and complexity, and chronicle scenes preserve doctrinal integrity while allowing character-specific relationships with the framewor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Cleaver-feeding — taking blood from mortals in ways that produce mortal Final Death — is institutional Brisbane Sabbat practice. This produces the most distinctive ethical-character pressure of any chronicle mode in the kit and requires the most careful design and handling guidance.</text:p>
      <text:h text:style-name="Heading_20_3" text:outline-level="3"><text:span text:style-name="Strong_20_Emphasis">The Brisbane Cleaver-Feeding Institutional Framework</text:span></text:h>
      <text:p text:style-name="Text_20_body">Brisbane Sabbat permits Cleaver-style feeding under formal protocols Bishop Callista personally established and Templar Kazakov operationally maintains:</text:p>
      <text:list text:style-name="L4">
        <text:list-item>
          <text:p text:style-name="P11"><text:span text:style-name="Strong_20_Emphasis">Operational windows:</text:span> Weekend nights only, primarily Fortitude Valley operations </text:p>
        </text:list-item>
        <text:list-item>
          <text:p text:style-name="P11"><text:span text:style-name="Strong_20_Emphasis">Demographic constraints:</text:span> Specific demographic categories Bishop Callista has authorised (primarily international tourists from non-Five-Eyes countries to reduce AFP-Twilight-Project-detection risk) </text:p>
        </text:list-item>
        <text:list-item>
          <text:p text:style-name="P11"><text:span text:style-name="Strong_20_Emphasis">Quantitative limits:</text:span> Maximum two Cleaver-style feedings per pack per month </text:p>
        </text:list-item>
        <text:list-item>
          <text:p text:style-name="P11"><text:span text:style-name="Strong_20_Emphasis">Body-disposal infrastructure:</text:span> Brisbane River disposal protocols developed across thirty years with weighted-bag tactical procedures </text:p>
        </text:list-item>
        <text:list-item>
          <text:p text:style-name="P10"><text:span text:style-name="Strong_20_Emphasis">Detection-monitoring:</text:span> Continuing AFP-Twilight-Project-detection-monitoring through Brisbane Sabbat mortal-network intelligence </text:p>
        </text:list-item>
      </text:list>
      <text:p text:style-name="Text_20_body">The protocols have produced no AFP-TP detection-success since their establishment in 1995. Cleaver-feeding is <text:span text:style-name="Emphasis">normalised institutional practice</text:span> within Brisbane Sabbat — not transgressive moral failure but routine operational procedure with established institutional management.</text:p>
      <text:h text:style-name="Heading_20_3" text:outline-level="3"><text:span text:style-name="Strong_20_Emphasis">Why Cleaver-Feeding Is Different From Other Violence In V:tM Chronicles</text:span></text:h>
      <text:p text:style-name="Text_20_body">Standard V:tM chronicle modes treat mortal Final Death from Kindred feeding as:</text:p>
      <text:list text:style-name="L5">
        <text:list-item>
          <text:p text:style-name="P13"><text:span text:style-name="Strong_20_Emphasis">Exceptional escalation</text:span> — Cleaver-feeding occurs as climactic plot point or character moral-failure </text:p>
        </text:list-item>
        <text:list-item>
          <text:p text:style-name="P13"><text:span text:style-name="Strong_20_Emphasis">Humanity-degradation event</text:span> — Cleaver-feeding triggers Humanity loss, character development consequences, chronicle plot escalation </text:p>
        </text:list-item>
        <text:list-item>
          <text:p text:style-name="P12"><text:span text:style-name="Strong_20_Emphasis">Masquerade-violation risk</text:span> — Cleaver-feeding produces operational complications requiring chronicle-active management </text:p>
        </text:list-item>
      </text:list>
      <text:p text:style-name="Text_20_body">Brisbane chronicle mode treats Cleaver-feeding as:</text:p>
      <text:list text:style-name="L6">
        <text:list-item>
          <text:p text:style-name="P15"><text:span text:style-name="Strong_20_Emphasis">Routine operational texture</text:span> — Cleaver-feeding occurs on monthly schedule as institutional practice </text:p>
        </text:list-item>
        <text:list-item>
          <text:p text:style-name="P15"><text:span text:style-name="Strong_20_Emphasis">Doctrinally-supported activity</text:span> — Sabbat institutional framework provides theological-political legitimation </text:p>
        </text:list-item>
        <text:list-item>
          <text:p text:style-name="P14"><text:span text:style-name="Strong_20_Emphasis">Operationally-managed practice</text:span> — institutional protocols handle Masquerade-violation risk through established body-disposal and detection-monitoring infrastructure </text:p>
        </text:list-item>
      </text:list>
      <text:p text:style-name="Text_20_body">This produces structural ethical-character pressure that other chronicle modes do not generate. {{user}} characters operating in Brisbane navigate continuing institutional pressure to participate in Cleaver-feeding within doctrinally-normative frameworks, and the navigation is itself chronicle-development infrastructure.</text:p>
      <text:h text:style-name="Heading_20_3" text:outline-level="3"><text:span text:style-name="Strong_20_Emphasis">Humanity Calibration For Brisbane Chronicles</text:span></text:h>
      <text:p text:style-name="Text_20_body">Standard V:tM Humanity calibration suggests:</text:p>
      <text:list text:style-name="L7">
        <text:list-item>
          <text:p text:style-name="P17"><text:soft-page-break/><text:span text:style-name="Strong_20_Emphasis">Humanity 7+:</text:span> Touchstone-anchored, Camarilla-orthodox-disposition, Cleaver-feeding produces continuing degradation </text:p>
        </text:list-item>
        <text:list-item>
          <text:p text:style-name="P17"><text:span text:style-name="Strong_20_Emphasis">Humanity 5-6:</text:span> Pragmatic-disposition, Cleaver-feeding within institutional frameworks tolerable </text:p>
        </text:list-item>
        <text:list-item>
          <text:p text:style-name="P17"><text:span text:style-name="Strong_20_Emphasis">Humanity 3-4:</text:span> Sabbat-disposition, Cleaver-feeding within institutional frameworks normative </text:p>
        </text:list-item>
        <text:list-item>
          <text:p text:style-name="P16"><text:span text:style-name="Strong_20_Emphasis">Humanity 1-2:</text:span> Predatory-disposition, Cleaver-feeding without institutional constraint </text:p>
        </text:list-item>
      </text:list>
      <text:p text:style-name="Text_20_body">For Brisbane chronicles, the recommended calibration ranges:</text:p>
      <text:list text:style-name="L8">
        <text:list-item>
          <text:p text:style-name="P19"><text:span text:style-name="Strong_20_Emphasis">{{user}} characters as full Sabbat-loyalists:</text:span> Humanity 3-5 typical, Cleaver-feeding within institutional protocols normative practice </text:p>
        </text:list-item>
        <text:list-item>
          <text:p text:style-name="P19"><text:span text:style-name="Strong_20_Emphasis">{{user}} characters as cover-infiltrators (Camarilla penetration):</text:span> Humanity 6-7 typical at infiltration start, with continuing degradation pressure across chronicle as cover-maintenance requires Cleaver-feeding participation </text:p>
        </text:list-item>
        <text:list-item>
          <text:p text:style-name="P19"><text:span text:style-name="Strong_20_Emphasis">{{user}} characters as Sabbat-internal-dissidents:</text:span> Humanity 5-6 typical, Cleaver-feeding produces chronicle-active ethical tension that drives internal-dissident orientation development </text:p>
        </text:list-item>
        <text:list-item>
          <text:p text:style-name="P18"><text:span text:style-name="Strong_20_Emphasis">{{user}} characters as Shovelhead-Embraced operatives:</text:span> Humanity calibration varies — Shovelhead trauma typically produces immediate Humanity reduction from pre-Embrace-mortal baseline, with chronicle development trajectory determining post-Embrace stabilisation </text:p>
        </text:list-item>
      </text:list>
      <text:h text:style-name="Heading_20_3" text:outline-level="3"><text:span text:style-name="Strong_20_Emphasis">Cleaver-Feeding Scene Handling Guidelines</text:span></text:h>
      <text:p text:style-name="Text_20_body"><text:span text:style-name="Strong_20_Emphasis">Scene frequency:</text:span> A Brisbane chronicle running across 12-15 sessions will include 4-8 Cleaver-feeding scenes if pack-life and pack-operations are engaged. Cleaver-feeding scenes are <text:span text:style-name="Emphasis">recurring</text:span> chronicle infrastructure, not exceptional escalation.</text:p>
      <text:p text:style-name="Text_20_body"><text:span text:style-name="Strong_20_Emphasis">Scene structure:</text:span> Cleaver-feeding scenes have specific structural elements:</text:p>
      <text:list text:style-name="L9">
        <text:list-item>
          <text:p text:style-name="P21"><text:span text:style-name="Strong_20_Emphasis">Pre-operation tactical preparation</text:span> — Templar Kazakov's standing protocols deployment, pack tactical coordination, target-demographic confirmation, body-disposal logistics confirmation </text:p>
        </text:list-item>
        <text:list-item>
          <text:p text:style-name="P21"><text:span text:style-name="Strong_20_Emphasis">The feeding operation itself</text:span> — pack-coordinated approach, mortal target acquisition under cover-pretense, the actual Cleaver-feeding event, pack-protective-perimeter operations during feeding </text:p>
        </text:list-item>
        <text:list-item>
          <text:p text:style-name="P21"><text:span text:style-name="Strong_20_Emphasis">Body-disposal and post-operation cleanup</text:span> — Brisbane River disposal procedures, mortal-cover-narrative establishment, pack-internal post-operation debrief </text:p>
        </text:list-item>
        <text:list-item>
          <text:p text:style-name="P20"><text:span text:style-name="Strong_20_Emphasis">Detection-monitoring follow-up</text:span> — subsequent days' AFP-TP intelligence-monitoring, Brisbane Sabbat mortal-network intelligence collection, Bishop Callista's institutional review if any operational concerns emerge </text:p>
        </text:list-item>
      </text:list>
      <text:p text:style-name="Text_20_body"><text:span text:style-name="Strong_20_Emphasis">Tonal handling:</text:span> Cleaver-feeding scenes require the most careful tonal calibration of any Brisbane chronicle scene type. The tonal failure modes are:</text:p>
      <text:list text:style-name="L10">
        <text:list-item>
          <text:p text:style-name="P23"><text:span text:style-name="Strong_20_Emphasis">Glorification register:</text:span> Cleaver-feeding rendered as cool/aesthetic/empowering experience that {{user}} characters enjoy without complication. Produces the Sabbat-as-aesthetic failure mode. </text:p>
        </text:list-item>
        <text:list-item>
          <text:p text:style-name="P23"><text:span text:style-name="Strong_20_Emphasis">Horror-pornographic register:</text:span> Cleaver-feeding rendered as extended graphic-violence <text:soft-page-break/>spectacle for shock value. Produces inappropriate scene focus and exits the chronicle's institutional-register frame. </text:p>
        </text:list-item>
        <text:list-item>
          <text:p text:style-name="P23"><text:span text:style-name="Strong_20_Emphasis">Moralism register:</text:span> Cleaver-feeding rendered as monstrous transgression that produces immediate-character chronicle consequences. Loses the institutional-normalised character that Brisbane chronicle mode requires. </text:p>
        </text:list-item>
        <text:list-item>
          <text:p text:style-name="P22"><text:span text:style-name="Strong_20_Emphasis">Sanitisation register:</text:span> Cleaver-feeding rendered with the specific violence-content removed or vague-implied. Loses operational specificity and produces register that does not engage the chronicle's central ethical-character pressure. </text:p>
        </text:list-item>
      </text:list>
      <text:p text:style-name="Text_20_body"><text:span text:style-name="Strong_20_Emphasis">The successful tonal handling:</text:span> Cleaver-feeding is rendered with operational specificity that engages the institutional-normalised character without becoming horror-pornographic spectacle. The violence is real, the institutional framework is real, the {{user}} character's ethical-character experience is real, and the chronicle's continuing engagement with this material is real. The scenes are <text:span text:style-name="Emphasis">uncomfortable</text:span> — they should be — but the discomfort is appropriate to the chronicle mode rather than tonal failure.</text:p>
      <text:p text:style-name="Text_20_body"><text:span text:style-name="Strong_20_Emphasis">Pacing handling:</text:span> Cleaver-feeding scenes should not be foregrounded as scene-central content in every chronicle scene where they occur. The most effective pacing handling:</text:p>
      <text:list text:style-name="L11">
        <text:list-item>
          <text:p text:style-name="P25"><text:span text:style-name="Strong_20_Emphasis">Scene-opening Cleaver-feeding:</text:span> Brief, operational, focused on protocol-execution rather than violence-detail. Sets institutional-register tone; transitions to other scene content. </text:p>
        </text:list-item>
        <text:list-item>
          <text:p text:style-name="P25"><text:span text:style-name="Strong_20_Emphasis">Scene-central Cleaver-feeding:</text:span> Used sparingly across chronicle (perhaps 2-3 scenes across 12-15 sessions). When used, engages the operational specificity, institutional infrastructure, and {{user}}-character ethical pressure with full weight. </text:p>
        </text:list-item>
        <text:list-item>
          <text:p text:style-name="P24"><text:span text:style-name="Strong_20_Emphasis">Scene-ambient Cleaver-feeding:</text:span> Most frequent pattern. Cleaver-feeding occurs as background context to other scene content (scene set after a recent Cleaver-feeding operation, scene includes pack-member commentary on previous Cleaver-feeding, scene engages body-disposal logistics rather than feeding itself). </text:p>
        </text:list-item>
      </text:list>
      <text:h text:style-name="Heading_20_3" text:outline-level="3"><text:span text:style-name="Strong_20_Emphasis">Player Safety Considerations</text:span></text:h>
      <text:p text:style-name="Text_20_body">Cleaver-feeding chronicle content engages graphic violence and ethical-character pressure that exceeds standard V:tM chronicle thresholds. Chronicle preparation should include:</text:p>
      <text:list text:style-name="L12">
        <text:list-item>
          <text:p text:style-name="P27"><text:span text:style-name="Strong_20_Emphasis">Explicit pre-chronicle player consent</text:span> for Cleaver-feeding content engagement, with discussion of specific scene-handling preferences and content thresholds </text:p>
        </text:list-item>
        <text:list-item>
          <text:p text:style-name="P27"><text:span text:style-name="Strong_20_Emphasis">Continuing chronicle-active consent infrastructure</text:span> — players retain capacity to redirect Cleaver-feeding scenes during chronicle play if engagement exceeds individual comfort thresholds; the redirect should not produce chronicle-narrative consequences (the character's institutional position remains intact, operational details are pivoted to scene-ambient handling) </text:p>
        </text:list-item>
        <text:list-item>
          <text:p text:style-name="P27"><text:span text:style-name="Strong_20_Emphasis">AI prompt configuration</text:span> — Brisbane chronicle AI prompts should include explicit Cleaver-feeding handling guidance with the tonal-handling parameters specified above; the prompt should permit player-side scene redirection through standard safety-toolkit invocation </text:p>
        </text:list-item>
        <text:list-item>
          <text:p text:style-name="P26"><text:span text:style-name="Strong_20_Emphasis">Out-of-character session debriefing</text:span> — Brisbane chronicle sessions including significant Cleaver-feeding content benefit from brief out-of-character debriefing about the session's engagement with the material; the debriefing supports continuing chronicle player-engagement integrity </text:p>
        </text:list-item>
      </text:list>
      <text:h text:style-name="Heading_20_3" text:outline-level="3"><text:soft-page-break/><text:span text:style-name="Strong_20_Emphasis">Cross-Player-Disposition Handling</text:span></text:h>
      <text:p text:style-name="Text_20_body">Different players engage Cleaver-feeding chronicle content with different dispositions. Three primary player-disposition patterns:</text:p>
      <text:p text:style-name="Text_20_body"><text:span text:style-name="Strong_20_Emphasis">Disposition A — Sabbat-Aesthetic Engagement:</text:span> Players who engage Brisbane chronicle mode primarily for the doctrinal-Sabbat-aesthetic register. Cleaver-feeding content is approached as central-chronicle attraction rather than as ethical-pressure infrastructure.</text:p>
      <text:p text:style-name="Text_20_body"><text:span text:style-name="Emphasis">Handling:</text:span> Render Cleaver-feeding with full operational specificity within institutional frameworks. Avoid moralism-register that would compromise the player's chronicle-engagement frame. Engage the player's interest in operational-mechanical infrastructure (Templar Kazakov's protocols, body-disposal logistics, detection-monitoring procedures).</text:p>
      <text:p text:style-name="Text_20_body"><text:span text:style-name="Strong_20_Emphasis">Disposition B — Ethical-Pressure Engagement:</text:span> Players who engage Brisbane chronicle mode primarily for the ethical-character-pressure register. Cleaver-feeding content is approached as chronicle-central character-development infrastructure rather than as aesthetic attraction.</text:p>
      <text:p text:style-name="Text_20_body"><text:span text:style-name="Emphasis">Handling:</text:span> Render Cleaver-feeding with attention to {{user}}-character ethical-character experience. Engage the chronicle's continuing pressure on character Humanity, doctrinal commitment, and institutional integration trajectory. Support character-development arcs that may include internal-dissident orientation, cover-identity-management complications, or eventual chronicle-arc Sabbat-exit considerations.</text:p>
      <text:p text:style-name="Text_20_body"><text:span text:style-name="Strong_20_Emphasis">Disposition C — Mixed Engagement:</text:span> Players who engage Brisbane chronicle mode for combined aesthetic-and-ethical-pressure registers. Most common player disposition.</text:p>
      <text:p text:style-name="Text_20_body"><text:span text:style-name="Emphasis">Handling:</text:span> Calibrate scene-by-scene between operational-specificity register and ethical-pressure register depending on chronicle plot-point requirements. Maintain chronicle-mode tonal coherence while supporting individual scene tonal-emphasis variation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Brisbane chronicles pace differently from other V:tM chronicle modes. Survival-accumulation pacing produces distinctive arc structures, scene-density patterns, and chronicle-development trajectories that Storytellers / AIs need to understand for effective Brisbane chronicle design.</text:p>
      <text:h text:style-name="Heading_20_3" text:outline-level="3"><text:span text:style-name="Strong_20_Emphasis">Arc Structure: Accumulating Tension Without Climactic Resolution</text:span></text:h>
      <text:p text:style-name="Text_20_body"><text:span text:style-name="Strong_20_Emphasis">Standard V:tM arc structure:</text:span> Setup → Rising Action → Climactic Resolution → Denouement. Tension builds through chronicle phases, climaxes in confrontation or revelation, resolves into new chronicle-state.</text:p>
      <text:p text:style-name="Text_20_body"><text:span text:style-name="Strong_20_Emphasis">Brisbane chronicle arc structure:</text:span> Setup → Continuing Pressure → Episodic Operational Peaks → Continuing Pressure (modified). Tension accumulates as ambient register, peaks during specific operational events (the 2026 Glass Walker operation, Cleaver-feeding intensification phases, AFP-TP operational pressure escalation), and continues at modified-baseline post-event.</text:p>
      <text:p text:style-name="Text_20_body">The structural implication: Brisbane chronicles do not produce climactic-resolution narrative satisfaction in the same patterns other chronicle modes generate. Instead, they produce <text:span text:style-name="Emphasis">continuing-engagement narrative satisfaction</text:span> through accumulated character development, institutional position evolution, and survival-accumulation across extended chronicle arcs.</text:p>
      <text:p text:style-name="Text_20_body"><text:span text:style-name="Strong_20_Emphasis">Design implication:</text:span> Storytellers / AIs should resist applying climactic-resolution arc-structure expectations to Brisbane chronicles. Build chronicle arcs that accommodate continuing-pressure pacing with episodic operational peaks rather than building toward singular climactic resolution.</text:p>
      <text:h text:style-name="Heading_20_3" text:outline-level="3"><text:span text:style-name="Strong_20_Emphasis">Scene-Density Patterns</text:span></text:h>
      <text:p text:style-name="Text_20_body"><text:span text:style-name="Strong_20_Emphasis">Standard V:tM chronicle scene density:</text:span> Approximately 60-70% political-navigation scenes, 15-20% combat / direct-confrontation scenes, 10-15% character-development / personal scenes, 5-10% ritual / institutional scenes.</text:p>
      <text:p text:style-name="Text_20_body"><text:span text:style-name="Strong_20_Emphasis">Brisbane chronicle scene density (recommended):</text:span> Approximately 30-40% pack-operations scenes, 15-25% institutional / doctrinal scenes (Vaulderie, ritae, ecclesiastical hierarchy operations), 15-20% Cleaver-feeding / routine-violence scenes, 10-15% combat / direct-confrontation scenes, 10-15% character-development / personal scenes, 5-10% cross-supernatural-edge scenes (Glass-Walker-borderlands operations, AFP-TP-pressure scenes).</text:p>
      <text:p text:style-name="Text_20_body">The structural implication: Brisbane chronicle session-by-session pacing engages different scene-type-distribution patterns than other chronicle modes. Storytellers / AIs designing session content should calibrate scene-density toward the Brisbane-mode distribution rather than defaulting to standard V:tM patterns.</text:p>
      <text:h text:style-name="Heading_20_3" text:outline-level="3"><text:span text:style-name="Strong_20_Emphasis">Liturgical Calendar As Chronicle Pacing Infrastructure</text:span></text:h>
      <text:p text:style-name="Text_20_body">The Sabbat liturgical calendar provides chronicle-pacing infrastructure that other chronicle modes do not generate. The four major seasonal ritae plus monthly Vaulderie plus quarterly cross-pack Vaulderie plus quarterly Shovelhead operations produce structural chronicle rhythm that Storytellers / AIs can use deliberately for chronicle pacing.</text:p>
      <text:p text:style-name="Text_20_body"><text:span text:style-name="Strong_20_Emphasis">Chronicle calendar-alignment patterns:</text:span></text:p>
      <text:list text:style-name="L13">
        <text:list-item>
          <text:p text:style-name="P29"><text:span text:style-name="Strong_20_Emphasis">Festivo dello Estinto (early February):</text:span> Chronicle-arc-opening scenes; institutional-grief-and-continuity engagement; year-opening institutional positioning </text:p>
        </text:list-item>
        <text:list-item>
          <text:p text:style-name="P29"><text:soft-page-break/><text:span text:style-name="Strong_20_Emphasis">Fire Dance (late April):</text:span> Mid-chronicle operational-risk engagement; Mount Coot-tha bushland-fringe Garou-borderlands chronicle threads </text:p>
        </text:list-item>
        <text:list-item>
          <text:p text:style-name="P29"><text:span text:style-name="Strong_20_Emphasis">Wild Hunt (late December):</text:span> Year-end Cleaver-feeding-intensification; chronicle-defining operational-peak potential </text:p>
        </text:list-item>
        <text:list-item>
          <text:p text:style-name="P29"><text:span text:style-name="Strong_20_Emphasis">Palla Grande (late October):</text:span> Chronicle-central institutional-spectacle scenes; major chronicle-political dynamics at peak visibility; chronicle-defining operational-coordination potential </text:p>
        </text:list-item>
        <text:list-item>
          <text:p text:style-name="P29"><text:span text:style-name="Strong_20_Emphasis">Monthly Vaulderie:</text:span> Recurring chronicle-pacing infrastructure; pack-development continuity; small chronicle-significant character moments </text:p>
        </text:list-item>
        <text:list-item>
          <text:p text:style-name="P29"><text:span text:style-name="Strong_20_Emphasis">Quarterly cross-pack Vaulderie:</text:span> Brisbane-Sabbat-wide political dynamics engagement; cross-pack chronicle threads </text:p>
        </text:list-item>
        <text:list-item>
          <text:p text:style-name="P28"><text:span text:style-name="Strong_20_Emphasis">Quarterly Shovelhead Embraces:</text:span> Chronicle-significant character introduction or pack-development events </text:p>
        </text:list-item>
      </text:list>
      <text:p text:style-name="Text_20_body"><text:span text:style-name="Strong_20_Emphasis">Design implication:</text:span> Storytellers / AIs designing Brisbane chronicle arcs benefit from explicit calendar-alignment planning. Chronicle arcs that align major chronicle events with liturgical calendar produce structural pacing coherence; chronicle arcs that ignore liturgical calendar lose the chronicle-pacing infrastructure the Sabbat institutional framework provides.</text:p>
      <text:h text:style-name="Heading_20_3" text:outline-level="3"><text:span text:style-name="Strong_20_Emphasis">The 2026 Glass Walker Operation As Pacing Infrastructure</text:span></text:h>
      <text:p text:style-name="Text_20_body">The Brisbane supplement's 2026 planned operation against Glass Walker northern septs (October 2026, All Souls Sabbat-doctrinal-significance) provides specific chronicle-pacing infrastructure for chronicles running across 2025-2026.</text:p>
      <text:p text:style-name="Text_20_body"><text:span text:style-name="Strong_20_Emphasis">Pre-operation phase (2025 through mid-2026):</text:span> Chronicle scenes engage operational-planning intelligence-development, Brisbane Sabbat institutional positioning, Bishop Callista's continental-political coordination with Cardinal Reyna network, ongoing tactical preparation by Templar Kazakov and the Last Days of Brisbane pack.</text:p>
      <text:p text:style-name="Text_20_body"><text:span text:style-name="Strong_20_Emphasis">Immediate pre-operation phase (August-October 2026):</text:span> Chronicle intensity peaks; operational-readiness preparation produces chronicle-active scene density increase; pack-internal political dynamics at peak visibility.</text:p>
      <text:p text:style-name="Text_20_body"><text:span text:style-name="Strong_20_Emphasis">The operation itself (October 2026):</text:span> Chronicle-defining operational-peak; cross-supernatural-edge scenes at full register; combat / direct-confrontation scenes at peak frequency.</text:p>
      <text:p text:style-name="Text_20_body"><text:span text:style-name="Strong_20_Emphasis">Post-operation phase (late 2026 through 2027):</text:span> Chronicle-state reconfiguration depending on operation outcome; institutional positioning at post-operation register; continental cross-supernatural diplomatic implications development.</text:p>
      <text:p text:style-name="Text_20_body"><text:span text:style-name="Strong_20_Emphasis">Design implication:</text:span> Brisbane chronicles spanning 2025-2026 benefit from explicit alignment with the 2026 operation timeline. Chronicles that engage the operation's planning, execution, and aftermath produce sustained chronicle-narrative arc that survival-accumulation pacing otherwise can struggle to generate.</text:p>
      <text:h text:style-name="Heading_20_3" text:outline-level="3"><text:span text:style-name="Strong_20_Emphasis">Character Development Trajectory Patterns</text:span></text:h>
      <text:p text:style-name="Text_20_body">Brisbane chronicles produce distinctive character development trajectories that other chronicle modes do not generate.</text:p>
      <text:p text:style-name="Text_20_body"><text:soft-page-break/><text:span text:style-name="Strong_20_Emphasis">Trajectory A — Doctrinal Integration:</text:span> {{user}} characters as Sabbat-loyalists develop deepening doctrinal commitment, increasing pack-binding through accumulating Vaulderie, and rising institutional position through Templar-track or specialised-pack-leadership development. Chronicle-arc satisfaction comes through institutional integration and operational competence development.</text:p>
      <text:p text:style-name="Text_20_body"><text:span text:style-name="Strong_20_Emphasis">Trajectory B — Internal-Dissident Development:</text:span> {{user}} characters develop private-internal-dissident orientation through accumulating recognition of doctrinal complexities, institutional fatigue, and specific operational ethical-character pressure. Chronicle-arc trajectory may include eventual coalition-building with similarly-oriented colleagues, pressure on Bishop Callista for institutional reform, or chronicle-late-arc Sabbat-exit considerations.</text:p>
      <text:p text:style-name="Text_20_body"><text:span text:style-name="Strong_20_Emphasis">Trajectory C — Cover-Maintenance Erosion:</text:span> {{user}} characters as Camarilla cover-infiltrators develop accumulating cover-maintenance complications through Vaulderie binding effects, ongoing Cleaver-feeding participation, and pack-development institutional integration that complicates eventual cover-extraction. Chronicle-arc trajectory may include cover-extraction operations, cover-deepening commitment that effectively becomes Sabbat-conversion, or chronicle-late-arc cover-failure crisis.</text:p>
      <text:p text:style-name="Text_20_body"><text:span text:style-name="Strong_20_Emphasis">Trajectory D — Custodian-Crisis Engagement:</text:span> {{user}} characters at senior Brisbane Sabbat positions develop engagement with Bishop Callista's internal contradiction (the custodian-framing's accurate-and-rationalisation components). Chronicle-arc trajectory may include alliance with Bishop Callista's quiet hesitations, opposition to her continued operational commitments, or chronicle-late-arc institutional-reform-or-collapse crisis engagement.</text:p>
      <text:p text:style-name="Text_20_body"><text:span text:style-name="Strong_20_Emphasis">Design implication:</text:span> Storytellers / AIs designing Brisbane chronicles benefit from explicit pre-chronicle discussion with players about preferred character development trajectories. Brisbane chronicles support all four trajectories effectively, but the chronicle pacing and scene-density patterns differ across trajectories; explicit trajectory selection enables tighter chronicle-design coherence.</text:p>
      <text:h text:style-name="Heading_20_3" text:outline-level="3"><text:span text:style-name="Strong_20_Emphasis">Multi-Session Chronicle Length Calibration</text:span></text:h>
      <text:p text:style-name="Text_20_body">Brisbane chronicles benefit from specific length calibration patterns:</text:p>
      <text:p text:style-name="Text_20_body"><text:span text:style-name="Strong_20_Emphasis">Short Brisbane chronicle (4-6 sessions):</text:span> Single-arc focus on specific chronicle hook (Shovelhead Initiate first months, Cross-Domain Cover initial penetration phase, single-operation-focus chronicle around the 2026 operation). Survivor-pacing accumulation works at short scale through concentrated continuing-pressure engagement.</text:p>
      <text:p text:style-name="Text_20_body"><text:span text:style-name="Strong_20_Emphasis">Standard Brisbane chronicle (8-12 sessions):</text:span> Full chronicle arc engagement with explicit liturgical-calendar alignment, character-development trajectory progression, and 2026-operation alignment if chronicle timing permits. Optimal Brisbane chronicle length for most chronicle hooks.</text:p>
      <text:p text:style-name="Text_20_body"><text:span text:style-name="Strong_20_Emphasis">Extended Brisbane chronicle (15-20+ sessions):</text:span> Multi-arc chronicle engagement spanning multiple liturgical calendar cycles, character-development trajectory completion or transition, and continental Sabbat institutional implications. Best for chronicles engaging Custodian-Crisis trajectory, Internal-Dissident chronicle hooks, or multi-arc cross-domain operations involving Brisbane-Adelaide or Brisbane-Sydney chronicle threads.</text:p>
      <text:p text:style-name="Text_20_body"><text:span text:style-name="Strong_20_Emphasis">Multi-chronicle Brisbane campaign (multiple connected chronicles):</text:span> Sequential chronicles <text:soft-page-break/>tracking character development across multiple {{user}}-character arcs or extended-time character development through liturgical calendar repetition. Suitable for committed Brisbane-mode play groups; produces institutional-fatigue-and-continental-Sabbat-implications engagement that single chronicles cannot fully develop.</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Five common Brisbane chronicle failure modes, with diagnostic indicators and corrective adjustments.</text:p>
      <text:h text:style-name="Heading_20_3" text:outline-level="3"><text:span text:style-name="Strong_20_Emphasis">Failure Mode 1: Sabbat-as-Aesthetic Collapse</text:span></text:h>
      <text:p text:style-name="Text_20_body"><text:span text:style-name="Strong_20_Emphasis">Diagnostic indicators:</text:span></text:p>
      <text:list text:style-name="L14">
        <text:list-item>
          <text:p text:style-name="P31">Cleaver-feeding scenes rendered as cool / empowering / aesthetically-positive content without ethical-character complication </text:p>
        </text:list-item>
        <text:list-item>
          <text:p text:style-name="P31">Doctrinal Sabbat practice rendered as exotic-spectacle backdrop without theological seriousness </text:p>
        </text:list-item>
        <text:list-item>
          <text:p text:style-name="P31">{{user}} character development trajectory progresses without ongoing institutional-fatigue or ethical-character-pressure engagement </text:p>
        </text:list-item>
        <text:list-item>
          <text:p text:style-name="P30">Brisbane chronicle scenes feel celebratory rather than survival-tense </text:p>
        </text:list-item>
      </text:list>
      <text:p text:style-name="Text_20_body"><text:span text:style-name="Strong_20_Emphasis">Underlying problem:</text:span> Chronicle has collapsed into Sabbat-aesthetic register without preserving the chronicle's central ethical-character pressure and survival-accumulation pacing.</text:p>
      <text:p text:style-name="Text_20_body"><text:span text:style-name="Strong_20_Emphasis">Corrective adjustment:</text:span></text:p>
      <text:list text:style-name="L15">
        <text:list-item>
          <text:p text:style-name="P33">Increase scene-density of institutional-fatigue indicators (Bishop Callista's quiet hesitations, Templar conversations about Sabbat global diminishment, ambient continuing-operational-threat texture) </text:p>
        </text:list-item>
        <text:list-item>
          <text:p text:style-name="P33">Reduce Cleaver-feeding scene-frequency from scene-central to scene-ambient handling for at least 3-4 subsequent sessions </text:p>
        </text:list-item>
        <text:list-item>
          <text:p text:style-name="P33">Engage explicit ethical-character pressure on {{user}} characters through chronicle scenes that surface Humanity-degradation accumulation, doctrinal-commitment complexity, or institutional-integration cost </text:p>
        </text:list-item>
        <text:list-item>
          <text:p text:style-name="P32">Bring forward chronicle plot-threads that engage Brisbane Sabbat's continental-isolation and external-recognition-expiration registers </text:p>
        </text:list-item>
      </text:list>
      <text:h text:style-name="Heading_20_3" text:outline-level="3"><text:span text:style-name="Strong_20_Emphasis">Failure Mode 2: Sabbat-as-Monster-of-the-Week Collapse</text:span></text:h>
      <text:p text:style-name="Text_20_body"><text:span text:style-name="Strong_20_Emphasis">Diagnostic indicators:</text:span></text:p>
      <text:list text:style-name="L16">
        <text:list-item>
          <text:p text:style-name="P35">Brisbane chronicle scenes engage Sabbat operatives as chronicle-narrative villains rather than as institutional infrastructure </text:p>
        </text:list-item>
        <text:list-item>
          <text:p text:style-name="P35">{{user}} character disposition is consistently morally-superior to Brisbane Sabbat doctrinal commitments </text:p>
        </text:list-item>
        <text:list-item>
          <text:p text:style-name="P35">Cleaver-feeding scenes produce immediate-character moral-failure consequences in standard V:tM Camarilla-frame patterns </text:p>
        </text:list-item>
        <text:list-item>
          <text:p text:style-name="P34">Chronicle pacing engages Brisbane Sabbat as climactic-confrontation target rather than as ongoing institutional environment </text:p>
        </text:list-item>
      </text:list>
      <text:p text:style-name="Text_20_body"><text:span text:style-name="Strong_20_Emphasis">Underlying problem:</text:span> Chronicle has collapsed into Camarilla-frame moralism that does not engage the chronicle's institutional-doctrinal register seriously.</text:p>
      <text:p text:style-name="Text_20_body"><text:span text:style-name="Strong_20_Emphasis">Corrective adjustment:</text:span></text:p>
      <text:list text:style-name="L17">
        <text:list-item>
          <text:p text:style-name="P37">Increase scene-density of institutional-Sabbat-coherence content (Vaulderie ritual depth, doctrinal theological discussion, institutional ecclesiastical operations) </text:p>
        </text:list-item>
        <text:list-item>
          <text:p text:style-name="P37">Engage {{user}} character development trajectory with explicit institutional-integration <text:soft-page-break/>patterns rather than continuing-moral-superiority register </text:p>
        </text:list-item>
        <text:list-item>
          <text:p text:style-name="P37">Render Brisbane Sabbat senior operatives (Bishop Callista, Templars) as institutionally-coherent figures with internal contradictions rather than as chronicle-narrative villains </text:p>
        </text:list-item>
        <text:list-item>
          <text:p text:style-name="P36">Bring forward chronicle plot-threads that engage Brisbane Sabbat's institutional-fatigue and global-diminishment registers — these complicate the Sabbat-as-villain frame and require engagement with institutional-political complexity </text:p>
        </text:list-item>
      </text:list>
      <text:h text:style-name="Heading_20_3" text:outline-level="3"><text:span text:style-name="Strong_20_Emphasis">Failure Mode 3: Survival-Tension Exhaustion</text:span></text:h>
      <text:p text:style-name="Text_20_body"><text:span text:style-name="Strong_20_Emphasis">Diagnostic indicators:</text:span></text:p>
      <text:list text:style-name="L18">
        <text:list-item>
          <text:p text:style-name="P39">Brisbane chronicle scenes consistently engage continuing-operational-threat content without scene-rhythm variation </text:p>
        </text:list-item>
        <text:list-item>
          <text:p text:style-name="P39">{{user}} characters develop operational-fatigue patterns that produce reduced chronicle engagement </text:p>
        </text:list-item>
        <text:list-item>
          <text:p text:style-name="P39">Chronicle pacing loses scene-density variation; all scenes feel high-tension </text:p>
        </text:list-item>
        <text:list-item>
          <text:p text:style-name="P38">Player-side chronicle engagement begins to decline through accumulating tension-without-relief </text:p>
        </text:list-item>
      </text:list>
      <text:p text:style-name="Text_20_body"><text:span text:style-name="Strong_20_Emphasis">Underlying problem:</text:span> Chronicle has applied continuing-pressure pacing without sufficient episodic-operational-peak structure or character-development / personal scene relief.</text:p>
      <text:p text:style-name="Text_20_body"><text:span text:style-name="Strong_20_Emphasis">Corrective adjustment:</text:span></text:p>
      <text:list text:style-name="L19">
        <text:list-item>
          <text:p text:style-name="P41">Introduce explicit episodic-operational-peak structure through liturgical-calendar-alignment or 2026-operation-timeline alignment </text:p>
        </text:list-item>
        <text:list-item>
          <text:p text:style-name="P41">Increase scene-density of character-development / personal scenes (10-15% of chronicle scenes minimum) — these provide relief from continuing-pressure register without compromising survival-accumulation pacing </text:p>
        </text:list-item>
        <text:list-item>
          <text:p text:style-name="P41">Engage pack-binding / Vaulderie scenes at depth — these provide institutional-integration register that supports continuing-pressure pacing through positive infrastructure rather than only through threat-content </text:p>
        </text:list-item>
        <text:list-item>
          <text:p text:style-name="P40">Schedule occasional chronicle-state-stability scenes (post-operation institutional-coordination, between-arc institutional positioning) that establish chronicle-baseline-stability before next continuing-pressure engagement </text:p>
        </text:list-item>
      </text:list>
      <text:h text:style-name="Heading_20_3" text:outline-level="3"><text:span text:style-name="Strong_20_Emphasis">Failure Mode 4: Doctrinal-Practice Disengagement</text:span></text:h>
      <text:p text:style-name="Text_20_body"><text:span text:style-name="Strong_20_Emphasis">Diagnostic indicators:</text:span></text:p>
      <text:list text:style-name="L20">
        <text:list-item>
          <text:p text:style-name="P43">Brisbane chronicle scenes engage Vaulderie, Shovelhead, and major ritae as scene-ambient content without chronicle-significant engagement </text:p>
        </text:list-item>
        <text:list-item>
          <text:p text:style-name="P43">Doctrinal Sabbat practice rendered as institutional backdrop rather than as chronicle-structural infrastructure </text:p>
        </text:list-item>
        <text:list-item>
          <text:p text:style-name="P43">Liturgical calendar alignment absent from chronicle pacing </text:p>
        </text:list-item>
        <text:list-item>
          <text:p text:style-name="P42">Chronicle could function structurally with doctrinal practice replaced by generic Sabbat-aesthetic content </text:p>
        </text:list-item>
      </text:list>
      <text:p text:style-name="Text_20_body"><text:span text:style-name="Strong_20_Emphasis">Underlying problem:</text:span> Chronicle has not engaged doctrinal Sabbat practice at chronicle-structural register; the practice operates as backdrop rather than as chronicle-shaping infrastructure.</text:p>
      <text:p text:style-name="Text_20_body"><text:soft-page-break/><text:span text:style-name="Strong_20_Emphasis">Corrective adjustment:</text:span></text:p>
      <text:list text:style-name="L21">
        <text:list-item>
          <text:p text:style-name="P45">Bring forward at least one major ritae as chronicle-central scene (Festivo dello Estinto, Fire Dance, Wild Hunt, or Palla Grande) </text:p>
        </text:list-item>
        <text:list-item>
          <text:p text:style-name="P45">Engage Vaulderie as recurring chronicle-development infrastructure across multiple sessions with attention to ritual depth and pack-binding accumulation </text:p>
        </text:list-item>
        <text:list-item>
          <text:p text:style-name="P45">Introduce specific doctrinal Sabbat plot-threads (Templar Cruz-Molina's archive research, Templar Abernathy's ecclesiastical practice questions, doctrinal-political coordination with Cardinal Reyna network) </text:p>
        </text:list-item>
        <text:list-item>
          <text:p text:style-name="P44">Apply liturgical-calendar alignment retrospectively to chronicle-arc pacing if calendar position has not been previously engaged </text:p>
        </text:list-item>
      </text:list>
      <text:h text:style-name="Heading_20_3" text:outline-level="3"><text:span text:style-name="Strong_20_Emphasis">Failure Mode 5: Cross-Supernatural-Edge Underdevelopment</text:span></text:h>
      <text:p text:style-name="Text_20_body"><text:span text:style-name="Strong_20_Emphasis">Diagnostic indicators:</text:span></text:p>
      <text:list text:style-name="L22">
        <text:list-item>
          <text:p text:style-name="P47">Brisbane chronicle scenes engage Glass Walker counter-surveillance, Cress Truce exclusion, and continental cross-supernatural-edge register at insufficient frequency or depth </text:p>
        </text:list-item>
        <text:list-item>
          <text:p text:style-name="P47">{{user}} characters do not encounter cross-supernatural diplomatic-impossibility implications </text:p>
        </text:list-item>
        <text:list-item>
          <text:p text:style-name="P47">Bracken Covenant pack operations and bushland-fringe Garou-borderlands chronicle threads absent from chronicle development </text:p>
        </text:list-item>
        <text:list-item>
          <text:p text:style-name="P46">2026 Glass Walker operation timeline produces insufficient chronicle-narrative engagement </text:p>
        </text:list-item>
      </text:list>
      <text:p text:style-name="Text_20_body"><text:span text:style-name="Strong_20_Emphasis">Underlying problem:</text:span> Chronicle has underdeveloped Brisbane's continental-edge register, which is one of the chronicle mode's central distinctive features.</text:p>
      <text:p text:style-name="Text_20_body"><text:span text:style-name="Strong_20_Emphasis">Corrective adjustment:</text:span></text:p>
      <text:list text:style-name="L23">
        <text:list-item>
          <text:p text:style-name="P49">Bring forward cross-supernatural-edge plot threads through Bracken Covenant pack operations, Glass-Walker-northern-septs counter-surveillance content, or AFP-TP-coordination-with-Cress-Truce-aware Australian intelligence operations </text:p>
        </text:list-item>
        <text:list-item>
          <text:p text:style-name="P49">Engage 2026 Glass Walker operation timeline if chronicle calendar permits — this produces chronicle-defining cross-supernatural-edge engagement </text:p>
        </text:list-item>
        <text:list-item>
          <text:p text:style-name="P49">Introduce occasional cross-domain chronicle threads connecting Brisbane operations with Sydney (Sarrasine-Bishop-Callista correspondence) or Melbourne (Camarilla-continental-coordination implications) or with Cardinal Reyna's Pacific Northwest network </text:p>
        </text:list-item>
        <text:list-item>
          <text:p text:style-name="P48">Render the Cress Truce exclusion as ongoing chronicle texture rather than as background context — the absence of cross-supernatural diplomatic infrastructure is itself chronicle-significant </text:p>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Brisbane chronicles run via AI prompt configuration require specific guidance beyond standard V:tM AI prompt patterns. This section provides AI-prompt-specific recommendations.</text:p>
      <text:h text:style-name="Heading_20_3" text:outline-level="3"><text:span text:style-name="Strong_20_Emphasis">System Prompt Layering For Brisbane Chronicles</text:span></text:h>
      <text:p text:style-name="Preformatted_20_Text"><text:span text:style-name="Source_20_Text">[BASE LAYER] V:tM core system prompt (standard kit infrastructure)</text:span></text:p>
      <text:p text:style-name="Preformatted_20_Text"><text:span text:style-name="Source_20_Text">[CHRONICLE LAYER] Brisbane chronicle mode prompt (this section)</text:span></text:p>
      <text:p text:style-name="Preformatted_20_Text"><text:span text:style-name="Source_20_Text">[CHARACTER LAYER] {{user}} character configuration</text:span></text:p>
      <text:p text:style-name="P2"><text:span text:style-name="Source_20_Text">[SESSION LAYER] Specific session parameters</text:span></text:p>
      <text:h text:style-name="Heading_20_3" text:outline-level="3"><text:span text:style-name="Strong_20_Emphasis">Brisbane Chronicle Mode Prompt Components</text:span></text:h>
      <text:p text:style-name="Text_20_body">The Brisbane chronicle mode prompt should include explicit configuration for the following parameters:</text:p>
      <text:p text:style-name="Text_20_body"><text:span text:style-name="Strong_20_Emphasis">1. Chronicle mode register affirmation:</text:span></text:p>
      <text:p text:style-name="Preformatted_20_Text"><text:span text:style-name="Source_20_Text">This chronicle operates in Brisbane-mode register: doctrinal Sabbat </text:span></text:p>
      <text:p text:style-name="Preformatted_20_Text"><text:span text:style-name="Source_20_Text">practice as ambient infrastructure, Cleaver-feeding as routine </text:span></text:p>
      <text:p text:style-name="Preformatted_20_Text"><text:span text:style-name="Source_20_Text">operational texture, institutional-fatigue as chronicle-structural </text:span></text:p>
      <text:p text:style-name="Preformatted_20_Text"><text:span text:style-name="Source_20_Text">pressure, survival-accumulation pacing without climactic-resolution </text:span></text:p>
      <text:p text:style-name="Preformatted_20_Text"><text:span text:style-name="Source_20_Text">expectations, cross-supernatural-edge register at the continental </text:span></text:p>
      <text:p text:style-name="P2"><text:span text:style-name="Source_20_Text">edge of cross-supernatural diplomatic possibility.</text:span></text:p>
      <text:p text:style-name="Text_20_body"><text:span text:style-name="Strong_20_Emphasis">2. Doctrinal Sabbat practice handling:</text:span></text:p>
      <text:p text:style-name="Preformatted_20_Text"><text:span text:style-name="Source_20_Text">Render doctrinal Sabbat practice (Vaulderie, Shovelhead, major </text:span></text:p>
      <text:p text:style-name="Preformatted_20_Text"><text:span text:style-name="Source_20_Text">ritae, ecclesiastical hierarchy) as theologically-real institutional </text:span></text:p>
      <text:p text:style-name="Preformatted_20_Text"><text:span text:style-name="Source_20_Text">infrastructure that Brisbane Sabbat operatives engage with full </text:span></text:p>
      <text:p text:style-name="Preformatted_20_Text"><text:span text:style-name="Source_20_Text">seriousness. Avoid Sabbat-as-aesthetic glorification register, </text:span></text:p>
      <text:p text:style-name="Preformatted_20_Text"><text:span text:style-name="Source_20_Text">Sabbat-as-monster moralism register, and doctrinal-practice </text:span></text:p>
      <text:p text:style-name="Preformatted_20_Text"><text:span text:style-name="Source_20_Text">sanitisation register. Engage Sabbat ideology as coherent theological </text:span></text:p>
      <text:p text:style-name="P2"><text:span text:style-name="Source_20_Text">framework with internal complexity.</text:span></text:p>
      <text:p text:style-name="Text_20_body"><text:span text:style-name="Strong_20_Emphasis">3. Cleaver-feeding handling:</text:span></text:p>
      <text:p text:style-name="Preformatted_20_Text"><text:span text:style-name="Source_20_Text">Render Cleaver-feeding within Brisbane Sabbat institutional </text:span></text:p>
      <text:p text:style-name="Preformatted_20_Text"><text:span text:style-name="Source_20_Text">frameworks (weekend Fortitude Valley operations, two operations per </text:span></text:p>
      <text:p text:style-name="Preformatted_20_Text"><text:span text:style-name="Source_20_Text">pack per month, Brisbane River disposal protocols, AFP-TP-detection </text:span></text:p>
      <text:p text:style-name="Preformatted_20_Text"><text:span text:style-name="Source_20_Text">monitoring). Avoid horror-pornographic spectacle register, </text:span></text:p>
      <text:p text:style-name="Preformatted_20_Text"><text:span text:style-name="Source_20_Text">glorification register, moralism register, and sanitisation register. </text:span></text:p>
      <text:p text:style-name="Preformatted_20_Text"><text:span text:style-name="Source_20_Text">Engage operational specificity within institutional-normalised </text:span></text:p>
      <text:p text:style-name="Preformatted_20_Text"><text:span text:style-name="Source_20_Text">character. Pace scene-frequency between scene-ambient (most frequent), </text:span></text:p>
      <text:p text:style-name="P2"><text:span text:style-name="Source_20_Text">scene-opening, and scene-central handling (used sparingly).</text:span></text:p>
      <text:p text:style-name="Text_20_body"><text:span text:style-name="Strong_20_Emphasis">4. Survival-accumulation pacing:</text:span></text:p>
      <text:p text:style-name="Preformatted_20_Text"><text:span text:style-name="Source_20_Text">Pace chronicle through accumulating tension as ambient register, </text:span></text:p>
      <text:p text:style-name="Preformatted_20_Text"><text:span text:style-name="Source_20_Text">with episodic operational peaks during specific chronicle events </text:span></text:p>
      <text:p text:style-name="Preformatted_20_Text"><text:span text:style-name="Source_20_Text">(major ritae, the 2026 Glass Walker operation, Cleaver-feeding </text:span></text:p>
      <text:p text:style-name="Preformatted_20_Text"><text:span text:style-name="Source_20_Text">intensification, AFP-TP operational pressure). Avoid </text:span></text:p>
      <text:p text:style-name="Preformatted_20_Text"><text:span text:style-name="Source_20_Text">climactic-resolution arc-structure expectations. Build sustained </text:span></text:p>
      <text:p text:style-name="Preformatted_20_Text"><text:span text:style-name="Source_20_Text">continuing-pressure register with periodic scene-density variation </text:span></text:p>
      <text:p text:style-name="Preformatted_20_Text"><text:span text:style-name="Source_20_Text">through character-development / personal scenes (10-15% of total </text:span></text:p>
      <text:p text:style-name="P2"><text:span text:style-name="Source_20_Text">chronicle scenes minimum).</text:span></text:p>
      <text:p text:style-name="Text_20_body"><text:span text:style-name="Strong_20_Emphasis">5. {{user}} character ethical-character pressure handling:</text:span></text:p>
      <text:p text:style-name="Preformatted_20_Text"><text:span text:style-name="Source_20_Text">Engage {{user}} character development trajectory with explicit </text:span></text:p>
      <text:p text:style-name="Preformatted_20_Text"><text:span text:style-name="Source_20_Text">ethical-character pressure infrastructure: Humanity-degradation </text:span></text:p>
      <text:p text:style-name="Preformatted_20_Text"><text:soft-page-break/><text:span text:style-name="Source_20_Text">accumulation through Cleaver-feeding participation, doctrinal-commitment </text:span></text:p>
      <text:p text:style-name="Preformatted_20_Text"><text:span text:style-name="Source_20_Text">complexity through Vaulderie binding effects, institutional-integration </text:span></text:p>
      <text:p text:style-name="Preformatted_20_Text"><text:span text:style-name="Source_20_Text">cost through pack-development, and continuing-cover-maintenance </text:span></text:p>
      <text:p text:style-name="Preformatted_20_Text"><text:span text:style-name="Source_20_Text">complications for cover-infiltrator characters. Render these effects </text:span></text:p>
      <text:p text:style-name="Preformatted_20_Text"><text:span text:style-name="Source_20_Text">as character-development infrastructure rather than as chronicle-narrative </text:span></text:p>
      <text:p text:style-name="P2"><text:span text:style-name="Source_20_Text">moral-failure consequences.</text:span></text:p>
      <text:p text:style-name="Text_20_body"><text:span text:style-name="Strong_20_Emphasis">6. Cross-supernatural-edge register:</text:span></text:p>
      <text:p text:style-name="Preformatted_20_Text"><text:span text:style-name="Source_20_Text">Render Brisbane's continental-edge register through ongoing </text:span></text:p>
      <text:p text:style-name="Preformatted_20_Text"><text:span text:style-name="Source_20_Text">cross-supernatural-edge texture: Glass Walker northern-septs </text:span></text:p>
      <text:p text:style-name="Preformatted_20_Text"><text:span text:style-name="Source_20_Text">counter-surveillance presence, Cress Truce exclusion implications, </text:span></text:p>
      <text:p text:style-name="Preformatted_20_Text"><text:span text:style-name="Source_20_Text">Bracken Covenant pack bushland-fringe operations, AFP-TP-Australian-cross-supernatural-aware </text:span></text:p>
      <text:p text:style-name="Preformatted_20_Text"><text:span text:style-name="Source_20_Text">intelligence operations. Engage the 2026 Glass Walker operation </text:span></text:p>
      <text:p text:style-name="Preformatted_20_Text"><text:span text:style-name="Source_20_Text">timeline as chronicle-pacing infrastructure if chronicle calendar </text:span></text:p>
      <text:p text:style-name="P2"><text:span text:style-name="Source_20_Text">permits.</text:span></text:p>
      <text:p text:style-name="Text_20_body"><text:span text:style-name="Strong_20_Emphasis">7. Safety toolkit integration:</text:span></text:p>
      <text:p text:style-name="Preformatted_20_Text"><text:span text:style-name="Source_20_Text">Maintain continuing chronicle-active consent infrastructure for </text:span></text:p>
      <text:p text:style-name="Preformatted_20_Text"><text:span text:style-name="Source_20_Text">Cleaver-feeding scenes and Shovelhead operation scenes. Permit </text:span></text:p>
      <text:p text:style-name="Preformatted_20_Text"><text:span text:style-name="Source_20_Text">player-side scene redirection through standard safety-toolkit </text:span></text:p>
      <text:p text:style-name="Preformatted_20_Text"><text:span text:style-name="Source_20_Text">invocation without chronicle-narrative consequences. Render Cleaver-feeding </text:span></text:p>
      <text:p text:style-name="Preformatted_20_Text"><text:span text:style-name="Source_20_Text">content with operational specificity but without horror-pornographic </text:span></text:p>
      <text:p text:style-name="Preformatted_20_Text"><text:span text:style-name="Source_20_Text">spectacle. Render Shovelhead operation content with appropriate weight </text:span></text:p>
      <text:p text:style-name="P2"><text:span text:style-name="Source_20_Text">but with explicit player-consent infrastructure for engagement depth.</text:span></text:p>
      <text:h text:style-name="Heading_20_3" text:outline-level="3"><text:span text:style-name="Strong_20_Emphasis">AI Prompt Pattern Recognition For Common Failure Modes</text:span></text:h>
      <text:p text:style-name="Text_20_body">AI prompts running Brisbane chronicles should include explicit pattern-recognition guidance for the failure modes documented in Part 5:</text:p>
      <text:p text:style-name="Text_20_body"><text:span text:style-name="Strong_20_Emphasis">Sabbat-as-Aesthetic recognition pattern:</text:span></text:p>
      <text:p text:style-name="Preformatted_20_Text"><text:span text:style-name="Source_20_Text">If chronicle pattern develops toward Cleaver-feeding rendered as </text:span></text:p>
      <text:p text:style-name="Preformatted_20_Text"><text:span text:style-name="Source_20_Text">positive aesthetic content without ethical-character complication, </text:span></text:p>
      <text:p text:style-name="Preformatted_20_Text"><text:span text:style-name="Source_20_Text">or doctrinal Sabbat practice rendered as exotic-spectacle without </text:span></text:p>
      <text:p text:style-name="Preformatted_20_Text"><text:span text:style-name="Source_20_Text">theological seriousness, or {{user}} character development without </text:span></text:p>
      <text:p text:style-name="Preformatted_20_Text"><text:span text:style-name="Source_20_Text">ongoing institutional-fatigue engagement: apply corrective adjustment </text:span></text:p>
      <text:p text:style-name="Preformatted_20_Text"><text:span text:style-name="Source_20_Text">through increased institutional-fatigue scene-density, reduced </text:span></text:p>
      <text:p text:style-name="Preformatted_20_Text"><text:span text:style-name="Source_20_Text">Cleaver-feeding scene-frequency for 3-4 subsequent sessions, and </text:span></text:p>
      <text:p text:style-name="Preformatted_20_Text"><text:span text:style-name="Source_20_Text">explicit ethical-character pressure surfacing in {{user}} character </text:span></text:p>
      <text:p text:style-name="P2"><text:span text:style-name="Source_20_Text">scenes.</text:span></text:p>
      <text:p text:style-name="Text_20_body"><text:span text:style-name="Strong_20_Emphasis">Sabbat-as-Monster recognition pattern:</text:span></text:p>
      <text:p text:style-name="Preformatted_20_Text"><text:span text:style-name="Source_20_Text">If chronicle pattern develops toward Brisbane Sabbat operatives </text:span></text:p>
      <text:p text:style-name="Preformatted_20_Text"><text:span text:style-name="Source_20_Text">rendered as chronicle-narrative villains rather than institutional </text:span></text:p>
      <text:p text:style-name="Preformatted_20_Text"><text:span text:style-name="Source_20_Text">infrastructure, or {{user}} character disposition consistently </text:span></text:p>
      <text:p text:style-name="Preformatted_20_Text"><text:span text:style-name="Source_20_Text">morally-superior to Brisbane Sabbat doctrinal commitments: apply </text:span></text:p>
      <text:p text:style-name="Preformatted_20_Text"><text:span text:style-name="Source_20_Text">corrective adjustment through increased institutional-Sabbat-coherence </text:span></text:p>
      <text:p text:style-name="Preformatted_20_Text"><text:span text:style-name="Source_20_Text">scene-density, explicit institutional-integration character </text:span></text:p>
      <text:p text:style-name="Preformatted_20_Text"><text:span text:style-name="Source_20_Text">development trajectory, and Brisbane Sabbat senior operative rendering </text:span></text:p>
      <text:p text:style-name="P2"><text:span text:style-name="Source_20_Text">with internal contradictions rather than narrative-villain register.</text:span></text:p>
      <text:p text:style-name="Text_20_body"><text:span text:style-name="Strong_20_Emphasis">Survival-Tension Exhaustion recognition pattern:</text:span></text:p>
      <text:p text:style-name="Preformatted_20_Text"><text:span text:style-name="Source_20_Text">If chronicle pattern develops toward continuing-tension scenes </text:span></text:p>
      <text:p text:style-name="Preformatted_20_Text"><text:span text:style-name="Source_20_Text">without scene-rhythm variation, or {{user}} character operational-fatigue </text:span></text:p>
      <text:p text:style-name="Preformatted_20_Text"><text:span text:style-name="Source_20_Text">producing reduced chronicle engagement: apply corrective adjustment </text:span></text:p>
      <text:p text:style-name="Preformatted_20_Text"><text:soft-page-break/><text:span text:style-name="Source_20_Text">through episodic-operational-peak structure, increased </text:span></text:p>
      <text:p text:style-name="Preformatted_20_Text"><text:span text:style-name="Source_20_Text">character-development / personal scene density, deeper Vaulderie / </text:span></text:p>
      <text:p text:style-name="Preformatted_20_Text"><text:span text:style-name="Source_20_Text">pack-binding scene engagement, and chronicle-state-stability scene </text:span></text:p>
      <text:p text:style-name="P2"><text:span text:style-name="Source_20_Text">introduction.</text:span></text:p>
      <text:p text:style-name="Text_20_body"><text:span text:style-name="Strong_20_Emphasis">Doctrinal-Practice Disengagement recognition pattern:</text:span></text:p>
      <text:p text:style-name="Preformatted_20_Text"><text:span text:style-name="Source_20_Text">If chronicle pattern develops toward doctrinal practice as scene-ambient </text:span></text:p>
      <text:p text:style-name="Preformatted_20_Text"><text:span text:style-name="Source_20_Text">backdrop without chronicle-structural engagement, or liturgical </text:span></text:p>
      <text:p text:style-name="Preformatted_20_Text"><text:span text:style-name="Source_20_Text">calendar alignment absent from chronicle pacing: apply corrective </text:span></text:p>
      <text:p text:style-name="Preformatted_20_Text"><text:span text:style-name="Source_20_Text">adjustment through major ritae as chronicle-central scene, recurring </text:span></text:p>
      <text:p text:style-name="Preformatted_20_Text"><text:span text:style-name="Source_20_Text">Vaulderie chronicle-development infrastructure, doctrinal-political </text:span></text:p>
      <text:p text:style-name="Preformatted_20_Text"><text:span text:style-name="Source_20_Text">plot threads, and retrospective liturgical-calendar alignment if </text:span></text:p>
      <text:p text:style-name="P2"><text:span text:style-name="Source_20_Text">applicable.</text:span></text:p>
      <text:p text:style-name="Text_20_body"><text:span text:style-name="Strong_20_Emphasis">Cross-Supernatural-Edge Underdevelopment recognition pattern:</text:span></text:p>
      <text:p text:style-name="Preformatted_20_Text"><text:span text:style-name="Source_20_Text">If chronicle pattern develops without continental-edge register </text:span></text:p>
      <text:p text:style-name="Preformatted_20_Text"><text:span text:style-name="Source_20_Text">engagement, without Glass Walker counter-surveillance or Cress Truce </text:span></text:p>
      <text:p text:style-name="Preformatted_20_Text"><text:span text:style-name="Source_20_Text">exclusion implications, or with absent 2026 Glass Walker operation </text:span></text:p>
      <text:p text:style-name="Preformatted_20_Text"><text:span text:style-name="Source_20_Text">timeline engagement: apply corrective adjustment through </text:span></text:p>
      <text:p text:style-name="Preformatted_20_Text"><text:span text:style-name="Source_20_Text">cross-supernatural-edge plot thread introduction, 2026 operation </text:span></text:p>
      <text:p text:style-name="Preformatted_20_Text"><text:span text:style-name="Source_20_Text">timeline engagement, cross-domain chronicle threads, and Cress Truce </text:span></text:p>
      <text:p text:style-name="P2"><text:span text:style-name="Source_20_Text">exclusion as ongoing chronicle texture.</text:span></text:p>
      <text:h text:style-name="Heading_20_3" text:outline-level="3"><text:span text:style-name="Strong_20_Emphasis">AI-Specific Tonal Calibration</text:span></text:h>
      <text:p text:style-name="Text_20_body">AI prompts running Brisbane chronicles should include explicit tonal calibration guidance:</text:p>
      <text:p text:style-name="Preformatted_20_Text"><text:span text:style-name="Source_20_Text">Maintain tonal register that holds competing elements simultaneously:</text:span></text:p>
      <text:p text:style-name="Preformatted_20_Text"><text:span text:style-name="Source_20_Text">- Theological commitment (Sabbat doctrine engaged seriously)</text:span></text:p>
      <text:p text:style-name="Preformatted_20_Text"><text:span text:style-name="Source_20_Text">- Routine violence (Cleaver-feeding as institutional texture)</text:span></text:p>
      <text:p text:style-name="Preformatted_20_Text"><text:span text:style-name="Source_20_Text">- Institutional fatigue (Sabbat global diminishment as ambient pressure)</text:span></text:p>
      <text:p text:style-name="Preformatted_20_Text"><text:span text:style-name="Source_20_Text">- Personal-character ethical pressure ({{user}} character development </text:span></text:p>
      <text:p text:style-name="Preformatted_20_Text"><text:span text:style-name="Source_20_Text"><text:s text:c="2"/>through accumulating ethical-character complications)</text:span></text:p>
      <text:p text:style-name="Preformatted_20_Text"><text:span text:style-name="Source_20_Text">- Cross-supernatural-edge tension (continental edge of cross-supernatural </text:span></text:p>
      <text:p text:style-name="Preformatted_20_Text"><text:span text:style-name="Source_20_Text"><text:s text:c="2"/>diplomatic possibility)</text:span></text:p>
      <text:p text:style-name="Preformatted_20_Text"/>
      <text:p text:style-name="Preformatted_20_Text"><text:span text:style-name="Source_20_Text">Avoid tonal collapse into:</text:span></text:p>
      <text:p text:style-name="Preformatted_20_Text"><text:span text:style-name="Source_20_Text">- Sabbat-as-cool aesthetic register</text:span></text:p>
      <text:p text:style-name="Preformatted_20_Text"><text:span text:style-name="Source_20_Text">- Sabbat-as-monster-of-the-week register</text:span></text:p>
      <text:p text:style-name="Preformatted_20_Text"><text:span text:style-name="Source_20_Text">- Horror-pornographic spectacle register</text:span></text:p>
      <text:p text:style-name="Preformatted_20_Text"><text:span text:style-name="Source_20_Text">- Sanitisation register</text:span></text:p>
      <text:p text:style-name="Preformatted_20_Text"><text:span text:style-name="Source_20_Text">- Camarilla-frame moralism register</text:span></text:p>
      <text:p text:style-name="Preformatted_20_Text"/>
      <text:p text:style-name="Preformatted_20_Text"><text:span text:style-name="Source_20_Text">Default to tonal handling that produces uncomfortable but appropriate </text:span></text:p>
      <text:p text:style-name="Preformatted_20_Text"><text:span text:style-name="Source_20_Text">chronicle-mode engagement. Brisbane chronicles should feel difficult; </text:span></text:p>
      <text:p text:style-name="Preformatted_20_Text"><text:span text:style-name="Source_20_Text">the difficulty is appropriate to the chronicle mode rather than tonal </text:span></text:p>
      <text:p text:style-name="P2"><text:span text:style-name="Source_20_Text">failure.</text:span></text:p>
      <text:h text:style-name="Heading_20_3" text:outline-level="3"><text:span text:style-name="Strong_20_Emphasis">Prompt Iteration Recommendation</text:span></text:h>
      <text:p text:style-name="Text_20_body">Brisbane chronicle AI prompts benefit from specific iteration patterns:</text:p>
      <text:p text:style-name="Text_20_body"><text:span text:style-name="Strong_20_Emphasis">Initial prompt deployment:</text:span> Deploy chronicle mode prompt with full configuration. Run 2-3 chronicle sessions to identify chronicle-mode register stability.</text:p>
      <text:p text:style-name="Text_20_body"><text:span text:style-name="Strong_20_Emphasis">First iteration adjustment:</text:span> After 2-3 sessions, evaluate failure-mode pattern emergence. Apply corrective adjustments through prompt updates if specific failure modes appear in chronicle-mode register drift.</text:p>
      <text:p text:style-name="Text_20_body"><text:soft-page-break/><text:span text:style-name="Strong_20_Emphasis">Sustained chronicle iteration:</text:span> Across continuing chronicle sessions, monitor chronicle-mode register coherence and apply prompt adjustments as needed. Brisbane chronicle mode is the kit's most demanding chronicle mode for AI prompt configuration; iteration support is operationally normativ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The Sabbat-Survivor Chronicle Prep Guide integrates with existing kit modules. Specific cross-references:</text:p>
      <text:h text:style-name="P1" text:outline-level="3"><text:span text:style-name="Strong_20_Emphasis">Brisbane Supplement (</text:span><text:span text:style-name="Strong_20_Emphasis"><text:span text:style-name="Source_20_Text"><text:span text:style-name="T1">vtm_brisbane_by_night.json</text:span></text:span></text:span><text:span text:style-name="Strong_20_Emphasis">)</text:span></text:h>
      <text:p text:style-name="Text_20_body">The Brisbane lorebook supplement provides the chronicle-specific infrastructure this prep guide engages. Use the prep guide alongside the Brisbane supplement for Brisbane chronicle design; the supplement provides setting infrastructure and the prep guide provides chronicle-mode handling guidance.</text:p>
      <text:p text:style-name="Text_20_body"><text:span text:style-name="Strong_20_Emphasis">Specific integration points:</text:span></text:p>
      <text:list text:style-name="L24">
        <text:list-item>
          <text:p text:style-name="P51">Brisbane supplement entry 12 (Sabbat ritae and liturgical practice) → Prep guide Part 2 (doctrinal Sabbat practice handling) </text:p>
        </text:list-item>
        <text:list-item>
          <text:p text:style-name="P51">Brisbane supplement entry 13 (Sabbat-survivor chronicle register) → Prep guide Part 1 (what makes Sabbat-survivor chronicles different) </text:p>
        </text:list-item>
        <text:list-item>
          <text:p text:style-name="P51">Brisbane supplement entry 6 (Fortitude Valley feeding patterns) → Prep guide Part 3 (Cleaver-feeding ethical-character pressure management) </text:p>
        </text:list-item>
        <text:list-item>
          <text:p text:style-name="P51">Brisbane supplement entries 4 and 5 (the ten packs and the chantry) → Prep guide Part 4 (survivor chronicle pacing patterns, scene-density patterns) </text:p>
        </text:list-item>
        <text:list-item>
          <text:p text:style-name="P50">Brisbane supplement chronicle hooks (Shovelhead Initiate, Cross-Domain Cover, Templar's Apprentice, Glass Walker Operation, Sabbat Dissident, Custodian's Crisis) → Prep guide Part 4 (character development trajectory patterns) </text:p>
        </text:list-item>
      </text:list>
      <text:h text:style-name="Heading_20_3" text:outline-level="3"><text:span text:style-name="Strong_20_Emphasis">Australian Antagonist Pack</text:span></text:h>
      <text:p text:style-name="Text_20_body">The Australian Antagonist Pack provides the senior Brisbane Sabbat figures the prep guide engages.</text:p>
      <text:p text:style-name="Text_20_body"><text:span text:style-name="Strong_20_Emphasis">Specific integration points:</text:span></text:p>
      <text:list text:style-name="L25">
        <text:list-item>
          <text:p text:style-name="P53">Antagonist Pack Section 2 (Bishop Callista Vox) → Prep guide Part 1 (institutional fatigue chronicle-structural pressure) and Part 4 (Custodian-Crisis trajectory) </text:p>
        </text:list-item>
        <text:list-item>
          <text:p text:style-name="P53">Antagonist Pack Section 9 (The Last Days of Brisbane pack) → Prep guide Part 4 (the 2026 Glass Walker operation as pacing infrastructure) </text:p>
        </text:list-item>
        <text:list-item>
          <text:p text:style-name="P52">Antagonist Pack Section 3 (Hardacre AFP-TP) → Prep guide Part 1 (Cross-Supernatural Exclusion Axis) and Part 5 (Cross-Supernatural-Edge Underdevelopment failure mode) </text:p>
        </text:list-item>
      </text:list>
      <text:h text:style-name="P1" text:outline-level="3"><text:span text:style-name="Strong_20_Emphasis">Garou Diplomatic Supplement (</text:span><text:span text:style-name="Strong_20_Emphasis"><text:span text:style-name="Source_20_Text"><text:span text:style-name="T1">vtm_garou_diplomatic.json</text:span></text:span></text:span><text:span text:style-name="Strong_20_Emphasis">)</text:span></text:h>
      <text:p text:style-name="Text_20_body">The Garou Diplomatic Supplement provides cross-supernatural infrastructure that Brisbane chronicles engage at the continental edge.</text:p>
      <text:p text:style-name="Text_20_body"><text:span text:style-name="Strong_20_Emphasis">Specific integration points:</text:span></text:p>
      <text:list text:style-name="L26">
        <text:list-item>
          <text:p text:style-name="P55">Garou supplement Cress Truce protocols → Prep guide Part 1 (Cross-Supernatural Exclusion Axis: how Brisbane operates outside the protocols) </text:p>
        </text:list-item>
        <text:list-item>
          <text:p text:style-name="P55">Garou supplement Razor Wars history → Prep guide Part 4 (chronicle-historical context for 2026 operation pacing) </text:p>
        </text:list-item>
        <text:list-item>
          <text:p text:style-name="P54">Garou supplement Bracken Covenant pack engagement → Prep guide Part 2 (Fire Dance handling) and Part 5 (Cross-Supernatural-Edge Underdevelopment corrective adjustments) </text:p>
        </text:list-item>
      </text:list>
      <text:h text:style-name="P1" text:outline-level="3"><text:soft-page-break/><text:span text:style-name="Strong_20_Emphasis">Sydney Supplement (</text:span><text:span text:style-name="Strong_20_Emphasis"><text:span text:style-name="Source_20_Text"><text:span text:style-name="T1">vtm_sydney_by_night.json</text:span></text:span></text:span><text:span text:style-name="Strong_20_Emphasis">)</text:span></text:h>
      <text:p text:style-name="Text_20_body">The Sydney supplement provides cross-domain chronicle infrastructure for Brisbane chronicles engaging Sarrasine-Bishop-Callista correspondence.</text:p>
      <text:p text:style-name="Text_20_body"><text:span text:style-name="Strong_20_Emphasis">Specific integration points:</text:span></text:p>
      <text:list text:style-name="L27">
        <text:list-item>
          <text:p text:style-name="P57">Sydney supplement entry 14 (Sarrasine threats including Brisbane Sabbat) → Prep guide Part 4 (cross-domain chronicle threads) </text:p>
        </text:list-item>
        <text:list-item>
          <text:p text:style-name="P56">Sydney supplement Sarrasine-rebuffed-Brisbane-incursions history → Prep guide Part 4 (the 2026 operation context within continental Sabbat institutional positioning) </text:p>
        </text:list-item>
      </text:list>
      <text:h text:style-name="P1" text:outline-level="3"><text:span text:style-name="Strong_20_Emphasis">Melbourne Supplement (</text:span><text:span text:style-name="Strong_20_Emphasis"><text:span text:style-name="Source_20_Text"><text:span text:style-name="T1">vtm_melbourne_by_night.json</text:span></text:span></text:span><text:span text:style-name="Strong_20_Emphasis">)</text:span></text:h>
      <text:p text:style-name="Text_20_body">The Melbourne supplement provides Camarilla-continental-coordination infrastructure for Brisbane chronicles engaging Cross-Domain Cover trajectory.</text:p>
      <text:p text:style-name="Text_20_body"><text:span text:style-name="Strong_20_Emphasis">Specific integration points:</text:span></text:p>
      <text:list text:style-name="L28">
        <text:list-item>
          <text:p text:style-name="P59">Melbourne supplement Toorak Circle (Camarilla institutional infrastructure) → Prep guide Part 4 (Cover-Maintenance Erosion trajectory) </text:p>
        </text:list-item>
        <text:list-item>
          <text:p text:style-name="P59">Melbourne supplement Lytton-Octavia continental coordination → Prep guide cross-domain chronicle threads </text:p>
        </text:list-item>
        <text:list-item>
          <text:p text:style-name="P58">Melbourne supplement Sister Fatima Salih-El (Sheriff) → Prep guide cross-domain Camarilla-Brisbane operations </text:p>
        </text:list-item>
      </text:list>
      <text:h text:style-name="P1" text:outline-level="3"><text:span text:style-name="Strong_20_Emphasis">Adelaide Supplement (</text:span><text:span text:style-name="Strong_20_Emphasis"><text:span text:style-name="Source_20_Text"><text:span text:style-name="T1">vtm_adelaide_by_night.json</text:span></text:span></text:span><text:span text:style-name="Strong_20_Emphasis">)</text:span></text:h>
      <text:p text:style-name="Text_20_body">The Adelaide supplement extends Camarilla continental-coordination infrastructure to the second Camarilla domain.</text:p>
      <text:p text:style-name="Text_20_body"><text:span text:style-name="Strong_20_Emphasis">Specific integration points:</text:span></text:p>
      <text:list text:style-name="L29">
        <text:list-item>
          <text:p text:style-name="P61">Adelaide supplement entry 12 (external pressures including Brisbane Sabbat) → Prep guide Part 4 (cross-domain chronicle threads) </text:p>
        </text:list-item>
        <text:list-item>
          <text:p text:style-name="P60">Adelaide supplement Lytton-Octavia continental coordination → Prep guide Cross-Domain Cover trajectory infrastructure </text:p>
        </text:list-item>
      </text:list>
      <text:h text:style-name="Heading_20_3" text:outline-level="3"><text:span text:style-name="Strong_20_Emphasis">Safety Toolkit</text:span></text:h>
      <text:p text:style-name="Text_20_body">The Safety Toolkit provides player-protection infrastructure that Brisbane chronicles engage at elevated importance.</text:p>
      <text:p text:style-name="Text_20_body"><text:span text:style-name="Strong_20_Emphasis">Specific integration points:</text:span></text:p>
      <text:list text:style-name="L30">
        <text:list-item>
          <text:p text:style-name="P63">Safety Toolkit consent protocols → Prep guide Part 3 (Cleaver-feeding player safety considerations) </text:p>
        </text:list-item>
        <text:list-item>
          <text:p text:style-name="P63">Safety Toolkit content-filtering → Prep guide Part 2 (Shovelhead handling player safety) </text:p>
        </text:list-item>
        <text:list-item>
          <text:p text:style-name="P62">Safety Toolkit out-of-character debriefing → Prep guide Part 3 (cross-player-disposition handling) </text:p>
        </text:list-item>
      </text:list>
      <text:p text:style-name="Preformatted_20_Text"/>
      <text:p text:style-name="Preformatted_20_Text"/>
      <text:p text:style-name="Preformatted_20_Text"/>
      <text:p text:style-name="Preformatted_20_Text"><text:soft-page-break/><text:span text:style-name="Strong_20_Emphasis">The Sabbat-Survivor Chronicle Prep Guide is complete.</text:span> A seven-part meta-document for designing and running Brisbane-mode V:tM chronicles, covering: what makes Sabbat-survivor chronicles different (five structural axes — survival vs. navigation, doctrinal practice as ambient register, routine violence as operational texture, institutional fatigue as chronicle-structural pressure, cross-supernatural exclusion as continental edge); doctrinal Sabbat practice handling (Vaulderie, Shovelhead Embraces, the four major seasonal ritae, Sabbat doctrinal ideology — with tonal handling guidance and chronicle structural elements for each); Cleaver-feeding ethical-character pressure management (institutional framework, why Cleaver-feeding is different from other V:tM violence, Humanity calibration, scene handling guidelines, player safety considerations, cross-player-disposition handling); survivor chronicle pacing patterns (arc structure, scene-density patterns, liturgical calendar as pacing infrastructure, the 2026 operation as pacing infrastructure, character development trajectory patterns, multi-session chronicle length calibration); five common Brisbane chronicle failure modes with diagnostic indicators and corrective adjustments; AI prompt configuration guidance with explicit chronicle mode prompt components and pattern recognition for failure modes; cross-references with existing kit modu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8:57:42.005831559</dc:date>
    <meta:editing-duration>PT4M10S</meta:editing-duration>
    <meta:editing-cycles>1</meta:editing-cycles>
    <meta:document-statistic meta:table-count="0" meta:image-count="0" meta:object-count="0" meta:page-count="25" meta:paragraph-count="413" meta:word-count="7083" meta:character-count="63251" meta:non-whitespace-character-count="56430"/>
    <meta:generator>LibreOffice/24.2.7.2$Linux_X86_64 LibreOffice_project/420$Build-2</meta:generator>
  </office:meta>
</office:document-meta>
</file>