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265cm" table:align="left"/>
    </style:style>
    <style:style style:name="Table1.A" style:family="table-column">
      <style:table-column-properties style:column-width="2.824cm"/>
    </style:style>
    <style:style style:name="Table1.B" style:family="table-column">
      <style:table-column-properties style:column-width="2.75cm"/>
    </style:style>
    <style:style style:name="Table1.C" style:family="table-column">
      <style:table-column-properties style:column-width="2.374cm"/>
    </style:style>
    <style:style style:name="Table1.D" style:family="table-column">
      <style:table-column-properties style:column-width="2.515cm"/>
    </style:style>
    <style:style style:name="Table1.E" style:family="table-column">
      <style:table-column-properties style:column-width="6.80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776cm"/>
    </style:style>
    <style:style style:name="Table2.B" style:family="table-column">
      <style:table-column-properties style:column-width="3.461cm"/>
    </style:style>
    <style:style style:name="Table2.C" style:family="table-column">
      <style:table-column-properties style:column-width="2.817cm"/>
    </style:style>
    <style:style style:name="Table2.D" style:family="table-column">
      <style:table-column-properties style:column-width="1.536cm"/>
    </style:style>
    <style:style style:name="Table2.E" style:family="table-column">
      <style:table-column-properties style:column-width="6.4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454cm"/>
    </style:style>
    <style:style style:name="Table3.B" style:family="table-column">
      <style:table-column-properties style:column-width="3.378cm"/>
    </style:style>
    <style:style style:name="Table3.C" style:family="table-column">
      <style:table-column-properties style:column-width="4.323cm"/>
    </style:style>
    <style:style style:name="Table3.D" style:family="table-column">
      <style:table-column-properties style:column-width="6.846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284cm"/>
    </style:style>
    <style:style style:name="Table4.B" style:family="table-column">
      <style:table-column-properties style:column-width="4.713cm"/>
    </style:style>
    <style:style style:name="Table4.C" style:family="table-column">
      <style:table-column-properties style:column-width="8.003cm"/>
    </style:style>
    <style:style style:name="Table4.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Brisbane supplement treating the city as a playable Sabbat domain — distinct in register from Sarrasine's patient Sydney, Lytton's institutional Melbourne, or Red Mag's working-class Footscray. Brisbane is <text:span text:style-name="Strong_20_Emphasis">doctrinal Sabbat operating in continental isolation</text:span> — one of fewer than ten metropolitan Sabbat domains globally, sustained by Bishop Callista Vox's institutional commitment for fifty years, increasingly aware that the global Sabbat infrastructure has effectively expired.</text:p>
      <text:p text:style-name="Text_20_body"><text:span text:style-name="Strong_20_Emphasis">Distinctive features of Brisbane:</text:span></text:p>
      <text:list text:style-name="L1">
        <text:list-item>
          <text:p text:style-name="P3"><text:span text:style-name="Strong_20_Emphasis">The continent's only operational Sabbat metropolitan domain</text:span>, and one of the last globally </text:p>
        </text:list-item>
        <text:list-item>
          <text:p text:style-name="P3"><text:span text:style-name="Strong_20_Emphasis">Doctrinal Sabbat practice fully retained</text:span> — Vaulderie monthly, Shovelhead Embraces quarterly, formal ecclesiastical hierarchy, ritae conducted on traditional liturgical schedule </text:p>
        </text:list-item>
        <text:list-item>
          <text:p text:style-name="P3"><text:span text:style-name="Strong_20_Emphasis">Excluded from the Cress Truce</text:span> — Glass Walker septs do not enter Brisbane, AFP-Twilight-Project operates with significant casualties expected, no cross-supernatural diplomatic infrastructure </text:p>
        </text:list-item>
        <text:list-item>
          <text:p text:style-name="P3"><text:span text:style-name="Strong_20_Emphasis">Material austerity</text:span> — Brisbane Sabbat operates without the wealth that Sydney and Melbourne accumulate, partly by doctrinal preference and partly by operational isolation </text:p>
        </text:list-item>
        <text:list-item>
          <text:p text:style-name="P3"><text:span text:style-name="Strong_20_Emphasis">Survivor chronicle register</text:span> — Brisbane chronicles structurally engage <text:span text:style-name="Emphasis">survival</text:span> rather than <text:span text:style-name="Emphasis">political navigation</text:span>; the question is not "how does my character thrive in this domain" but "how does my character not die this night" </text:p>
        </text:list-item>
        <text:list-item>
          <text:p text:style-name="P2"><text:span text:style-name="Strong_20_Emphasis">Bishop Callista's quiet contradiction</text:span> — fifty years of Brisbane Bishopric have produced doctrinal certainty alongside accumulating awareness that Sabbat-as-institution has effectively ended; chronicle late-arc opportunities engage this contradiction </text:p>
        </text:list-item>
      </text:list>
      <text:p text:style-name="P1">A 16-entry lorebook providing Brisbane's geography, ecclesiastical structure, packs, and operational character. Designed to layer alongside <text:span text:style-name="Source_20_Text"><text:span text:style-name="T1">vtm_modern_nights.json</text:span></text:span> for Sabbat-survivor chronicles or alongside the broader Australian kit for cross-domain operations.</text:p>
      <text:p text:style-name="P1"/>
      <text:p text:style-name="P1">load alongside <text:span text:style-name="Source_20_Text"><text:span text:style-name="T1">vtm_modern_nights.json</text:span></text:span> for Sabbat-survivor chronicles. Optionally layer with <text:span text:style-name="Source_20_Text"><text:span text:style-name="T1">vtm_garou_diplomatic.json</text:span></text:span> for chronicles engaging Glass Walker northern-septs surveillance plot threads, or with <text:span text:style-name="Source_20_Text"><text:span text:style-name="T1">vtm_sydney_by_night.json</text:span></text:span> for cross-domain operations engaging Sarrasine-Bishop-Callista correspond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District</text:p>
            </table:table-cell>
            <table:table-cell table:style-name="Table1.A1" office:value-type="string">
              <text:p text:style-name="Table_20_Heading">Status</text:p>
            </table:table-cell>
            <table:table-cell table:style-name="Table1.A1" office:value-type="string">
              <text:p text:style-name="Table_20_Heading">Authority</text:p>
            </table:table-cell>
            <table:table-cell table:style-name="Table1.A1" office:value-type="string">
              <text:p text:style-name="Table_20_Heading">Pack</text:p>
            </table:table-cell>
            <table:table-cell table:style-name="Table1.A1" office:value-type="string">
              <text:p text:style-name="Table_20_Heading">Key Sites</text:p>
            </table:table-cell>
          </table:table-row>
        </table:table-header-rows>
        <table:table-row>
          <table:table-cell table:style-name="Table1.A1" office:value-type="string">
            <text:p text:style-name="Table_20_Contents"><text:span text:style-name="Strong_20_Emphasis">West End</text:span></text:p>
          </table:table-cell>
          <table:table-cell table:style-name="Table1.A1" office:value-type="string">
            <text:p text:style-name="Table_20_Contents">Sabbat Zone (chantry)</text:p>
          </table:table-cell>
          <table:table-cell table:style-name="Table1.A1" office:value-type="string">
            <text:p text:style-name="Table_20_Contents">Bishop Callista direct</text:p>
          </table:table-cell>
          <table:table-cell table:style-name="Table1.A1" office:value-type="string">
            <text:p text:style-name="Table_20_Contents">Last Days of Brisbane</text:p>
          </table:table-cell>
          <table:table-cell table:style-name="Table1.A1" office:value-type="string">
            <text:p text:style-name="Table_20_Contents">West End chantry (former St Augustine's), Bishop's chamber</text:p>
          </table:table-cell>
        </table:table-row>
        <table:table-row>
          <table:table-cell table:style-name="Table1.A1" office:value-type="string">
            <text:p text:style-name="Table_20_Contents"><text:span text:style-name="Strong_20_Emphasis">Fortitude Valley</text:span></text:p>
          </table:table-cell>
          <table:table-cell table:style-name="Table1.A1" office:value-type="string">
            <text:p text:style-name="Table_20_Contents">Sabbat Zone (feeding)</text:p>
          </table:table-cell>
          <table:table-cell table:style-name="Table1.A1" office:value-type="string">
            <text:p text:style-name="Table_20_Contents">Templar Kazakov supervision</text:p>
          </table:table-cell>
          <table:table-cell table:style-name="Table1.A1" office:value-type="string">
            <text:p text:style-name="Table_20_Contents">Blood Crossing</text:p>
          </table:table-cell>
          <table:table-cell table:style-name="Table1.A1" office:value-type="string">
            <text:p text:style-name="Table_20_Contents">Brunswick Street venues, Empire Hotel, Press Club</text:p>
          </table:table-cell>
        </table:table-row>
        <table:table-row>
          <table:table-cell table:style-name="Table1.A1" office:value-type="string">
            <text:p text:style-name="Table_20_Contents"><text:span text:style-name="Strong_20_Emphasis">South Bank</text:span></text:p>
          </table:table-cell>
          <table:table-cell table:style-name="Table1.A1" office:value-type="string">
            <text:p text:style-name="Table_20_Contents">Sabbat Zone (cultural-cover)</text:p>
          </table:table-cell>
          <table:table-cell table:style-name="Table1.A1" office:value-type="string">
            <text:p text:style-name="Table_20_Contents">Templar Cruz-Molina supervision</text:p>
          </table:table-cell>
          <table:table-cell table:style-name="Table1.A1" office:value-type="string">
            <text:p text:style-name="Table_20_Contents">Burning Shepherds</text:p>
          </table:table-cell>
          <table:table-cell table:style-name="Table1.A1" office:value-type="string">
            <text:p text:style-name="Table_20_Contents">QAG, State Library QLD, QPAC</text:p>
          </table:table-cell>
        </table:table-row>
        <table:table-row>
          <table:table-cell table:style-name="Table1.A1" office:value-type="string">
            <text:p text:style-name="Table_20_Contents"><text:span text:style-name="Strong_20_Emphasis">Brisbane CBD</text:span></text:p>
          </table:table-cell>
          <table:table-cell table:style-name="Table1.A1" office:value-type="string">
            <text:p text:style-name="Table_20_Contents">Sabbat Zone (administrative)</text:p>
          </table:table-cell>
          <table:table-cell table:style-name="Table1.A1" office:value-type="string">
            <text:p text:style-name="Table_20_Contents">Bishop Callista direct</text:p>
          </table:table-cell>
          <table:table-cell table:style-name="Table1.A1" office:value-type="string">
            <text:p text:style-name="Table_20_Contents">Queen Street Rite</text:p>
          </table:table-cell>
          <table:table-cell table:style-name="Table1.A1" office:value-type="string">
            <text:p text:style-name="Table_20_Contents">Brisbane City Hall, GPO, Anzac Square</text:p>
          </table:table-cell>
        </table:table-row>
        <table:table-row>
          <table:table-cell table:style-name="Table1.A1" office:value-type="string">
            <text:p text:style-name="Table_20_Contents"><text:span text:style-name="Strong_20_Emphasis">New Farm / Inner Riverside</text:span></text:p>
          </table:table-cell>
          <table:table-cell table:style-name="Table1.A1" office:value-type="string">
            <text:p text:style-name="Table_20_Contents">Sabbat Zone (cultural)</text:p>
          </table:table-cell>
          <table:table-cell table:style-name="Table1.A1" office:value-type="string">
            <text:p text:style-name="Table_20_Contents">Templar Cruz-Molina supervision</text:p>
          </table:table-cell>
          <table:table-cell table:style-name="Table1.A1" office:value-type="string">
            <text:p text:style-name="Table_20_Contents">New Farm Choir</text:p>
          </table:table-cell>
          <table:table-cell table:style-name="Table1.A1" office:value-type="string">
            <text:p text:style-name="Table_20_Contents">Brisbane Powerhouse, Jan Power's Markets</text:p>
          </table:table-cell>
        </table:table-row>
        <table:table-row>
          <table:table-cell table:style-name="Table1.A1" office:value-type="string">
            <text:p text:style-name="Table_20_Contents"><text:span text:style-name="Strong_20_Emphasis">Mount Coot-tha / Bushland Fringe</text:span></text:p>
          </table:table-cell>
          <table:table-cell table:style-name="Table1.A1" office:value-type="string">
            <text:p text:style-name="Table_20_Contents">Contested (Garou Zone adjacent)</text:p>
          </table:table-cell>
          <table:table-cell table:style-name="Table1.A1" office:value-type="string">
            <text:p text:style-name="Table_20_Contents">Templar Kazakov supervision</text:p>
          </table:table-cell>
          <table:table-cell table:style-name="Table1.A1" office:value-type="string">
            <text:p text:style-name="Table_20_Contents">Bracken Covenant</text:p>
          </table:table-cell>
          <table:table-cell table:style-name="Table1.A1" office:value-type="string">
            <text:p text:style-name="Table_20_Contents">Mount Coot-tha summit (avoided), Brisbane Botanic Gardens</text:p>
          </table:table-cell>
        </table:table-row>
        <table:table-row>
          <table:table-cell table:style-name="Table1.A1" office:value-type="string">
            <text:p text:style-name="Table_20_Contents"><text:span text:style-name="Strong_20_Emphasis">Northern Suburbs (Chermside, Aspley)</text:span></text:p>
          </table:table-cell>
          <table:table-cell table:style-name="Table1.A1" office:value-type="string">
            <text:p text:style-name="Table_20_Contents">Sabbat Zone (perimeter)</text:p>
          </table:table-cell>
          <table:table-cell table:style-name="Table1.A1" office:value-type="string">
            <text:p text:style-name="Table_20_Contents">Templar Kazakov supervision</text:p>
          </table:table-cell>
          <table:table-cell table:style-name="Table1.A1" office:value-type="string">
            <text:p text:style-name="Table_20_Contents">Northern Star</text:p>
          </table:table-cell>
          <table:table-cell table:style-name="Table1.A1" office:value-type="string">
            <text:p text:style-name="Table_20_Contents">Brisbane-Glass-Walker-northern-septs border</text:p>
          </table:table-cell>
        </table:table-row>
        <table:table-row>
          <table:table-cell table:style-name="Table1.A1" office:value-type="string">
            <text:p text:style-name="Table_20_Contents"><text:span text:style-name="Strong_20_Emphasis">Inner West (Indooroopilly)</text:span></text:p>
          </table:table-cell>
          <table:table-cell table:style-name="Table1.A1" office:value-type="string">
            <text:p text:style-name="Table_20_Contents">Sabbat Zone (recruitment)</text:p>
          </table:table-cell>
          <table:table-cell table:style-name="Table1.A1" office:value-type="string">
            <text:p text:style-name="Table_20_Contents">Bishop Callista oversight</text:p>
          </table:table-cell>
          <table:table-cell table:style-name="Table1.A1" office:value-type="string">
            <text:p text:style-name="Table_20_Contents">Indooroopilly Harvest</text:p>
          </table:table-cell>
          <table:table-cell table:style-name="Table1.A1" office:value-type="string">
            <text:p text:style-name="Table_20_Contents">Recruitment infrastructure</text:p>
          </table:table-cell>
        </table:table-row>
        <table:table-row>
          <table:table-cell table:style-name="Table1.A1" office:value-type="string">
            <text:p text:style-name="Table_20_Contents"><text:span text:style-name="Strong_20_Emphasis">Bayside (Wynnum, Cleveland)</text:span></text:p>
          </table:table-cell>
          <table:table-cell table:style-name="Table1.A1" office:value-type="string">
            <text:p text:style-name="Table_20_Contents">Sabbat Zone (bay specialty)</text:p>
          </table:table-cell>
          <table:table-cell table:style-name="Table1.A1" office:value-type="string">
            <text:p text:style-name="Table_20_Contents">Templar Kazakov supervision</text:p>
          </table:table-cell>
          <table:table-cell table:style-name="Table1.A1" office:value-type="string">
            <text:p text:style-name="Table_20_Contents">Wynnum Tide</text:p>
          </table:table-cell>
          <table:table-cell table:style-name="Table1.A1" office:value-type="string">
            <text:p text:style-name="Table_20_Contents">Moreton Bay operations, occasional offshore</text:p>
          </table:table-cell>
        </table:table-row>
        <table:table-row>
          <table:table-cell table:style-name="Table1.A1" office:value-type="string">
            <text:p text:style-name="Table_20_Contents"><text:span text:style-name="Strong_20_Emphasis">Southern Suburbs (Logan, Beenleigh)</text:span></text:p>
          </table:table-cell>
          <table:table-cell table:style-name="Table1.A1" office:value-type="string">
            <text:p text:style-name="Table_20_Contents">Sabbat Zone (corridor)</text:p>
          </table:table-cell>
          <table:table-cell table:style-name="Table1.A1" office:value-type="string">
            <text:p text:style-name="Table_20_Contents">Templar Kazakov supervision</text:p>
          </table:table-cell>
          <table:table-cell table:style-name="Table1.A1" office:value-type="string">
            <text:p text:style-name="Table_20_Contents">Logan Crusade</text:p>
          </table:table-cell>
          <table:table-cell table:style-name="Table1.A1" office:value-type="string">
            <text:p text:style-name="Table_20_Contents">Brisbane-Gold-Coast tourism feeding</text:p>
          </table:table-cell>
        </table:table-row>
      </table:table>
      <text:h text:style-name="Heading_20_3" text:outline-level="3"><text:span text:style-name="Strong_20_Emphasis">Brisbane Sabbat ecclesiastical hierarchy at a glance:</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osition</text:p>
            </table:table-cell>
            <table:table-cell table:style-name="Table2.A1" office:value-type="string">
              <text:p text:style-name="Table_20_Heading">Holder</text:p>
            </table:table-cell>
            <table:table-cell table:style-name="Table2.A1" office:value-type="string">
              <text:p text:style-name="Table_20_Heading">Clan</text:p>
            </table:table-cell>
            <table:table-cell table:style-name="Table2.A1" office:value-type="string">
              <text:p text:style-name="Table_20_Heading">Tenure</text:p>
            </table:table-cell>
            <table:table-cell table:style-name="Table2.A1" office:value-type="string">
              <text:p text:style-name="Table_20_Heading">Portfolio</text:p>
            </table:table-cell>
          </table:table-row>
        </table:table-header-rows>
        <table:table-row>
          <table:table-cell table:style-name="Table2.A1" office:value-type="string">
            <text:p text:style-name="Table_20_Contents"><text:span text:style-name="Strong_20_Emphasis">Bishop</text:span></text:p>
          </table:table-cell>
          <table:table-cell table:style-name="Table2.A1" office:value-type="string">
            <text:p text:style-name="Table_20_Contents">Callista Vox</text:p>
          </table:table-cell>
          <table:table-cell table:style-name="Table2.A1" office:value-type="string">
            <text:p text:style-name="Table_20_Contents">Tzimisce 8th gen</text:p>
          </table:table-cell>
          <table:table-cell table:style-name="Table2.A1" office:value-type="string">
            <text:p text:style-name="Table_20_Contents">50 years</text:p>
          </table:table-cell>
          <table:table-cell table:style-name="Table2.A1" office:value-type="string">
            <text:p text:style-name="Table_20_Contents">All Brisbane operations, ultimate authority</text:p>
          </table:table-cell>
        </table:table-row>
        <table:table-row>
          <table:table-cell table:style-name="Table2.A1" office:value-type="string">
            <text:p text:style-name="Table_20_Contents"><text:span text:style-name="Strong_20_Emphasis">Templar</text:span></text:p>
          </table:table-cell>
          <table:table-cell table:style-name="Table2.A1" office:value-type="string">
            <text:p text:style-name="Table_20_Contents">Anatoly Kazakov</text:p>
          </table:table-cell>
          <table:table-cell table:style-name="Table2.A1" office:value-type="string">
            <text:p text:style-name="Table_20_Contents">Tzimisce 9th gen</text:p>
          </table:table-cell>
          <table:table-cell table:style-name="Table2.A1" office:value-type="string">
            <text:p text:style-name="Table_20_Contents">50 years</text:p>
          </table:table-cell>
          <table:table-cell table:style-name="Table2.A1" office:value-type="string">
            <text:p text:style-name="Table_20_Contents">Combat operations, 2026 operation, AFP-TP counter-protocols</text:p>
          </table:table-cell>
        </table:table-row>
        <table:table-row>
          <table:table-cell table:style-name="Table2.A1" office:value-type="string">
            <text:p text:style-name="Table_20_Contents"><text:span text:style-name="Strong_20_Emphasis">Templar</text:span></text:p>
          </table:table-cell>
          <table:table-cell table:style-name="Table2.A1" office:value-type="string">
            <text:p text:style-name="Table_20_Contents">Constance Abernathy</text:p>
          </table:table-cell>
          <table:table-cell table:style-name="Table2.A1" office:value-type="string">
            <text:p text:style-name="Table_20_Contents">Lasombra antitribu 9th gen</text:p>
          </table:table-cell>
          <table:table-cell table:style-name="Table2.A1" office:value-type="string">
            <text:p text:style-name="Table_20_Contents">50 years</text:p>
          </table:table-cell>
          <table:table-cell table:style-name="Table2.A1" office:value-type="string">
            <text:p text:style-name="Table_20_Contents">Ecclesiastical practice, Vaulderie coordination, Lasombra-refusenik network</text:p>
          </table:table-cell>
        </table:table-row>
        <table:table-row>
          <table:table-cell table:style-name="Table2.A1" office:value-type="string">
            <text:p text:style-name="Table_20_Contents"><text:span text:style-name="Strong_20_Emphasis">Templar</text:span></text:p>
          </table:table-cell>
          <table:table-cell table:style-name="Table2.A1" office:value-type="string">
            <text:p text:style-name="Table_20_Contents">Father Esteban Cruz-Molina</text:p>
          </table:table-cell>
          <table:table-cell table:style-name="Table2.A1" office:value-type="string">
            <text:p text:style-name="Table_20_Contents">Toreador antitribu 10th gen</text:p>
          </table:table-cell>
          <table:table-cell table:style-name="Table2.A1" office:value-type="string">
            <text:p text:style-name="Table_20_Contents">22 years</text:p>
          </table:table-cell>
          <table:table-cell table:style-name="Table2.A1" office:value-type="string">
            <text:p text:style-name="Table_20_Contents">Cultural-cover operations, archive, mortal-society infiltration</text:p>
          </table:table-cell>
        </table:table-row>
        <table:table-row>
          <table:table-cell table:style-name="Table2.A1" office:value-type="string">
            <text:p text:style-name="Table_20_Contents"><text:span text:style-name="Strong_20_Emphasis">Pack-Leaders</text:span></text:p>
          </table:table-cell>
          <table:table-cell table:style-name="Table2.A1" office:value-type="string">
            <text:p text:style-name="Table_20_Contents">Approximately 30</text:p>
          </table:table-cell>
          <table:table-cell table:style-name="Table2.A1" office:value-type="string">
            <text:p text:style-name="Table_20_Contents">Various</text:p>
          </table:table-cell>
          <table:table-cell table:style-name="Table2.A1" office:value-type="string">
            <text:p text:style-name="Table_20_Contents">Varies</text:p>
          </table:table-cell>
          <table:table-cell table:style-name="Table2.A1" office:value-type="string">
            <text:p text:style-name="Table_20_Contents">Pack-territorial responsibility, pack operations</text:p>
          </table:table-cell>
        </table:table-row>
        <text:soft-page-break/>
        <table:table-row>
          <table:table-cell table:style-name="Table2.A1" office:value-type="string">
            <text:p text:style-name="Table_20_Contents"><text:span text:style-name="Strong_20_Emphasis">Pack Members</text:span></text:p>
          </table:table-cell>
          <table:table-cell table:style-name="Table2.A1" office:value-type="string">
            <text:p text:style-name="Table_20_Contents">Approximately 30</text:p>
          </table:table-cell>
          <table:table-cell table:style-name="Table2.A1" office:value-type="string">
            <text:p text:style-name="Table_20_Contents">Various</text:p>
          </table:table-cell>
          <table:table-cell table:style-name="Table2.A1" office:value-type="string">
            <text:p text:style-name="Table_20_Contents">Varies</text:p>
          </table:table-cell>
          <table:table-cell table:style-name="Table2.A1" office:value-type="string">
            <text:p text:style-name="Table_20_Contents">Pack operations, ritae participation, doctrinal practice</text:p>
          </table:table-cell>
        </table:table-row>
      </table:table>
      <text:h text:style-name="Heading_20_3" text:outline-level="3"><text:span text:style-name="Strong_20_Emphasis">Brisbane Sabbat liturgical calendar:</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Date</text:p>
            </table:table-cell>
            <table:table-cell table:style-name="Table3.A1" office:value-type="string">
              <text:p text:style-name="Table_20_Heading">Festival</text:p>
            </table:table-cell>
            <table:table-cell table:style-name="Table3.A1" office:value-type="string">
              <text:p text:style-name="Table_20_Heading">Location</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Early February</text:p>
          </table:table-cell>
          <table:table-cell table:style-name="Table3.A1" office:value-type="string">
            <text:p text:style-name="Table_20_Contents"><text:span text:style-name="Strong_20_Emphasis">Festivo dello Estinto</text:span></text:p>
          </table:table-cell>
          <table:table-cell table:style-name="Table3.A1" office:value-type="string">
            <text:p text:style-name="Table_20_Contents">West End chantry</text:p>
          </table:table-cell>
          <table:table-cell table:style-name="Table3.A1" office:value-type="string">
            <text:p text:style-name="Table_20_Contents">Festival of the Dead, Sabbat liturgical year opening</text:p>
          </table:table-cell>
        </table:table-row>
        <table:table-row>
          <table:table-cell table:style-name="Table3.A1" office:value-type="string">
            <text:p text:style-name="Table_20_Contents">Late April</text:p>
          </table:table-cell>
          <table:table-cell table:style-name="Table3.A1" office:value-type="string">
            <text:p text:style-name="Table_20_Contents"><text:span text:style-name="Strong_20_Emphasis">Fire Dance</text:span></text:p>
          </table:table-cell>
          <table:table-cell table:style-name="Table3.A1" office:value-type="string">
            <text:p text:style-name="Table_20_Contents">Mount Coot-tha bushland fringe</text:p>
          </table:table-cell>
          <table:table-cell table:style-name="Table3.A1" office:value-type="string">
            <text:p text:style-name="Table_20_Contents">Walpurgisnacht, conducted under operational risk</text:p>
          </table:table-cell>
        </table:table-row>
        <table:table-row>
          <table:table-cell table:style-name="Table3.A1" office:value-type="string">
            <text:p text:style-name="Table_20_Contents">October 31</text:p>
          </table:table-cell>
          <table:table-cell table:style-name="Table3.A1" office:value-type="string">
            <text:p text:style-name="Table_20_Contents"><text:span text:style-name="Strong_20_Emphasis">Palla Grande</text:span></text:p>
          </table:table-cell>
          <table:table-cell table:style-name="Table3.A1" office:value-type="string">
            <text:p text:style-name="Table_20_Contents">West End chantry</text:p>
          </table:table-cell>
          <table:table-cell table:style-name="Table3.A1" office:value-type="string">
            <text:p text:style-name="Table_20_Contents">Largest annual occasion, all packs gathered</text:p>
          </table:table-cell>
        </table:table-row>
        <table:table-row>
          <table:table-cell table:style-name="Table3.A1" office:value-type="string">
            <text:p text:style-name="Table_20_Contents">Late December</text:p>
          </table:table-cell>
          <table:table-cell table:style-name="Table3.A1" office:value-type="string">
            <text:p text:style-name="Table_20_Contents"><text:span text:style-name="Strong_20_Emphasis">Wild Hunt</text:span></text:p>
          </table:table-cell>
          <table:table-cell table:style-name="Table3.A1" office:value-type="string">
            <text:p text:style-name="Table_20_Contents">Multiple Brisbane locations</text:p>
          </table:table-cell>
          <table:table-cell table:style-name="Table3.A1" office:value-type="string">
            <text:p text:style-name="Table_20_Contents">Midsummer hunting festival, formal Cleaver protocols</text:p>
          </table:table-cell>
        </table:table-row>
        <table:table-row>
          <table:table-cell table:style-name="Table3.A1" office:value-type="string">
            <text:p text:style-name="Table_20_Contents">Monthly</text:p>
          </table:table-cell>
          <table:table-cell table:style-name="Table3.A1" office:value-type="string">
            <text:p text:style-name="Table_20_Contents"><text:span text:style-name="Strong_20_Emphasis">Vaulderie</text:span></text:p>
          </table:table-cell>
          <table:table-cell table:style-name="Table3.A1" office:value-type="string">
            <text:p text:style-name="Table_20_Contents">Pack-internal</text:p>
          </table:table-cell>
          <table:table-cell table:style-name="Table3.A1" office:value-type="string">
            <text:p text:style-name="Table_20_Contents">Pack-binding ritual</text:p>
          </table:table-cell>
        </table:table-row>
        <table:table-row>
          <table:table-cell table:style-name="Table3.A1" office:value-type="string">
            <text:p text:style-name="Table_20_Contents">Quarterly</text:p>
          </table:table-cell>
          <table:table-cell table:style-name="Table3.A1" office:value-type="string">
            <text:p text:style-name="Table_20_Contents"><text:span text:style-name="Strong_20_Emphasis">Cross-pack Vaulderie</text:span></text:p>
          </table:table-cell>
          <table:table-cell table:style-name="Table3.A1" office:value-type="string">
            <text:p text:style-name="Table_20_Contents">West End chantry</text:p>
          </table:table-cell>
          <table:table-cell table:style-name="Table3.A1" office:value-type="string">
            <text:p text:style-name="Table_20_Contents">Templar Abernathy supervised</text:p>
          </table:table-cell>
        </table:table-row>
        <table:table-row>
          <table:table-cell table:style-name="Table3.A1" office:value-type="string">
            <text:p text:style-name="Table_20_Contents">Quarterly</text:p>
          </table:table-cell>
          <table:table-cell table:style-name="Table3.A1" office:value-type="string">
            <text:p text:style-name="Table_20_Contents"><text:span text:style-name="Strong_20_Emphasis">Shovelhead Embraces</text:span></text:p>
          </table:table-cell>
          <table:table-cell table:style-name="Table3.A1" office:value-type="string">
            <text:p text:style-name="Table_20_Contents">Shovelhead Room, chantry</text:p>
          </table:table-cell>
          <table:table-cell table:style-name="Table3.A1" office:value-type="string">
            <text:p text:style-name="Table_20_Contents">~4/year current rate</text:p>
          </table:table-cell>
        </table:table-row>
      </table:table>
      <text:h text:style-name="Heading_20_3" text:outline-level="3"><text:span text:style-name="Strong_20_Emphasis">Continental snapshot from Brisbane perspective:</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omain</text:p>
            </table:table-cell>
            <table:table-cell table:style-name="Table4.A1" office:value-type="string">
              <text:p text:style-name="Table_20_Heading">Authority</text:p>
            </table:table-cell>
            <table:table-cell table:style-name="Table4.A1" office:value-type="string">
              <text:p text:style-name="Table_20_Heading">Brisbane relationship</text:p>
            </table:table-cell>
          </table:table-row>
        </table:table-header-rows>
        <table:table-row>
          <table:table-cell table:style-name="Table4.A1" office:value-type="string">
            <text:p text:style-name="Table_20_Contents"><text:span text:style-name="Strong_20_Emphasis">Brisbane (this supplement)</text:span></text:p>
          </table:table-cell>
          <table:table-cell table:style-name="Table4.A1" office:value-type="string">
            <text:p text:style-name="Table_20_Contents">Bishop Callista Vox (Sabbat)</text:p>
          </table:table-cell>
          <table:table-cell table:style-name="Table4.A1" office:value-type="string">
            <text:p text:style-name="Table_20_Contents">Her domain</text:p>
          </table:table-cell>
        </table:table-row>
        <table:table-row>
          <table:table-cell table:style-name="Table4.A1" office:value-type="string">
            <text:p text:style-name="Table_20_Contents"><text:span text:style-name="Strong_20_Emphasis">Sydney</text:span></text:p>
          </table:table-cell>
          <table:table-cell table:style-name="Table4.A1" office:value-type="string">
            <text:p text:style-name="Table_20_Contents">Sarrasine (Independent)</text:p>
          </table:table-cell>
          <table:table-cell table:style-name="Table4.A1" office:value-type="string">
            <text:p text:style-name="Table_20_Contents">Correct-but-cool, two failed incursions (1989, 2008)</text:p>
          </table:table-cell>
        </table:table-row>
        <table:table-row>
          <table:table-cell table:style-name="Table4.A1" office:value-type="string">
            <text:p text:style-name="Table_20_Contents"><text:span text:style-name="Strong_20_Emphasis">Melbourne</text:span></text:p>
          </table:table-cell>
          <table:table-cell table:style-name="Table4.A1" office:value-type="string">
            <text:p text:style-name="Table_20_Contents">Lytton (Camarilla)</text:p>
          </table:table-cell>
          <table:table-cell table:style-name="Table4.A1" office:value-type="string">
            <text:p text:style-name="Table_20_Contents">Hostile-formal, three formal correspondences in 50 years</text:p>
          </table:table-cell>
        </table:table-row>
        <table:table-row>
          <table:table-cell table:style-name="Table4.A1" office:value-type="string">
            <text:p text:style-name="Table_20_Contents"><text:span text:style-name="Strong_20_Emphasis">Adelaide</text:span></text:p>
          </table:table-cell>
          <table:table-cell table:style-name="Table4.A1" office:value-type="string">
            <text:p text:style-name="Table_20_Contents">Octavia Marsh (Camarilla)</text:p>
          </table:table-cell>
          <table:table-cell table:style-name="Table4.A1" office:value-type="string">
            <text:p text:style-name="Table_20_Contents">Hostile-formal, minimal contact</text:p>
          </table:table-cell>
        </table:table-row>
        <table:table-row>
          <table:table-cell table:style-name="Table4.A1" office:value-type="string">
            <text:p text:style-name="Table_20_Contents"><text:span text:style-name="Strong_20_Emphasis">Perth</text:span></text:p>
          </table:table-cell>
          <table:table-cell table:style-name="Table4.A1" office:value-type="string">
            <text:p text:style-name="Table_20_Contents">(Independent, no formal Praxis)</text:p>
          </table:table-cell>
          <table:table-cell table:style-name="Table4.A1" office:value-type="string">
            <text:p text:style-name="Table_20_Contents">No operational contact</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Brisbane produces chronicle textures other Australian cities do not:</text:p>
      <text:h text:style-name="Heading_20_3" text:outline-level="3"><text:span text:style-name="Strong_20_Emphasis">The survivor's tempo</text:span></text:h>
      <text:p text:style-name="Text_20_body">Every Brisbane chronicle scene operates implicitly under continuing operational danger. AFP-Twilight-Project surveillance is active. Glass Walker northern-septs counter-surveillance is active. Brisbane Sabbat-internal political pressure is real. The rare cross-domain Camarilla operative penetration occurs. Chronicle scenes carry constant low-grade threat that other Australian Kindred domains do not produce. The texture: when a Brisbane Sabbat operative checks for surveillance before entering the West End chantry, the check is operational habit refined across decades — not chronicle plot device. {{user}} characters who try to operate on Sydney's patient methuselah-tempo or Melbourne's institutional pace in Brisbane consistently produce operational vulnerability; Brisbane expects vigilance.</text:p>
      <text:h text:style-name="Heading_20_3" text:outline-level="3"><text:span text:style-name="Strong_20_Emphasis">Doctrinal practice as ambient register</text:span></text:h>
      <text:p text:style-name="Text_20_body">Brisbane Sabbat operates under doctrinal Sabbat ecclesiastical practice that other Australian Kindred domains do not match. Vaulderie is monthly and mandatory for pack members. Shovelhead Embraces are quarterly and witnessed. Festivo dello Estinto and Fire Dance and Wild Hunt and Palla Grande are conducted on liturgical calendar with full Sabbat traditional infrastructure. The texture: Brisbane Sabbat scenes carry theological weight that Camarilla scenes' formal-court ceremony does not match — Sabbat ritae are <text:span text:style-name="Emphasis">religious</text:span> in ways that produce ambient register {{user}} characters either accept (Sabbat-loyalist alignment), carefully manage (Sabbat-internal-dissident or cover positions), or experience as alienating (non-Sabbat character operating under Brisbane cover). The doctrinal expectation is not adornment; it is the operational infrastructure within which all Brisbane chronicle scenes occur.</text:p>
      <text:h text:style-name="Heading_20_3" text:outline-level="3"><text:span text:style-name="Strong_20_Emphasis">Material austerity as operational virtue</text:span></text:h>
      <text:p text:style-name="Text_20_body">Brisbane Sabbat operates without the wealth Sydney's Sarrasine accumulates or Melbourne's institutional Camarilla infrastructure provides. The West End chantry is functional rather than luxurious. The Templars operate from heritage cottages and converted warehouses rather than Vaucluse mansions. Pack-internal operational resources are limited. The texture: Brisbane chronicle scenes occur with material specificity that emphasises functional purpose over aesthetic refinement — the ritual chamber's altar is repurposed Anglican furniture rather than custom Sabbat-doctrinal commission, the Templars' meeting room has institutional-grade folding chairs rather than Sydney's mahogany conference furniture. {{user}} characters from wealthier Australian domains experience Brisbane as visiting an operational-religious order rather than a metropolitan Kindred political institution.</text:p>
      <text:h text:style-name="Heading_20_3" text:outline-level="3"><text:span text:style-name="Strong_20_Emphasis">Cleaver-feeding normalised as institutional practice</text:span></text:h>
      <text:p text:style-name="Text_20_body">Brisbane Sabbat permits Cleaver-style feeding within specific protocols. Mortal Final Deaths are routine operational texture rather than climactic plot escalation. The Brisbane River body-disposal infrastructure operates continuously. Fortitude Valley weekend Cleaver-operations occur on monthly schedule with established protocols. The texture: Brisbane chronicle scenes engage routine mortal predation at scale that other Australian Kindred chronicle modes treat as exceptional, producing distinct ethical-character pressure on {{user}} characters whose Humanity registers <text:soft-page-break/>permit or do not permit the institutional expectation. {{user}} characters with Humanity 7+ (the Camarilla Touchstone-anchored register) experience Brisbane operations as continuing Humanity-degradation pressure that chronicle late-arc may produce as character-defining crisis.</text:p>
      <text:h text:style-name="Heading_20_3" text:outline-level="3"><text:span text:style-name="Strong_20_Emphasis">The custodian's contradiction</text:span></text:h>
      <text:p text:style-name="Text_20_body">Bishop Callista's framing of Brisbane as 'custodian of authentic Sabbat tradition globally' shapes Brisbane chronicle scenes' ideological register. The framing is partly accurate, partly rationalisation. Senior Brisbane Sabbat (Templars, Pack-Leaders with longest tenure) increasingly recognise the framing's complexity; junior Brisbane Sabbat (Pack Members with shorter tenure, recently-Embraced operatives) often do not yet recognise it. The texture: Brisbane chronicle scenes operate under unspoken institutional question that Bishop Callista herself has not fully resolved — does Brisbane Sabbat's continuing operation serve genuine doctrinal preservation, or is it institutional momentum maintained by personal commitment in the absence of meaningful external context? {{user}} characters at senior Brisbane Sabbat positions encounter this contradiction in ways junior characters do not, producing chronicle texture that distinguishes generational-tenure registers within the domain.</text:p>
      <text:h text:style-name="Heading_20_3" text:outline-level="3"><text:span text:style-name="Strong_20_Emphasis">Cross-supernatural exclusion as continental edge</text:span></text:h>
      <text:p text:style-name="Text_20_body">Brisbane is excluded from the Cress Truce. Glass Walker septs do not enter Brisbane. The cross-supernatural diplomatic infrastructure that organises broader Australian Kindred politics does not extend to Brisbane operations. The texture: Brisbane chronicle scenes operate at the continental edge of cross-supernatural diplomatic possibility — there is no cross-supernatural diplomatic protocol available, no Cress Truce Article 9 emergency response procedure, no Glass Walker third-party witness for incidents. When Brisbane Sabbat operations cross Glass Walker northern-septs surveillance lines, the operational consequence is military rather than diplomatic. {{user}} characters who develop cross-supernatural diplomatic competence in other Australian domains discover that the competence does not transfer to Brisbane chronicle wor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Brisbane supports chronicles distinct from other Australian domains. The Sabbat-survivor register produces six chronicle types:</text:p>
      <text:h text:style-name="Heading_20_3" text:outline-level="3"><text:span text:style-name="Strong_20_Emphasis">1. The Shovelhead Initiate</text:span></text:h>
      <text:p text:style-name="Text_20_body">{{user}} has been recently Embraced through Shovelhead operations conducted at the West End chantry's Shovelhead Room. The Embrace was traumatic — Sabbat tradition; mass burial, panicked rise from soil, immediate Vaulderie ritual binding to pack. {{user}}'s pre-Embrace mortal life is gone. {{user}}'s pack assignment is provisional pending evaluation by the assigned Pack-Leader and Templar oversight. The chronicle tracks {{user}}'s first months as Sabbat-Embraced operative — the doctrinal training, the operational learning, the gradual development of pack-Vaulderie-bond, the decisions about which pre-Embrace mortal-life elements to preserve and which to abandon, the navigation of Brisbane Sabbat ecclesiastical hierarchy with the deference junior position requires. The chronicle late-arc questions: does {{user}} integrate fully into Sabbat doctrinal commitment, develop Sabbat-internal-dissident orientation, or eventually attempt the rare and dangerous defection from Sabbat that Brisbane Sabbat ecclesiastical structure makes operationally difficult.</text:p>
      <text:p text:style-name="Text_20_body"><text:span text:style-name="Strong_20_Emphasis">Stakes:</text:span> {{user}}'s long-term political-religious identity. Successful Sabbat integration produces operational competence and pack-binding security; Sabbat-internal-dissident development produces ongoing operational vulnerability with eventual chronicle-defining crisis; defection attempt produces direct Templar-or-Bishop confrontation with extremely low survival probability.</text:p>
      <text:h text:style-name="Heading_20_3" text:outline-level="3"><text:span text:style-name="Strong_20_Emphasis">2. The Cross-Domain Cover</text:span></text:h>
      <text:p text:style-name="Text_20_body">{{user}} is a Camarilla operative (from Melbourne or Adelaide) penetrating Brisbane Sabbat through long-term cover identity. The cover involves: false Sabbat-loyalist political alignment maintained through formal Vaulderie participation that produces genuine spiritual-supernatural binding {{user}} must navigate; pack assignment to a Brisbane Sabbat pack with full operational participation expectations; ongoing intelligence-development for Camarilla Australia continental operations; periodic crisis points where cover-identity demands conflict with Camarilla-loyalty operational requirements. The chronicle tracks {{user}}'s slow accumulation of Brisbane Sabbat intelligence, the Vaulderie-bond's effects on {{user}}'s capacity for Camarilla-loyalty maintenance, the chronicle-defining decisions about cover-extraction timing or cover-deepening commitment.</text:p>
      <text:p text:style-name="Text_20_body"><text:span text:style-name="Strong_20_Emphasis">Stakes:</text:span> Continental Camarilla intelligence operations. Successful intelligence-extraction reshapes Camarilla Australian operational position against Brisbane Sabbat for decades; cover-failure produces almost-certain Final Death; cover-extraction late-arc produces complicated reintegration into Camarilla Melbourne or Adelaide that Vaulderie-bond's lingering effects may permanently complicate.</text:p>
      <text:h text:style-name="Heading_20_3" text:outline-level="3"><text:span text:style-name="Strong_20_Emphasis">3. The Templar's Apprentice</text:span></text:h>
      <text:p text:style-name="Text_20_body">{{user}} has been identified by Templar Cruz-Molina (or Templar Abernathy or Templar Kazakov) as potential Templar-track candidate — a Brisbane Sabbat operative whose disposition, capabilities, and operational pattern suggest receptiveness to Templar-tier responsibility. The cultivation is conducted across years, beginning with specific operational assignments testing competencies the Templar values, progressing through formal Templar-mentorship that includes ecclesiastical doctrinal training and Brisbane Sabbat institutional history education, and eventually arriving at the formal Templar-succession question when the current Templar approaches Final Death or voluntary <text:soft-page-break/>stepping-down. The chronicle tracks the slow induction with operational complications — Templar-track positions involve significant ecclesiastical and operational responsibility, internal Brisbane Sabbat political competition, and the senior-tenure relationship with Bishop Callista's institutional contradiction.</text:p>
      <text:p text:style-name="Text_20_body"><text:span text:style-name="Strong_20_Emphasis">Stakes:</text:span> {{user}}'s long-term Brisbane Sabbat institutional position. Successful Templar-succession produces continental Sabbat senior position with significant operational authority; failed Templar-succession produces ongoing Brisbane Sabbat senior pack-leader position with reduced political prospects; Templar-succession-refusal produces gentle Bishop Callista acceptance with quiet operational consequences {{user}} discovers across years.</text:p>
      <text:h text:style-name="Heading_20_3" text:outline-level="3"><text:span text:style-name="Strong_20_Emphasis">4. The Glass Walker Operation</text:span></text:h>
      <text:p text:style-name="Text_20_body">{{user}}, as senior Brisbane Sabbat operative or Templar Kazakov-pack member, is positioned for the planned 2026 follow-up operation against Glass Walker northern septs. The operation is October 2026 (All Souls Sabbat-doctrinal-significance), involves coordinated raid by the Last Days of Brisbane pack and two coordinated Brisbane Sabbat packs, targets Glass Walker northern-NSW and southern-Queensland sept operations, expected casualty cost is significant, and the operation's success or failure shapes Brisbane Sabbat's continental position for the subsequent decade. The chronicle tracks operational planning across 2025-2026 with intensifying operational risk through October 2026 climactic engagement; chronicle late-arc occurs in late 2026 with the operation's outcome.</text:p>
      <text:p text:style-name="Text_20_body"><text:span text:style-name="Strong_20_Emphasis">Stakes:</text:span> Continental Sabbat operational position. Successful operation produces Brisbane Sabbat continental military credibility and significant Glass Walker operational damage; failed operation produces Brisbane Sabbat operational diminishment with possible cascading institutional crisis; operation's collateral effects on Cress Truce stability reshape continental cross-supernatural diplomatic infrastructure regardless of direct outcome.</text:p>
      <text:h text:style-name="Heading_20_3" text:outline-level="3"><text:span text:style-name="Strong_20_Emphasis">5. The Sabbat Dissident</text:span></text:h>
      <text:p text:style-name="Text_20_body">{{user}} is a senior Brisbane Sabbat operative (Pack-Leader or Templar-tier) who has recognised the custodian-framing's accurate component and rationalisation component complexity, and who has begun developing private-internal-dissident orientation toward Bishop Callista's institutional commitments. The dissent involves: private theological-political reflection that Sabbat doctrinal practice in current global conditions produces institutional pathology rather than authentic preservation; quiet operational hesitations during operations whose collateral effects {{user}} considers ethically inappropriate; gradual cultivation of Brisbane Sabbat colleagues with similar private orientations; eventual chronicle late-arc decisions about whether to: (a) continue private dissent without operational consequence, (b) attempt dissident-coalition that could pressure Bishop Callista toward institutional reform, (c) attempt Brisbane Sabbat institutional change through Templar-succession or Bishop-succession positioning, or (d) attempt the rare and dangerous Brisbane Sabbat exit through cross-domain relocation or independent existence. The chronicle is structurally similar to Cardinal Reyna's Sabbat-loyalist refusenik position but inverted — instead of refusing reformation, {{user}} pursues it from inside.</text:p>
      <text:p text:style-name="Text_20_body"><text:span text:style-name="Strong_20_Emphasis">Stakes:</text:span> Brisbane Sabbat's institutional future. Successful dissident-coalition produces unprecedented Brisbane Sabbat institutional reform; failed dissent produces operational vulnerability with eventual Templar-or-Bishop confrontation; institutional change produces <text:soft-page-break/>continental and possibly global Sabbat resurgence implications.</text:p>
      <text:h text:style-name="Heading_20_3" text:outline-level="3"><text:span text:style-name="Strong_20_Emphasis">6. The Custodian's Crisis</text:span></text:h>
      <text:p text:style-name="Text_20_body">{{user}} reaches the chronicle late-arc moment where Bishop Callista's internal contradiction becomes operationally visible — the methuselah-track Bishop's gradual recognition that the custodian-framing's accurate and rationalisation components are difficult to disentangle, her quiet hesitations about the 2026 operation's strategic justification, her small cultivation of private-personal orientation toward operational caution beyond doctrinal-conformity expectations. The crisis involves {{user}}'s recognition that the Bishop is reachable in ways Sabbat doctrine does not authorise — that Bishop Callista has begun across her fifty-year Bishopric to develop private institutional reservations, and that the contradiction is itself opportunity for unprecedented direct engagement. The chronicle tracks {{user}}'s development of this recognition, the careful approach to Bishop Callista on the contradiction's grounds, and the chronicle-defining decisions about whether to support or destabilise the Bishop's emerging self-recognition.</text:p>
      <text:p text:style-name="Text_20_body"><text:span text:style-name="Strong_20_Emphasis">Stakes:</text:span> The Bishop's continental position and Brisbane Sabbat's institutional character. Successful engagement with the contradiction produces the rare chronicle outcome of substantive change in a senior Sabbat figure; failed engagement produces operations Bishop Callista has conducted with operational efficiency across fifty years and that {{user}}'s character may not survive; the chronicle's outcome shapes whether Brisbane Sabbat continues as doctrinal-Sabbat custodian institution or transforms into something Sabbat institutional history has not previously produced.</text:p>
      <text:p text:style-name="P1"><text:span text:style-name="Strong_20_Emphasis">The Brisbane supplement is complete.</text:span> A 16-entry lorebook covering Bishop Callista Vox's Sabbat domain authority, the three Templars and their portfolios, the ten Brisbane Sabbat packs with territorial assignments, the city's distinctive districts (West End chantry, Fortitude Valley, South Bank, Brisbane CBD, New Farm, Mount Coot-tha, plus the broader district structure), the AFP-Twilight-Project Brisbane operations and Brisbane Sabbat counter-protocols, the doctrinal Sabbat liturgical practice (Festivo dello Estinto, Fire Dance, Wild Hunt, Palla Grande, monthly Vaulderie, quarterly Shovelhead), the Sabbat-survivor chronicle register characteristics, the 1976 Sabbat takeover history, and the global Sabbat diminishment context. Six chronicle hooks specific to Brisbane — the Shovelhead Initiate, Cross-Domain Cover, Templar's Apprentice, Glass Walker Operation, Sabbat Dissident, Custodian's Crisis. Full cross-domain continuity with the broader Australian kit including Sydney and Melbourne suppl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8:46:31.612476658</dc:date>
    <meta:editing-duration>PT5M16S</meta:editing-duration>
    <meta:editing-cycles>1</meta:editing-cycles>
    <meta:document-statistic meta:table-count="4" meta:image-count="0" meta:object-count="0" meta:page-count="8" meta:paragraph-count="186" meta:word-count="2504" meta:character-count="20784" meta:non-whitespace-character-count="18446"/>
    <meta:generator>LibreOffice/24.2.7.2$Linux_X86_64 LibreOffice_project/420$Build-2</meta:generator>
  </office:meta>
</office:document-meta>
</file>