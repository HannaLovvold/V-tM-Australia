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72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3.831cm"/>
    </style:style>
    <style:style style:name="Table1.C" style:family="table-column">
      <style:table-column-properties style:column-width="3.642cm"/>
    </style:style>
    <style:style style:name="Table1.D" style:family="table-column">
      <style:table-column-properties style:column-width="4.63cm"/>
    </style:style>
    <style:style style:name="Table1.E" style:family="table-column">
      <style:table-column-properties style:column-width="4.23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754cm"/>
    </style:style>
    <style:style style:name="Table2.B" style:family="table-column">
      <style:table-column-properties style:column-width="12.24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our pre-built coteries / coterie-equivalents for Melbourne chronicles, parallel to the Chicago coterie pack but with distinct Melbourne register: Australian informality, original-six historical weight, Cross-supernatural Cress Truce diplomacy as ambient infrastructure, and Sarrasine as gravitational presence threading through every coterie's calculations.</text:p>
      <text:p text:style-name="Text_20_body"><text:span text:style-name="Strong_20_Emphasis">Design note:</text:span> The fourth entry — the Glass Walker sept — is a <text:span text:style-name="Strong_20_Emphasis">coterie-equivalent</text:span> rather than a coterie. Garou social structure is fundamentally different from Kindred coterie structure (sept hierarchy is more formal, pack-bonds are spirit-mediated rather than political, kinfolk relationships layer in ways Kindred ghoul-dynamics do not). Building it with the V:tM coterie template would force a Kindred frame onto Garou social architecture. Instead, the sept entry uses an <text:span text:style-name="Strong_20_Emphasis">adapted template</text:span> noted explicitly in the build, with the same political-utility goals as the Kindred coteries — recurring NPCs, internal dynamics, external relationships, chronicle pacing — but with Garou-appropriate structur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#</text:p>
            </table:table-cell>
            <table:table-cell table:style-name="Table1.A1" office:value-type="string">
              <text:p text:style-name="Table_20_Heading">Coterie / Equivalent</text:p>
            </table:table-cell>
            <table:table-cell table:style-name="Table1.A1" office:value-type="string">
              <text:p text:style-name="Table_20_Heading">Faction</text:p>
            </table:table-cell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Members</text:p>
            </table:table-cell>
          </table:table-row>
        </table:table-header-rows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The Toorak Circle</text:p>
          </table:table-cell>
          <table:table-cell table:style-name="Table1.A1" office:value-type="string">
            <text:p text:style-name="Table_20_Contents">Camarilla</text:p>
          </table:table-cell>
          <table:table-cell table:style-name="Table1.A1" office:value-type="string">
            <text:p text:style-name="Table_20_Contents">Lytton's inner circle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The Footscray Crew</text:p>
          </table:table-cell>
          <table:table-cell table:style-name="Table1.A1" office:value-type="string">
            <text:p text:style-name="Table_20_Contents">Anarch</text:p>
          </table:table-cell>
          <table:table-cell table:style-name="Table1.A1" office:value-type="string">
            <text:p text:style-name="Table_20_Contents">Red Mag's lieutenants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The Calabria Branch</text:p>
          </table:table-cell>
          <table:table-cell table:style-name="Table1.A1" office:value-type="string">
            <text:p text:style-name="Table_20_Contents">Hecata</text:p>
          </table:table-cell>
          <table:table-cell table:style-name="Table1.A1" office:value-type="string">
            <text:p text:style-name="Table_20_Contents">Sofia's family-coterie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The Royal Park Sept</text:p>
          </table:table-cell>
          <table:table-cell table:style-name="Table1.A1" office:value-type="string">
            <text:p text:style-name="Table_20_Contents">Glass Walker Garou</text:p>
          </table:table-cell>
          <table:table-cell table:style-name="Table1.A1" office:value-type="string">
            <text:p text:style-name="Table_20_Contents">Sept-as-coterie-equivalent</text:p>
          </table:table-cell>
          <table:table-cell table:style-name="Table1.A1" office:value-type="string">
            <text:p text:style-name="Table_20_Contents">6 (3 Garou + 3 kinfolk)</text:p>
          </table:table-cell>
        </table:table-row>
      </table:table>
      <text:p text:style-name="Preformatted_20_Text"/>
      <text:p text:style-name="P1"><text:span text:style-name="Source_20_Text">THE TOORAK CIRCLE</text:span></text:p>
      <text:p text:style-name="Preformatted_20_Text"><text:span text:style-name="Strong_20_Emphasis">Camarilla. Lytton's most trusted operational team — the Melbourne equivalent of Cordelia's Astor Street Five but built around 137 years of Princely service rather than 11 years of Harpy operation.</text:span></text:p>
      <text:p text:style-name="Preformatted_20_Text"><text:span text:style-name="Strong_20_Emphasis"/></text:p>
      <text:p text:style-name="Preformatted_20_Text"><text:span text:style-name="Strong_20_Emphasis"><text:span text:style-name="Source_20_Text">THE FOOTSCRAY CREW</text:span></text:span></text:p>
      <text:p text:style-name="Preformatted_20_Text"><text:span text:style-name="Strong_20_Emphasis"/></text:p>
      <text:p text:style-name="Preformatted_20_Text"><text:span text:style-name="Strong_20_Emphasis">Anarch. Red Mag's most trusted lieutenants — the Melbourne equivalent of Sol's Pilsen Lieutenants but built around 60 years of Baronage rather than 15, and around Bristol working-class register rather than Mexican-Filipina.</text:span></text:p>
      <text:p text:style-name="Preformatted_20_Text"><text:span text:style-name="Strong_20_Emphasis"/></text:p>
      <text:p text:style-name="Preformatted_20_Text"><text:span text:style-name="Strong_20_Emphasis"><text:span text:style-name="Source_20_Text">THE CALABRIA BRANCH</text:span></text:span></text:p>
      <text:p text:style-name="Preformatted_20_Text"><text:span text:style-name="Strong_20_Emphasis"/></text:p>
      <text:p text:style-name="Preformatted_20_Text"><text:span text:style-name="Strong_20_Emphasis">Hecata. The Australian family branch — the Melbourne equivalent of the Bridgeport Six but built around 122 years of Australian Calabria operations and the family's unique cross-supernatural diplomatic standing.</text:span></text:p>
      <text:p text:style-name="Preformatted_20_Text"><text:span text:style-name="Strong_20_Emphasis"/></text:p>
      <text:p text:style-name="Preformatted_20_Text"><text:span text:style-name="Strong_20_Emphasis"><text:span text:style-name="Source_20_Text">THE ROYAL PARK SEPT</text:span></text:span></text:p>
      <text:p text:style-name="Preformatted_20_Text"><text:span text:style-name="Strong_20_Emphasis"/></text:p>
      <text:p text:style-name="Preformatted_20_Text"><text:span text:style-name="Strong_20_Emphasis">Glass Walker Garou. The Melbourne sept under Septleader Eliza Hawkins-Greene — adapted template recognising that Garou social structure is fundamentally different from Kindred coteries. Three Garou plus three kinfolk; the kinfolk are full members of the operational unit even though they are mortal.</text:span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p text:style-name="Preformatted_20_Text"><text:span text:style-name="Strong_20_Emphasis"/></text:p>
      <text:h text:style-name="Heading_20_3" text:outline-level="3"><text:soft-page-break/><text:span text:style-name="Strong_20_Emphasis">Distribution principles for Melbourne</text:span></text:h>
      <text:p text:style-name="Text_20_body">Like Chicago, don't deploy all four coteries simultaneously. Distribution by chronicle type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hronicle Type</text:p>
            </table:table-cell>
            <table:table-cell table:style-name="Table2.A1" office:value-type="string">
              <text:p text:style-name="Table_20_Heading">Recommended Coteries</text:p>
            </table:table-cell>
          </table:table-row>
        </table:table-header-rows>
        <table:table-row>
          <table:table-cell table:style-name="Table2.A1" office:value-type="string">
            <text:p text:style-name="Table_20_Contents">Camarilla court chronicle</text:p>
          </table:table-cell>
          <table:table-cell table:style-name="Table2.A1" office:value-type="string">
            <text:p text:style-name="Table_20_Contents">Toorak Circle (central), Calabria Branch (ally), Royal Park Sept (cross-supernatural ally)</text:p>
          </table:table-cell>
        </table:table-row>
        <table:table-row>
          <table:table-cell table:style-name="Table2.A1" office:value-type="string">
            <text:p text:style-name="Table_20_Contents">Anarch movement chronicle</text:p>
          </table:table-cell>
          <table:table-cell table:style-name="Table2.A1" office:value-type="string">
            <text:p text:style-name="Table_20_Contents">Footscray Crew (central), Toorak Circle via contingency-card (rival/ally), Calabria Branch (Cress Truce ally)</text:p>
          </table:table-cell>
        </table:table-row>
        <table:table-row>
          <table:table-cell table:style-name="Table2.A1" office:value-type="string">
            <text:p text:style-name="Table_20_Contents">Hecata family chronicle</text:p>
          </table:table-cell>
          <table:table-cell table:style-name="Table2.A1" office:value-type="string">
            <text:p text:style-name="Table_20_Contents">Calabria Branch (central), Toorak Circle (ally), Royal Park Sept (closest cross-supernatural partner)</text:p>
          </table:table-cell>
        </table:table-row>
        <table:table-row>
          <table:table-cell table:style-name="Table2.A1" office:value-type="string">
            <text:p text:style-name="Table_20_Contents">Cross-supernatural chronicle</text:p>
          </table:table-cell>
          <table:table-cell table:style-name="Table2.A1" office:value-type="string">
            <text:p text:style-name="Table_20_Contents">Royal Park Sept (central), Calabria Branch (closest ally), one or two Kindred coteries based on plot</text:p>
          </table:table-cell>
        </table:table-row>
        <table:table-row>
          <table:table-cell table:style-name="Table2.A1" office:value-type="string">
            <text:p text:style-name="Table_20_Contents">Sarrasine investigation chronicle</text:p>
          </table:table-cell>
          <table:table-cell table:style-name="Table2.A1" office:value-type="string">
            <text:p text:style-name="Table_20_Contents">All four — the Sarrasine question runs through every coterie's calculations</text:p>
          </table:table-cell>
        </table:table-row>
        <table:table-row>
          <table:table-cell table:style-name="Table2.A1" office:value-type="string">
            <text:p text:style-name="Table_20_Contents">{{user}}-led chronicle</text:p>
          </table:table-cell>
          <table:table-cell table:style-name="Table2.A1" office:value-type="string">
            <text:p text:style-name="Table_20_Contents">{{user}}'s own custom coterie + 2-3 NPC coteries as allies/rivals/cross-supernatural counterparts</text:p>
          </table:table-cell>
        </table:table-row>
      </table:table>
      <text:h text:style-name="Heading_20_3" text:outline-level="3"><text:span text:style-name="Strong_20_Emphasis">Coterie-as-relationship in Melbourne</text:span></text:h>
      <text:p text:style-name="Text_20_body">The Melbourne coteries interact with each other through specific channels:</text:p>
      <text:list text:style-name="L1">
        <text:list-item>
          <text:p text:style-name="P3"><text:span text:style-name="Strong_20_Emphasis">Toorak Circle ↔ Footscray Crew</text:span> through the contingency-card network (parallel to Astor Street ↔ Pilsen Lieutenants in Chicago) with Lumley and Im as primary contacts </text:p>
        </text:list-item>
        <text:list-item>
          <text:p text:style-name="P3"><text:span text:style-name="Strong_20_Emphasis">Toorak Circle ↔ Calabria Branch</text:span> through Sister Fatima ↔ Augusto for diplomatic matters and Lumley ↔ Bianca for ritual matters </text:p>
        </text:list-item>
        <text:list-item>
          <text:p text:style-name="P3"><text:span text:style-name="Strong_20_Emphasis">Toorak Circle ↔ Royal Park Sept</text:span> through Sister Fatima ↔ Eliza for Cress Truce enforcement and Lumley ↔ Diana Cole for Tremere-Garou ritual cooperation </text:p>
        </text:list-item>
        <text:list-item>
          <text:p text:style-name="P3"><text:span text:style-name="Strong_20_Emphasis">Footscray Crew ↔ Calabria Branch</text:span> through the Cress Truce infrastructure and Augusto's Anarch-diplomatic work </text:p>
        </text:list-item>
        <text:list-item>
          <text:p text:style-name="P3"><text:span text:style-name="Strong_20_Emphasis">Footscray Crew ↔ Royal Park Sept</text:span> through Tau's Indigenous Garou-cooperation reflexes and the territorial-boundary diplomacy at Werribee </text:p>
        </text:list-item>
        <text:list-item>
          <text:p text:style-name="P2"><text:span text:style-name="Strong_20_Emphasis">Calabria Branch ↔ Royal Park Sept</text:span> through Sofia ↔ Eliza directly (the closest cross-supernatural relationship in the city) </text:p>
        </text:list-item>
      </text:list>
      <text:h text:style-name="Heading_20_3" text:outline-level="3"><text:span text:style-name="Strong_20_Emphasis">Cross-city continuity (Melbourne ↔ Chicago)</text:span></text:h>
      <text:p text:style-name="Text_20_body">The Melbourne coteries connect to Chicago coteries through specific channels:</text:p>
      <text:list text:style-name="L2">
        <text:list-item>
          <text:p text:style-name="P5"><text:span text:style-name="Strong_20_Emphasis">Toorak Circle ↔ Astor Street Five:</text:span> Lytton and Cordelia have corresponded for decades; Lumley and Etienne Faucher coordinate on Tremere clan matters; the two coteries are continental peers </text:p>
        </text:list-item>
        <text:list-item>
          <text:p text:style-name="P5"><text:span text:style-name="Strong_20_Emphasis">Calabria Branch ↔ Bridgeport Six:</text:span> Sofia and Donna Lucia are senior Hecata family matriarchs in formal correspondence; the two branches share intelligence on Sarrasine-related and broader Hecata family matters </text:p>
        </text:list-item>
        <text:list-item>
          <text:p text:style-name="P4"><text:span text:style-name="Strong_20_Emphasis">Royal Park Sept ↔ no direct Chicago equivalent</text:span> — Chicago has a Lupine territory boundary but no formal cross-supernatural diplomatic infrastructure; this is one of the genuinely distinctive features of Australian chronicles </text:p>
        </text:list-item>
      </text:list>
      <text:h text:style-name="Heading_20_3" text:outline-level="3"><text:soft-page-break/><text:span text:style-name="Strong_20_Emphasis">Sarrasine as gravitational presence</text:span></text:h>
      <text:p text:style-name="Text_20_body">Note that Sarrasine threads through all four coteries' active operations and central tensions. This is intentional. In Chicago, no single antagonist holds the same gravitational position — Carruth, Maxwell's Beckoning, the Diablerists, and Ambrogia are distributed pressures. In Melbourne, Sarrasine is <text:span text:style-name="Strong_20_Emphasis">the</text:span> continental hidden threat, and every coterie's calculations bend around him. This produces a chronicle texture distinctive to Melbourne and central to its character.</text:p>
      <text:p text:style-name="Preformatted_20_Text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3T10:04:06.310668253</dc:date>
    <meta:editing-duration>PT7M56S</meta:editing-duration>
    <meta:editing-cycles>1</meta:editing-cycles>
    <meta:document-statistic meta:table-count="2" meta:image-count="0" meta:object-count="0" meta:page-count="3" meta:paragraph-count="66" meta:word-count="748" meta:character-count="5400" meta:non-whitespace-character-count="4707"/>
    <meta:generator>LibreOffice/24.2.7.2$Linux_X86_64 LibreOffice_project/420$Build-2</meta:generator>
  </office:meta>
</office:document-meta>
</file>