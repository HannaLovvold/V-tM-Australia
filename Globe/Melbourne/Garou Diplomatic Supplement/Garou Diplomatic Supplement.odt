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9.412cm" table:align="left"/>
    </style:style>
    <style:style style:name="Table1.A" style:family="table-column">
      <style:table-column-properties style:column-width="1.012cm"/>
    </style:style>
    <style:style style:name="Table1.B" style:family="table-column">
      <style:table-column-properties style:column-width="8.4cm"/>
    </style:style>
    <style:style style:name="Table1.A1" style:family="table-cell">
      <style:table-cell-properties style:vertical-align="middle" fo:padding="0.049cm" fo:border="none"/>
    </style:style>
    <style:style style:name="P1" style:family="paragraph" style:parent-style-name="Preformatted_20_Text">
      <style:text-properties officeooo:paragraph-rsid="0018a057"/>
    </style:style>
    <style:style style:name="P2" style:family="paragraph" style:parent-style-name="Text_20_body">
      <style:text-properties officeooo:paragraph-rsid="0018a057"/>
    </style:style>
    <style:style style:name="T1" style:family="text">
      <style:text-properties fo:color="#f97583" loext:opacity="100%"/>
    </style:style>
    <style:style style:name="T2" style:family="text">
      <style:text-properties fo:color="#79b8ff" loext:opacity="100%" fo:font-weight="bold"/>
    </style:style>
    <style:style style:name="T3" style:family="text">
      <style:text-properties fo:color="#79b8ff" loext:opacity="100%" fo:font-weight="bold" officeooo:rsid="0015f099"/>
    </style:style>
    <style:style style:name="T4" style:family="text">
      <style:text-properties officeooo:rsid="0015f099"/>
    </style:style>
    <style:style style:name="T5" style:family="text">
      <style:text-properties officeooo:rsid="0018a0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Strong_20_Emphasis">Garou Diplomatic Supplement</text:span></text:p>
      <text:p text:style-name="Preformatted_20_Text"><text:span text:style-name="Strong_20_Emphasis"/></text:p>
      <text:p text:style-name="Text_20_body"><text:span text:style-name="Strong_20_Emphasis">A cross-splat module for V:tM chronicles that need to engage Glass Walker (and other Garou) NPCs as diplomatic counterparts rather than as combat threats or background environment. Built for chronicles where the Cress Truce, the Royal Park Sept, or broader cross-supernatural diplomacy is operationally significant — particularly Melbourne and other Australian chronicles.</text:span></text:p>
      <text:p text:style-name="Text_20_body"><text:span text:style-name="Strong_20_Emphasis">Design principle:</text:span> This is <text:span text:style-name="Emphasis">Garou-as-they-appear-to-Kindred-diplomats</text:span> — not a full Werewolf: The Apocalypse conversion. The supplement provides enough cosmology, tribal politics, and protocol detail for Kindred-side characters to engage meaningfully, without requiring V:tM players to become W:tA experts. Where W:tA canon has been adapted or extended for this kit, that's noted explicitly.</text:p>
      <table:table table:name="Table1" table:style-name="Table1">
        <table:table-column table:style-name="Table1.A"/>
        <table:table-column table:style-name="Table1.B"/>
        <table:table-header-rows>
          <table:table-row>
            <table:table-cell table:style-name="Table1.A1" office:value-type="string">
              <text:p text:style-name="Table_20_Heading">Part</text:p>
            </table:table-cell>
            <table:table-cell table:style-name="Table1.A1" office:value-type="string">
              <text:p text:style-name="Table_20_Heading">Content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Cross-Splat Garou Lorebook (15 entries)</text:p>
          </table:table-cell>
        </table:table-row>
        <table:table-row>
          <table:table-cell table:style-name="Table1.A1" office:value-type="string">
            <text:p text:style-name="Table_20_Contents">2</text:p>
          </table:table-cell>
          <table:table-cell table:style-name="Table1.A1" office:value-type="string">
            <text:p text:style-name="Table_20_Contents">The Razor Wars 1907-1924 — historical detail</text:p>
          </table:table-cell>
        </table:table-row>
        <table:table-row>
          <table:table-cell table:style-name="Table1.A1" office:value-type="string">
            <text:p text:style-name="Table_20_Contents">3</text:p>
          </table:table-cell>
          <table:table-cell table:style-name="Table1.A1" office:value-type="string">
            <text:p text:style-name="Table_20_Contents">The Cress Truce — playable protocols</text:p>
          </table:table-cell>
        </table:table-row>
        <table:table-row>
          <table:table-cell table:style-name="Table1.A1" office:value-type="string">
            <text:p text:style-name="Table_20_Contents">4</text:p>
          </table:table-cell>
          <table:table-cell table:style-name="Table1.A1" office:value-type="string">
            <text:p text:style-name="Table_20_Contents">Glass Walker NPC pack (5 builds)</text:p>
          </table:table-cell>
        </table:table-row>
        <table:table-row>
          <table:table-cell table:style-name="Table1.A1" office:value-type="string">
            <text:p text:style-name="Table_20_Contents">5</text:p>
          </table:table-cell>
          <table:table-cell table:style-name="Table1.A1" office:value-type="string">
            <text:p text:style-name="Table_20_Contents">Other Garou tribes in Australia (brief reference)</text:p>
          </table:table-cell>
        </table:table-row>
        <table:table-row>
          <table:table-cell table:style-name="Table1.A1" office:value-type="string">
            <text:p text:style-name="Table_20_Contents">6</text:p>
          </table:table-cell>
          <table:table-cell table:style-name="Table1.A1" office:value-type="string">
            <text:p text:style-name="Table_20_Contents">Cross-splat mechanical handling</text:p>
          </table:table-cell>
        </table:table-row>
        <table:table-row>
          <table:table-cell table:style-name="Table1.A1" office:value-type="string">
            <text:p text:style-name="Table_20_Contents">7</text:p>
          </table:table-cell>
          <table:table-cell table:style-name="Table1.A1" office:value-type="string">
            <text:p text:style-name="Table_20_Contents">Cross-splat scenario hooks</text:p>
          </table:table-cell>
        </table:table-row>
      </table:table>
      <text:p text:style-name="Preformatted_20_Text"><text:span text:style-name="Strong_20_Emphasis"/></text:p>
      <text:p text:style-name="Preformatted_20_Text"><text:span text:style-name="Strong_20_Emphasis">A 15-entry lorebook providing the Garou cosmology, social structure, and Glass Walker specifics that V:tM players need to engage Garou NPCs as diplomatic counterparts. Designed to layer alongside the existing Melbourne or Australian lorebooks.</text:span></text:p>
      <text:p text:style-name="Preformatted_20_Text"><text:span text:style-name="Strong_20_Emphasis"/></text:p>
      <text:p text:style-name="Preformatted_20_Text"><text:span text:style-name="Strong_20_Emphasis">load alongside </text:span><text:span text:style-name="Strong_20_Emphasis"><text:span text:style-name="Source_20_Text"><text:span text:style-name="T1">vtm_modern_nights.json</text:span></text:span></text:span><text:span text:style-name="Strong_20_Emphasis"> and the appropriate city supplement (Melbourne for the Cress Truce, or other Australian city supplements as developed).</text:span></text:p>
      <text:p text:style-name="Preformatted_20_Text"><text:span text:style-name="Strong_20_Emphasis"/></text:p>
      <text:p text:style-name="Preformatted_20_Text"><text:span text:style-name="Strong_20_Emphasis"><text:span text:style-name="Source_20_Text"><text:span text:style-name="T2">THE RAZOR WARS — A HISTORICAL ACCOUNT </text:span></text:span></text:span><text:span text:style-name="Strong_20_Emphasis"><text:span text:style-name="Source_20_Text"><text:span text:style-name="T3">1907-1924</text:span></text:span></text:span></text:p>
      <text:p text:style-name="Preformatted_20_Text"><text:span text:style-name="Strong_20_Emphasis"><text:span text:style-name="Source_20_Text"><text:span text:style-name="T3"/></text:span></text:span></text:p>
      <text:p text:style-name="Preformatted_20_Text"><text:span text:style-name="Strong_20_Emphasis"/></text:p>
      <text:p text:style-name="Preformatted_20_Text"><text:span text:style-name="Strong_20_Emphasis">The full chronicle of the conflict that produced the Cress Truce. Detailed enough that chronicle scenes referencing Razor Wars history have specific names, dates, and events to draw on; not so detailed that the historical material overwhelms playable use.</text:span></text:p>
      <text:p text:style-name="Preformatted_20_Text"><text:span text:style-name="Strong_20_Emphasis"/></text:p>
      <text:p text:style-name="Preformatted_20_Text"><text:span text:style-name="Strong_20_Emphasis"><text:span text:style-name="Source_20_Text"><text:span text:style-name="T2">THE CRESS TRUCE — OPERATIONAL TEXT</text:span></text:span></text:span></text:p>
      <text:p text:style-name="Preformatted_20_Text"><text:span text:style-name="Strong_20_Emphasis"/></text:p>
      <text:p text:style-name="Preformatted_20_Text"><text:span text:style-name="Strong_20_Emphasis">The actual treaty articles, in playable form. This is what gets cited in scenes when characters reference Cress Truce provisions, what protocols govern emergency response, and what procedures the quarterly Truce Council follows.</text:span></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oft-page-break/><text:span text:style-name="Strong_20_Emphasis">Glass Walker NPC </text:span><text:span text:style-name="Strong_20_Emphasis"><text:span text:style-name="T4">Pack</text:span></text:span></text:p>
      <text:p text:style-name="Preformatted_20_Text"><text:span text:style-name="Strong_20_Emphasis"/></text:p>
      <text:p text:style-name="Text_20_body"><text:span text:style-name="Strong_20_Emphasis">Five fully-built Glass Walker (and adjacent) NPCs for chronicles requiring deeper Garou diplomatic engagement. Built using Tier-3-equivalent architecture from the V:tM NPC builder, adapted for Garou register.</text:span></text:p>
      <text:h text:style-name="Heading_20_3" text:outline-level="3"><text:span text:style-name="Strong_20_Emphasis">NPC 1: Don Abacus</text:span> <text:span text:style-name="Emphasis">(deceased 2003, ancestor-spirit consultable)</text:span></text:h>
      <text:p text:style-name="Text_20_body">The Glass Walker who negotiated the Cress Truce. Now an ancestor spirit at Royal Park caern, consultable through formal ritual. The chronicle's deepest cross-supernatural diplomatic resource and a presence whose attention can shape entire arcs.</text:p>
      <text:h text:style-name="Heading_20_3" text:outline-level="3"><text:span text:style-name="Strong_20_Emphasis">NPC 2: Marcus Cobalt </text:span><text:span text:style-name="Strong_20_Emphasis"><text:span text:style-name="Emphasis">(deceased 2017, recent significant loss)</text:span></text:span></text:h>
      <text:p text:style-name="Text_20_body">Eliza's predecessor. The Septleader killed by the Brisbane Sabbat raid that crossed Truce lines. Not consultable as ancestor spirit — his Final Death was too recent for full ancestor-binding to have been completed before the Brisbane crisis disrupted ritual operations. His memory shapes Eliza's leadership and the sept's grief.</text:p>
      <text:h text:style-name="Heading_20_3" text:outline-level="3"><text:span text:style-name="Strong_20_Emphasis">NPC 3: Patrick "Paddy" Boon </text:span><text:span text:style-name="Strong_20_Emphasis"><text:span text:style-name="Emphasis">(Bone Gnawer, Melbourne)</text:span></text:span></text:h>
      <text:p text:style-name="Text_20_body">Continental Bone Gnawer representative for southeastern Australia, the senior tribal counterpart to Eliza for cross-tribal cooperation. The diplomatic operative who handles inner-Melbourne urban-poverty community defence and who has been quietly cooperative with the Royal Park sept for fifty years.</text:p>
      <text:h text:style-name="Heading_20_3" text:outline-level="3"><text:span text:style-name="Strong_20_Emphasis">NPC 4: Mereki Cole </text:span><text:span text:style-name="Strong_20_Emphasis"><text:span text:style-name="Emphasis">(Children of Gaia, Tasmania-based)</text:span></text:span></text:h>
      <text:p text:style-name="Text_20_body">Children of Gaia continental peacemaker representative for southeastern Australia. Diana Cole's biological grand-niece by mortal genealogy (Children of Gaia maintain cross-tribal kinfolk relationships in ways most tribes do not). The diplomatic mediator who provides third-party witness during major Truce events.</text:p>
      <text:h text:style-name="Heading_20_3" text:outline-level="3"><text:span text:style-name="Strong_20_Emphasis">NPC 5: Tomás Schreckenberg </text:span><text:span text:style-name="Strong_20_Emphasis"><text:span text:style-name="Emphasis">(Continental Sept Council senior, Sydney-based — yes, Sydney)</text:span></text:span></text:h>
      <text:p text:style-name="Text_20_body">The Glass Walker Continental Sept Council senior representative for Australia, currently. Operates from Sydney within the Sarrasine domain — a fact that is itself politically complicated. Has held the position since 2015. The Garou whom Eliza Hawkins-Greene reports to in formal Continental Sept Council channel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oft-page-break/><text:span text:style-name="Strong_20_Emphasis"><text:span text:style-name="Source_20_Text"><text:span text:style-name="T2">OTHER GAROU TRIBES IN AUSTRALIA</text:span></text:span></text:span></text:p>
      <text:p text:style-name="Preformatted_20_Text"><text:span text:style-name="Strong_20_Emphasis"/></text:p>
      <text:p text:style-name="Preformatted_20_Text"><text:span text:style-name="Strong_20_Emphasis">Quick-reference detail on the other Garou tribes operating in Australia, for chronicles where they need to appear without warranting full NPC builds. Most of this material echoes Part 1's lorebook entry 13 with additional operational specificity.</text:span></text:p>
      <text:p text:style-name="Preformatted_20_Text"><text:span text:style-name="Strong_20_Emphasis"/></text:p>
      <text:p text:style-name="Preformatted_20_Text"><text:span text:style-name="Strong_20_Emphasis"><text:span text:style-name="Source_20_Text"><text:span text:style-name="T2">CROSS-SPLAT MECHANICAL HANDLING</text:span></text:span></text:span></text:p>
      <text:p text:style-name="Preformatted_20_Text"><text:span text:style-name="Strong_20_Emphasis"/></text:p>
      <text:p text:style-name="Preformatted_20_Text"><text:span text:style-name="Strong_20_Emphasis">How to handle the mechanical edge cases when V:tM and W:tA systems interact in scenes — the moments when a Kindred PC's Disciplines hit a Garou NPC, when Garou Gifts hit a Kindred PC, when Rage and Hunger occupy the same room.</text:span></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1"><text:soft-page-break/><text:span text:style-name="Strong_20_Emphasis"><text:span text:style-name="T5">Cross-Splat Scenario Handling</text:span></text:span></text:p>
      <text:p text:style-name="P1"><text:span text:style-name="Strong_20_Emphasis"/></text:p>
      <text:p text:style-name="P2"><text:span text:style-name="Strong_20_Emphasis">Five chronicle hooks that put {{user}} into cross-splat diplomatic situations beyond the Cress Council scenario already in the Melbourne set. Each is designed to be expandable into a full scenario card if desired.</text:span></text:p>
      <text:h text:style-name="Heading_20_3" text:outline-level="3"><text:span text:style-name="Strong_20_Emphasis">Hook 1: The Royal Park Visit</text:span></text:h>
      <text:p text:style-name="Text_20_body">{{user}} has been invited to attend a Royal Park caern ritual as observer — a rare honour extended to perhaps two Kindred per decade. Sofia Calabria-Hecata has nominated {{user}}; Eliza Hawkins-Greene has consulted Diana Cole and Don Abacus's ancestor-spirit; the spirit has indicated approval. The ritual is the seasonal renewal of the caern's binding to totem-Cockatoo, conducted at the autumn equinox. {{user}}'s role: observer, witness, demonstrate that Kindred can be present at sacred Garou ritual without violation. The ritual takes four hours. The opportunity to fail is constant. The opportunity to deepen cross-supernatural diplomatic standing for life is also present.</text:p>
      <text:p text:style-name="Text_20_body"><text:span text:style-name="Strong_20_Emphasis">Stakes:</text:span> Cross-supernatural Status. {{user}}'s standing with the Royal Park sept and through them with Glass Walkers continentally. The opportunity is rare and chronicle-defining.</text:p>
      <text:h text:style-name="Heading_20_3" text:outline-level="3"><text:span text:style-name="Strong_20_Emphasis">Hook 2: The Brisbane Border Operation</text:span></text:h>
      <text:p text:style-name="Text_20_body">A Bishop Callista Vox Sabbat pack has been detected approaching the Queensland-NSW border. The Royal Park sept is mobilising response under Truce Article 8 joint-threat protocols. {{user}} is being invited to participate as Camarilla / Anarch / Hecata operative depending on chronicle context. The operation is genuinely dangerous — Sabbat combat tier, potentially including The Last Days pack from the Antagonist Pack — and requires cross-supernatural tactical coordination. Marcus Tan will lead the Garou operational element; {{user}}'s side will be led by Sister Fatima Salih-El (Camarilla), Tau Larrakia (Anarch), or Augusto Calabria-Greco (Hecata).</text:p>
      <text:p text:style-name="Text_20_body"><text:span text:style-name="Strong_20_Emphasis">Stakes:</text:span> Continental supernatural politics. Defeating the Brisbane operation produces meaningful chronicle progress; defeating it badly produces casualties on both sides; failing produces Continental Cress Council escalation.</text:p>
      <text:h text:style-name="Heading_20_3" text:outline-level="3"><text:span text:style-name="Strong_20_Emphasis">Hook 3: Don Abacus Consults</text:span></text:h>
      <text:p text:style-name="Text_20_body">The chronicle has reached a point where {{user}} requires perspective only Don Abacus's ancestor-spirit can provide — perhaps Sarrasine-related historical context, perhaps Razor Wars precedent for a current crisis, perhaps Continental Sept Council political navigation for Eliza's invitation question. Diana Cole agrees to conduct the consultation ritual at Royal Park caern with {{user}} present as questioner. The ritual takes 90 minutes; the conversation with the ancestor-spirit takes 15-30 minutes; the spiritual cost is significant for the sept and they expect the consultation to produce useful chronicle work.</text:p>
      <text:p text:style-name="Text_20_body"><text:span text:style-name="Strong_20_Emphasis">Stakes:</text:span> Information access. Don Abacus's ancestor-spirit has 78 years of Septleadership memory plus 22 years of post-death observation. The consultation can resolve plot questions that no living source can address. The cost — sept spiritual resources, Diana's ritual labour, the spirit's expended attention — is real and acknowledged.</text:p>
      <text:h text:style-name="Heading_20_3" text:outline-level="3"><text:span text:style-name="Strong_20_Emphasis">Hook 4: The Hecata-Glass-Walker Joint Working</text:span></text:h>
      <text:p text:style-name="Text_20_body">Sofia Calabria-Hecata and Diana Cole have been working on a joint cross-realm research project <text:soft-page-break/>since 2018 — the Cobalt-Calabria Protocols, developed in response to Marcus Cobalt's death and aimed at allowing legitimate Hecata necromancy to address Garou-related death situations without violating the Garou cosmological boundary that Necromancy normally cannot cross. The protocols have produced operational results twice and have failed (with significant consequences) once. A new operational opportunity has emerged — a recently-deceased Glass Walker kinfolk whose family wishes to consult them through joint Hecata-Glass-Walker ritual. {{user}} is being invited to assist. The ritual is technically experimental and the cost of failure is unclear.</text:p>
      <text:p text:style-name="Text_20_body"><text:span text:style-name="Strong_20_Emphasis">Stakes:</text:span> Cross-realm research advancement. The protocols are quietly building toward something that could reshape both Hecata and Glass Walker operational capabilities globally. {{user}}'s participation provides Vitae-resonance the protocols require; the failure modes are unclear because the protocols are still developing.</text:p>
      <text:h text:style-name="Heading_20_3" text:outline-level="3"><text:span text:style-name="Strong_20_Emphasis">Hook 5: The Continental Sept Council Invitation</text:span></text:h>
      <text:p text:style-name="Text_20_body">Eliza Hawkins-Greene has been formally invited to Continental Sept Council senior position — the role currently held by Tomás Schreckenberg, who is preparing for retirement. Eliza is genuinely undecided about acceptance. The decision affects Royal Park sept (Marcus Tan would ascend to Septleader; the sept reorganises), Melbourne cross-supernatural diplomatic infrastructure (Eliza's relationships do not transfer cleanly to Marcus Tan), and continental Garou politics (Eliza in Continental position changes Australian Glass Walker strategy in ways neither Tomás nor Eliza fully predict). Eliza has decided to consult three external operatives before deciding: Sofia Calabria-Hecata (already consulted), Sister Fatima Salih-El (already consulted), and {{user}} (being invited). The consultation conversation is at the Royal Park caern, mid-evening, formal Theurge-witnessed proceeding.</text:p>
      <text:p text:style-name="Text_20_body"><text:span text:style-name="Strong_20_Emphasis">Stakes:</text:span> Chronicle-shaping continental decision. {{user}}'s perspective on Eliza's question genuinely affects Eliza's choice; Eliza will not accept the invitation if her three external consultants advise against it. The choice reshapes Australian supernatural politics for a decade.</text:p>
      <text:p text:style-name="P1"><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7:55:13.028667764</dc:date>
    <meta:editing-duration>PT4M42S</meta:editing-duration>
    <meta:editing-cycles>2</meta:editing-cycles>
    <meta:generator>LibreOffice/24.2.7.2$Linux_X86_64 LibreOffice_project/420$Build-2</meta:generator>
    <meta:document-statistic meta:table-count="1" meta:image-count="0" meta:object-count="0" meta:page-count="5" meta:paragraph-count="58" meta:word-count="1382" meta:character-count="9954" meta:non-whitespace-character-count="8611"/>
  </office:meta>
</office:document-meta>
</file>