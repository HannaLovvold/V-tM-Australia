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3.431cm"/>
    </style:style>
    <style:style style:name="Table1.B" style:family="table-column">
      <style:table-column-properties style:column-width="6.114cm"/>
    </style:style>
    <style:style style:name="Table1.C" style:family="table-column">
      <style:table-column-properties style:column-width="3.478cm"/>
    </style:style>
    <style:style style:name="Table1.D" style:family="table-column">
      <style:table-column-properties style:column-width="3.978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4.029cm"/>
    </style:style>
    <style:style style:name="Table2.B" style:family="table-column">
      <style:table-column-properties style:column-width="3.709cm"/>
    </style:style>
    <style:style style:name="Table2.C" style:family="table-column">
      <style:table-column-properties style:column-width="4.86cm"/>
    </style:style>
    <style:style style:name="Table2.D" style:family="table-column">
      <style:table-column-properties style:column-width="4.403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3.588cm"/>
    </style:style>
    <style:style style:name="Table3.B" style:family="table-column">
      <style:table-column-properties style:column-width="13.413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3.385cm"/>
    </style:style>
    <style:style style:name="Table4.B" style:family="table-column">
      <style:table-column-properties style:column-width="13.615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3.395cm"/>
    </style:style>
    <style:style style:name="Table5.B" style:family="table-column">
      <style:table-column-properties style:column-width="13.605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3.32cm"/>
    </style:style>
    <style:style style:name="Table6.B" style:family="table-column">
      <style:table-column-properties style:column-width="13.681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3.237cm"/>
    </style:style>
    <style:style style:name="Table7.B" style:family="table-column">
      <style:table-column-properties style:column-width="13.764cm"/>
    </style:style>
    <style:style style:name="Table7.A1" style:family="table-cell">
      <style:table-cell-properties style:vertical-align="middle" fo:padding="0.049cm" fo:border="none"/>
    </style:style>
    <style:style style:name="P1" style:family="paragraph" style:parent-style-name="Text_20_body">
      <style:paragraph-properties fo:margin-top="0cm" fo:margin-bottom="0cm" style:contextual-spacing="false"/>
    </style:style>
    <style:style style:name="P2" style:family="paragraph" style:parent-style-name="Preformatted_20_Text">
      <style:paragraph-properties fo:margin-top="0cm" fo:margin-bottom="0.499cm" style:contextual-spacing="false"/>
    </style:style>
    <style:style style:name="P3" style:family="paragraph" style:parent-style-name="Text_20_body">
      <style:paragraph-properties fo:margin-top="0cm" fo:margin-bottom="0cm" style:contextual-spacing="false"/>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5"/>
    <style:style style:name="P13" style:family="paragraph" style:parent-style-name="Text_20_body" style:list-style-name="L5">
      <style:paragraph-properties fo:margin-top="0cm" fo:margin-bottom="0cm" style:contextual-spacing="false"/>
    </style:style>
    <style:style style:name="P14" style:family="paragraph" style:parent-style-name="Text_20_body" style:list-style-name="L6">
      <style:paragraph-properties fo:margin-left="0cm" fo:margin-right="0cm" fo:margin-top="0cm" fo:margin-bottom="0cm" style:contextual-spacing="false" fo:text-indent="0cm" style:auto-text-indent="false"/>
    </style:style>
    <style:style style:name="P15" style:family="paragraph" style:parent-style-name="Text_20_body" style:list-style-name="L6">
      <style:paragraph-properties fo:margin-left="0cm" fo:margin-right="0cm" fo:text-indent="0cm" style:auto-text-indent="false"/>
    </style:style>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8">
      <style:paragraph-properties fo:margin-top="0cm" fo:margin-bottom="0cm" style:contextual-spacing="false"/>
    </style:style>
    <style:style style:name="P19" style:family="paragraph" style:parent-style-name="Text_20_body" style:list-style-name="L9">
      <style:paragraph-properties fo:margin-left="0cm" fo:margin-right="0cm" fo:margin-top="0cm" fo:margin-bottom="0cm" style:contextual-spacing="false" fo:text-indent="0cm" style:auto-text-indent="false"/>
    </style:style>
    <style:style style:name="P20" style:family="paragraph" style:parent-style-name="Text_20_body" style:list-style-name="L9">
      <style:paragraph-properties fo:margin-left="0cm" fo:margin-right="0cm" fo:text-indent="0cm" style:auto-text-indent="false"/>
    </style:style>
    <style:style style:name="P21" style:family="paragraph" style:parent-style-name="Text_20_body" style:list-style-name="L10"/>
    <style:style style:name="P22" style:family="paragraph" style:parent-style-name="Text_20_body" style:list-style-name="L10">
      <style:paragraph-properties fo:margin-top="0cm" fo:margin-bottom="0cm" style:contextual-spacing="false"/>
    </style:style>
    <style:style style:name="P23" style:family="paragraph" style:parent-style-name="Text_20_body" style:list-style-name="L11"/>
    <style:style style:name="P24" style:family="paragraph" style:parent-style-name="Text_20_body" style:list-style-name="L11">
      <style:paragraph-properties fo:margin-top="0cm" fo:margin-bottom="0cm" style:contextual-spacing="false"/>
    </style:style>
    <style:style style:name="P25" style:family="paragraph" style:parent-style-name="Text_20_body" style:list-style-name="L12">
      <style:paragraph-properties fo:margin-left="0cm" fo:margin-right="0cm" fo:margin-top="0cm" fo:margin-bottom="0cm" style:contextual-spacing="false" fo:text-indent="0cm" style:auto-text-indent="false"/>
    </style:style>
    <style:style style:name="P26" style:family="paragraph" style:parent-style-name="Text_20_body" style:list-style-name="L12">
      <style:paragraph-properties fo:margin-left="0cm" fo:margin-right="0cm" fo:text-indent="0cm" style:auto-text-indent="false"/>
    </style:style>
    <style:style style:name="P27" style:family="paragraph" style:parent-style-name="Text_20_body" style:list-style-name="L13"/>
    <style:style style:name="P28" style:family="paragraph" style:parent-style-name="Text_20_body" style:list-style-name="L13">
      <style:paragraph-properties fo:margin-top="0cm" fo:margin-bottom="0cm" style:contextual-spacing="false"/>
    </style:style>
    <style:style style:name="P29" style:family="paragraph" style:parent-style-name="Text_20_body" style:list-style-name="L14"/>
    <style:style style:name="P30" style:family="paragraph" style:parent-style-name="Text_20_body" style:list-style-name="L14">
      <style:paragraph-properties fo:margin-top="0cm" fo:margin-bottom="0cm" style:contextual-spacing="false"/>
    </style:style>
    <style:style style:name="P31" style:family="paragraph" style:parent-style-name="Text_20_body" style:list-style-name="L15">
      <style:paragraph-properties fo:margin-top="0cm" fo:margin-bottom="0cm" style:contextual-spacing="false"/>
    </style:style>
    <style:style style:name="P32" style:family="paragraph" style:parent-style-name="Text_20_body" style:list-style-name="L15">
      <style:paragraph-properties fo:margin-left="0cm" fo:margin-right="0cm" fo:margin-top="0cm" fo:margin-bottom="0cm" style:contextual-spacing="false" fo:text-indent="0cm" style:auto-text-indent="false"/>
    </style:style>
    <style:style style:name="P33" style:family="paragraph" style:parent-style-name="Text_20_body" style:list-style-name="L15">
      <style:paragraph-properties fo:margin-left="0cm" fo:margin-right="0cm" fo:text-indent="0cm" style:auto-text-indent="false"/>
    </style:style>
    <style:style style:name="P34" style:family="paragraph" style:parent-style-name="Text_20_body" style:list-style-name="L16"/>
    <style:style style:name="P35" style:family="paragraph" style:parent-style-name="Text_20_body" style:list-style-name="L16">
      <style:paragraph-properties fo:margin-top="0cm" fo:margin-bottom="0cm" style:contextual-spacing="false"/>
    </style:style>
    <style:style style:name="P36" style:family="paragraph" style:parent-style-name="Text_20_body" style:list-style-name="L17"/>
    <style:style style:name="P37" style:family="paragraph" style:parent-style-name="Text_20_body" style:list-style-name="L17">
      <style:paragraph-properties fo:margin-top="0cm" fo:margin-bottom="0cm" style:contextual-spacing="false"/>
    </style:style>
    <style:style style:name="P38" style:family="paragraph" style:parent-style-name="Text_20_body" style:list-style-name="L18">
      <style:paragraph-properties fo:margin-left="0cm" fo:margin-right="0cm" fo:margin-top="0cm" fo:margin-bottom="0cm" style:contextual-spacing="false" fo:text-indent="0cm" style:auto-text-indent="false"/>
    </style:style>
    <style:style style:name="P39" style:family="paragraph" style:parent-style-name="Text_20_body" style:list-style-name="L18">
      <style:paragraph-properties fo:margin-left="0cm" fo:margin-right="0cm" fo:text-indent="0cm" style:auto-text-indent="false"/>
    </style:style>
    <style:style style:name="P40" style:family="paragraph" style:parent-style-name="Text_20_body" style:list-style-name="L19"/>
    <style:style style:name="P41" style:family="paragraph" style:parent-style-name="Text_20_body" style:list-style-name="L19">
      <style:paragraph-properties fo:margin-top="0cm" fo:margin-bottom="0cm" style:contextual-spacing="false"/>
    </style:style>
    <style:style style:name="P42" style:family="paragraph" style:parent-style-name="Text_20_body" style:list-style-name="L20"/>
    <style:style style:name="P43" style:family="paragraph" style:parent-style-name="Text_20_body" style:list-style-name="L20">
      <style:paragraph-properties fo:margin-top="0cm" fo:margin-bottom="0cm" style:contextual-spacing="false"/>
    </style:style>
    <style:style style:name="P44" style:family="paragraph" style:parent-style-name="Text_20_body" style:list-style-name="L21"/>
    <style:style style:name="P45" style:family="paragraph" style:parent-style-name="Text_20_body" style:list-style-name="L21">
      <style:paragraph-properties fo:margin-top="0cm" fo:margin-bottom="0cm" style:contextual-spacing="false"/>
    </style:style>
    <style:style style:name="P46" style:family="paragraph" style:parent-style-name="Text_20_body" style:list-style-name="L22"/>
    <style:style style:name="P47" style:family="paragraph" style:parent-style-name="Text_20_body" style:list-style-name="L22">
      <style:paragraph-properties fo:margin-top="0cm" fo:margin-bottom="0cm" style:contextual-spacing="false"/>
    </style:style>
    <style:style style:name="P48" style:family="paragraph" style:parent-style-name="Text_20_body" style:list-style-name="L23"/>
    <style:style style:name="P49" style:family="paragraph" style:parent-style-name="Text_20_body" style:list-style-name="L23">
      <style:paragraph-properties fo:margin-top="0cm" fo:margin-bottom="0cm" style:contextual-spacing="false"/>
    </style:style>
    <style:style style:name="P50" style:family="paragraph" style:parent-style-name="Text_20_body" style:list-style-name="L24"/>
    <style:style style:name="P51" style:family="paragraph" style:parent-style-name="Text_20_body" style:list-style-name="L24">
      <style:paragraph-properties fo:margin-top="0cm" fo:margin-bottom="0cm" style:contextual-spacing="false"/>
    </style:style>
    <style:style style:name="P52" style:family="paragraph" style:parent-style-name="Text_20_body" style:list-style-name="L25"/>
    <style:style style:name="P53" style:family="paragraph" style:parent-style-name="Text_20_body" style:list-style-name="L25">
      <style:paragraph-properties fo:margin-top="0cm" fo:margin-bottom="0cm" style:contextual-spacing="false"/>
    </style:style>
    <style:style style:name="P54" style:family="paragraph" style:parent-style-name="Text_20_body" style:list-style-name="L26"/>
    <style:style style:name="P55" style:family="paragraph" style:parent-style-name="Text_20_body" style:list-style-name="L26">
      <style:paragraph-properties fo:margin-top="0cm" fo:margin-bottom="0cm" style:contextual-spacing="false"/>
    </style:style>
    <style:style style:name="P56" style:family="paragraph" style:parent-style-name="Text_20_body" style:list-style-name="L27"/>
    <style:style style:name="P57" style:family="paragraph" style:parent-style-name="Text_20_body" style:list-style-name="L27">
      <style:paragraph-properties fo:margin-top="0cm" fo:margin-bottom="0cm" style:contextual-spacing="false"/>
    </style:style>
    <style:style style:name="P58" style:family="paragraph" style:parent-style-name="Text_20_body" style:list-style-name="L28"/>
    <style:style style:name="P59" style:family="paragraph" style:parent-style-name="Text_20_body" style:list-style-name="L28">
      <style:paragraph-properties fo:margin-top="0cm" fo:margin-bottom="0cm" style:contextual-spacing="false"/>
    </style:style>
    <style:style style:name="P60" style:family="paragraph" style:parent-style-name="Text_20_body" style:list-style-name="L29"/>
    <style:style style:name="P61" style:family="paragraph" style:parent-style-name="Text_20_body" style:list-style-name="L29">
      <style:paragraph-properties fo:margin-top="0cm" fo:margin-bottom="0cm" style:contextual-spacing="false"/>
    </style:style>
    <style:style style:name="P62" style:family="paragraph" style:parent-style-name="Text_20_body" style:list-style-name="L30"/>
    <style:style style:name="P63" style:family="paragraph" style:parent-style-name="Text_20_body" style:list-style-name="L30">
      <style:paragraph-properties fo:margin-top="0cm" fo:margin-bottom="0cm" style:contextual-spacing="false"/>
    </style:style>
    <style:style style:name="P64" style:family="paragraph" style:parent-style-name="Text_20_body" style:list-style-name="L31"/>
    <style:style style:name="P65" style:family="paragraph" style:parent-style-name="Text_20_body" style:list-style-name="L31">
      <style:paragraph-properties fo:margin-top="0cm" fo:margin-bottom="0cm" style:contextual-spacing="false"/>
    </style:style>
    <style:style style:name="P66" style:family="paragraph" style:parent-style-name="Text_20_body" style:list-style-name="L32"/>
    <style:style style:name="P67" style:family="paragraph" style:parent-style-name="Text_20_body" style:list-style-name="L32">
      <style:paragraph-properties fo:margin-top="0cm" fo:margin-bottom="0cm" style:contextual-spacing="false"/>
    </style:style>
    <style:style style:name="P68" style:family="paragraph" style:parent-style-name="Text_20_body" style:list-style-name="L33"/>
    <style:style style:name="P69" style:family="paragraph" style:parent-style-name="Text_20_body" style:list-style-name="L33">
      <style:paragraph-properties fo:margin-top="0cm" fo:margin-bottom="0cm" style:contextual-spacing="false"/>
    </style:style>
    <style:style style:name="P70" style:family="paragraph" style:parent-style-name="Text_20_body" style:list-style-name="L34"/>
    <style:style style:name="P71" style:family="paragraph" style:parent-style-name="Text_20_body" style:list-style-name="L34">
      <style:paragraph-properties fo:margin-top="0cm" fo:margin-bottom="0cm" style:contextual-spacing="false"/>
    </style:style>
    <style:style style:name="P72" style:family="paragraph" style:parent-style-name="Text_20_body" style:list-style-name="L35"/>
    <style:style style:name="P73" style:family="paragraph" style:parent-style-name="Text_20_body" style:list-style-name="L35">
      <style:paragraph-properties fo:margin-top="0cm" fo:margin-bottom="0cm" style:contextual-spacing="false"/>
    </style:style>
    <style:style style:name="P74" style:family="paragraph" style:parent-style-name="Text_20_body" style:list-style-name="L36"/>
    <style:style style:name="P75" style:family="paragraph" style:parent-style-name="Text_20_body" style:list-style-name="L36">
      <style:paragraph-properties fo:margin-top="0cm" fo:margin-bottom="0cm" style:contextual-spacing="false"/>
    </style:style>
    <style:style style:name="P76" style:family="paragraph" style:parent-style-name="Text_20_body" style:list-style-name="L37"/>
    <style:style style:name="P77" style:family="paragraph" style:parent-style-name="Text_20_body" style:list-style-name="L37">
      <style:paragraph-properties fo:margin-top="0cm" fo:margin-bottom="0cm" style:contextual-spacing="false"/>
    </style:style>
    <style:style style:name="P78" style:family="paragraph" style:parent-style-name="Text_20_body" style:list-style-name="L38"/>
    <style:style style:name="P79" style:family="paragraph" style:parent-style-name="Text_20_body" style:list-style-name="L38">
      <style:paragraph-properties fo:margin-top="0cm" fo:margin-bottom="0cm" style:contextual-spacing="false"/>
    </style:style>
    <style:style style:name="P80" style:family="paragraph" style:parent-style-name="Text_20_body" style:list-style-name="L39"/>
    <style:style style:name="P81" style:family="paragraph" style:parent-style-name="Text_20_body" style:list-style-name="L39">
      <style:paragraph-properties fo:margin-top="0cm" fo:margin-bottom="0cm" style:contextual-spacing="false"/>
    </style:style>
    <style:style style:name="P82" style:family="paragraph" style:parent-style-name="Text_20_body" style:list-style-name="L40"/>
    <style:style style:name="P83" style:family="paragraph" style:parent-style-name="Text_20_body" style:list-style-name="L40">
      <style:paragraph-properties fo:margin-top="0cm" fo:margin-bottom="0cm" style:contextual-spacing="false"/>
    </style:style>
    <style:style style:name="P84" style:family="paragraph" style:parent-style-name="Text_20_body" style:list-style-name="L41"/>
    <style:style style:name="P85" style:family="paragraph" style:parent-style-name="Text_20_body" style:list-style-name="L41">
      <style:paragraph-properties fo:margin-top="0cm" fo:margin-bottom="0cm" style:contextual-spacing="false"/>
    </style:style>
    <style:style style:name="P86" style:family="paragraph" style:parent-style-name="Text_20_body" style:list-style-name="L42"/>
    <style:style style:name="P87" style:family="paragraph" style:parent-style-name="Text_20_body" style:list-style-name="L42">
      <style:paragraph-properties fo:margin-top="0cm" fo:margin-bottom="0cm" style:contextual-spacing="false"/>
    </style:style>
    <style:style style:name="P88" style:family="paragraph" style:parent-style-name="Text_20_body" style:list-style-name="L43"/>
    <style:style style:name="P89" style:family="paragraph" style:parent-style-name="Text_20_body" style:list-style-name="L43">
      <style:paragraph-properties fo:margin-top="0cm" fo:margin-bottom="0cm" style:contextual-spacing="false"/>
    </style:style>
    <style:style style:name="P90" style:family="paragraph" style:parent-style-name="Text_20_body" style:list-style-name="L44"/>
    <style:style style:name="P91" style:family="paragraph" style:parent-style-name="Text_20_body" style:list-style-name="L44">
      <style:paragraph-properties fo:margin-top="0cm" fo:margin-bottom="0cm" style:contextual-spacing="false"/>
    </style:style>
    <style:style style:name="P92" style:family="paragraph" style:parent-style-name="Text_20_body" style:list-style-name="L45"/>
    <style:style style:name="P93" style:family="paragraph" style:parent-style-name="Text_20_body" style:list-style-name="L45">
      <style:paragraph-properties fo:margin-top="0cm" fo:margin-bottom="0cm" style:contextual-spacing="false"/>
    </style:style>
    <style:style style:name="P94" style:family="paragraph" style:parent-style-name="Text_20_body" style:list-style-name="L46"/>
    <style:style style:name="P95" style:family="paragraph" style:parent-style-name="Text_20_body" style:list-style-name="L46">
      <style:paragraph-properties fo:margin-top="0cm" fo:margin-bottom="0cm" style:contextual-spacing="false"/>
    </style:style>
    <style:style style:name="P96" style:family="paragraph" style:parent-style-name="Text_20_body" style:list-style-name="L47"/>
    <style:style style:name="P97" style:family="paragraph" style:parent-style-name="Text_20_body" style:list-style-name="L47">
      <style:paragraph-properties fo:margin-top="0cm" fo:margin-bottom="0cm" style:contextual-spacing="false"/>
    </style:style>
    <style:style style:name="T1" style:family="text">
      <style:text-properties fo:color="#f97583" loext:opacity="10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Chronicle Design Prep Guide — Building Your Own Multi-Session Chronicle from the Kit</text:span></text:p>
      <text:p text:style-name="P1"><text:span text:style-name="Strong_20_Emphasis"/></text:p>
      <text:p text:style-name="P1"><text:span text:style-name="Strong_20_Emphasis">A meta-document for designing your own multi-session V:tM chronicle from the accumulated kit components. The kit now contains 13 lorebooks, 40 scenarios, 22 pre-built coteries, 3 cross-splat antagonist supplements, 7 specialised chronicle prep guides, plus continuing supporting infrastructure across personas, antagonists, NPC builders, and safety tools. This guide provides the framework for assembling those components into a coherent chronicle that fits your specific table, your specific players, and your specific chronicle ambitions.</text:span></text:p>
      <text:p text:style-name="Text_20_body"><text:span text:style-name="Strong_20_Emphasis">Editorial note:</text:span> Maintaining disciplined prose throughout. This guide is meant to be readable and usable — practical chronicle design guidance rather than additional institutional-register material.</text:p>
      <text:p text:style-name="Text_20_body"><text:span text:style-name="Strong_20_Emphasis">Position in the kit:</text:span> This document sits alongside the seven existing chronicle prep guides as the <text:span text:style-name="Emphasis">meta-prep guide</text:span> — the document you read first when you're designing a new chronicle, before you select chronicle mode, before you decide on city or scope. The seven existing prep guides each address specific chronicle modes; this one addresses the design process itself.</text:p>
      <text:p text:style-name="Text_20_body"><text:span text:style-name="Strong_20_Emphasis">Audience:</text:span> Storytellers and AI prompt designers preparing new chronicles using the kit, players who want to understand the design choices their Storyteller is making, anyone using the kit's components for chronicle work who wants a structured approach to chronicle assembly.</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oft-page-break/><text:span text:style-name="Strong_20_Emphasis">Every chronicle requires six fundamental design decisions made in roughly the order presented. Earlier decisions constrain later decisions; later decisions reveal whether earlier decisions were calibrated appropriately. The kit's components support every combination of decisions, but specific combinations work better than others.</text:span></text:p>
      <text:h text:style-name="Heading_20_3" text:outline-level="3"><text:span text:style-name="Strong_20_Emphasis">Decision 1: Chronicle scope</text:span></text:h>
      <text:p text:style-name="Text_20_body">The first decision: how big is your chronicle? Scope determines how many components you'll layer, how complex the institutional dynamics will be, and how many sessions the chronicle requires for adequate development.</text:p>
      <text:p text:style-name="Text_20_body"><text:span text:style-name="Strong_20_Emphasis">Five primary scope categori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cope</text:p>
            </table:table-cell>
            <table:table-cell table:style-name="Table1.A1" office:value-type="string">
              <text:p text:style-name="Table_20_Heading">Components</text:p>
            </table:table-cell>
            <table:table-cell table:style-name="Table1.A1" office:value-type="string">
              <text:p text:style-name="Table_20_Heading">Sessions</text:p>
            </table:table-cell>
            <table:table-cell table:style-name="Table1.A1" office:value-type="string">
              <text:p text:style-name="Table_20_Heading">Best for</text:p>
            </table:table-cell>
          </table:table-row>
        </table:table-header-rows>
        <table:table-row>
          <table:table-cell table:style-name="Table1.A1" office:value-type="string">
            <text:p text:style-name="Table_20_Contents"><text:span text:style-name="Strong_20_Emphasis">Single-coterie chronicle</text:span></text:p>
          </table:table-cell>
          <table:table-cell table:style-name="Table1.A1" office:value-type="string">
            <text:p text:style-name="Table_20_Contents">1 lorebook + 1 city supplement + 1 prep guide + 1 coterie + a few NPCs</text:p>
          </table:table-cell>
          <table:table-cell table:style-name="Table1.A1" office:value-type="string">
            <text:p text:style-name="Table_20_Contents">8-12 sessions</text:p>
          </table:table-cell>
          <table:table-cell table:style-name="Table1.A1" office:value-type="string">
            <text:p text:style-name="Table_20_Contents">New tables, focused chronicles, shorter campaigns</text:p>
          </table:table-cell>
        </table:table-row>
        <table:table-row>
          <table:table-cell table:style-name="Table1.A1" office:value-type="string">
            <text:p text:style-name="Table_20_Contents"><text:span text:style-name="Strong_20_Emphasis">Single-city chronicle</text:span></text:p>
          </table:table-cell>
          <table:table-cell table:style-name="Table1.A1" office:value-type="string">
            <text:p text:style-name="Table_20_Contents">1 lorebook + 1 city supplement + 1-2 prep guides + 2-3 coteries + city-specific antagonists</text:p>
          </table:table-cell>
          <table:table-cell table:style-name="Table1.A1" office:value-type="string">
            <text:p text:style-name="Table_20_Contents">12-15 sessions</text:p>
          </table:table-cell>
          <table:table-cell table:style-name="Table1.A1" office:value-type="string">
            <text:p text:style-name="Table_20_Contents">Standard chronicle work, established tables</text:p>
          </table:table-cell>
        </table:table-row>
        <table:table-row>
          <table:table-cell table:style-name="Table1.A1" office:value-type="string">
            <text:p text:style-name="Table_20_Contents"><text:span text:style-name="Strong_20_Emphasis">Single-mode continental chronicle</text:span></text:p>
          </table:table-cell>
          <table:table-cell table:style-name="Table1.A1" office:value-type="string">
            <text:p text:style-name="Table_20_Contents">Continental Coordination Guide + multiple city supplements + 1 chronicle mode prep guide + multiple coteries</text:p>
          </table:table-cell>
          <table:table-cell table:style-name="Table1.A1" office:value-type="string">
            <text:p text:style-name="Table_20_Contents">15-20 sessions</text:p>
          </table:table-cell>
          <table:table-cell table:style-name="Table1.A1" office:value-type="string">
            <text:p text:style-name="Table_20_Contents">Tables wanting continental scope at single chronicle mode</text:p>
          </table:table-cell>
        </table:table-row>
        <table:table-row>
          <table:table-cell table:style-name="Table1.A1" office:value-type="string">
            <text:p text:style-name="Table_20_Contents"><text:span text:style-name="Strong_20_Emphasis">Multi-mode continental chronicle</text:span></text:p>
          </table:table-cell>
          <table:table-cell table:style-name="Table1.A1" office:value-type="string">
            <text:p text:style-name="Table_20_Contents">Continental Coordination Guide + multiple city supplements + multiple prep guides + multi-mode coterie selection</text:p>
          </table:table-cell>
          <table:table-cell table:style-name="Table1.A1" office:value-type="string">
            <text:p text:style-name="Table_20_Contents">20-25 sessions</text:p>
          </table:table-cell>
          <table:table-cell table:style-name="Table1.A1" office:value-type="string">
            <text:p text:style-name="Table_20_Contents">Experienced tables with continental ambition</text:p>
          </table:table-cell>
        </table:table-row>
        <table:table-row>
          <table:table-cell table:style-name="Table1.A1" office:value-type="string">
            <text:p text:style-name="Table_20_Contents"><text:span text:style-name="Strong_20_Emphasis">Cross-splat continental chronicle</text:span></text:p>
          </table:table-cell>
          <table:table-cell table:style-name="Table1.A1" office:value-type="string">
            <text:p text:style-name="Table_20_Contents">All of the above + cross-splat supplements (Garou, Pentex, Black Spiral Dancers)</text:p>
          </table:table-cell>
          <table:table-cell table:style-name="Table1.A1" office:value-type="string">
            <text:p text:style-name="Table_20_Contents">25+ sessions, often multi-chronicle</text:p>
          </table:table-cell>
          <table:table-cell table:style-name="Table1.A1" office:value-type="string">
            <text:p text:style-name="Table_20_Contents">Advanced tables wanting maximum kit engagement</text:p>
          </table:table-cell>
        </table:table-row>
      </table:table>
      <text:p text:style-name="Text_20_body"><text:span text:style-name="Strong_20_Emphasis">Diagnostic question:</text:span> <text:span text:style-name="Emphasis">Can your table sustain weekly or fortnightly play for the full session count?</text:span> If not, scope down. A solid single-coterie chronicle that completes is significantly better than an ambitious continental chronicle that stalls in session 9.</text:p>
      <text:p text:style-name="Text_20_body"><text:span text:style-name="Strong_20_Emphasis">Common scoping mistake:</text:span> Choosing scope based on what excites the Storyteller without checking what excites the players. The kit's Sydney methuselah-tempo material is fascinating to design but produces slow chronicle pacing that some tables find tedious. The Brisbane Sabbat-survivor mode produces rich institutional texture but requires players comfortable with morally complex characters at sustained operational scale. The cross-splat material produces unprecedented chronicle complexity but requires players willing to engage cross-cosmic-framework metaphysical material.</text:p>
      <text:p text:style-name="Text_20_body"><text:span text:style-name="Strong_20_Emphasis">Calibrate scope to player tolerance, not Storyteller interest.</text:span></text:p>
      <text:h text:style-name="Heading_20_3" text:outline-level="3"><text:span text:style-name="Strong_20_Emphasis">Decision 2: Chronicle mode</text:span></text:h>
      <text:p text:style-name="Text_20_body">The second decision: which chronicle mode does your chronicle operate in? The kit supports six chronicle modes, each producing distinct chronicle textur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Chronicle mode</text:p>
            </table:table-cell>
            <table:table-cell table:style-name="Table2.A1" office:value-type="string">
              <text:p text:style-name="Table_20_Heading">City alignment</text:p>
            </table:table-cell>
            <table:table-cell table:style-name="Table2.A1" office:value-type="string">
              <text:p text:style-name="Table_20_Heading">Distinctive character</text:p>
            </table:table-cell>
            <table:table-cell table:style-name="Table2.A1" office:value-type="string">
              <text:p text:style-name="Table_20_Heading">Prep guide</text:p>
            </table:table-cell>
          </table:table-row>
        </table:table-header-rows>
        <table:table-row>
          <table:table-cell table:style-name="Table2.A1" office:value-type="string">
            <text:p text:style-name="Table_20_Contents"><text:span text:style-name="Strong_20_Emphasis">Camarilla orthodox</text:span></text:p>
          </table:table-cell>
          <table:table-cell table:style-name="Table2.A1" office:value-type="string">
            <text:p text:style-name="Table_20_Contents">Melbourne, <text:soft-page-break/>Adelaide, Chicago, broader continental Camarilla</text:p>
          </table:table-cell>
          <table:table-cell table:style-name="Table2.A1" office:value-type="string">
            <text:p text:style-name="Table_20_Contents">Tower-formal institutional <text:soft-page-break/>politics, status accumulation, formal court occasions</text:p>
          </table:table-cell>
          <table:table-cell table:style-name="Table2.A1" office:value-type="string">
            <text:p text:style-name="Table_20_Contents">Camarilla Orthodox <text:soft-page-break/>Chronicle Prep Guide</text:p>
          </table:table-cell>
        </table:table-row>
        <table:table-row>
          <table:table-cell table:style-name="Table2.A1" office:value-type="string">
            <text:p text:style-name="Table_20_Contents"><text:span text:style-name="Strong_20_Emphasis">Sabbat-survivor</text:span></text:p>
          </table:table-cell>
          <table:table-cell table:style-name="Table2.A1" office:value-type="string">
            <text:p text:style-name="Table_20_Contents">Brisbane</text:p>
          </table:table-cell>
          <table:table-cell table:style-name="Table2.A1" office:value-type="string">
            <text:p text:style-name="Table_20_Contents">Doctrinal religious infrastructure, Cleaver-feeding protocols, custodian-framing institutional contradiction</text:p>
          </table:table-cell>
          <table:table-cell table:style-name="Table2.A1" office:value-type="string">
            <text:p text:style-name="Table_20_Contents">Sabbat-Survivor Chronicle Prep Guide</text:p>
          </table:table-cell>
        </table:table-row>
        <table:table-row>
          <table:table-cell table:style-name="Table2.A1" office:value-type="string">
            <text:p text:style-name="Table_20_Contents"><text:span text:style-name="Strong_20_Emphasis">Methuselah-tempo</text:span></text:p>
          </table:table-cell>
          <table:table-cell table:style-name="Table2.A1" office:value-type="string">
            <text:p text:style-name="Table_20_Contents">Sydney</text:p>
          </table:table-cell>
          <table:table-cell table:style-name="Table2.A1" office:value-type="string">
            <text:p text:style-name="Table_20_Contents">Patient operational tempo, surveillance-as-default, deliberate secrecy, double-layer cultural reading</text:p>
          </table:table-cell>
          <table:table-cell table:style-name="Table2.A1" office:value-type="string">
            <text:p text:style-name="Table_20_Contents">Methuselah-Tempo Chronicle Prep Guide</text:p>
          </table:table-cell>
        </table:table-row>
        <table:table-row>
          <table:table-cell table:style-name="Table2.A1" office:value-type="string">
            <text:p text:style-name="Table_20_Contents"><text:span text:style-name="Strong_20_Emphasis">Anarch Movement</text:span></text:p>
          </table:table-cell>
          <table:table-cell table:style-name="Table2.A1" office:value-type="string">
            <text:p text:style-name="Table_20_Contents">Melbourne Footscray, Pilsen, Anarch-tolerated continental positions</text:p>
          </table:table-cell>
          <table:table-cell table:style-name="Table2.A1" office:value-type="string">
            <text:p text:style-name="Table_20_Contents">Working-class cultural register, deliberate institutional refusal, community-organising infrastructure</text:p>
          </table:table-cell>
          <table:table-cell table:style-name="Table2.A1" office:value-type="string">
            <text:p text:style-name="Table_20_Contents">Anarch Movement Chronicle Prep Guide</text:p>
          </table:table-cell>
        </table:table-row>
        <table:table-row>
          <table:table-cell table:style-name="Table2.A1" office:value-type="string">
            <text:p text:style-name="Table_20_Contents"><text:span text:style-name="Strong_20_Emphasis">Hecata family</text:span></text:p>
          </table:table-cell>
          <table:table-cell table:style-name="Table2.A1" office:value-type="string">
            <text:p text:style-name="Table_20_Contents">Melbourne Calabria Branch, Bridgeport Six</text:p>
          </table:table-cell>
          <table:table-cell table:style-name="Table2.A1" office:value-type="string">
            <text:p text:style-name="Table_20_Contents">Necromantic institutional infrastructure, family-cousinage patterns, death-trade operations</text:p>
          </table:table-cell>
          <table:table-cell table:style-name="Table2.A1" office:value-type="string">
            <text:p text:style-name="Table_20_Contents">Hecata Family Chronicle Prep Guide</text:p>
          </table:table-cell>
        </table:table-row>
        <table:table-row>
          <table:table-cell table:style-name="Table2.A1" office:value-type="string">
            <text:p text:style-name="Table_20_Contents"><text:span text:style-name="Strong_20_Emphasis">Cross-supernatural diplomatic</text:span></text:p>
          </table:table-cell>
          <table:table-cell table:style-name="Table2.A1" office:value-type="string">
            <text:p text:style-name="Table_20_Contents">Cress Truce framework cities (Melbourne, Adelaide, modified Sydney)</text:p>
          </table:table-cell>
          <table:table-cell table:style-name="Table2.A1" office:value-type="string">
            <text:p text:style-name="Table_20_Contents">Inter-splat institutional cooperation, Article 8 operations, treaty-counterpart formality</text:p>
          </table:table-cell>
          <table:table-cell table:style-name="Table2.A1" office:value-type="string">
            <text:p text:style-name="Table_20_Contents">Cross-Supernatural Diplomatic Chronicle Prep Guide</text:p>
          </table:table-cell>
        </table:table-row>
      </table:table>
      <text:p text:style-name="Text_20_body"><text:span text:style-name="Strong_20_Emphasis">Diagnostic question:</text:span> <text:span text:style-name="Emphasis">Which chronicle mode produces the chronicle texture your players actually want to engage with?</text:span></text:p>
      <text:p text:style-name="Text_20_body">If your players want institutional politics and status manoeuvring → Camarilla orthodox.<text:line-break/>If your players want morally complex predatory characters with sustained ethical pressure → Sabbat-survivor.<text:line-break/>If your players want patient atmospheric chronicle work with rich double-layer texture → Methuselah-tempo.<text:line-break/>If your players want anti-institutional energy with community-organising infrastructure → Anarch Movement.<text:line-break/>If your players want family-cousinage politics with necromantic specialty → Hecata family.<text:line-break/>If your players want inter-splat cooperation with treaty-counterpart institutional work → Cross-supernatural diplomatic.</text:p>
      <text:p text:style-name="Text_20_body">Multi-mode continental chronicles engage multiple modes simultaneously and require chronicle-mode plurality handling per the Continental Coordination Guide.</text:p>
      <text:p text:style-name="Text_20_body"><text:span text:style-name="Strong_20_Emphasis">Common mode mistake:</text:span> Choosing chronicle mode based on iconic Vampire imagery without checking what the chronicle mode actually plays like at the table. Sabbat-survivor mode is famously dramatic but requires players comfortable with sustained moral complexity that some tables find exhausting. Methuselah-tempo is famously atmospheric but produces slow pacing that some tables find tedious. Camarilla orthodox is famously political but requires players who actually enjoy institutional politics rather than just admiring it from afar.</text:p>
      <text:p text:style-name="Text_20_body"><text:soft-page-break/><text:span text:style-name="Strong_20_Emphasis">Read the prep guide for your chosen mode before committing to it.</text:span> Each prep guide describes the mode's distinctive character explicitly — the descriptions are honest about what the mode plays like, not just what it sounds like.</text:p>
      <text:h text:style-name="Heading_20_3" text:outline-level="3"><text:span text:style-name="Strong_20_Emphasis">Decision 3: City or geographic anchor</text:span></text:h>
      <text:p text:style-name="Text_20_body">The third decision: where does your chronicle operate? Geographic anchor determines which city supplement you load, which coteries are available, and which institutional infrastructure your chronicle engages.</text:p>
      <text:p text:style-name="Text_20_body"><text:span text:style-name="Strong_20_Emphasis">The kit's city supplements:</text:span></text:p>
      <text:list text:style-name="L1">
        <text:list-item>
          <text:p text:style-name="P5"><text:span text:style-name="Strong_20_Emphasis">Melbourne</text:span> — Lytton's Camarilla orthodox with Australian-informal accommodation; Toorak Circle, Footscray Crew, Calabria Branch, Royal Park Sept; AFP-Twilight-Project primary cell </text:p>
        </text:list-item>
        <text:list-item>
          <text:p text:style-name="P5"><text:span text:style-name="Strong_20_Emphasis">Sydney</text:span> — Sarrasine's methuselah-tempo Independent domain; Vaucluse Five, Sydney Council, Anarch-tolerated coterie, Newtown Tremere chantry; Phase Two continental operation </text:p>
        </text:list-item>
        <text:list-item>
          <text:p text:style-name="P5"><text:span text:style-name="Strong_20_Emphasis">Brisbane</text:span> — Bishop Callista's Sabbat-survivor mode; Templar Council, Blood Crossing, Burning Shepherds, Bracken Covenant, Last Days of Brisbane; 2026 Glass Walker operation </text:p>
        </text:list-item>
        <text:list-item>
          <text:p text:style-name="P5"><text:span text:style-name="Strong_20_Emphasis">Adelaide</text:span> — Octavia's smaller-domain Edwardian-influenced orthodoxy; Inner Circle, Priestly Chantry, three Anarch-tolerated, Adelaide Hills Sept; strategic-depth cultivation track </text:p>
        </text:list-item>
        <text:list-item>
          <text:p text:style-name="P5"><text:span text:style-name="Strong_20_Emphasis">Chicago</text:span> — Standard reference city for North American Camarilla orthodox chronicles </text:p>
        </text:list-item>
        <text:list-item>
          <text:p text:style-name="P4"><text:span text:style-name="Strong_20_Emphasis">Other supplements</text:span> — Cross-Pacific Refusenik, Pacific Northwest, Russian Far East, South American Highlands for continental cross-Pacific scope </text:p>
        </text:list-item>
      </text:list>
      <text:p text:style-name="Text_20_body"><text:span text:style-name="Strong_20_Emphasis">Diagnostic question:</text:span> <text:span text:style-name="Emphasis">Does your table want a chronicle they can find on a map?</text:span></text:p>
      <text:p text:style-name="Text_20_body">Many tables prefer chronicles in cities they've actually been to — Melbourne players running Melbourne chronicles, Brisbane players running Brisbane chronicles. Local recognition produces immediate engagement that fictional cities don't match. The kit's Australian city supplements are designed for Australian tables specifically; the Chicago supplement provides North American alternative.</text:p>
      <text:p text:style-name="Text_20_body"><text:span text:style-name="Strong_20_Emphasis">Common anchor mistake:</text:span> Choosing geographic anchor based on Storyteller research interests without checking whether the city's chronicle mode matches what the players want to engage with. A Storyteller fascinated by Brisbane's Sabbat-survivor material can run a Brisbane chronicle, but the players will only engage if they actually want to play Sabbat-survivor characters. A Storyteller fascinated by Sarrasine's methuselah-tempo can run a Sydney chronicle, but the players will only engage if they actually want patient atmospheric work.</text:p>
      <text:p text:style-name="Text_20_body"><text:span text:style-name="Strong_20_Emphasis">Check city-mode alignment with player interest before committing to geographic anchor.</text:span></text:p>
      <text:h text:style-name="Heading_20_3" text:outline-level="3"><text:span text:style-name="Strong_20_Emphasis">Decision 4: Player character starting position</text:span></text:h>
      <text:p text:style-name="Text_20_body">The fourth decision: where do your players' characters begin? The kit's 40 scenarios provide playable starting positions across every chronicle scope and mode the kit supports.</text:p>
      <text:p text:style-name="Text_20_body"><text:span text:style-name="Strong_20_Emphasis">Scenario selection categories:</text:span></text:p>
      <text:list text:style-name="L2">
        <text:list-item>
          <text:p text:style-name="P7"><text:soft-page-break/><text:span text:style-name="Strong_20_Emphasis">Original 15 scenarios</text:span> — Standard kit scenarios across diverse chronicle modes </text:p>
        </text:list-item>
        <text:list-item>
          <text:p text:style-name="P7"><text:span text:style-name="Strong_20_Emphasis">5 cross-Pacific scenarios</text:span> — Continental cross-Pacific scope chronicle work </text:p>
        </text:list-item>
        <text:list-item>
          <text:p text:style-name="P7"><text:span text:style-name="Strong_20_Emphasis">5 cross-Wyrm-infrastructure scenarios</text:span> — Cross-splat chronicle work engaging Pentex and Black Spiral Dancers </text:p>
        </text:list-item>
        <text:list-item>
          <text:p text:style-name="P7"><text:span text:style-name="Strong_20_Emphasis">5 Sydney scenarios</text:span> — Single-city Sydney scope with Sarrasine's institutional infrastructure </text:p>
        </text:list-item>
        <text:list-item>
          <text:p text:style-name="P7"><text:span text:style-name="Strong_20_Emphasis">5 Brisbane scenarios</text:span> — Single-city Brisbane scope with Bishop Callista's institutional infrastructure </text:p>
        </text:list-item>
        <text:list-item>
          <text:p text:style-name="P6"><text:span text:style-name="Strong_20_Emphasis">5 Adelaide scenarios</text:span> — Single-city Adelaide scope with Octavia's institutional infrastructure </text:p>
        </text:list-item>
      </text:list>
      <text:p text:style-name="Text_20_body"><text:span text:style-name="Strong_20_Emphasis">Diagnostic question:</text:span> <text:span text:style-name="Emphasis">Does your players' chosen starting position give them obvious chronicle engagement, or are they starting from positions that don't produce immediate chronicle hooks?</text:span></text:p>
      <text:p text:style-name="Text_20_body">The kit's scenarios are designed with chronicle hooks built into the starting position — each scenario character has continuing institutional positioning that produces obvious chronicle development paths. This is deliberate. Original V:tM character creation often produces characters with thin chronicle hooks that the Storyteller has to develop ad-hoc during play. The kit's scenarios solve this problem by providing characters with rich starting position that produces immediate chronicle direction.</text:p>
      <text:p text:style-name="Text_20_body"><text:span text:style-name="Strong_20_Emphasis">Two starting position approaches:</text:span></text:p>
      <text:list text:style-name="L3">
        <text:list-item>
          <text:p text:style-name="P9"><text:span text:style-name="Strong_20_Emphasis">All players use kit scenarios</text:span> — Easiest approach for new tables. Each player picks a scenario; the chronicle launches from the scenarios' opening scenes. </text:p>
        </text:list-item>
        <text:list-item>
          <text:p text:style-name="P8"><text:span text:style-name="Strong_20_Emphasis">Players design original characters using scenarios as templates</text:span> — Better approach for experienced tables. Use scenarios as design templates; players adapt scenario character builds to their own preferences while preserving the chronicle hook infrastructure. </text:p>
        </text:list-item>
      </text:list>
      <text:p text:style-name="Text_20_body"><text:span text:style-name="Strong_20_Emphasis">Common starting position mistake:</text:span> Letting players design original characters without chronicle hook infrastructure, then trying to retrofit chronicle direction during play. This is the most common chronicle failure mode in V:tM generally — characters with thin starting positions that produce no chronicle direction. The kit's scenarios are specifically designed to prevent this failure mode.</text:p>
      <text:p text:style-name="Text_20_body"><text:span text:style-name="Strong_20_Emphasis">If your players design original characters, ensure each character has identified institutional positioning, identified chronicle hooks, and identified relationships to existing kit infrastructure.</text:span></text:p>
      <text:h text:style-name="Heading_20_3" text:outline-level="3"><text:span text:style-name="Strong_20_Emphasis">Decision 5: Antagonist infrastructure</text:span></text:h>
      <text:p text:style-name="Text_20_body">The fifth decision: who are your chronicle's primary antagonists? Antagonist selection determines what your chronicle is <text:span text:style-name="Emphasis">about</text:span> in operational terms.</text:p>
      <text:p text:style-name="Text_20_body"><text:span text:style-name="Strong_20_Emphasis">Antagonist categories:</text:span></text:p>
      <text:list text:style-name="L4">
        <text:list-item>
          <text:p text:style-name="P11"><text:span text:style-name="Strong_20_Emphasis">Internal institutional antagonists</text:span> — Other Kindred operatives within the same institutional infrastructure (rival faction members, succession candidates, dissent crisis figures). Best for chronicles emphasising institutional politics. </text:p>
        </text:list-item>
        <text:list-item>
          <text:p text:style-name="P11"><text:span text:style-name="Strong_20_Emphasis">Cross-faction antagonists</text:span> — Operatives from rival Kindred factions (Camarilla operations against Sabbat, Anarch operations against Camarilla, Independent operations against Camarilla and Sabbat). Best for chronicles emphasising sect-political conflict. </text:p>
        </text:list-item>
        <text:list-item>
          <text:p text:style-name="P11"><text:span text:style-name="Strong_20_Emphasis">Mortal-network antagonists</text:span> — Mortal infrastructure (AFP-Twilight-Project intelligence <text:soft-page-break/>operations, organised crime infrastructure, journalism investigations). Best for chronicles emphasising masquerade pressure and mortal-network management. </text:p>
        </text:list-item>
        <text:list-item>
          <text:p text:style-name="P11"><text:span text:style-name="Strong_20_Emphasis">Supernatural-corruption antagonists</text:span> — Pentex corporate operations and fomori; Black Spiral Dancer Hive operations; broader Wyrm-corruption material. Best for chronicles emphasising cross-splat antagonist infrastructure. </text:p>
        </text:list-item>
        <text:list-item>
          <text:p text:style-name="P10"><text:span text:style-name="Strong_20_Emphasis">Methuselah-tier antagonists</text:span> — Senior figures whose institutional positioning operates at scale exceeding chronicle character institutional scale (Sarrasine, Bishop Callista, the three Cardinals). Best for chronicles emphasising chronicle-defining institutional pressure. </text:p>
        </text:list-item>
      </text:list>
      <text:p text:style-name="Text_20_body"><text:span text:style-name="Strong_20_Emphasis">The kit's Australian Antagonist Pack</text:span> provides 23 detailed antagonist entries across these categories specifically for Australian metropolitan chronicles. The Pentex and Black Spiral Dancer supplements provide cross-splat antagonist infrastructure. The Garou Diplomatic Supplement provides cross-supernatural cooperation infrastructure (Garou as potential allies rather than antagonists, depending on chronicle scope).</text:p>
      <text:p text:style-name="Text_20_body"><text:span text:style-name="Strong_20_Emphasis">Diagnostic question:</text:span> <text:span text:style-name="Emphasis">What kind of operational pressure do your players want to navigate?</text:span></text:p>
      <text:p text:style-name="Text_20_body">Players who want courtroom intrigue want internal institutional antagonists.<text:line-break/>Players who want high-stakes faction conflict want cross-faction antagonists.<text:line-break/>Players who want noir investigation want mortal-network antagonists.<text:line-break/>Players who want cosmic horror want supernatural-corruption antagonists.<text:line-break/>Players who want chronicle-defining stakes want methuselah-tier antagonists.</text:p>
      <text:p text:style-name="Text_20_body"><text:span text:style-name="Strong_20_Emphasis">Most chronicles benefit from antagonists across multiple categories</text:span> — primary antagonist focus producing chronicle-central pressure plus secondary antagonists producing chronicle texture. A single-category antagonist chronicle can feel monotonous; a five-category antagonist chronicle can feel chaotic. Two-to-three categories typically produces the best chronicle texture.</text:p>
      <text:p text:style-name="Text_20_body"><text:span text:style-name="Strong_20_Emphasis">Common antagonist mistake:</text:span> Designing antagonists at scale exceeding the players' character builds without acknowledging the scale mismatch. Methuselah-tier antagonists are appropriate for chronicle-defining stakes but require players' characters to engage them at chronicle-defining scale — direct combat is rarely viable; institutional manoeuvring, alliance development, and operational positioning are the realistic engagement modes. Confirm with your players that the antagonist scale they encounter matches the kind of chronicle work they want to do.</text:p>
      <text:h text:style-name="Heading_20_3" text:outline-level="3"><text:span text:style-name="Strong_20_Emphasis">Decision 6: Chronicle calendar and pacing</text:span></text:h>
      <text:p text:style-name="Text_20_body">The sixth decision: how does your chronicle organise time? The kit's chronicle-active 2025-2026 period provides specific chronological reference points that ground chronicle scenes in identifiable temporal infrastructure.</text:p>
      <text:p text:style-name="Text_20_body"><text:span text:style-name="Strong_20_Emphasis">The kit's chronicle calendar reference points:</text:span></text:p>
      <text:list text:style-name="L5">
        <text:list-item>
          <text:p text:style-name="P13"><text:span text:style-name="Strong_20_Emphasis">October-November 2025</text:span> — Standard chronicle launch period; many scenarios open during this period </text:p>
        </text:list-item>
        <text:list-item>
          <text:p text:style-name="P13"><text:span text:style-name="Strong_20_Emphasis">November 3, 2025</text:span> — Brisbane Burning Shepherds pack formalisation ritual (Brisbane Scenario 1 anchor) </text:p>
        </text:list-item>
        <text:list-item>
          <text:p text:style-name="P13"><text:span text:style-name="Strong_20_Emphasis">January 26, 2026</text:span> — Australia Day Sarrasine Reception (Sydney institutional formal occasion) </text:p>
        </text:list-item>
        <text:list-item>
          <text:p text:style-name="P13"><text:span text:style-name="Strong_20_Emphasis">March 2026</text:span> — Adelaide Festival programming (Octavia cultural-cultivation infrastructure) </text:p>
        </text:list-item>
        <text:list-item>
          <text:p text:style-name="P13"><text:soft-page-break/><text:span text:style-name="Strong_20_Emphasis">April 25, 2026</text:span> — Anzac Day continental Camarilla institutional formal occasions (Lytton-Octavia coordination) </text:p>
        </text:list-item>
        <text:list-item>
          <text:p text:style-name="P13"><text:span text:style-name="Strong_20_Emphasis">June-August 2026</text:span> — Australian winter operational reduction; continental Cress Truce framework intensification </text:p>
        </text:list-item>
        <text:list-item>
          <text:p text:style-name="P13"><text:span text:style-name="Strong_20_Emphasis">October 2026</text:span> — Brisbane Glass Walker operation (chronicle-defining cross-supernatural operations) </text:p>
        </text:list-item>
        <text:list-item>
          <text:p text:style-name="P12"><text:span text:style-name="Strong_20_Emphasis">November 2026</text:span> — Pentex First Team meeting in Singapore (continental corporate-supernatural reference) </text:p>
        </text:list-item>
      </text:list>
      <text:p text:style-name="Text_20_body"><text:span text:style-name="Strong_20_Emphasis">Diagnostic question:</text:span> <text:span text:style-name="Emphasis">Does your chronicle have a chronicle-defining endpoint, or does it run open-ended?</text:span></text:p>
      <text:p text:style-name="Text_20_body"><text:span text:style-name="Strong_20_Emphasis">Chronicle-defining endpoint chronicles</text:span> organise around a specific chronological event — the October 2026 Brisbane operation is the kit's most prominent chronicle-defining endpoint, producing chronicle-active period from chronicle launch through October 2026 and post-operation continental positioning afterward. Endpoint chronicles produce strong narrative arc but require chronicle pacing calibrated to reach the endpoint at appropriate session count.</text:p>
      <text:p text:style-name="Text_20_body"><text:span text:style-name="Strong_20_Emphasis">Open-ended chronicles</text:span> organise around continuing institutional positioning without specific chronological endpoint. The kit's continuing chronicle-active 2025-2026 period supports open-ended chronicles through continuing convergent pressure (Beckoning trajectories, Phase Two operations, Article 8 activation possibility) without requiring specific chronicle-defining endpoint resolution.</text:p>
      <text:p text:style-name="Text_20_body"><text:span text:style-name="Strong_20_Emphasis">Most chronicles benefit from at least one identified chronicle-defining moment</text:span> even in open-ended chronicles — a moment around which chronicle late-arc pressure organises, even if the chronicle continues past that moment into post-operation continuing institutional positioning. The October 2026 Brisbane operation provides a kit-default chronicle-defining moment for chronicles operating in Brisbane or engaging continental cross-Pacific operations; other chronicle-defining moments can be designed using the kit's existing chronicle-active pressure infrastructure.</text:p>
      <text:p text:style-name="Text_20_body"><text:span text:style-name="Strong_20_Emphasis">Common pacing mistake:</text:span> Running chronicles at single-temporal-scale pacing (only hour-scale within-city scenes, only week-scale inter-city correspondence, only month-scale institutional rhythm) rather than at multi-temporal-scale pacing that the Continental Coordination Guide describes. Chronicles that operate at single temporal scale flatten over time; chronicles that operate at multiple temporal scales produce richer pacing texture.</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oft-page-break/><text:span text:style-name="Strong_20_Emphasis">Five worked chronicle design templates demonstrating how the six design decisions combine into specific chronicle configurations. Each template provides starting infrastructure for chronicle preparation; specific session counts and component selections can be adjusted based on table-specific requirements.</text:span></text:p>
      <text:h text:style-name="Heading_20_3" text:outline-level="3"><text:span text:style-name="Strong_20_Emphasis">Template 1: The Single-Coterie Brisbane Chronicle</text:span></text:h>
      <text:p text:style-name="Text_20_body">Designed for new tables wanting focused chronicle work at modest commitment.</text:p>
      <table:table table:name="Table3" table:style-name="Table3">
        <table:table-column table:style-name="Table3.A"/>
        <table:table-column table:style-name="Table3.B"/>
        <table:table-header-rows>
          <table:table-row>
            <table:table-cell table:style-name="Table3.A1" office:value-type="string">
              <text:p text:style-name="Table_20_Heading">Decision</text:p>
            </table:table-cell>
            <table:table-cell table:style-name="Table3.A1" office:value-type="string">
              <text:p text:style-name="Table_20_Heading">Selection</text:p>
            </table:table-cell>
          </table:table-row>
        </table:table-header-rows>
        <table:table-row>
          <table:table-cell table:style-name="Table3.A1" office:value-type="string">
            <text:p text:style-name="Table_20_Contents"><text:span text:style-name="Strong_20_Emphasis">Scope</text:span></text:p>
          </table:table-cell>
          <table:table-cell table:style-name="Table3.A1" office:value-type="string">
            <text:p text:style-name="Table_20_Contents">Single-coterie chronicle, 8-12 sessions</text:p>
          </table:table-cell>
        </table:table-row>
        <table:table-row>
          <table:table-cell table:style-name="Table3.A1" office:value-type="string">
            <text:p text:style-name="Table_20_Contents"><text:span text:style-name="Strong_20_Emphasis">Mode</text:span></text:p>
          </table:table-cell>
          <table:table-cell table:style-name="Table3.A1" office:value-type="string">
            <text:p text:style-name="Table_20_Contents">Sabbat-survivor</text:p>
          </table:table-cell>
        </table:table-row>
        <table:table-row>
          <table:table-cell table:style-name="Table3.A1" office:value-type="string">
            <text:p text:style-name="Table_20_Contents"><text:span text:style-name="Strong_20_Emphasis">Geographic anchor</text:span></text:p>
          </table:table-cell>
          <table:table-cell table:style-name="Table3.A1" office:value-type="string">
            <text:p text:style-name="Table_20_Contents">Brisbane</text:p>
          </table:table-cell>
        </table:table-row>
        <table:table-row>
          <table:table-cell table:style-name="Table3.A1" office:value-type="string">
            <text:p text:style-name="Table_20_Contents"><text:span text:style-name="Strong_20_Emphasis">Starting position</text:span></text:p>
          </table:table-cell>
          <table:table-cell table:style-name="Table3.A1" office:value-type="string">
            <text:p text:style-name="Table_20_Contents">All players use Brisbane Scenario 1 (Shovelhead Initiate) as character template; players design pack-cousin variants</text:p>
          </table:table-cell>
        </table:table-row>
        <table:table-row>
          <table:table-cell table:style-name="Table3.A1" office:value-type="string">
            <text:p text:style-name="Table_20_Contents"><text:span text:style-name="Strong_20_Emphasis">Antagonist infrastructure</text:span></text:p>
          </table:table-cell>
          <table:table-cell table:style-name="Table3.A1" office:value-type="string">
            <text:p text:style-name="Table_20_Contents">Internal institutional (Templar Cruz-Molina dissent crisis, Bishop Callista institutional pressure) + mortal-network (AFP-Twilight-Project secondary pressure)</text:p>
          </table:table-cell>
        </table:table-row>
        <table:table-row>
          <table:table-cell table:style-name="Table3.A1" office:value-type="string">
            <text:p text:style-name="Table_20_Contents"><text:span text:style-name="Strong_20_Emphasis">Calendar</text:span></text:p>
          </table:table-cell>
          <table:table-cell table:style-name="Table3.A1" office:value-type="string">
            <text:p text:style-name="Table_20_Contents">November 2025 launch; chronicle climax at November 3, 2025 pack formalisation ritual; chronicle late-arc engagement with continuing 2026 institutional pressure</text:p>
          </table:table-cell>
        </table:table-row>
      </table:table>
      <text:p text:style-name="Text_20_body"><text:span text:style-name="Strong_20_Emphasis">Lorebook layering:</text:span></text:p>
      <text:list text:style-name="L6">
        <text:list-item>
          <text:p text:style-name="P14"><text:span text:style-name="Source_20_Text"><text:span text:style-name="T1">vtm_modern_nights.json</text:span></text:span> (base) </text:p>
        </text:list-item>
        <text:list-item>
          <text:p text:style-name="P14"><text:span text:style-name="Source_20_Text"><text:span text:style-name="T1">vtm_brisbane_by_night.json</text:span></text:span> (city) </text:p>
        </text:list-item>
        <text:list-item>
          <text:p text:style-name="P15"><text:span text:style-name="Source_20_Text"><text:span text:style-name="T1">vtm_australian_antagonist_pack.json</text:span></text:span> (antagonists) </text:p>
        </text:list-item>
      </text:list>
      <text:p text:style-name="Text_20_body"><text:span text:style-name="Strong_20_Emphasis">Chronicle prep guides:</text:span></text:p>
      <text:list text:style-name="L7">
        <text:list-item>
          <text:p text:style-name="P16">Sabbat-Survivor Chronicle Prep Guide (primary) </text:p>
        </text:list-item>
      </text:list>
      <text:p text:style-name="Text_20_body"><text:span text:style-name="Strong_20_Emphasis">Coteries engaged:</text:span></text:p>
      <text:list text:style-name="L8">
        <text:list-item>
          <text:p text:style-name="P18">Burning Shepherds (player character pack) </text:p>
        </text:list-item>
        <text:list-item>
          <text:p text:style-name="P17">Templar Council (institutional context) </text:p>
        </text:list-item>
      </text:list>
      <text:p text:style-name="Text_20_body"><text:span text:style-name="Strong_20_Emphasis">Chronicle texture:</text:span> Doctrinal religious indoctrination, Cleaver-feeding institutional protocols, pack-leader cultivation, internal institutional crisis at chronicle-defining scale, working-class Brisbane West End cultural register.</text:p>
      <text:p text:style-name="Text_20_body"><text:span text:style-name="Strong_20_Emphasis">Why this works:</text:span> Focused scope produces manageable chronicle preparation; Brisbane Scenario 1 provides immediate chronicle direction; single chronicle mode prevents chronicle-mode-plurality handling complexity; identified chronicle-defining moment (formalisation ritual) provides clear narrative arc.</text:p>
      <text:h text:style-name="Heading_20_3" text:outline-level="3"><text:span text:style-name="Strong_20_Emphasis">Template 2: The Single-City Melbourne Chronicle</text:span></text:h>
      <text:p text:style-name="Text_20_body">Designed for established tables wanting standard chronicle work at moderate commitment.</text:p>
      <table:table table:name="Table4" table:style-name="Table4">
        <table:table-column table:style-name="Table4.A"/>
        <table:table-column table:style-name="Table4.B"/>
        <table:table-header-rows>
          <table:table-row>
            <table:table-cell table:style-name="Table4.A1" office:value-type="string">
              <text:p text:style-name="Table_20_Heading">Decision</text:p>
            </table:table-cell>
            <table:table-cell table:style-name="Table4.A1" office:value-type="string">
              <text:p text:style-name="Table_20_Heading">Selection</text:p>
            </table:table-cell>
          </table:table-row>
        </table:table-header-rows>
        <table:table-row>
          <table:table-cell table:style-name="Table4.A1" office:value-type="string">
            <text:p text:style-name="Table_20_Contents"><text:span text:style-name="Strong_20_Emphasis">Scope</text:span></text:p>
          </table:table-cell>
          <table:table-cell table:style-name="Table4.A1" office:value-type="string">
            <text:p text:style-name="Table_20_Contents">Single-city chronicle, 12-15 sessions</text:p>
          </table:table-cell>
        </table:table-row>
        <text:soft-page-break/>
        <table:table-row>
          <table:table-cell table:style-name="Table4.A1" office:value-type="string">
            <text:p text:style-name="Table_20_Contents"><text:span text:style-name="Strong_20_Emphasis">Mode</text:span></text:p>
          </table:table-cell>
          <table:table-cell table:style-name="Table4.A1" office:value-type="string">
            <text:p text:style-name="Table_20_Contents">Camarilla orthodox</text:p>
          </table:table-cell>
        </table:table-row>
        <table:table-row>
          <table:table-cell table:style-name="Table4.A1" office:value-type="string">
            <text:p text:style-name="Table_20_Contents"><text:span text:style-name="Strong_20_Emphasis">Geographic anchor</text:span></text:p>
          </table:table-cell>
          <table:table-cell table:style-name="Table4.A1" office:value-type="string">
            <text:p text:style-name="Table_20_Contents">Melbourne</text:p>
          </table:table-cell>
        </table:table-row>
        <table:table-row>
          <table:table-cell table:style-name="Table4.A1" office:value-type="string">
            <text:p text:style-name="Table_20_Contents"><text:span text:style-name="Strong_20_Emphasis">Starting position</text:span></text:p>
          </table:table-cell>
          <table:table-cell table:style-name="Table4.A1" office:value-type="string">
            <text:p text:style-name="Table_20_Contents">Players select from existing Melbourne scenarios (Toorak Circle apprentice, Footscray Crew operative, Calabria Branch operative, Royal Park Sept liaison); mixed coterie produces cross-mode chronicle texture</text:p>
          </table:table-cell>
        </table:table-row>
        <table:table-row>
          <table:table-cell table:style-name="Table4.A1" office:value-type="string">
            <text:p text:style-name="Table_20_Contents"><text:span text:style-name="Strong_20_Emphasis">Antagonist infrastructure</text:span></text:p>
          </table:table-cell>
          <table:table-cell table:style-name="Table4.A1" office:value-type="string">
            <text:p text:style-name="Table_20_Contents">Internal institutional (Toorak Circle internal dynamics, Lytton Beckoning trajectory) + cross-faction (Sarrasine Phase Two pressure on Melbourne) + mortal-network (AFP-Twilight-Project Melbourne primary cell)</text:p>
          </table:table-cell>
        </table:table-row>
        <table:table-row>
          <table:table-cell table:style-name="Table4.A1" office:value-type="string">
            <text:p text:style-name="Table_20_Contents"><text:span text:style-name="Strong_20_Emphasis">Calendar</text:span></text:p>
          </table:table-cell>
          <table:table-cell table:style-name="Table4.A1" office:value-type="string">
            <text:p text:style-name="Table_20_Contents">October 2025 launch; chronicle late-arc engagement with continuing Phase Two pre-positioning through 2026 Brisbane operation period</text:p>
          </table:table-cell>
        </table:table-row>
      </table:table>
      <text:p text:style-name="Text_20_body"><text:span text:style-name="Strong_20_Emphasis">Lorebook layering:</text:span></text:p>
      <text:list text:style-name="L9">
        <text:list-item>
          <text:p text:style-name="P19"><text:span text:style-name="Source_20_Text"><text:span text:style-name="T1">vtm_modern_nights.json</text:span></text:span> (base) </text:p>
        </text:list-item>
        <text:list-item>
          <text:p text:style-name="P19"><text:span text:style-name="Source_20_Text"><text:span text:style-name="T1">vtm_melbourne_by_night.json</text:span></text:span> (city) </text:p>
        </text:list-item>
        <text:list-item>
          <text:p text:style-name="P19"><text:span text:style-name="Source_20_Text"><text:span text:style-name="T1">vtm_australian_antagonist_pack.json</text:span></text:span> (antagonists) </text:p>
        </text:list-item>
        <text:list-item>
          <text:p text:style-name="P20"><text:span text:style-name="Source_20_Text"><text:span text:style-name="T1">vtm_garou_diplomatic.json</text:span></text:span> (if Royal Park Sept engaged) </text:p>
        </text:list-item>
      </text:list>
      <text:p text:style-name="Text_20_body"><text:span text:style-name="Strong_20_Emphasis">Chronicle prep guides:</text:span></text:p>
      <text:list text:style-name="L10">
        <text:list-item>
          <text:p text:style-name="P22">Camarilla Orthodox Chronicle Prep Guide (primary) </text:p>
        </text:list-item>
        <text:list-item>
          <text:p text:style-name="P22">Anarch Movement Chronicle Prep Guide (if Footscray Crew engaged) </text:p>
        </text:list-item>
        <text:list-item>
          <text:p text:style-name="P22">Hecata Family Chronicle Prep Guide (if Calabria Branch engaged) </text:p>
        </text:list-item>
        <text:list-item>
          <text:p text:style-name="P21">Cross-Supernatural Diplomatic Chronicle Prep Guide (if Royal Park Sept engaged) </text:p>
        </text:list-item>
      </text:list>
      <text:p text:style-name="Text_20_body"><text:span text:style-name="Strong_20_Emphasis">Coteries engaged:</text:span></text:p>
      <text:list text:style-name="L11">
        <text:list-item>
          <text:p text:style-name="P24">Toorak Circle (institutional context) </text:p>
        </text:list-item>
        <text:list-item>
          <text:p text:style-name="P23">Possibly Footscray Crew, Calabria Branch, Royal Park Sept depending on player character mix </text:p>
        </text:list-item>
      </text:list>
      <text:p text:style-name="Text_20_body"><text:span text:style-name="Strong_20_Emphasis">Chronicle texture:</text:span> Australian-informal Camarilla orthodox, institutional politics with Status accumulation, Lytton Beckoning trajectory continuing pressure, optional cross-mode engagement through alternative coteries.</text:p>
      <text:p text:style-name="Text_20_body"><text:span text:style-name="Strong_20_Emphasis">Why this works:</text:span> Melbourne supports the broadest chronicle mode variation in the kit through diverse coterie infrastructure; players can engage different chronicle modes through different scenario selections; chronicle scope manageable while richer than single-coterie work.</text:p>
      <text:h text:style-name="Heading_20_3" text:outline-level="3"><text:span text:style-name="Strong_20_Emphasis">Template 3: The Continental Phase Two Chronicle</text:span></text:h>
      <text:p text:style-name="Text_20_body">Designed for experienced tables wanting continental scope at substantial commitment.</text:p>
      <table:table table:name="Table5" table:style-name="Table5">
        <table:table-column table:style-name="Table5.A"/>
        <table:table-column table:style-name="Table5.B"/>
        <table:table-header-rows>
          <table:table-row>
            <table:table-cell table:style-name="Table5.A1" office:value-type="string">
              <text:p text:style-name="Table_20_Heading">Decision</text:p>
            </table:table-cell>
            <table:table-cell table:style-name="Table5.A1" office:value-type="string">
              <text:p text:style-name="Table_20_Heading">Selection</text:p>
            </table:table-cell>
          </table:table-row>
        </table:table-header-rows>
        <table:table-row>
          <table:table-cell table:style-name="Table5.A1" office:value-type="string">
            <text:p text:style-name="Table_20_Contents"><text:span text:style-name="Strong_20_Emphasis">Scope</text:span></text:p>
          </table:table-cell>
          <table:table-cell table:style-name="Table5.A1" office:value-type="string">
            <text:p text:style-name="Table_20_Contents">Multi-mode continental chronicle, 20-25 sessions</text:p>
          </table:table-cell>
        </table:table-row>
        <table:table-row>
          <table:table-cell table:style-name="Table5.A1" office:value-type="string">
            <text:p text:style-name="Table_20_Contents"><text:span text:style-name="Strong_20_Emphasis">Mode</text:span></text:p>
          </table:table-cell>
          <table:table-cell table:style-name="Table5.A1" office:value-type="string">
            <text:p text:style-name="Table_20_Contents">Multi-mode (Methuselah-tempo at Sydney + Camarilla orthodox at Melbourne and Adelaide)</text:p>
          </table:table-cell>
        </table:table-row>
        <table:table-row>
          <table:table-cell table:style-name="Table5.A1" office:value-type="string">
            <text:p text:style-name="Table_20_Contents"><text:span text:style-name="Strong_20_Emphasis">Geographic anchor</text:span></text:p>
          </table:table-cell>
          <table:table-cell table:style-name="Table5.A1" office:value-type="string">
            <text:p text:style-name="Table_20_Contents">Sydney primary + Melbourne + Adelaide secondary</text:p>
          </table:table-cell>
        </table:table-row>
        <table:table-row>
          <table:table-cell table:style-name="Table5.A1" office:value-type="string">
            <text:p text:style-name="Table_20_Contents"><text:span text:style-name="Strong_20_Emphasis">Starting position</text:span></text:p>
          </table:table-cell>
          <table:table-cell table:style-name="Table5.A1" office:value-type="string">
            <text:p text:style-name="Table_20_Contents">Players use Sydney scenarios primarily (Vaucluse aspirant, Sydney Council <text:soft-page-break/>apprentice, Sarrasine cross-sect liaison) with optional Melbourne and Adelaide character ties through cross-correspondence relationships</text:p>
          </table:table-cell>
        </table:table-row>
        <table:table-row>
          <table:table-cell table:style-name="Table5.A1" office:value-type="string">
            <text:p text:style-name="Table_20_Contents"><text:span text:style-name="Strong_20_Emphasis">Antagonist infrastructure</text:span></text:p>
          </table:table-cell>
          <table:table-cell table:style-name="Table5.A1" office:value-type="string">
            <text:p text:style-name="Table_20_Contents">Internal (Sarrasine Phase Two operations) + cross-faction (operational pressure on Melbourne and Adelaide Camarilla institutions) + methuselah-tier (Sarrasine direct engagement at chronicle-defining scale)</text:p>
          </table:table-cell>
        </table:table-row>
        <table:table-row>
          <table:table-cell table:style-name="Table5.A1" office:value-type="string">
            <text:p text:style-name="Table_20_Contents"><text:span text:style-name="Strong_20_Emphasis">Calendar</text:span></text:p>
          </table:table-cell>
          <table:table-cell table:style-name="Table5.A1" office:value-type="string">
            <text:p text:style-name="Table_20_Contents">October 2025 launch; Phase Two operations across 2026-2028 chronicle-active period; chronicle late-arc engagement with continuing continental institutional reorganisation</text:p>
          </table:table-cell>
        </table:table-row>
      </table:table>
      <text:p text:style-name="Text_20_body"><text:span text:style-name="Strong_20_Emphasis">Lorebook layering:</text:span></text:p>
      <text:list text:style-name="L12">
        <text:list-item>
          <text:p text:style-name="P25"><text:span text:style-name="Source_20_Text"><text:span text:style-name="T1">vtm_modern_nights.json</text:span></text:span> (base) </text:p>
        </text:list-item>
        <text:list-item>
          <text:p text:style-name="P25"><text:span text:style-name="Source_20_Text"><text:span text:style-name="T1">vtm_sydney_by_night.json</text:span></text:span> (primary city) </text:p>
        </text:list-item>
        <text:list-item>
          <text:p text:style-name="P25"><text:span text:style-name="Source_20_Text"><text:span text:style-name="T1">vtm_melbourne_by_night.json</text:span></text:span> (secondary city) </text:p>
        </text:list-item>
        <text:list-item>
          <text:p text:style-name="P25"><text:span text:style-name="Source_20_Text"><text:span text:style-name="T1">vtm_adelaide_by_night.json</text:span></text:span> (secondary city) </text:p>
        </text:list-item>
        <text:list-item>
          <text:p text:style-name="P25"><text:span text:style-name="Source_20_Text"><text:span text:style-name="T1">vtm_australian_antagonist_pack.json</text:span></text:span> (antagonists) </text:p>
        </text:list-item>
        <text:list-item>
          <text:p text:style-name="P26"><text:span text:style-name="Source_20_Text"><text:span text:style-name="T1">vtm_garou_diplomatic.json</text:span></text:span> (Cress Truce framework) </text:p>
        </text:list-item>
      </text:list>
      <text:p text:style-name="Text_20_body"><text:span text:style-name="Strong_20_Emphasis">Chronicle prep guides:</text:span></text:p>
      <text:list text:style-name="L13">
        <text:list-item>
          <text:p text:style-name="P28">Methuselah-Tempo Chronicle Prep Guide (primary) </text:p>
        </text:list-item>
        <text:list-item>
          <text:p text:style-name="P28">Camarilla Orthodox Chronicle Prep Guide (secondary) </text:p>
        </text:list-item>
        <text:list-item>
          <text:p text:style-name="P27">Continental Coordination Guide (meta-handling) </text:p>
        </text:list-item>
      </text:list>
      <text:p text:style-name="Text_20_body"><text:span text:style-name="Strong_20_Emphasis">Coteries engaged:</text:span></text:p>
      <text:list text:style-name="L14">
        <text:list-item>
          <text:p text:style-name="P30">Vaucluse Five (Sydney institutional context) </text:p>
        </text:list-item>
        <text:list-item>
          <text:p text:style-name="P30">Sydney Council (Sydney institutional context) </text:p>
        </text:list-item>
        <text:list-item>
          <text:p text:style-name="P30">Toorak Circle (Melbourne institutional context) </text:p>
        </text:list-item>
        <text:list-item>
          <text:p text:style-name="P29">Inner Circle (Adelaide institutional context) </text:p>
        </text:list-item>
      </text:list>
      <text:p text:style-name="Text_20_body"><text:span text:style-name="Strong_20_Emphasis">Chronicle texture:</text:span> Multi-mode plurality with chronicle-mode pivot handling, continental geographic rhythm at four temporal scales, methuselah-tempo register at Sydney with Camarilla orthodox register at Melbourne and Adelaide, continental pressure convergence (Phase Two + Beckoning trajectories + Cress Truce framework operations).</text:p>
      <text:p text:style-name="Text_20_body"><text:span text:style-name="Strong_20_Emphasis">Why this works:</text:span> Continental scope produces chronicle scale that single-city chronicles do not generate; multi-mode plurality produces distinctive chronicle character; Continental Coordination Guide provides meta-handling for chronicle-mode pivots; chronicle-defining continental endpoint (Phase Two operational climax) provides narrative arc.</text:p>
      <text:h text:style-name="Heading_20_3" text:outline-level="3"><text:span text:style-name="Strong_20_Emphasis">Template 4: The Cross-Splat Article 8 Chronicle</text:span></text:h>
      <text:p text:style-name="Text_20_body">Designed for advanced tables wanting maximum kit engagement at full commitment.</text:p>
      <table:table table:name="Table6" table:style-name="Table6">
        <table:table-column table:style-name="Table6.A"/>
        <table:table-column table:style-name="Table6.B"/>
        <table:table-header-rows>
          <table:table-row>
            <table:table-cell table:style-name="Table6.A1" office:value-type="string">
              <text:p text:style-name="Table_20_Heading">Decision</text:p>
            </table:table-cell>
            <table:table-cell table:style-name="Table6.A1" office:value-type="string">
              <text:p text:style-name="Table_20_Heading">Selection</text:p>
            </table:table-cell>
          </table:table-row>
        </table:table-header-rows>
        <table:table-row>
          <table:table-cell table:style-name="Table6.A1" office:value-type="string">
            <text:p text:style-name="Table_20_Contents"><text:span text:style-name="Strong_20_Emphasis">Scope</text:span></text:p>
          </table:table-cell>
          <table:table-cell table:style-name="Table6.A1" office:value-type="string">
            <text:p text:style-name="Table_20_Contents">Cross-splat continental chronicle, 25+ sessions, multi-chronicle campaign engagement preferred</text:p>
          </table:table-cell>
        </table:table-row>
        <table:table-row>
          <table:table-cell table:style-name="Table6.A1" office:value-type="string">
            <text:p text:style-name="Table_20_Contents"><text:span text:style-name="Strong_20_Emphasis">Mode</text:span></text:p>
          </table:table-cell>
          <table:table-cell table:style-name="Table6.A1" office:value-type="string">
            <text:p text:style-name="Table_20_Contents">Multi-mode (Camarilla orthodox at Melbourne and Adelaide + Sabbat-survivor at Brisbane + Methuselah-tempo at Sydney) plus cross-supernatural diplomatic</text:p>
          </table:table-cell>
        </table:table-row>
        <table:table-row>
          <table:table-cell table:style-name="Table6.A1" office:value-type="string">
            <text:p text:style-name="Table_20_Contents"><text:span text:style-name="Strong_20_Emphasis">Geographic </text:span><text:soft-page-break/><text:span text:style-name="Strong_20_Emphasis">anchor</text:span></text:p>
          </table:table-cell>
          <table:table-cell table:style-name="Table6.A1" office:value-type="string">
            <text:p text:style-name="Table_20_Contents">Continental Australian (all four major metropolitan domains)</text:p>
          </table:table-cell>
        </table:table-row>
        <table:table-row>
          <table:table-cell table:style-name="Table6.A1" office:value-type="string">
            <text:p text:style-name="Table_20_Contents"><text:span text:style-name="Strong_20_Emphasis">Starting position</text:span></text:p>
          </table:table-cell>
          <table:table-cell table:style-name="Table6.A1" office:value-type="string">
            <text:p text:style-name="Table_20_Contents">Players use Cross-Wyrm-Infrastructure scenarios primarily (Article 8 Tactical Specialist, Pentex Investigation Operative, Continental Coordination Specialist); diverse player character builds support cross-splat chronicle work</text:p>
          </table:table-cell>
        </table:table-row>
        <table:table-row>
          <table:table-cell table:style-name="Table6.A1" office:value-type="string">
            <text:p text:style-name="Table_20_Contents"><text:span text:style-name="Strong_20_Emphasis">Antagonist infrastructure</text:span></text:p>
          </table:table-cell>
          <table:table-cell table:style-name="Table6.A1" office:value-type="string">
            <text:p text:style-name="Table_20_Contents">Supernatural-corruption (Pentex operations, Black Spiral Dancer Hives, cross-Wyrm-infrastructure cooperation) + methuselah-tier (Bishop Callista, Sarrasine, all three Cardinals indirectly)</text:p>
          </table:table-cell>
        </table:table-row>
        <table:table-row>
          <table:table-cell table:style-name="Table6.A1" office:value-type="string">
            <text:p text:style-name="Table_20_Contents"><text:span text:style-name="Strong_20_Emphasis">Calendar</text:span></text:p>
          </table:table-cell>
          <table:table-cell table:style-name="Table6.A1" office:value-type="string">
            <text:p text:style-name="Table_20_Contents">November 2025 launch; chronicle climax at October 2026 Brisbane operation; chronicle late-arc engagement with continuing post-operation continental reorganisation</text:p>
          </table:table-cell>
        </table:table-row>
      </table:table>
      <text:p text:style-name="Text_20_body"><text:span text:style-name="Strong_20_Emphasis">Lorebook layering:</text:span></text:p>
      <text:list text:style-name="L15">
        <text:list-item>
          <text:p text:style-name="P32"><text:span text:style-name="Source_20_Text"><text:span text:style-name="T1">vtm_modern_nights.json</text:span></text:span> (base) </text:p>
        </text:list-item>
        <text:list-item>
          <text:p text:style-name="P31">All four Australian city supplements </text:p>
        </text:list-item>
        <text:list-item>
          <text:p text:style-name="P32"><text:span text:style-name="Source_20_Text"><text:span text:style-name="T1">vtm_australian_antagonist_pack.json</text:span></text:span> (Australian antagonists) </text:p>
        </text:list-item>
        <text:list-item>
          <text:p text:style-name="P32"><text:span text:style-name="Source_20_Text"><text:span text:style-name="T1">vtm_garou_diplomatic.json</text:span></text:span> (Cress Truce framework + Garou cooperation) </text:p>
        </text:list-item>
        <text:list-item>
          <text:p text:style-name="P32"><text:span text:style-name="Source_20_Text"><text:span text:style-name="T1">vtm_pentex_by_night.json</text:span></text:span> (Pentex cross-splat antagonists) </text:p>
        </text:list-item>
        <text:list-item>
          <text:p text:style-name="P32"><text:span text:style-name="Source_20_Text"><text:span text:style-name="T1">vtm_black_spiral_dancers.json</text:span></text:span> (Black Spiral Dancer cross-splat antagonists) </text:p>
        </text:list-item>
        <text:list-item>
          <text:p text:style-name="P33"><text:span text:style-name="Source_20_Text"><text:span text:style-name="T1">vtm_cross_pacific_refusenik.json</text:span></text:span> (continental cross-Pacific implications) </text:p>
        </text:list-item>
      </text:list>
      <text:p text:style-name="Text_20_body"><text:span text:style-name="Strong_20_Emphasis">Chronicle prep guides:</text:span></text:p>
      <text:list text:style-name="L16">
        <text:list-item>
          <text:p text:style-name="P35">All seven existing prep guides applied per chronicle scope context </text:p>
        </text:list-item>
        <text:list-item>
          <text:p text:style-name="P35">Continental Coordination Guide (meta-handling at maximum complexity scale) </text:p>
        </text:list-item>
        <text:list-item>
          <text:p text:style-name="P34">This Chronicle Design Prep Guide (meta-design handling) </text:p>
        </text:list-item>
      </text:list>
      <text:p text:style-name="Text_20_body"><text:span text:style-name="Strong_20_Emphasis">Coteries engaged:</text:span></text:p>
      <text:list text:style-name="L17">
        <text:list-item>
          <text:p text:style-name="P37">All Australian metropolitan coteries available at appropriate chronicle-active scale </text:p>
        </text:list-item>
        <text:list-item>
          <text:p text:style-name="P36">Specifically engaged: Templar Council (Brisbane), Vaucluse Five (Sydney), Toorak Circle (Melbourne), Inner Circle (Adelaide), Royal Park Sept (Melbourne), Adelaide Hills Sept (Adelaide), Last Days of Brisbane (chronicle-defining Brisbane operation pack) </text:p>
        </text:list-item>
      </text:list>
      <text:p text:style-name="Text_20_body"><text:span text:style-name="Strong_20_Emphasis">Chronicle texture:</text:span> Maximum kit engagement; chronicle-mode plurality at full continental scope; cross-splat continental cooperation through Cress Truce Article 8 operations; cross-Wyrm-infrastructure cooperation between Pentex and Black Spiral Dancers as chronicle-defining antagonist material; continental pressure convergence at chronicle-defining scale.</text:p>
      <text:p text:style-name="Text_20_body"><text:span text:style-name="Strong_20_Emphasis">Why this works:</text:span> This is the kit's most demanding chronicle configuration; chronicle scope engages essentially all kit components; chronicle-defining endpoint (October 2026 Brisbane operation) provides clear narrative arc despite continental complexity; chronicle late-arc continental reorganisation produces continuing chronicle work potential beyond the chronicle-defining moment.</text:p>
      <text:p text:style-name="Text_20_body"><text:span text:style-name="Strong_20_Emphasis">Caveat:</text:span> This template is appropriate only for tables with substantial V:tM experience plus willingness to engage with cross-cosmic-framework metaphysical material plus weekly-or-fortnightly play commitment for 25+ sessions. Tables with less experience or commitment should scope down to Template 3 or earlier.</text:p>
      <text:h text:style-name="Heading_20_3" text:outline-level="3"><text:soft-page-break/><text:span text:style-name="Strong_20_Emphasis">Template 5: The Cross-Pacific Sabbat-Refusenik Chronicle</text:span></text:h>
      <text:p text:style-name="Text_20_body">Designed for tables wanting global Sabbat-refusenik chronicle work at chronicle-defining continental scope.</text:p>
      <table:table table:name="Table7" table:style-name="Table7">
        <table:table-column table:style-name="Table7.A"/>
        <table:table-column table:style-name="Table7.B"/>
        <table:table-header-rows>
          <table:table-row>
            <table:table-cell table:style-name="Table7.A1" office:value-type="string">
              <text:p text:style-name="Table_20_Heading">Decision</text:p>
            </table:table-cell>
            <table:table-cell table:style-name="Table7.A1" office:value-type="string">
              <text:p text:style-name="Table_20_Heading">Selection</text:p>
            </table:table-cell>
          </table:table-row>
        </table:table-header-rows>
        <table:table-row>
          <table:table-cell table:style-name="Table7.A1" office:value-type="string">
            <text:p text:style-name="Table_20_Contents"><text:span text:style-name="Strong_20_Emphasis">Scope</text:span></text:p>
          </table:table-cell>
          <table:table-cell table:style-name="Table7.A1" office:value-type="string">
            <text:p text:style-name="Table_20_Contents">Continental cross-Pacific chronicle, 25+ sessions</text:p>
          </table:table-cell>
        </table:table-row>
        <table:table-row>
          <table:table-cell table:style-name="Table7.A1" office:value-type="string">
            <text:p text:style-name="Table_20_Contents"><text:span text:style-name="Strong_20_Emphasis">Mode</text:span></text:p>
          </table:table-cell>
          <table:table-cell table:style-name="Table7.A1" office:value-type="string">
            <text:p text:style-name="Table_20_Contents">Multi-mode (Sabbat-survivor at Brisbane + Lasombra-refusenik institutional positioning at Pacific Northwest, Russian Far East, South American Highlands)</text:p>
          </table:table-cell>
        </table:table-row>
        <table:table-row>
          <table:table-cell table:style-name="Table7.A1" office:value-type="string">
            <text:p text:style-name="Table_20_Contents"><text:span text:style-name="Strong_20_Emphasis">Geographic anchor</text:span></text:p>
          </table:table-cell>
          <table:table-cell table:style-name="Table7.A1" office:value-type="string">
            <text:p text:style-name="Table_20_Contents">Continental cross-Pacific (Brisbane + Pacific Northwest + Russian Far East + South American Highlands)</text:p>
          </table:table-cell>
        </table:table-row>
        <table:table-row>
          <table:table-cell table:style-name="Table7.A1" office:value-type="string">
            <text:p text:style-name="Table_20_Contents"><text:span text:style-name="Strong_20_Emphasis">Starting position</text:span></text:p>
          </table:table-cell>
          <table:table-cell table:style-name="Table7.A1" office:value-type="string">
            <text:p text:style-name="Table_20_Contents">Players use Cross-Pacific scenarios (Lima Coordinator's Apprentice, Anchorage Cross-Bering Operative, Telegraph Hill Apprentice, Brisbane Templar's Continental Operative, Three-Cardinal Coordination Operative); chronicle scope engages all three remaining Cardinals globally</text:p>
          </table:table-cell>
        </table:table-row>
        <table:table-row>
          <table:table-cell table:style-name="Table7.A1" office:value-type="string">
            <text:p text:style-name="Table_20_Contents"><text:span text:style-name="Strong_20_Emphasis">Antagonist infrastructure</text:span></text:p>
          </table:table-cell>
          <table:table-cell table:style-name="Table7.A1" office:value-type="string">
            <text:p text:style-name="Table_20_Contents">Methuselah-tier (all three remaining Cardinals at simultaneous Beckoning trajectory pressure) + internal institutional (continental Sabbat-refusenik institutional positioning during Cardinal succession question dynamics)</text:p>
          </table:table-cell>
        </table:table-row>
        <table:table-row>
          <table:table-cell table:style-name="Table7.A1" office:value-type="string">
            <text:p text:style-name="Table_20_Contents"><text:span text:style-name="Strong_20_Emphasis">Calendar</text:span></text:p>
          </table:table-cell>
          <table:table-cell table:style-name="Table7.A1" office:value-type="string">
            <text:p text:style-name="Table_20_Contents">October 2025 launch; chronicle climax at convergent Cardinal succession question dynamics (timing depends on Cardinal trajectory pressure during chronicle-active period)</text:p>
          </table:table-cell>
        </table:table-row>
      </table:table>
      <text:p text:style-name="Text_20_body"><text:span text:style-name="Strong_20_Emphasis">Lorebook layering:</text:span></text:p>
      <text:list text:style-name="L18">
        <text:list-item>
          <text:p text:style-name="P38"><text:span text:style-name="Source_20_Text"><text:span text:style-name="T1">vtm_modern_nights.json</text:span></text:span> (base) </text:p>
        </text:list-item>
        <text:list-item>
          <text:p text:style-name="P38"><text:span text:style-name="Source_20_Text"><text:span text:style-name="T1">vtm_brisbane_by_night.json</text:span></text:span> (Brisbane connection through Templar Abernathy) </text:p>
        </text:list-item>
        <text:list-item>
          <text:p text:style-name="P38"><text:span text:style-name="Source_20_Text"><text:span text:style-name="T1">vtm_cross_pacific_refusenik.json</text:span></text:span> (continental cross-Pacific institutional infrastructure) </text:p>
        </text:list-item>
        <text:list-item>
          <text:p text:style-name="P38"><text:span text:style-name="Source_20_Text"><text:span text:style-name="T1">vtm_pacific_northwest.json</text:span></text:span> (Cardinal Reyna's domain) </text:p>
        </text:list-item>
        <text:list-item>
          <text:p text:style-name="P38"><text:span text:style-name="Source_20_Text"><text:span text:style-name="T1">vtm_russian_far_east_refusenik.json</text:span></text:span> (Cardinal Magdalena's domain) </text:p>
        </text:list-item>
        <text:list-item>
          <text:p text:style-name="P39"><text:span text:style-name="Source_20_Text"><text:span text:style-name="T1">vtm_south_american_highlands_refusenik.json</text:span></text:span> (Cardinal Aurelius's domain) </text:p>
        </text:list-item>
      </text:list>
      <text:p text:style-name="Text_20_body"><text:span text:style-name="Strong_20_Emphasis">Chronicle prep guides:</text:span></text:p>
      <text:list text:style-name="L19">
        <text:list-item>
          <text:p text:style-name="P41">Sabbat-Survivor Chronicle Prep Guide (primary) </text:p>
        </text:list-item>
        <text:list-item>
          <text:p text:style-name="P40">Continental Coordination Guide (meta-handling at continental cross-Pacific scope) </text:p>
        </text:list-item>
      </text:list>
      <text:p text:style-name="Text_20_body"><text:span text:style-name="Strong_20_Emphasis">Coteries engaged:</text:span></text:p>
      <text:list text:style-name="L20">
        <text:list-item>
          <text:p text:style-name="P43">Templar Council (Brisbane connection) </text:p>
        </text:list-item>
        <text:list-item>
          <text:p text:style-name="P43">Pacific Northwest Cardinal Reyna institutional infrastructure </text:p>
        </text:list-item>
        <text:list-item>
          <text:p text:style-name="P43">Russian Far East Cardinal Magdalena institutional infrastructure </text:p>
        </text:list-item>
        <text:list-item>
          <text:p text:style-name="P42">South American Highlands Cardinal Aurelius institutional infrastructure </text:p>
        </text:list-item>
      </text:list>
      <text:p text:style-name="Text_20_body"><text:span text:style-name="Strong_20_Emphasis">Chronicle texture:</text:span> Continental cross-Pacific Sabbat-refusenik chronicle work at maximum global scope; all three remaining Cardinals at simultaneous chronicle-active trajectory pressure; potential continental institutional reorganisation if chronicle-defining Cardinal succumbence occurs during chronicle-active period; chronicle-defining continental cross-Pacific institutional infrastructure development.</text:p>
      <text:p text:style-name="Text_20_body"><text:span text:style-name="Strong_20_Emphasis">Why this works:</text:span> Engages the kit's continental cross-Pacific Sabbat-refusenik infrastructure at full <text:soft-page-break/>scale; provides chronicle scope distinct from Australian metropolitan chronicle work; potential continental institutional reorganisation produces chronicle-defining narrative potential at scale that continental Australian chronicles cannot match.</text:p>
      <text:p text:style-name="Text_20_body"><text:span text:style-name="Strong_20_Emphasis">Caveat:</text:span> Continental cross-Pacific chronicles require continental geographic rhythm pacing (multi-day inter-continental travel, weekly correspondence operations, monthly continental institutional coordination) that Australian metropolitan chronicles do not require. Tables wanting faster chronicle pacing should scope down to Australian metropolitan template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oft-page-break/><text:span text:style-name="Strong_20_Emphasis">A practical checklist for chronicle preparation. Work through the checklist before chronicle launch; revisit during chronicle-active period as needed.</text:span></text:p>
      <text:h text:style-name="Heading_20_3" text:outline-level="3"><text:span text:style-name="Strong_20_Emphasis">Pre-launch checklist (4-8 weeks before chronicle launch):</text:span></text:h>
      <text:p text:style-name="Text_20_body"><text:span text:style-name="Strong_20_Emphasis">Scope and mode confirmation:</text:span></text:p>
      <text:list text:style-name="L21">
        <text:list-item>
          <text:p text:style-name="P45">Have I confirmed chronicle scope with my players? </text:p>
        </text:list-item>
        <text:list-item>
          <text:p text:style-name="P45">Have I confirmed chronicle mode with my players? </text:p>
        </text:list-item>
        <text:list-item>
          <text:p text:style-name="P45">Have I read the relevant chronicle prep guide(s) for my chosen mode(s)? </text:p>
        </text:list-item>
        <text:list-item>
          <text:p text:style-name="P44">Does the chronicle scope match the table's commitment capacity (session count, scheduling reliability)? </text:p>
        </text:list-item>
      </text:list>
      <text:p text:style-name="Text_20_body"><text:span text:style-name="Strong_20_Emphasis">Component selection:</text:span></text:p>
      <text:list text:style-name="L22">
        <text:list-item>
          <text:p text:style-name="P47">Have I selected the relevant lorebook(s)? </text:p>
        </text:list-item>
        <text:list-item>
          <text:p text:style-name="P47">Have I selected the relevant city supplement(s)? </text:p>
        </text:list-item>
        <text:list-item>
          <text:p text:style-name="P47">Have I selected the relevant chronicle prep guide(s)? </text:p>
        </text:list-item>
        <text:list-item>
          <text:p text:style-name="P47">Have I selected the relevant coterie(s) for institutional context? </text:p>
        </text:list-item>
        <text:list-item>
          <text:p text:style-name="P47">Have I selected the relevant antagonist infrastructure? </text:p>
        </text:list-item>
        <text:list-item>
          <text:p text:style-name="P47">If continental scope: have I loaded the Continental Coordination Guide? </text:p>
        </text:list-item>
        <text:list-item>
          <text:p text:style-name="P46">If cross-splat: have I loaded the relevant cross-splat supplements? </text:p>
        </text:list-item>
      </text:list>
      <text:p text:style-name="Text_20_body"><text:span text:style-name="Strong_20_Emphasis">Player character preparation:</text:span></text:p>
      <text:list text:style-name="L23">
        <text:list-item>
          <text:p text:style-name="P49">Have my players selected starting positions (kit scenarios or original characters with kit-style chronicle hook infrastructure)? </text:p>
        </text:list-item>
        <text:list-item>
          <text:p text:style-name="P49">Does each player character have identified institutional positioning? </text:p>
        </text:list-item>
        <text:list-item>
          <text:p text:style-name="P49">Does each player character have identified chronicle hooks? </text:p>
        </text:list-item>
        <text:list-item>
          <text:p text:style-name="P49">Does each player character have identified relationships to existing kit infrastructure? </text:p>
        </text:list-item>
        <text:list-item>
          <text:p text:style-name="P48">If multiple chronicle modes: do player characters' chronicle modes align with chronicle scope, or does the chronicle-mode plurality require deliberate handling? </text:p>
        </text:list-item>
      </text:list>
      <text:p text:style-name="Text_20_body"><text:span text:style-name="Strong_20_Emphasis">Chronicle calendar:</text:span></text:p>
      <text:list text:style-name="L24">
        <text:list-item>
          <text:p text:style-name="P51">Have I identified chronicle launch chronological position? </text:p>
        </text:list-item>
        <text:list-item>
          <text:p text:style-name="P51">Have I identified chronicle-defining moment(s) for chronicle pacing infrastructure? </text:p>
        </text:list-item>
        <text:list-item>
          <text:p text:style-name="P51">Have I planned chronicle pacing across multiple temporal scales (within-session, inter-session, multi-arc)? </text:p>
        </text:list-item>
        <text:list-item>
          <text:p text:style-name="P50">Have I checked that chronicle calendar aligns with the kit's chronicle-active 2025-2026 period? </text:p>
        </text:list-item>
      </text:list>
      <text:p text:style-name="Text_20_body"><text:span text:style-name="Strong_20_Emphasis">Antagonist preparation:</text:span></text:p>
      <text:list text:style-name="L25">
        <text:list-item>
          <text:p text:style-name="P53">Have I selected antagonists across appropriate categories (internal, cross-faction, mortal-network, supernatural-corruption, methuselah-tier)? </text:p>
        </text:list-item>
        <text:list-item>
          <text:p text:style-name="P53">Have I confirmed antagonist scale matches chronicle character scale? </text:p>
        </text:list-item>
        <text:list-item>
          <text:p text:style-name="P53">If methuselah-tier antagonists: have I planned engagement modes that don't require direct combat (institutional manoeuvring, alliance development, operational positioning)? </text:p>
        </text:list-item>
        <text:list-item>
          <text:p text:style-name="P52">Have I planned antagonist progression across chronicle arc? </text:p>
        </text:list-item>
      </text:list>
      <text:p text:style-name="Text_20_body"><text:span text:style-name="Strong_20_Emphasis">Safety and table commitment:</text:span></text:p>
      <text:list text:style-name="L26">
        <text:list-item>
          <text:p text:style-name="P55"><text:soft-page-break/>Have I reviewed the kit's safety toolkit components with my players? </text:p>
        </text:list-item>
        <text:list-item>
          <text:p text:style-name="P55">Have we established lines and veils for the chronicle? </text:p>
        </text:list-item>
        <text:list-item>
          <text:p text:style-name="P55">Have we established X-card or equivalent safety mechanism? </text:p>
        </text:list-item>
        <text:list-item>
          <text:p text:style-name="P55">Have we discussed content warnings for chronicle-mode-specific material (Sabbat-survivor moral complexity, methuselah-tempo slow pacing, cross-splat metaphysical horror)? </text:p>
        </text:list-item>
        <text:list-item>
          <text:p text:style-name="P54">Have we confirmed scheduling reliability for the chronicle session count? </text:p>
        </text:list-item>
      </text:list>
      <text:h text:style-name="Heading_20_3" text:outline-level="3"><text:span text:style-name="Strong_20_Emphasis">Session-by-session checklist (during chronicle-active play):</text:span></text:h>
      <text:p text:style-name="Text_20_body"><text:span text:style-name="Strong_20_Emphasis">Each session preparation:</text:span></text:p>
      <text:list text:style-name="L27">
        <text:list-item>
          <text:p text:style-name="P57">Have I reviewed the session's planned chronicle scenes? </text:p>
        </text:list-item>
        <text:list-item>
          <text:p text:style-name="P57">Have I identified continuing chronicle hooks from previous sessions? </text:p>
        </text:list-item>
        <text:list-item>
          <text:p text:style-name="P57">Have I prepared appropriate antagonist material for the session? </text:p>
        </text:list-item>
        <text:list-item>
          <text:p text:style-name="P56">Have I identified the session's intended pacing (hour-scale within-session resolution? Day-scale inter-session continuation? Week-scale operational tempo?)? </text:p>
        </text:list-item>
      </text:list>
      <text:p text:style-name="Text_20_body"><text:span text:style-name="Strong_20_Emphasis">Each session post-play:</text:span></text:p>
      <text:list text:style-name="L28">
        <text:list-item>
          <text:p text:style-name="P59">Have I noted continuing chronicle hooks for subsequent sessions? </text:p>
        </text:list-item>
        <text:list-item>
          <text:p text:style-name="P59">Have I noted player character development that affects chronicle direction? </text:p>
        </text:list-item>
        <text:list-item>
          <text:p text:style-name="P59">Have I noted any safety toolkit activations and adjusted future sessions accordingly? </text:p>
        </text:list-item>
        <text:list-item>
          <text:p text:style-name="P58">Have I checked session pacing against intended chronicle pacing (sessions running long? running short? player engagement levels?)? </text:p>
        </text:list-item>
      </text:list>
      <text:p text:style-name="Text_20_body"><text:span text:style-name="Strong_20_Emphasis">Mid-chronicle checkpoint (approximately every 5 sessions):</text:span></text:p>
      <text:list text:style-name="L29">
        <text:list-item>
          <text:p text:style-name="P61">Are we on pace for intended chronicle session count? </text:p>
        </text:list-item>
        <text:list-item>
          <text:p text:style-name="P61">Are players engaged with chronicle direction? </text:p>
        </text:list-item>
        <text:list-item>
          <text:p text:style-name="P61">Are antagonists producing appropriate operational pressure? </text:p>
        </text:list-item>
        <text:list-item>
          <text:p text:style-name="P61">Does chronicle pacing match intended pacing? Does it need adjustment? </text:p>
        </text:list-item>
        <text:list-item>
          <text:p text:style-name="P60">Have any players' characters reached operational positioning that requires chronicle adjustment? </text:p>
        </text:list-item>
      </text:list>
      <text:h text:style-name="Heading_20_3" text:outline-level="3"><text:span text:style-name="Strong_20_Emphasis">Chronicle late-arc checklist (final 3-5 sessions):</text:span></text:h>
      <text:list text:style-name="L30">
        <text:list-item>
          <text:p text:style-name="P63">Are chronicle hooks resolving toward chronicle-defining moment(s)? </text:p>
        </text:list-item>
        <text:list-item>
          <text:p text:style-name="P63">Have I planned chronicle climax appropriately for player character institutional positioning? </text:p>
        </text:list-item>
        <text:list-item>
          <text:p text:style-name="P63">Have I planned chronicle resolution that produces appropriate narrative completion? </text:p>
        </text:list-item>
        <text:list-item>
          <text:p text:style-name="P63">Have I planned post-chronicle continuing institutional positioning that supports potential subsequent chronicle work? </text:p>
        </text:list-item>
        <text:list-item>
          <text:p text:style-name="P62">Have I planned table debrief discussion for post-chronicle review? </text:p>
        </text:list-item>
      </text:list>
      <text:h text:style-name="Heading_20_3" text:outline-level="3"><text:span text:style-name="Strong_20_Emphasis">Post-chronicle checklist:</text:span></text:h>
      <text:list text:style-name="L31">
        <text:list-item>
          <text:p text:style-name="P65">Have we conducted post-chronicle table debrief discussion? </text:p>
        </text:list-item>
        <text:list-item>
          <text:p text:style-name="P65">Have we documented chronicle outcomes for potential subsequent chronicle reference? </text:p>
        </text:list-item>
        <text:list-item>
          <text:p text:style-name="P65">Have we identified player character development that supports subsequent chronicle work? </text:p>
        </text:list-item>
        <text:list-item>
          <text:p text:style-name="P65">Have we identified institutional infrastructure development that affects subsequent chronicle work? </text:p>
        </text:list-item>
        <text:list-item>
          <text:p text:style-name="P64">Have we adjusted continuing kit infrastructure (continuing institutional positioning, <text:soft-page-break/>continuing chronicle-active dynamics) for subsequent chronicle reference? </text:p>
        </text:list-item>
      </text:list>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oft-page-break/><text:span text:style-name="Strong_20_Emphasis">Six common chronicle failure modes specific to kit-based chronicle work, with diagnostic indicators and corrective adjustments.</text:span></text:p>
      <text:h text:style-name="Heading_20_3" text:outline-level="3"><text:span text:style-name="Strong_20_Emphasis">Failure Mode 1: Scope Creep</text:span></text:h>
      <text:p text:style-name="Text_20_body"><text:span text:style-name="Strong_20_Emphasis">Diagnostic indicators:</text:span></text:p>
      <text:list text:style-name="L32">
        <text:list-item>
          <text:p text:style-name="P67">Chronicle expanding beyond planned scope mid-arc </text:p>
        </text:list-item>
        <text:list-item>
          <text:p text:style-name="P67">New cities, new factions, new antagonists added during play without chronicle structure adjustment </text:p>
        </text:list-item>
        <text:list-item>
          <text:p text:style-name="P67">Players overwhelmed by chronicle complexity </text:p>
        </text:list-item>
        <text:list-item>
          <text:p text:style-name="P66">Storyteller preparation time exceeding sustainable level </text:p>
        </text:list-item>
      </text:list>
      <text:p text:style-name="Text_20_body"><text:span text:style-name="Strong_20_Emphasis">Underlying problem:</text:span> Storyteller adding kit components during play without checking whether the components serve chronicle direction; chronicle scope expanding through accretion rather than through deliberate design.</text:p>
      <text:p text:style-name="Text_20_body"><text:span text:style-name="Strong_20_Emphasis">Corrective adjustment:</text:span></text:p>
      <text:list text:style-name="L33">
        <text:list-item>
          <text:p text:style-name="P69">Stop adding new kit components mid-chronicle </text:p>
        </text:list-item>
        <text:list-item>
          <text:p text:style-name="P69">Identify chronicle scope creep at first diagnostic indicator </text:p>
        </text:list-item>
        <text:list-item>
          <text:p text:style-name="P69">If continuing kit components require engagement, plan engagement for subsequent chronicle rather than current chronicle </text:p>
        </text:list-item>
        <text:list-item>
          <text:p text:style-name="P68">Return to chronicle-defining moment infrastructure to refocus chronicle direction </text:p>
        </text:list-item>
      </text:list>
      <text:h text:style-name="Heading_20_3" text:outline-level="3"><text:span text:style-name="Strong_20_Emphasis">Failure Mode 2: Mode-Mismatch Engagement</text:span></text:h>
      <text:p text:style-name="Text_20_body"><text:span text:style-name="Strong_20_Emphasis">Diagnostic indicators:</text:span></text:p>
      <text:list text:style-name="L34">
        <text:list-item>
          <text:p text:style-name="P71">Chronicle running at chronicle mode that some players are not engaging with </text:p>
        </text:list-item>
        <text:list-item>
          <text:p text:style-name="P71">Some players obviously bored during sessions while others engaged </text:p>
        </text:list-item>
        <text:list-item>
          <text:p text:style-name="P71">Sessions split between chronicle mode work and out-of-character discussion </text:p>
        </text:list-item>
        <text:list-item>
          <text:p text:style-name="P70">Player character development not aligned with chronicle mode </text:p>
        </text:list-item>
      </text:list>
      <text:p text:style-name="Text_20_body"><text:span text:style-name="Strong_20_Emphasis">Underlying problem:</text:span> Chronicle mode selection did not check player interest; players are tolerating rather than enjoying the chronicle mode.</text:p>
      <text:p text:style-name="Text_20_body"><text:span text:style-name="Strong_20_Emphasis">Corrective adjustment:</text:span></text:p>
      <text:list text:style-name="L35">
        <text:list-item>
          <text:p text:style-name="P73">Acknowledge the mismatch directly with players </text:p>
        </text:list-item>
        <text:list-item>
          <text:p text:style-name="P73">Either adjust chronicle mode (if mid-arc adjustment is feasible) or commit to current chronicle mode and plan chronicle conclusion at sustainable session count rather than ambitious session count </text:p>
        </text:list-item>
        <text:list-item>
          <text:p text:style-name="P72">For subsequent chronicles, conduct explicit chronicle mode selection conversation before chronicle launch </text:p>
        </text:list-item>
      </text:list>
      <text:h text:style-name="Heading_20_3" text:outline-level="3"><text:span text:style-name="Strong_20_Emphasis">Failure Mode 3: Antagonist Scale Mismatch</text:span></text:h>
      <text:p text:style-name="Text_20_body"><text:span text:style-name="Strong_20_Emphasis">Diagnostic indicators:</text:span></text:p>
      <text:list text:style-name="L36">
        <text:list-item>
          <text:p text:style-name="P75">Player characters consistently outclassed by antagonists </text:p>
        </text:list-item>
        <text:list-item>
          <text:p text:style-name="P75">Direct combat resolution unavailable (antagonist scale too high) </text:p>
        </text:list-item>
        <text:list-item>
          <text:p text:style-name="P75">Player characters consistently outclass antagonists </text:p>
        </text:list-item>
        <text:list-item>
          <text:p text:style-name="P74"><text:soft-page-break/>Player characters unable to lose meaningfully (antagonist scale too low) </text:p>
        </text:list-item>
      </text:list>
      <text:p text:style-name="Text_20_body"><text:span text:style-name="Strong_20_Emphasis">Underlying problem:</text:span> Antagonist scale was not calibrated to player character scale; chronicle pressure either excessive or absent.</text:p>
      <text:p text:style-name="Text_20_body"><text:span text:style-name="Strong_20_Emphasis">Corrective adjustment:</text:span></text:p>
      <text:list text:style-name="L37">
        <text:list-item>
          <text:p text:style-name="P77">For too-high antagonist scale: introduce institutional engagement modes that don't require direct combat (alliance development, operational positioning, intelligence-gathering) </text:p>
        </text:list-item>
        <text:list-item>
          <text:p text:style-name="P77">For too-low antagonist scale: escalate antagonist infrastructure through institutional pressure rather than through direct combat scaling </text:p>
        </text:list-item>
        <text:list-item>
          <text:p text:style-name="P76">Plan antagonist progression that scales with player character development across chronicle arc </text:p>
        </text:list-item>
      </text:list>
      <text:h text:style-name="Heading_20_3" text:outline-level="3"><text:span text:style-name="Strong_20_Emphasis">Failure Mode 4: Calendar Drift</text:span></text:h>
      <text:p text:style-name="Text_20_body"><text:span text:style-name="Strong_20_Emphasis">Diagnostic indicators:</text:span></text:p>
      <text:list text:style-name="L38">
        <text:list-item>
          <text:p text:style-name="P79">Chronicle session count exceeding planned session count without chronicle progression </text:p>
        </text:list-item>
        <text:list-item>
          <text:p text:style-name="P79">Chronicle pacing slowing without corresponding chronicle development </text:p>
        </text:list-item>
        <text:list-item>
          <text:p text:style-name="P79">Chronicle-defining moment never approaching despite chronicle continuation </text:p>
        </text:list-item>
        <text:list-item>
          <text:p text:style-name="P78">Player frustration with chronicle pace </text:p>
        </text:list-item>
      </text:list>
      <text:p text:style-name="Text_20_body"><text:span text:style-name="Strong_20_Emphasis">Underlying problem:</text:span> Chronicle calendar is not advancing relative to chronicle session count; chronicle pacing has flattened.</text:p>
      <text:p text:style-name="Text_20_body"><text:span text:style-name="Strong_20_Emphasis">Corrective adjustment:</text:span></text:p>
      <text:list text:style-name="L39">
        <text:list-item>
          <text:p text:style-name="P81">Identify chronicle-defining moment timeline explicitly </text:p>
        </text:list-item>
        <text:list-item>
          <text:p text:style-name="P81">Adjust chronicle pacing to advance toward chronicle-defining moment </text:p>
        </text:list-item>
        <text:list-item>
          <text:p text:style-name="P81">If chronicle-defining moment cannot be reached at sustainable session count, plan abbreviated chronicle conclusion that resolves available chronicle direction within remaining sessions </text:p>
        </text:list-item>
        <text:list-item>
          <text:p text:style-name="P80">For subsequent chronicles, plan calendar advancement explicitly across chronicle arc </text:p>
        </text:list-item>
      </text:list>
      <text:h text:style-name="Heading_20_3" text:outline-level="3"><text:span text:style-name="Strong_20_Emphasis">Failure Mode 5: Coterie Cohesion Collapse</text:span></text:h>
      <text:p text:style-name="Text_20_body"><text:span text:style-name="Strong_20_Emphasis">Diagnostic indicators:</text:span></text:p>
      <text:list text:style-name="L40">
        <text:list-item>
          <text:p text:style-name="P83">Player characters operating independently rather than as coterie </text:p>
        </text:list-item>
        <text:list-item>
          <text:p text:style-name="P83">Coterie scenes producing chronicle complications rather than chronicle development </text:p>
        </text:list-item>
        <text:list-item>
          <text:p text:style-name="P83">Player conflict during sessions </text:p>
        </text:list-item>
        <text:list-item>
          <text:p text:style-name="P82">Coterie operational specialty divergence at scale that single-coterie chronicle work cannot sustain </text:p>
        </text:list-item>
      </text:list>
      <text:p text:style-name="Text_20_body"><text:span text:style-name="Strong_20_Emphasis">Underlying problem:</text:span> Player characters do not have sufficient operational specialty alignment to function as coterie; chronicle scope is operating at multiple individual chronicles in parallel rather than as single coterie chronicle.</text:p>
      <text:p text:style-name="Text_20_body"><text:span text:style-name="Strong_20_Emphasis">Corrective adjustment:</text:span></text:p>
      <text:list text:style-name="L41">
        <text:list-item>
          <text:p text:style-name="P85">Restore coterie operational specialty alignment through chronicle scenes that require coterie cooperation </text:p>
        </text:list-item>
        <text:list-item>
          <text:p text:style-name="P85"><text:soft-page-break/>If coterie cohesion has irrevocably collapsed, acknowledge that the chronicle has shifted to multiple parallel chronicles and adjust chronicle preparation accordingly </text:p>
        </text:list-item>
        <text:list-item>
          <text:p text:style-name="P84">For subsequent chronicles, plan coterie design with explicit operational specialty alignment </text:p>
        </text:list-item>
      </text:list>
      <text:h text:style-name="Heading_20_3" text:outline-level="3"><text:span text:style-name="Strong_20_Emphasis">Failure Mode 6: Cross-Splat Engagement Failure</text:span></text:h>
      <text:p text:style-name="Text_20_body"><text:span text:style-name="Strong_20_Emphasis">Diagnostic indicators:</text:span></text:p>
      <text:list text:style-name="L42">
        <text:list-item>
          <text:p text:style-name="P87">Cross-splat material engaging at scale that exceeds player comfort with metaphysical horror </text:p>
        </text:list-item>
        <text:list-item>
          <text:p text:style-name="P87">Cross-splat material engaging at scale that exceeds player understanding of chronicle infrastructure </text:p>
        </text:list-item>
        <text:list-item>
          <text:p text:style-name="P87">Cross-splat scenes producing player disengagement rather than chronicle engagement </text:p>
        </text:list-item>
        <text:list-item>
          <text:p text:style-name="P86">Chronicle work avoiding cross-splat scenes despite cross-splat scope commitment </text:p>
        </text:list-item>
      </text:list>
      <text:p text:style-name="Text_20_body"><text:span text:style-name="Strong_20_Emphasis">Underlying problem:</text:span> Cross-splat scope was selected without confirming player comfort with cross-splat material; chronicle scope is engaging cross-splat material at scale that the table cannot sustain.</text:p>
      <text:p text:style-name="Text_20_body"><text:span text:style-name="Strong_20_Emphasis">Corrective adjustment:</text:span></text:p>
      <text:list text:style-name="L43">
        <text:list-item>
          <text:p text:style-name="P89">Acknowledge cross-splat engagement difficulty directly with players </text:p>
        </text:list-item>
        <text:list-item>
          <text:p text:style-name="P89">Either reduce cross-splat scope to background context rather than central operational infrastructure, or conclude chronicle at sustainable session count and plan subsequent non-cross-splat chronicle </text:p>
        </text:list-item>
        <text:list-item>
          <text:p text:style-name="P88">For subsequent cross-splat chronicles, conduct explicit cross-splat content discussion before chronicle launch including content warnings for metaphysical horror material </text:p>
        </text:list-item>
      </text:list>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oft-page-break/><text:span text:style-name="Strong_20_Emphasis">For Storytellers running chronicles via AI prompt configuration (Storyteller assistance, character voice support, scene rendering support), AI prompt configuration requires deliberate component selection.</text:span></text:p>
      <text:h text:style-name="Heading_20_3" text:outline-level="3"><text:span text:style-name="Strong_20_Emphasis">Custom chronicle prompt layering structure:</text:span></text:h>
      <text:p text:style-name="Preformatted_20_Text"><text:span text:style-name="Source_20_Text">[BASE LAYER] V:tM core system prompt (always loaded)</text:span></text:p>
      <text:p text:style-name="Preformatted_20_Text"><text:span text:style-name="Source_20_Text"><text:s text:c="16"/>↓</text:span></text:p>
      <text:p text:style-name="Preformatted_20_Text"><text:span text:style-name="Source_20_Text">[CITY LAYER] City supplement(s) for chronicle geographic anchor</text:span></text:p>
      <text:p text:style-name="Preformatted_20_Text"><text:span text:style-name="Source_20_Text"><text:s text:c="16"/>↓</text:span></text:p>
      <text:p text:style-name="Preformatted_20_Text"><text:span text:style-name="Source_20_Text">[MODE LAYER] Chronicle prep guide(s) for chronicle mode handling</text:span></text:p>
      <text:p text:style-name="Preformatted_20_Text"><text:span text:style-name="Source_20_Text"><text:s text:c="16"/>↓</text:span></text:p>
      <text:p text:style-name="Preformatted_20_Text"><text:span text:style-name="Source_20_Text">[CROSS-SPLAT LAYER] Cross-splat supplement(s) if engaged</text:span></text:p>
      <text:p text:style-name="Preformatted_20_Text"><text:span text:style-name="Source_20_Text"><text:s text:c="16"/>↓</text:span></text:p>
      <text:p text:style-name="Preformatted_20_Text"><text:span text:style-name="Source_20_Text">[ANTAGONIST LAYER] Antagonist Pack(s) for chronicle antagonist material</text:span></text:p>
      <text:p text:style-name="Preformatted_20_Text"><text:span text:style-name="Source_20_Text"><text:s text:c="16"/>↓</text:span></text:p>
      <text:p text:style-name="Preformatted_20_Text"><text:span text:style-name="Source_20_Text">[CONTINENTAL LAYER] Continental Coordination Guide if continental scope</text:span></text:p>
      <text:p text:style-name="Preformatted_20_Text"><text:span text:style-name="Source_20_Text"><text:s text:c="16"/>↓</text:span></text:p>
      <text:p text:style-name="Preformatted_20_Text"><text:span text:style-name="Source_20_Text">[CHARACTER LAYER] Player character configurations with chronicle hook context</text:span></text:p>
      <text:p text:style-name="Preformatted_20_Text"><text:span text:style-name="Source_20_Text"><text:s text:c="16"/>↓</text:span></text:p>
      <text:p text:style-name="P2"><text:span text:style-name="Source_20_Text">[SESSION LAYER] Session-specific parameters (current chronicle position, current chronicle hooks, current antagonist pressure)</text:span></text:p>
      <text:h text:style-name="Heading_20_3" text:outline-level="3"><text:span text:style-name="Strong_20_Emphasis">Custom chronicle prompt components to include:</text:span></text:h>
      <text:p text:style-name="Preformatted_20_Text"><text:span text:style-name="Source_20_Text">This chronicle operates at [scope] with [mode(s)] chronicle mode </text:span></text:p>
      <text:p text:style-name="Preformatted_20_Text"><text:span text:style-name="Source_20_Text">engagement. Chronicle geographic anchor is [city/cities]. Chronicle </text:span></text:p>
      <text:p text:style-name="Preformatted_20_Text"><text:span text:style-name="Source_20_Text">calendar position is [chronological reference]. Chronicle is at </text:span></text:p>
      <text:p text:style-name="Preformatted_20_Text"><text:span text:style-name="Source_20_Text">session [N] of [total] planned sessions.</text:span></text:p>
      <text:p text:style-name="Preformatted_20_Text"/>
      <text:p text:style-name="Preformatted_20_Text"><text:span text:style-name="Source_20_Text">Apply [specific chronicle prep guide(s)] handling guidance.</text:span></text:p>
      <text:p text:style-name="Preformatted_20_Text"/>
      <text:p text:style-name="Preformatted_20_Text"><text:span text:style-name="Source_20_Text">Render chronicle modes per their distinctive characteristics:</text:span></text:p>
      <text:p text:style-name="Preformatted_20_Text"><text:span text:style-name="Source_20_Text">- [list specific chronicle mode characteristics relevant to current </text:span></text:p>
      <text:p text:style-name="Preformatted_20_Text"><text:span text:style-name="Source_20_Text"><text:s text:c="2"/>scope]</text:span></text:p>
      <text:p text:style-name="Preformatted_20_Text"/>
      <text:p text:style-name="Preformatted_20_Text"><text:span text:style-name="Source_20_Text">Render player character chronicle hooks:</text:span></text:p>
      <text:p text:style-name="Preformatted_20_Text"><text:span text:style-name="Source_20_Text">- [list each player character's identified chronicle hooks and </text:span></text:p>
      <text:p text:style-name="Preformatted_20_Text"><text:span text:style-name="Source_20_Text"><text:s text:c="2"/>current chronicle development direction]</text:span></text:p>
      <text:p text:style-name="Preformatted_20_Text"/>
      <text:p text:style-name="Preformatted_20_Text"><text:span text:style-name="Source_20_Text">Render current antagonist pressure:</text:span></text:p>
      <text:p text:style-name="Preformatted_20_Text"><text:span text:style-name="Source_20_Text">- [list current antagonist material at chronicle-active scale]</text:span></text:p>
      <text:p text:style-name="Preformatted_20_Text"/>
      <text:p text:style-name="Preformatted_20_Text"><text:span text:style-name="Source_20_Text">Apply chronicle pacing at appropriate temporal scale(s):</text:span></text:p>
      <text:p text:style-name="Preformatted_20_Text"><text:span text:style-name="Source_20_Text">- [identify which temporal scales the chronicle is operating at — </text:span></text:p>
      <text:p text:style-name="Preformatted_20_Text"><text:span text:style-name="Source_20_Text"><text:s text:c="2"/>hour-scale within-session, day-scale inter-session, week-scale </text:span></text:p>
      <text:p text:style-name="Preformatted_20_Text"><text:span text:style-name="Source_20_Text"><text:s text:c="2"/>operational tempo, month-scale institutional rhythm]</text:span></text:p>
      <text:p text:style-name="Preformatted_20_Text"/>
      <text:p text:style-name="Preformatted_20_Text"><text:span text:style-name="Source_20_Text">Apply continental coordination handling per Continental Coordination </text:span></text:p>
      <text:p text:style-name="Preformatted_20_Text"><text:span text:style-name="Source_20_Text">Guide if continental scope; apply chronicle-mode-pivot handling </text:span></text:p>
      <text:p text:style-name="Preformatted_20_Text"><text:span text:style-name="Source_20_Text">where chronicle scope engages multiple chronicle modes.</text:span></text:p>
      <text:p text:style-name="Preformatted_20_Text"/>
      <text:p text:style-name="Preformatted_20_Text"><text:span text:style-name="Source_20_Text">Apply chronicle failure mode recognition:</text:span></text:p>
      <text:p text:style-name="P2"><text:span text:style-name="Source_20_Text">- [list relevant failure modes for current chronicle scope]</text:span></text:p>
      <text:h text:style-name="Heading_20_3" text:outline-level="3"><text:span text:style-name="Strong_20_Emphasis">AI prompt iteration patterns for custom chronicles:</text:span></text:h>
      <text:p text:style-name="Text_20_body"><text:span text:style-name="Strong_20_Emphasis">Initial deployment:</text:span> Deploy chronicle prompt with full configuration. Run 2-3 chronicle sessions to identify chronicle scope coherence stability.</text:p>
      <text:p text:style-name="Text_20_body"><text:span text:style-name="Strong_20_Emphasis">First iteration adjustment (sessions 3-5):</text:span> Evaluate chronicle scope coherence and chronicle-mode <text:soft-page-break/>handling capacity. Apply corrective adjustments through prompt updates if specific failure modes appear.</text:p>
      <text:p text:style-name="Text_20_body"><text:span text:style-name="Strong_20_Emphasis">Sustained chronicle iteration (sessions 6+):</text:span> Continuing chronicle scope continues at planned complexity; chronicle AI prompts require ongoing iteration support across continuing chronicle sessions.</text:p>
      <text:p text:style-name="Text_20_body"><text:span text:style-name="Strong_20_Emphasis">Chronicle late-arc preparation:</text:span> As chronicle approaches chronicle-defining moment, update prompt with chronicle climax preparation including chronicle-defining moment specifics, expected player character development at chronicle climax, and post-chronicle continuing institutional positioning expectation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oft-page-break/><text:span text:style-name="Strong_20_Emphasis">The kit's components are designed for chronicle work, but they are also designed as templates for original material design. This section provides guidance for chronicle work that extends beyond the kit's existing material.</text:span></text:p>
      <text:h text:style-name="Heading_20_3" text:outline-level="3"><text:span text:style-name="Strong_20_Emphasis">Designing original cities:</text:span></text:h>
      <text:p text:style-name="Text_20_body">The kit's city supplements demonstrate consistent structural patterns: senior figure (Prince, Bishop, methuselah-tier figure) at city authority position; institutional infrastructure operating at appropriate scale (8-21 senior operatives plus supporting infrastructure); chronicle mode appropriate to city context; geographic anchor with specific local detail; antagonist infrastructure including internal, cross-faction, and mortal-network categories.</text:p>
      <text:p text:style-name="Text_20_body">To design an original city using kit patterns:</text:p>
      <text:list text:style-name="L44">
        <text:list-item>
          <text:p text:style-name="P91"><text:span text:style-name="Strong_20_Emphasis">Identify senior figure</text:span> — clan, generation, tenure, operational character, distinctive register </text:p>
        </text:list-item>
        <text:list-item>
          <text:p text:style-name="P91"><text:span text:style-name="Strong_20_Emphasis">Identify chronicle mode</text:span> — which kit-supported mode operates at this city </text:p>
        </text:list-item>
        <text:list-item>
          <text:p text:style-name="P91"><text:span text:style-name="Strong_20_Emphasis">Identify institutional infrastructure scale</text:span> — smaller-domain (Adelaide-scale, ~15-20 operatives), standard (Melbourne-Sydney-scale, ~25-40 operatives), chronicle-active (Brisbane-scale with chronicle-defining operations, ~40+ operatives) </text:p>
        </text:list-item>
        <text:list-item>
          <text:p text:style-name="P91"><text:span text:style-name="Strong_20_Emphasis">Identify geographic anchor</text:span> — specific local detail at scale that supports chronicle render </text:p>
        </text:list-item>
        <text:list-item>
          <text:p text:style-name="P90"><text:span text:style-name="Strong_20_Emphasis">Identify chronicle hook infrastructure</text:span> — chronicle-active dynamics, chronicle-defining moments, continuing institutional pressure </text:p>
        </text:list-item>
      </text:list>
      <text:h text:style-name="Heading_20_3" text:outline-level="3"><text:span text:style-name="Strong_20_Emphasis">Designing original scenarios:</text:span></text:h>
      <text:p text:style-name="Text_20_body">The kit's 40 scenarios demonstrate consistent structural patterns: detailed character build (V5 mechanical infrastructure plus thorough background); identified institutional positioning at chronicle-active scope; identified chronicle hooks with continuing operational direction; opening scene that produces immediate chronicle engagement; chronicle stakes with both successful and failed arc outcomes; AI handling notes for prompt configuration.</text:p>
      <text:p text:style-name="Text_20_body">To design an original scenario using kit patterns:</text:p>
      <text:list text:style-name="L45">
        <text:list-item>
          <text:p text:style-name="P93"><text:span text:style-name="Strong_20_Emphasis">Identify chronicle position</text:span> — scope, mode, geographic anchor that the scenario supports </text:p>
        </text:list-item>
        <text:list-item>
          <text:p text:style-name="P93"><text:span text:style-name="Strong_20_Emphasis">Identify character institutional positioning</text:span> — sire/cultivator, institutional cooperation infrastructure, operational specialty </text:p>
        </text:list-item>
        <text:list-item>
          <text:p text:style-name="P93"><text:span text:style-name="Strong_20_Emphasis">Identify chronicle hooks</text:span> — at least 4-6 distinct chronicle development directions </text:p>
        </text:list-item>
        <text:list-item>
          <text:p text:style-name="P93"><text:span text:style-name="Strong_20_Emphasis">Design opening scene</text:span> — specific scenario opening that produces immediate chronicle engagement plus institutional decision moment </text:p>
        </text:list-item>
        <text:list-item>
          <text:p text:style-name="P93"><text:span text:style-name="Strong_20_Emphasis">Design chronicle stakes</text:span> — explicit successful and failed arc outcomes </text:p>
        </text:list-item>
        <text:list-item>
          <text:p text:style-name="P92"><text:span text:style-name="Strong_20_Emphasis">Write AI handling notes</text:span> — specific guidance for AI prompt rendering at scenario chronicle scope </text:p>
        </text:list-item>
      </text:list>
      <text:h text:style-name="Heading_20_3" text:outline-level="3"><text:span text:style-name="Strong_20_Emphasis">Designing original coteries:</text:span></text:h>
      <text:p text:style-name="Text_20_body">The kit's 22 coteries demonstrate consistent structural patterns: institutional positioning with continuing tenure; member infrastructure at appropriate scale (3-8 operatives plus supporting infrastructure); operational specialty distinguishing the coterie from other coteries; internal dynamics producing chronicle texture; chronicle hook integration with city and continental infrastructure.</text:p>
      <text:p text:style-name="Text_20_body"><text:soft-page-break/>To design an original coterie using kit patterns:</text:p>
      <text:list text:style-name="L46">
        <text:list-item>
          <text:p text:style-name="P95"><text:span text:style-name="Strong_20_Emphasis">Identify institutional positioning</text:span> — coterie type, establishment context, continuing tenure, operational scope </text:p>
        </text:list-item>
        <text:list-item>
          <text:p text:style-name="P95"><text:span text:style-name="Strong_20_Emphasis">Identify member infrastructure</text:span> — number of members, clan/tribe distribution, operational specialty distribution </text:p>
        </text:list-item>
        <text:list-item>
          <text:p text:style-name="P95"><text:span text:style-name="Strong_20_Emphasis">Build senior member(s)</text:span> — full character builds for senior operatives at scale appropriate to coterie position </text:p>
        </text:list-item>
        <text:list-item>
          <text:p text:style-name="P95"><text:span text:style-name="Strong_20_Emphasis">Sketch additional members</text:span> — at-a-glance reference for less-central operatives </text:p>
        </text:list-item>
        <text:list-item>
          <text:p text:style-name="P95"><text:span text:style-name="Strong_20_Emphasis">Identify operational character</text:span> — what distinguishes this coterie from other coteries operating in similar institutional space </text:p>
        </text:list-item>
        <text:list-item>
          <text:p text:style-name="P94"><text:span text:style-name="Strong_20_Emphasis">Identify chronicle hook integration</text:span> — how the coterie engages with broader kit infrastructure </text:p>
        </text:list-item>
      </text:list>
      <text:h text:style-name="Heading_20_3" text:outline-level="3"><text:span text:style-name="Strong_20_Emphasis">Designing original antagonists:</text:span></text:h>
      <text:p text:style-name="Text_20_body">The kit's antagonist infrastructure demonstrates consistent structural patterns: detailed character builds at appropriate antagonist tier; institutional positioning with continuing tenure; operational character distinguishing the antagonist from generic threat material; chronicle hook integration with broader chronicle scope.</text:p>
      <text:p text:style-name="Text_20_body">To design an original antagonist using kit patterns:</text:p>
      <text:list text:style-name="L47">
        <text:list-item>
          <text:p text:style-name="P97"><text:span text:style-name="Strong_20_Emphasis">Identify antagonist tier</text:span> — fomor-tier, intermediate, senior, methuselah-tier (calibrate to chronicle character scale) </text:p>
        </text:list-item>
        <text:list-item>
          <text:p text:style-name="P97"><text:span text:style-name="Strong_20_Emphasis">Identify antagonist category</text:span> — internal institutional, cross-faction, mortal-network, supernatural-corruption, methuselah-tier </text:p>
        </text:list-item>
        <text:list-item>
          <text:p text:style-name="P97"><text:span text:style-name="Strong_20_Emphasis">Build full character infrastructure</text:span> — V5 mechanical build, background, institutional positioning, distinctive operational character </text:p>
        </text:list-item>
        <text:list-item>
          <text:p text:style-name="P97"><text:span text:style-name="Strong_20_Emphasis">Identify chronicle hook integration</text:span> — how the antagonist engages with chronicle scope </text:p>
        </text:list-item>
        <text:list-item>
          <text:p text:style-name="P96"><text:span text:style-name="Strong_20_Emphasis">Plan antagonist progression</text:span> — how the antagonist develops across chronicle arc rather than appearing only as static threat material </text:p>
        </text:list-item>
      </text:list>
      <text:h text:style-name="Heading_20_3" text:outline-level="3"><text:span text:style-name="Strong_20_Emphasis">The kit as design template, not as constraint:</text:span></text:h>
      <text:p text:style-name="Text_20_body">The kit's components are exhaustive enough to support chronicle work without original design, but the kit is also designed to support original design. Chronicles that extend beyond the kit's existing material — original cities, original scenarios, original coteries, original antagonists — can use the kit's structural patterns as design templates while engaging chronicle scope that the kit's existing material does not directly support.</text:p>
      <text:p text:style-name="Text_20_body">The structural patterns are the kit's primary contribution to chronicle design infrastructure. The specific characters, institutions, and chronicle-active dynamics are illustrative of the patterns; the patterns themselves are reusable across chronicle work that extends beyond the kit's specific Australian metropolitan and continental cross-Pacific scope.</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oft-page-break/><text:span text:style-name="Strong_20_Emphasis">The Chronicle Design Prep Guide is complete. A six-part meta-document for designing your own multi-session chronicle from kit components: the six chronicle design decisions (scope, mode, geographic anchor, player character starting position, antagonist infrastructure, chronicle calendar and pacing) each with diagnostic questions and common mistakes; five worked chronicle design templates demonstrating decision combinations from single-coterie Brisbane through cross-splat continental Article 8 through continental cross-Pacific Sabbat-refusenik; comprehensive chronicle preparation checklist covering pre-launch through post-chronicle phases; six common chronicle failure modes with diagnostic indicators and corrective adjustments; AI prompt configuration guidance for custom chronicles; and design template guidance for extending beyond the kit's existing material into original cities, scenarios, coteries, and antagonist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5-13T23:13:11.874339688</dc:date>
    <meta:editing-duration>PT1H39M20S</meta:editing-duration>
    <meta:editing-cycles>10</meta:editing-cycles>
    <meta:generator>LibreOffice/24.2.7.2$Linux_X86_64 LibreOffice_project/420$Build-2</meta:generator>
    <meta:document-statistic meta:table-count="7" meta:image-count="0" meta:object-count="0" meta:page-count="24" meta:paragraph-count="509" meta:word-count="6176" meta:character-count="50695" meta:non-whitespace-character-count="44836"/>
  </office:meta>
</office:document-meta>
</file>