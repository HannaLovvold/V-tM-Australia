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251cm" table:align="left"/>
    </style:style>
    <style:style style:name="Table1.A" style:family="table-column">
      <style:table-column-properties style:column-width="5.493cm"/>
    </style:style>
    <style:style style:name="Table1.B" style:family="table-column">
      <style:table-column-properties style:column-width="10.758cm"/>
    </style:style>
    <style:style style:name="Table1.A1" style:family="table-cell">
      <style:table-cell-properties style:vertical-align="middle" fo:padding="0.049cm" fo:border="none"/>
    </style:style>
    <style:style style:name="P1" style:family="paragraph" style:parent-style-name="Heading_20_3">
      <style:text-properties officeooo:rsid="001ed97d" officeooo:paragraph-rsid="001ed97d"/>
    </style:style>
    <style:style style:name="P2" style:family="paragraph" style:parent-style-name="Heading_20_3">
      <style:text-properties officeooo:rsid="001ed97d" officeooo:paragraph-rsid="00204040"/>
    </style:style>
    <style:style style:name="P3" style:family="paragraph" style:parent-style-name="Preformatted_20_Text">
      <style:text-properties officeooo:rsid="001ed97d" officeooo:paragraph-rsid="001ed97d"/>
    </style:style>
    <style:style style:name="P4" style:family="paragraph" style:parent-style-name="Preformatted_20_Text">
      <style:text-properties officeooo:rsid="001ed97d" officeooo:paragraph-rsid="00204040"/>
    </style:style>
    <style:style style:name="P5" style:family="paragraph" style:parent-style-name="Preformatted_20_Text">
      <style:text-properties officeooo:paragraph-rsid="00204040"/>
    </style:style>
    <style:style style:name="P6" style:family="paragraph" style:parent-style-name="Text_20_body">
      <style:text-properties officeooo:rsid="001ed97d" officeooo:paragraph-rsid="001ed97d"/>
    </style:style>
    <style:style style:name="P7" style:family="paragraph" style:parent-style-name="Text_20_body">
      <style:text-properties officeooo:rsid="001ed97d" officeooo:paragraph-rsid="00204040"/>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T1" style:family="text">
      <style:text-properties officeooo:rsid="001ed97d"/>
    </style:style>
    <style:style style:name="T2" style:family="text">
      <style:text-properties officeooo:rsid="0020404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drop-in roster of structural antagonists for V:tM chronicles: three Princes from cities beyond Chicago, two methuselahs at different threat-resonance levels, four mortal hunters representing different threat vectors, two solo Sabbat figures, and three rival coteries (including one Sabbat pack). All built using the Tier 3 architecture from the NPC builder, with internal contradictions, codes, and pressure patterns calibrated for chronicle play.</text:p>
      <text:p text:style-name="Text_20_body"><text:span text:style-name="Strong_20_Emphasis">Design principle for the entire pack:</text:span> every antagonist has a code, an internal contradiction, and a path other than direct combat — they can be negotiated, manipulated, escaped, or in some cases turned into allies. Wall-of-power antagonists are bad chronicle design; this pack treats antagonism as relationship.</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text:soft-page-break/>Section 1: Princes (3 Antagonists)</text:p>
      <text:p text:style-name="P3"/>
      <text:p text:style-name="P6">Princes from outside Chicago who can appear as visiting dignitaries, distant pressures, refuge options if Chicago becomes uninhabitable, or geopolitical context for the chronicle's larger Camarilla questions.</text:p>
      <text:h text:style-name="Heading_20_3" text:outline-level="3"><text:span text:style-name="Strong_20_Emphasis">1. Prince Mira Solis of Miami</text:span> — <text:span text:style-name="Emphasis">The Future the Tower Fears</text:span></text:h>
      <text:p text:style-name="P3"/>
      <text:h text:style-name="P1" text:outline-level="3"><text:span text:style-name="Strong_20_Emphasis">2. Prince Henrik Vargas of Mexico City</text:span> — <text:span text:style-name="Emphasis">The Death-Walker</text:span></text:h>
      <text:p text:style-name="P3"/>
      <text:h text:style-name="P1" text:outline-level="3"><text:span text:style-name="Strong_20_Emphasis">3. Prince Karl Schreck of Berlin</text:span> — <text:span text:style-name="Emphasis">The Information King</text:span></text:h>
      <text:p text:style-name="P3"/>
      <text:p text:style-name="P3">Section 2: Methuselahs (2 Antagonists)</text:p>
      <text:p text:style-name="P3"/>
      <text:p text:style-name="P6">Methuselahs are mostly absent from V5 due to the Beckoning, but the few who manifest in modern chronicles do so as world-shaping presences rather than scene-level NPCs. Both of these are calibrated as catalysts and pressures, not as enemies {{user}} can engage directly.</text:p>
      <text:h text:style-name="Heading_20_3" text:outline-level="3"><text:span text:style-name="Strong_20_Emphasis">4. Mistress Esmé Reyes of Lisbon</text:span> — <text:span text:style-name="Emphasis">The Lasombra Patriarch</text:span></text:h>
      <text:p text:style-name="P3"/>
      <text:h text:style-name="P1" text:outline-level="3"><text:span text:style-name="Strong_20_Emphasis">5. The Ladder Walker</text:span> — <text:span text:style-name="Emphasis">The Tzimisce That Stirred</text:span></text:h>
      <text:p text:style-name="P3"/>
      <text:p text:style-name="P3">Section 3: Mortal Hunters (4 Antagonists)</text:p>
      <text:p text:style-name="P3"/>
      <text:p text:style-name="P6">Four mortal threat vectors beyond Carruth's federal procedural register: religious vigilante, independent solo hunter, academic exposure threat, and Carruth's bureaucratic rival.</text:p>
      <text:h text:style-name="Heading_20_3" text:outline-level="3"><text:span text:style-name="Strong_20_Emphasis">6. Sister Helena Cardoso, Society of Leopold</text:span> — <text:span text:style-name="Emphasis">The Catholic Hunter</text:span></text:h>
      <text:p text:style-name="P3"/>
      <text:h text:style-name="P1" text:outline-level="3"><text:span text:style-name="Strong_20_Emphasis">7. Damien Ortega</text:span> — <text:span text:style-name="Emphasis">The Solo Tracker</text:span></text:h>
      <text:p text:style-name="P3"/>
      <text:h text:style-name="P1" text:outline-level="3"><text:span text:style-name="Strong_20_Emphasis">8. Dr. Yelena Marchenko</text:span> — <text:span text:style-name="Emphasis">The Academic Threat</text:span></text:h>
      <text:p text:style-name="P3"/>
      <text:h text:style-name="P1" text:outline-level="3"><text:span text:style-name="Strong_20_Emphasis">9. Special Agent Rin Tanaka</text:span> — <text:span text:style-name="Emphasis">The Bureaucratic Rival</text:span></text:h>
      <text:p text:style-name="P3"/>
      <text:p text:style-name="P4">Section <text:span text:style-name="T2">4</text:span>: <text:span text:style-name="T2">Sabbat Figures (2 Antagonists)</text:span></text:p>
      <text:p text:style-name="P4"/>
      <text:p text:style-name="P5"><text:span text:style-name="T1"><text:s/></text:span>The Sabbat is largely absent from V5 due to the Beckoning, but pockets remain. These two are the rare manifestations chronicles encounter.</text:p>
      <text:h text:style-name="Heading_20_3" text:outline-level="3"><text:span text:style-name="Strong_20_Emphasis">10. The Bishop Kovacs</text:span> — <text:span text:style-name="Emphasis">The Sabbat Holdout</text:span></text:h>
      <text:p text:style-name="P4"/>
      <text:h text:style-name="P2" text:outline-level="3"><text:span text:style-name="Strong_20_Emphasis">11. Cardinal Reyna Quiñones</text:span> — <text:span text:style-name="Emphasis">The Lasombra Refusenik</text:span></text:h>
      <text:p text:style-name="P4"/>
      <text:p text:style-name="P4"/>
      <text:p text:style-name="P4"><text:soft-page-break/>Section <text:span text:style-name="T2">5</text:span>: <text:span text:style-name="T2">Rival Coteries (3 Coteries, 10 Kindred Total)</text:span></text:p>
      <text:p text:style-name="P4"/>
      <text:p text:style-name="P7">Rival coteries are V:tM's group antagonists — small teams of 3-5 Kindred who provide multi-axis pressure rather than single-NPC threat. Each coterie below is built as a unit, with relationships and dynamics specified.</text:p>
      <text:h text:style-name="Heading_20_3" text:outline-level="3"><text:span text:style-name="Strong_20_Emphasis">12. The Diablerists</text:span> — <text:span text:style-name="Emphasis">Camarilla-Aligned, Secretly Compromised</text:span></text:h>
      <text:p text:style-name="Text_20_body">A four-Kindred Camarilla coterie that has secretly committed multiple diableries over the last fifteen years and is being slowly traced by the Banu Haqim. They appear as ordinary Camarilla Kindred at Elysium and salons; their secret would destroy them all if exposed.</text:p>
      <text:h text:style-name="P2" text:outline-level="3"><text:span text:style-name="Strong_20_Emphasis">13. The Pilsen Insurgents</text:span> — <text:span text:style-name="Emphasis">Anarch Splinter</text:span></text:h>
      <text:p text:style-name="Text_20_body">A three-Kindred Anarch splinter coterie operating in Pilsen who oppose Sol Vega-Chen's pragmatist position and would prefer to escalate Camarilla-Anarch conflict to open war. They are loyal to the Anarch Movement abstractly but disloyal to Sol's specific leadership.</text:p>
      <text:h text:style-name="P2" text:outline-level="3"><text:span text:style-name="Strong_20_Emphasis">14. The Last Days</text:span> — <text:span text:style-name="Emphasis">Sabbat Pack</text:span></text:h>
      <text:p text:style-name="Text_20_body">A three-Kindred Sabbat terror cell operating across North American cities, currently approaching Chicago. They are the Bishop Kovacs's most experienced pack — the original New Orleans pack, or what remains of it — and have been hunted by Damien Ortega for nineteen years.</text:p>
      <text:p text:style-name="P4"/>
      <text:p text:style-name="P4">Section <text:span text:style-name="T2">6</text:span>: <text:span text:style-name="T2">Deployment Guide</text:span></text:p>
      <text:p text:style-name="P4"/>
      <text:h text:style-name="P2" text:outline-level="3"><text:span text:style-name="Strong_20_Emphasis">Antagonist density per chronicle:</text:span></text:h>
      <text:p text:style-name="Text_20_body">For a typical 10-15 session V:tM chronicle:</text:p>
      <text:list text:style-name="L1">
        <text:list-item>
          <text:p text:style-name="P9"><text:span text:style-name="Strong_20_Emphasis">1-2 primary antagonists</text:span> carrying the chronicle's central conflict </text:p>
        </text:list-item>
        <text:list-item>
          <text:p text:style-name="P9"><text:span text:style-name="Strong_20_Emphasis">2-3 secondary pressures</text:span> providing complications </text:p>
        </text:list-item>
        <text:list-item>
          <text:p text:style-name="P9"><text:span text:style-name="Strong_20_Emphasis">1-2 background presences</text:span> felt but not engaged </text:p>
        </text:list-item>
        <text:list-item>
          <text:p text:style-name="P8"><text:span text:style-name="Strong_20_Emphasis">0-1 cosmic-tier presences</text:span> (methuselahs, the Ladder Walker) reserved for finale or specific arcs </text:p>
        </text:list-item>
      </text:list>
      <text:p text:style-name="Text_20_body">Don't deploy all 14 entries from this pack at once. Pick what fits the chronicle.</text:p>
      <text:h text:style-name="Heading_20_3" text:outline-level="3"><text:span text:style-name="Strong_20_Emphasis">Mapping antagonists to chronicle types:</text:span></text:h>
      <table:table table:name="Table1" table:style-name="Table1">
        <table:table-column table:style-name="Table1.A"/>
        <table:table-column table:style-name="Table1.B"/>
        <table:table-header-rows>
          <table:table-row>
            <table:table-cell table:style-name="Table1.A1" office:value-type="string">
              <text:p text:style-name="Table_20_Heading">Chronicle Focus</text:p>
            </table:table-cell>
            <table:table-cell table:style-name="Table1.A1" office:value-type="string">
              <text:p text:style-name="Table_20_Heading">Recommended Antagonists</text:p>
            </table:table-cell>
          </table:table-row>
        </table:table-header-rows>
        <table:table-row>
          <table:table-cell table:style-name="Table1.A1" office:value-type="string">
            <text:p text:style-name="Table_20_Contents">Camarilla court politics</text:p>
          </table:table-cell>
          <table:table-cell table:style-name="Table1.A1" office:value-type="string">
            <text:p text:style-name="Table_20_Contents">Mira Solis, Karl Schreck, The Diablerists</text:p>
          </table:table-cell>
        </table:table-row>
        <table:table-row>
          <table:table-cell table:style-name="Table1.A1" office:value-type="string">
            <text:p text:style-name="Table_20_Contents">Anarch movement</text:p>
          </table:table-cell>
          <table:table-cell table:style-name="Table1.A1" office:value-type="string">
            <text:p text:style-name="Table_20_Contents">Cardinal Reyna (distant), The Pilsen Insurgents</text:p>
          </table:table-cell>
        </table:table-row>
        <table:table-row>
          <table:table-cell table:style-name="Table1.A1" office:value-type="string">
            <text:p text:style-name="Table_20_Contents">Mortal-stakes / Personal horror</text:p>
          </table:table-cell>
          <table:table-cell table:style-name="Table1.A1" office:value-type="string">
            <text:p text:style-name="Table_20_Contents">Dr. Marchenko, Sister Helena, Carruth + Tanaka</text:p>
          </table:table-cell>
        </table:table-row>
        <table:table-row>
          <table:table-cell table:style-name="Table1.A1" office:value-type="string">
            <text:p text:style-name="Table_20_Contents">Sabbat threat</text:p>
          </table:table-cell>
          <table:table-cell table:style-name="Table1.A1" office:value-type="string">
            <text:p text:style-name="Table_20_Contents">Bishop Kovacs, The Last Days, Damien Ortega</text:p>
          </table:table-cell>
        </table:table-row>
        <table:table-row>
          <table:table-cell table:style-name="Table1.A1" office:value-type="string">
            <text:p text:style-name="Table_20_Contents">Hecata family business</text:p>
          </table:table-cell>
          <table:table-cell table:style-name="Table1.A1" office:value-type="string">
            <text:p text:style-name="Table_20_Contents">Henrik Vargas (ally-pressure), Esmé Reyes (distant)</text:p>
          </table:table-cell>
        </table:table-row>
        <table:table-row>
          <table:table-cell table:style-name="Table1.A1" office:value-type="string">
            <text:p text:style-name="Table_20_Contents">High-tier elder play</text:p>
          </table:table-cell>
          <table:table-cell table:style-name="Table1.A1" office:value-type="string">
            <text:p text:style-name="Table_20_Contents">Esmé Reyes (Lasombra), Ladder Walker (Tzimisce)</text:p>
          </table:table-cell>
        </table:table-row>
        <table:table-row>
          <table:table-cell table:style-name="Table1.A1" office:value-type="string">
            <text:p text:style-name="Table_20_Contents">Cross-sect tension</text:p>
          </table:table-cell>
          <table:table-cell table:style-name="Table1.A1" office:value-type="string">
            <text:p text:style-name="Table_20_Contents">Mira Solis + Cardinal Reyna together (Lasombra schism plot)</text:p>
          </table:table-cell>
        </table:table-row>
      </table:table>
      <text:h text:style-name="Heading_20_3" text:outline-level="3"><text:span text:style-name="Strong_20_Emphasis">Antagonist pacing principles:</text:span></text:h>
      <text:list text:style-name="L2">
        <text:list-item>
          <text:p text:style-name="P10"><text:span text:style-name="Strong_20_Emphasis">Build before reveal</text:span> — major antagonists should be FELT for sessions before they appear <text:soft-page-break/>directly. The first time {{user}} hears Mira Solis's name should be in a letter; the first time they see her should be much later.</text:p>
        </text:list-item>
        <text:list-item>
          <text:p text:style-name="P10"><text:span text:style-name="Strong_20_Emphasis">Power proportional to pacing</text:span> — methuselahs and elders should be encountered late and rarely. If they appear early, they solve the chronicle.</text:p>
        </text:list-item>
        <text:list-item>
          <text:p text:style-name="P10"><text:span text:style-name="Strong_20_Emphasis">Codes are the negotiation surface</text:span> — antagonists are made manageable by understanding their codes. The chronicle's challenge is figuring out what each antagonist will and won't do.</text:p>
        </text:list-item>
        <text:list-item>
          <text:p text:style-name="P10"><text:span text:style-name="Strong_20_Emphasis">Threats stack</text:span> — having Carruth AND Sister Helena AND Marchenko in the same chronicle isn't redundant; each is a different threat axis the {{user}} navigates differently.</text:p>
        </text:list-item>
        <text:list-item>
          <text:p text:style-name="P10"><text:span text:style-name="Strong_20_Emphasis">Coteries for group pressure</text:span> — single antagonists test {{user}}'s personal capacity; coteries test {{user}}'s coterie or alliance network.</text:p>
        </text:list-item>
        <text:list-item>
          <text:p text:style-name="P10"><text:span text:style-name="Strong_20_Emphasis">Defeat is plot, not finality</text:span> — when {{user}} defeats a primary antagonist, the chronicle should produce the next pressure (Carruth removed → Tanaka rises). The Beast is patient; the world keeps producing problems.</text:p>
        </text:list-item>
      </text:list>
      <text:h text:style-name="Heading_20_3" text:outline-level="3"><text:span text:style-name="Strong_20_Emphasis">Cross-references with existing kit:</text:span></text:h>
      <text:p text:style-name="Text_20_body">The pack connects to existing scenarios:</text:p>
      <text:list text:style-name="L3">
        <text:list-item>
          <text:p text:style-name="P12"><text:span text:style-name="Strong_20_Emphasis">Mira Solis</text:span> → relevant if Scenario 9 (Beckoned Prince) plays out in certain directions </text:p>
        </text:list-item>
        <text:list-item>
          <text:p text:style-name="P12"><text:span text:style-name="Strong_20_Emphasis">Henrik Vargas</text:span> → relevant for Scenarios 5, 7, 10 (Hecata thread) </text:p>
        </text:list-item>
        <text:list-item>
          <text:p text:style-name="P12"><text:span text:style-name="Strong_20_Emphasis">Karl Schreck</text:span> → relevant any time Mara Bekele or SchreckNet matters </text:p>
        </text:list-item>
        <text:list-item>
          <text:p text:style-name="P12"><text:span text:style-name="Strong_20_Emphasis">Esmé Reyes</text:span> → relevant for any Lasombra-deep play; can come up around Esperanza Salgado-Reyes </text:p>
        </text:list-item>
        <text:list-item>
          <text:p text:style-name="P12"><text:span text:style-name="Strong_20_Emphasis">The Ladder Walker</text:span> → reserved for Tzimisce-adjacent finale arcs </text:p>
        </text:list-item>
        <text:list-item>
          <text:p text:style-name="P12"><text:span text:style-name="Strong_20_Emphasis">Sister Helena</text:span> → activates if chronicle touches Mexico (Henrik Vargas, Bishop Kovacs) </text:p>
        </text:list-item>
        <text:list-item>
          <text:p text:style-name="P12"><text:span text:style-name="Strong_20_Emphasis">Damien Ortega</text:span> → activates if Sabbat operations push north </text:p>
        </text:list-item>
        <text:list-item>
          <text:p text:style-name="P12"><text:span text:style-name="Strong_20_Emphasis">Dr. Marchenko</text:span> → background Masquerade pressure for any long-running chronicle </text:p>
        </text:list-item>
        <text:list-item>
          <text:p text:style-name="P12"><text:span text:style-name="Strong_20_Emphasis">Tanaka</text:span> → activates if Carruth is removed in Scenario 7 or related </text:p>
        </text:list-item>
        <text:list-item>
          <text:p text:style-name="P12"><text:span text:style-name="Strong_20_Emphasis">Bishop Kovacs + The Last Days</text:span> → Sabbat-thread chronicles only </text:p>
        </text:list-item>
        <text:list-item>
          <text:p text:style-name="P12"><text:span text:style-name="Strong_20_Emphasis">Cardinal Reyna</text:span> → Lasombra-thread chronicles, especially if Esperanza becomes plot-active </text:p>
        </text:list-item>
        <text:list-item>
          <text:p text:style-name="P12"><text:span text:style-name="Strong_20_Emphasis">The Diablerists</text:span> → Camarilla-internal mystery for any Cordelia-aligned chronicle </text:p>
        </text:list-item>
        <text:list-item>
          <text:p text:style-name="P11"><text:span text:style-name="Strong_20_Emphasis">The Pilsen Insurgents</text:span> → Anarch-internal mystery for any Sol-aligned chronicle </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09:27:45.166681861</dc:date>
    <meta:editing-duration>PT10M19S</meta:editing-duration>
    <meta:editing-cycles>1</meta:editing-cycles>
    <meta:document-statistic meta:table-count="1" meta:image-count="0" meta:object-count="0" meta:page-count="4" meta:paragraph-count="76" meta:word-count="987" meta:character-count="6639" meta:non-whitespace-character-count="5709"/>
    <meta:generator>LibreOffice/24.2.7.2$Linux_X86_64 LibreOffice_project/420$Build-2</meta:generator>
  </office:meta>
</office:document-meta>
</file>