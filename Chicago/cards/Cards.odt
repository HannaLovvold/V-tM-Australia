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637cm"/>
    </style:style>
    <style:style style:name="Table1.B" style:family="table-column">
      <style:table-column-properties style:column-width="4.297cm"/>
    </style:style>
    <style:style style:name="Table1.C" style:family="table-column">
      <style:table-column-properties style:column-width="2.902cm"/>
    </style:style>
    <style:style style:name="Table1.D" style:family="table-column">
      <style:table-column-properties style:column-width="9.165cm"/>
    </style:style>
    <style:style style:name="Table1.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color="#f97583" loext:opacity="100%"/>
    </style:style>
    <style:style style:name="T2" style:family="text">
      <style:text-properties fo:color="#f97583" loext:opacity="100%" fo:font-size="12pt" style:font-size-asian="12pt" style:font-size-complex="12pt"/>
    </style:style>
    <style:style style:name="T3" style:family="text">
      <style:text-properties fo:font-size="12pt" style:font-size-asian="12pt" style:font-size-complex="12pt"/>
    </style:style>
    <style:style style:name="T4" style:family="text">
      <style:text-properties style:font-name="Liberation Serif" fo:font-size="12pt"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ve new scenarios that build on the named cast from the existing five. Each ties to existing characters, advances the Chicago metaplot, and works as a follow-up OR standalone entry.</text:p>
      <text:p text:style-name="Horizontal_20_Line"/>
      <text:p text:style-name="Text_20_body"><text:span text:style-name="Strong_20_Emphasis"><text:span text:style-name="Source_20_Text"><text:span text:style-name="T1">lake_treaty_renewal.json</text:span></text:span></text:span></text:p>
      <text:p text:style-name="Text_20_body"><text:span text:style-name="Strong_20_Emphasis">Vibe:</text:span> Every March, the Lake Treaty is renewed at a formal ceremony at the Palmer House. {{user}} has been selected as a delegate — either by the Camarilla (chosen by Cordelia) or by the Anarchs (chosen by Sol). Tonight, before the ceremony, {{user}} is summoned to a private pre-event meeting where the actual diplomacy happens. The other faction's lead delegate is a stranger to {{user}} but is widely known: Lukas Yates (if {{user}} is Anarch) or Demetrius Kemper (if {{user}} is Camarilla).</text:p>
      <text:p text:style-name="P2"><text:span text:style-name="Source_20_Text"><text:span text:style-name="T1">twilight_operation.json</text:span></text:span></text:p>
      <text:p text:style-name="Preformatted_20_Text"><text:span text:style-name="Strong_20_Emphasis"><text:span text:style-name="T4">Vibe:</text:span></text:span><text:span text:style-name="T4"> Inquisitor Carruth's Twilight Project team has just hit Donna Lucia's funeral parlor in Bridgeport. The strike is in progress. Donna Lucia has called {{user}} (a Hecata) directly because Maria's normal succession would have meant calling Maria, and Maria is dead. Or — alternative configuration — Sol has called {{user}} (any sect) because Sol's contingency network is activating to extract Hecata operatives from the burning building.</text:span></text:p>
      <text:p text:style-name="Preformatted_20_Text"><text:span text:style-name="T4"/></text:p>
      <text:p text:style-name="P1"><text:span text:style-name="Source_20_Text"><text:span text:style-name="T2">therapist_couch_adaeze.json</text:span></text:span></text:p>
      <text:p text:style-name="Preformatted_20_Text"><text:span text:style-name="T4"/></text:p>
      <text:p text:style-name="Preformatted_20_Text"><text:span text:style-name="Strong_20_Emphasis"><text:span text:style-name="T4">Vibe:</text:span></text:span><text:span text:style-name="T4"> {{user}} has been seeing a therapist for three months — not a Kindred therapist, a regular clinical psychologist, a beta-male in a tasteful Lakeview practice who has been helping {{user}} navigate post-Embrace adjustment under the conceit that {{user}}'s "condition" is a chronic illness affecting sleep, diet, and social functioning. Tonight, in the third month of weekly sessions, the therapist breaks the conceit. He is Kindred. He is Adaeze Achebe. He has known what {{user}} is from session one. He has decided, tonight, to tell {{user}} the truth about why he has been seeing them.</text:span></text:p>
      <text:p text:style-name="Preformatted_20_Text"><text:span text:style-name="T4"/></text:p>
      <text:p text:style-name="P1"><text:span text:style-name="Source_20_Text"><text:span text:style-name="T2">beckoned_prince.json</text:span></text:span></text:p>
      <text:p text:style-name="Preformatted_20_Text"><text:span text:style-name="T4"/></text:p>
      <text:p text:style-name="Preformatted_20_Text"><text:span text:style-name="Strong_20_Emphasis"><text:span text:style-name="T4">Vibe:</text:span></text:span><text:span text:style-name="T4"> Cordelia has summoned {{user}} to her brownstone at 3 AM. The summons was unusual — handwritten note delivered by Beatrix in person, no advance notice, the words "I require you tonight" in Cordelia's hand. {{user}} arrives. Cordelia is alone. She tells {{user}}: Prince Maxwell has succumbed to the Beckoning. He left Chicago tonight. The city does not yet know. The Camarilla domain is, as of right now, headless. Cordelia has been, since 11 PM, the de facto authority. She has summoned {{user}} because she needs help making one decision before dawn.</text:span></text:p>
      <text:p text:style-name="Preformatted_20_Text"><text:span text:style-name="T4"/></text:p>
      <text:p text:style-name="P1"><text:span text:style-name="Source_20_Text"><text:span text:style-name="T2">methuselah_arrives.json</text:span></text:span></text:p>
      <text:p text:style-name="Preformatted_20_Text"><text:span text:style-name="T4"/></text:p>
      <text:p text:style-name="Preformatted_20_Text"><text:span text:style-name="Strong_20_Emphasis"><text:span text:style-name="T4">Vibe:</text:span></text:span><text:span text:style-name="T4"> Ambrogia Giovanni — Donna Lucia's elder sister and sire, 457-year-old Hecata methuselah-track elder — has arrived in Chicago. She is in the temporary Hecata haven in Pilsen (the funeral parlor was destroyed in the Twilight Operation). Donna Lucia has summoned {{user}} for the formal introduction. {{user}}'s standing in the global Hecata family for the next century will be set by Ambrogia's assessment in the next two hours.</text:span></text:p>
      <text:p text:style-name="Preformatted_20_Text"><text:span text:style-name="T4"/></text:p>
      <text:p text:style-name="Preformatted_20_Text"><text:span text:style-name="T4"/></text:p>
      <text:p text:style-name="Preformatted_20_Text"><text:span text:style-name="T4"/></text:p>
      <text:p text:style-name="Preformatted_20_Text"><text:span text:style-name="T4"/></text:p>
      <text:p text:style-name="Preformatted_20_Text"><text:span text:style-name="T4"/></text:p>
      <text:p text:style-name="Preformatted_20_Text"><text:soft-page-break/><text:span text:style-name="T4"/></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Scenario</text:p>
            </table:table-cell>
            <table:table-cell table:style-name="Table1.A1" office:value-type="string">
              <text:p text:style-name="Table_20_Heading">Connects To</text:p>
            </table:table-cell>
            <table:table-cell table:style-name="Table1.A1" office:value-type="string">
              <text:p text:style-name="Table_20_Heading">Stakes</text:p>
            </table:table-cell>
          </table:table-row>
        </table:table-header-rows>
        <table:table-row>
          <table:table-cell table:style-name="Table1.A1" office:value-type="string">
            <text:p text:style-name="Table_20_Contents">6</text:p>
          </table:table-cell>
          <table:table-cell table:style-name="Table1.A1" office:value-type="string">
            <text:p text:style-name="Table_20_Contents">Lake Treaty Renewal</text:p>
          </table:table-cell>
          <table:table-cell table:style-name="Table1.A1" office:value-type="string">
            <text:p text:style-name="Table_20_Contents">Scenarios 1 &amp; 2</text:p>
          </table:table-cell>
          <table:table-cell table:style-name="Table1.A1" office:value-type="string">
            <text:p text:style-name="Table_20_Contents">Annual treaty terms; cross-sect relations</text:p>
          </table:table-cell>
        </table:table-row>
        <table:table-row>
          <table:table-cell table:style-name="Table1.A1" office:value-type="string">
            <text:p text:style-name="Table_20_Contents">7</text:p>
          </table:table-cell>
          <table:table-cell table:style-name="Table1.A1" office:value-type="string">
            <text:p text:style-name="Table_20_Contents">Twilight Operation</text:p>
          </table:table-cell>
          <table:table-cell table:style-name="Table1.A1" office:value-type="string">
            <text:p text:style-name="Table_20_Contents">Scenarios 2 &amp; 5</text:p>
          </table:table-cell>
          <table:table-cell table:style-name="Table1.A1" office:value-type="string">
            <text:p text:style-name="Table_20_Contents">Lives, the wraith-archive, the building, the truce</text:p>
          </table:table-cell>
        </table:table-row>
        <table:table-row>
          <table:table-cell table:style-name="Table1.A1" office:value-type="string">
            <text:p text:style-name="Table_20_Contents">8</text:p>
          </table:table-cell>
          <table:table-cell table:style-name="Table1.A1" office:value-type="string">
            <text:p text:style-name="Table_20_Contents">The Therapist's Couch</text:p>
          </table:table-cell>
          <table:table-cell table:style-name="Table1.A1" office:value-type="string">
            <text:p text:style-name="Table_20_Contents">Scenario 3</text:p>
          </table:table-cell>
          <table:table-cell table:style-name="Table1.A1" office:value-type="string">
            <text:p text:style-name="Table_20_Contents">Adaeze-Helen reveal; clinical relationship reframing</text:p>
          </table:table-cell>
        </table:table-row>
        <table:table-row>
          <table:table-cell table:style-name="Table1.A1" office:value-type="string">
            <text:p text:style-name="Table_20_Contents">9</text:p>
          </table:table-cell>
          <table:table-cell table:style-name="Table1.A1" office:value-type="string">
            <text:p text:style-name="Table_20_Contents">The Beckoned Prince</text:p>
          </table:table-cell>
          <table:table-cell table:style-name="Table1.A1" office:value-type="string">
            <text:p text:style-name="Table_20_Contents">Scenario 1</text:p>
          </table:table-cell>
          <table:table-cell table:style-name="Table1.A1" office:value-type="string">
            <text:p text:style-name="Table_20_Contents">Camarilla Praxis; Cordelia's trust; city's decade</text:p>
          </table:table-cell>
        </table:table-row>
        <table:table-row>
          <table:table-cell table:style-name="Table1.A1" office:value-type="string">
            <text:p text:style-name="Table_20_Contents">10</text:p>
          </table:table-cell>
          <table:table-cell table:style-name="Table1.A1" office:value-type="string">
            <text:p text:style-name="Table_20_Contents">The Methuselah Arrives</text:p>
          </table:table-cell>
          <table:table-cell table:style-name="Table1.A1" office:value-type="string">
            <text:p text:style-name="Table_20_Contents">Scenarios 5 &amp; 7</text:p>
          </table:table-cell>
          <table:table-cell table:style-name="Table1.A1" office:value-type="string">
            <text:p text:style-name="Table_20_Contents">{{user}}'s standing in global Hecata for a century</text:p>
          </table:table-cell>
        </table:table-row>
      </table:table>
      <text:p text:style-name="Text_20_body"><text:span text:style-name="Strong_20_Emphasis"><text:span text:style-name="T4"/></text:span></text:p>
      <text:p text:style-name="Text_20_body"><text:span text:style-name="Strong_20_Emphasis"><text:span text:style-name="T4">Chronicle continuity arc — playing in this order:</text:span></text:span></text:p>
      <text:list text:style-name="L1">
        <text:list-item>
          <text:p text:style-name="P4"><text:span text:style-name="Strong_20_Emphasis">Choose your faction</text:span> through Scenario 1 (Cordelia, Camarilla) OR Scenario 2 (Sol, Anarch) OR Scenario 5 (Donna Lucia, Hecata). </text:p>
        </text:list-item>
        <text:list-item>
          <text:p text:style-name="P4"><text:span text:style-name="Strong_20_Emphasis">Establish a mortal anchor</text:span> through Scenario 3 (Helen) OR Scenario 4 (Imogen). </text:p>
        </text:list-item>
        <text:list-item>
          <text:p text:style-name="P4"><text:span text:style-name="Strong_20_Emphasis">Engage cross-sect politics</text:span> through Scenario 6 (Lake Treaty Renewal) — requires faction loyalty established. </text:p>
        </text:list-item>
        <text:list-item>
          <text:p text:style-name="P4"><text:span text:style-name="Strong_20_Emphasis">Survive the chronicle's first crisis</text:span> through Scenario 7 (Twilight Operation) — requires Hecata or contingency-network involvement. </text:p>
        </text:list-item>
        <text:list-item>
          <text:p text:style-name="P4"><text:span text:style-name="Strong_20_Emphasis">Discover the chronicle's hidden plot</text:span> through Scenario 8 (Therapist's Couch) IF the Helen scenario is in continuity. </text:p>
        </text:list-item>
        <text:list-item>
          <text:p text:style-name="P4"><text:span text:style-name="Strong_20_Emphasis">Navigate succession crisis</text:span> through Scenario 9 (Beckoned Prince) — requires Cordelia relationship. </text:p>
        </text:list-item>
        <text:list-item>
          <text:p text:style-name="P3"><text:span text:style-name="Strong_20_Emphasis">Climactic assessment</text:span> through Scenario 10 (Methuselah) — requires Hecata family role accepted. </text:p>
        </text:list-item>
      </text:list>
      <text:p text:style-name="Text_20_body">The five new scenarios + the original five form a connected Chicago chronicle of approximately 10-15 sessions. Every named character connects. Every choice ripples.</text:p>
      <text:p text:style-name="Preformatted_20_Text"><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08:40:47.659267522</dc:date>
    <meta:editing-duration>PT11M48S</meta:editing-duration>
    <meta:editing-cycles>1</meta:editing-cycles>
    <meta:document-statistic meta:table-count="1" meta:image-count="0" meta:object-count="0" meta:page-count="2" meta:paragraph-count="44" meta:word-count="638" meta:character-count="4231" meta:non-whitespace-character-count="3625"/>
    <meta:generator>LibreOffice/24.2.7.2$Linux_X86_64 LibreOffice_project/420$Build-2</meta:generator>
  </office:meta>
</office:document-meta>
</file>