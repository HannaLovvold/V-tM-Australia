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233cm"/>
    </style:style>
    <style:style style:name="Table1.B" style:family="table-column">
      <style:table-column-properties style:column-width="12.767cm"/>
    </style:style>
    <style:style style:name="Table1.A1" style:family="table-cell">
      <style:table-cell-properties style:vertical-align="middle" fo:padding="0.049cm" fo:border="none"/>
    </style:style>
    <style:style style:name="P1" style:family="paragraph" style:parent-style-name="Heading_20_3">
      <style:text-properties style:font-name="Liberation Serif" fo:font-size="12pt" officeooo:rsid="00053212" officeooo:paragraph-rsid="00053212" style:font-size-asian="12pt" style:font-size-complex="12pt"/>
    </style:style>
    <style:style style:name="P2" style:family="paragraph" style:parent-style-name="Preformatted_20_Text">
      <style:text-properties style:font-name="Liberation Serif" fo:font-size="12pt" officeooo:rsid="00053212" officeooo:paragraph-rsid="00053212" style:font-size-asian="12pt" style:font-size-complex="12pt"/>
    </style:style>
    <style:style style:name="P3" style:family="paragraph" style:parent-style-name="Text_20_body">
      <style:text-properties style:font-name="Liberation Serif" fo:font-size="12pt" officeooo:rsid="00053212" officeooo:paragraph-rsid="00053212" style:font-size-asian="12pt" style:font-size-complex="12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oteries are V:tM's distinctive social unit — small groups of Kindred bound by shared interest, mutual protection, or fate. The single-protagonist character lacks the texture of a coterie; chronicles run with coteries have different rhythms, different stakes, and different politics. This module provides the template for building coteries plus six pre-built ones for plug-and-play deployment.</text:p>
      <text:p text:style-name="Text_20_body"><text:span text:style-name="Strong_20_Emphasis">Design principle:</text:span> A coterie is a relationship, not a roster. The template treats coterie composition as secondary to coterie dynamics — what binds them, what divides them, what they do together that none could do alone. Pre-built coteries each have an internal tension that drives play, not just a list of competent operators.</text:p>
      <text:p text:style-name="Preformatted_20_Text">For building a coterie of 3-6 Kindred to operate as either {{user}}'s coterie (player-led) or as an NPC faction encountered in chronicle.</text:p>
      <text:p text:style-name="Preformatted_20_Text"/>
      <text:p text:style-name="Preformatted_20_Tex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terie Design Principles</text:p>
      <text:p text:style-name="P2"/>
      <text:h text:style-name="P1" text:outline-level="3"><text:span text:style-name="Strong_20_Emphasis">The 3/6 rule</text:span></text:h>
      <text:p text:style-name="Text_20_body">Coteries below three members aren't coteries — they're partnerships, which have different dynamics. Coteries above six members aren't coteries — they're factions or gangs, which need formal hierarchy rather than informal binding. The 3-6 sweet spot is the range where every member can have a distinct role and every member's voice matters in coterie decisions.</text:p>
      <text:h text:style-name="Heading_20_3" text:outline-level="3"><text:span text:style-name="Strong_20_Emphasis">The binding question is the only question that matters</text:span></text:h>
      <text:p text:style-name="Text_20_body">A coterie without binding is a list of competent NPCs in approximately the same place. The binding is the central design question. If you cannot articulate why these specific Kindred stay together when one of them could leave at any time, the coterie isn't a coterie yet — it's a roster. Go back to the binding question.</text:p>
      <text:h text:style-name="Heading_20_3" text:outline-level="3"><text:span text:style-name="Strong_20_Emphasis">Internal tension is mandatory</text:span></text:h>
      <text:p text:style-name="Text_20_body">Coteries without internal tension are inert. Real coteries argue, disagree, work through resentments, fail to resolve old grievances. The internal tension is what produces chronicle drama — it's what makes a coterie scene different from a single-NPC scene. Specify the tension explicitly. If you cannot, the coterie hasn't been built yet.</text:p>
      <text:h text:style-name="Heading_20_3" text:outline-level="3"><text:span text:style-name="Strong_20_Emphasis">Roles, not classes</text:span></text:h>
      <text:p text:style-name="Text_20_body">D&amp;D-style "we need a tank, a healer, a face" thinking will produce mechanically functional coteries that feel hollow. Better: think about what each member CONTRIBUTES to the coterie's specific operation. The Diablerists' Roman is "the architect" — that's a coterie-internal role, not a generic class. The Pilsen Insurgents' Theo is "the true believer" — also coterie-specific. Roles emerge from the coterie's purpose, not from a generic kit.</text:p>
      <text:h text:style-name="Heading_20_3" text:outline-level="3"><text:span text:style-name="Strong_20_Emphasis">External relationships create plot fuel</text:span></text:h>
      <text:p text:style-name="Text_20_body">The coterie's allies, rivals, and enemies are not flavor — they're plot engines. Specify them. What the coterie's enemies know vs. suspect vs. don't know is particularly important; this gates how plot reveals happen.</text:p>
      <text:h text:style-name="Heading_20_3" text:outline-level="3"><text:span text:style-name="Strong_20_Emphasis">Trajectory matters</text:span></text:h>
      <text:p text:style-name="Text_20_body">A coterie that is stable forever produces no plot. A coterie heading toward fracture, exposure, victory, or transformation produces continuous plot. Specify the trajectory. Players (or AI as DM-equivalent) can intervene to redirect it, but the default trajectory should be specified before play starts.</text:p>
      <text:h text:style-name="Heading_20_3" text:outline-level="3"><text:span text:style-name="Strong_20_Emphasis">The coterie is not the sum of its members</text:span></text:h>
      <text:p text:style-name="Text_20_body">Building a coterie member-by-member without thinking about the whole produces disjointed groups. Build the coterie's binding, purpose, internal tension, and trajectory FIRST, then build members who fit those parameters. This is the inverse of how D&amp;D parties typically form, and it's correct for V:tM.</text:p>
      <text:p text:style-name="P2"><text:soft-page-break/>Six Pre-built Coteries</text:p>
      <text:p text:style-name="P2"/>
      <text:p text:style-name="P3">Six coteries representing different factions, sect alignments, and chronicle uses. Each is fully built using the template. Three are antagonist coteries (drawing from the Antagonist NPC Pack); three are allies, neutrals, or potential player coteries.</text:p>
      <text:p text:style-name="Horizontal_20_Line"/>
      <text:h text:style-name="Heading_20_3" text:outline-level="3"><text:span text:style-name="Strong_20_Emphasis">Coterie 1: The Astor Street Five</text:span> — <text:span text:style-name="Emphasis">Cordelia's Hand</text:span></text:h>
      <text:p text:style-name="Text_20_body"><text:span text:style-name="Strong_20_Emphasis">Camarilla. Allied to {{user}} if Camarilla-aligned. Cordelia's most trusted instrument.</text:span></text:p>
      <text:h text:style-name="P1" text:outline-level="3"><text:span text:style-name="Strong_20_Emphasis">Coterie 2: The Bridgeport Six</text:span> — <text:span text:style-name="Emphasis">Donna Lucia's Inner Circle</text:span></text:h>
      <text:p text:style-name="Text_20_body"><text:span text:style-name="Strong_20_Emphasis">Hecata. Family-internal. The senior cousins of the Giovanni-Costa branch.</text:span></text:p>
      <text:h text:style-name="P1" text:outline-level="3"><text:span text:style-name="Strong_20_Emphasis">Coterie 3: The Pilsen Lieutenants</text:span> — <text:span text:style-name="Emphasis">Sol's Operational Team</text:span></text:h>
      <text:p text:style-name="Text_20_body"><text:span text:style-name="Strong_20_Emphasis">Anarch. Sol Vega-Chen's most trusted lieutenants. The operational team that runs Pilsen day-to-day.</text:span></text:p>
      <text:h text:style-name="P1" text:outline-level="3"><text:span text:style-name="Strong_20_Emphasis">Coterie 4: The Diablerists</text:span> — <text:span text:style-name="Emphasis">Hidden Camarilla Antagonist</text:span></text:h>
      <text:p text:style-name="Text_20_body"><text:span text:style-name="Strong_20_Emphasis">Camarilla. The hidden antagonist coterie from the Antagonist NPC Pack. Now built fully as coterie with internal dynamics.</text:span></text:p>
      <text:h text:style-name="P1" text:outline-level="3"><text:span text:style-name="Strong_20_Emphasis">Coterie 5: The Pilsen Insurgents</text:span> — <text:span text:style-name="Emphasis">Hidden Anarch Antagonist</text:span></text:h>
      <text:p text:style-name="Text_20_body"><text:span text:style-name="Strong_20_Emphasis">Anarch. The Anarch radical splinter from the Antagonist NPC Pack, fully built as coterie.</text:span></text:p>
      <text:h text:style-name="P1" text:outline-level="3"><text:span text:style-name="Strong_20_Emphasis">Coterie 6: The Vienna Refugees</text:span> — <text:span text:style-name="Emphasis">Tremere Survivors</text:span></text:h>
      <text:p text:style-name="Text_20_body"><text:span text:style-name="Strong_20_Emphasis">Camarilla / Tremere. Survivors of the Vienna Chantry's destruction. Transient, scarred, looking for a new hom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3"><text:soft-page-break/><text:span text:style-name="Strong_20_Emphasis">Distribution principles</text:span></text:h>
      <text:p text:style-name="Text_20_body">Don't deploy all six coteries in a single chronicle. Distribution by chronicle type:</text:p>
      <table:table table:name="Table1" table:style-name="Table1">
        <table:table-column table:style-name="Table1.A"/>
        <table:table-column table:style-name="Table1.B"/>
        <table:table-header-rows>
          <table:table-row>
            <table:table-cell table:style-name="Table1.A1" office:value-type="string">
              <text:p text:style-name="Table_20_Heading">Chronicle Type</text:p>
            </table:table-cell>
            <table:table-cell table:style-name="Table1.A1" office:value-type="string">
              <text:p text:style-name="Table_20_Heading">Recommended Coteries</text:p>
            </table:table-cell>
          </table:table-row>
        </table:table-header-rows>
        <table:table-row>
          <table:table-cell table:style-name="Table1.A1" office:value-type="string">
            <text:p text:style-name="Table_20_Contents">Camarilla court chronicle</text:p>
          </table:table-cell>
          <table:table-cell table:style-name="Table1.A1" office:value-type="string">
            <text:p text:style-name="Table_20_Contents">Astor Street Five (ally), Diablerists (hidden antagonist), Vienna Refugees (resource)</text:p>
          </table:table-cell>
        </table:table-row>
        <table:table-row>
          <table:table-cell table:style-name="Table1.A1" office:value-type="string">
            <text:p text:style-name="Table_20_Contents">Anarch movement chronicle</text:p>
          </table:table-cell>
          <table:table-cell table:style-name="Table1.A1" office:value-type="string">
            <text:p text:style-name="Table_20_Contents">Pilsen Lieutenants (ally), Pilsen Insurgents (hidden antagonist), one outside coterie for context</text:p>
          </table:table-cell>
        </table:table-row>
        <table:table-row>
          <table:table-cell table:style-name="Table1.A1" office:value-type="string">
            <text:p text:style-name="Table_20_Contents">Hecata family chronicle</text:p>
          </table:table-cell>
          <table:table-cell table:style-name="Table1.A1" office:value-type="string">
            <text:p text:style-name="Table_20_Contents">Bridgeport Six (central), Astor Street Five (ally), one outside coterie</text:p>
          </table:table-cell>
        </table:table-row>
        <table:table-row>
          <table:table-cell table:style-name="Table1.A1" office:value-type="string">
            <text:p text:style-name="Table_20_Contents">Cross-sect chronicle</text:p>
          </table:table-cell>
          <table:table-cell table:style-name="Table1.A1" office:value-type="string">
            <text:p text:style-name="Table_20_Contents">All three primary coteries (Astor Street, Bridgeport, Pilsen) plus one antagonist</text:p>
          </table:table-cell>
        </table:table-row>
        <table:table-row>
          <table:table-cell table:style-name="Table1.A1" office:value-type="string">
            <text:p text:style-name="Table_20_Contents">{{user}}-led chronicle</text:p>
          </table:table-cell>
          <table:table-cell table:style-name="Table1.A1" office:value-type="string">
            <text:p text:style-name="Table_20_Contents">{{user}}'s own custom coterie + 2-3 NPC coteries as allies/rivals/antagonists</text:p>
          </table:table-cell>
        </table:table-row>
      </table:table>
      <text:h text:style-name="Heading_20_3" text:outline-level="3"><text:span text:style-name="Strong_20_Emphasis">Coterie-as-relationship</text:span></text:h>
      <text:p text:style-name="Text_20_body">The coteries are designed to interact with each other, not just with {{user}}. The Astor Street Five works with the Bridgeport Six through Mara-and-Augusto. The Pilsen Lieutenants work with both via Lukas-and-Augusto cross-sect channels. The Diablerists' Cassia is a member of the Astor Street Five too. The Pilsen Insurgents threaten the Pilsen Lieutenants from inside Anarch territory. These cross-coterie relationships are the chronicle's political geography.</text:p>
      <text:h text:style-name="Heading_20_3" text:outline-level="3"><text:span text:style-name="Strong_20_Emphasis">Chronicle pacing through coteries</text:span></text:h>
      <text:p text:style-name="Text_20_body">Coteries provide chronicle pacing in ways individual NPCs cannot:</text:p>
      <text:list text:style-name="L1">
        <text:list-item>
          <text:p text:style-name="P5"><text:span text:style-name="Strong_20_Emphasis">Stable phase:</text:span> Coteries operate as background context; {{user}} interacts with individuals </text:p>
        </text:list-item>
        <text:list-item>
          <text:p text:style-name="P5"><text:span text:style-name="Strong_20_Emphasis">Tension phase:</text:span> Coterie internal disputes surface; {{user}} can be drawn into cross-coterie politics </text:p>
        </text:list-item>
        <text:list-item>
          <text:p text:style-name="P5"><text:span text:style-name="Strong_20_Emphasis">Crisis phase:</text:span> A coterie fractures, gets exposed, or commits a major action that reshapes the chronicle </text:p>
        </text:list-item>
        <text:list-item>
          <text:p text:style-name="P4"><text:span text:style-name="Strong_20_Emphasis">Resolution phase:</text:span> New coterie configurations emerge from the crisis </text:p>
        </text:list-item>
      </text:list>
      <text:p text:style-name="Text_20_body">A long-arc chronicle moves through these phases for multiple coteries in parallel. The Astor Street Five's Cassia secret is a slow-burn approach to crisis. The Pilsen Insurgents' 2026 operation is a faster-build crisis. The Vienna Refugees' placement question is a stable-decision-point. Layered together, these provide chronicle texture that no single antagonist can match.</text:p>
      <text:h text:style-name="Heading_20_3" text:outline-level="3"><text:span text:style-name="Strong_20_Emphasis">The {{user}}-coterie path</text:span></text:h>
      <text:p text:style-name="Text_20_body">If {{user}} is leading their own coterie (rather than playing as auxiliary to an existing one), build the coterie using the template in Part 1 with these special considerations:</text:p>
      <text:list text:style-name="L2">
        <text:list-item>
          <text:p text:style-name="P7"><text:span text:style-name="Strong_20_Emphasis">{{user}} is one member of 3-6, not the leader by default.</text:span> Even if {{user}} is mechanically the strongest, the coterie's binding should mean other members have voice and agency. </text:p>
        </text:list-item>
        <text:list-item>
          <text:p text:style-name="P7"><text:span text:style-name="Strong_20_Emphasis">Other coterie members should be Tier 2 NPCs with their own arcs</text:span>, not props for {{user}}'s narrative. </text:p>
        </text:list-item>
        <text:list-item>
          <text:p text:style-name="P7"><text:span text:style-name="Strong_20_Emphasis">The coterie's binding determines the chronicle's central register.</text:span> A trauma-bonded coterie produces different stories than a commercial coterie. </text:p>
        </text:list-item>
        <text:list-item>
          <text:p text:style-name="P6"><text:soft-page-break/><text:span text:style-name="Strong_20_Emphasis">Position the coterie among the existing Chicago coteries.</text:span> Are they allied to the Astor Street Five? Independent? Rivals to the Pilsen Lieutenants? The position shapes what plots they can engage with. </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9:40:16.757411941</dc:date>
    <meta:editing-duration>PT4S</meta:editing-duration>
    <meta:editing-cycles>1</meta:editing-cycles>
    <meta:document-statistic meta:table-count="1" meta:image-count="0" meta:object-count="0" meta:page-count="5" meta:paragraph-count="61" meta:word-count="1077" meta:character-count="7375" meta:non-whitespace-character-count="6344"/>
    <meta:generator>LibreOffice/24.2.7.2$Linux_X86_64 LibreOffice_project/420$Build-2</meta:generator>
  </office:meta>
</office:document-meta>
</file>